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0.993cm" fo:min-width="1.406cm" fo:padding-top="0.15cm" fo:padding-bottom="0.15cm" fo:padding-left="0.275cm" fo:padding-right="0.275cm" draw:shadow="visible" draw:shadow-offset-x="0.051cm" draw:shadow-offset-y="-0.051cm" draw:shadow-color="#6a99d0" loext:decorative="false"/>
      <style:paragraph-properties style:writing-mode="lr-tb"/>
    </style:style>
    <style:style style:name="gr2" style:family="graphic" style:parent-style-name="standard">
      <style:graphic-properties svg:stroke-width="0.051cm" svg:stroke-color="#6a99d0" draw:marker-start="" draw:marker-start-width="0.381cm" draw:marker-end="" draw:marker-end-width="0.381cm" draw:fill="solid" draw:fill-color="#ffffff" draw:textarea-vertical-align="middle" fo:padding-top="0.15cm" fo:padding-bottom="0.15cm" fo:padding-left="0.275cm" fo:padding-right="0.27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 draw:shadow-offset-x="0.051cm" draw:shadow-offset-y="-0.051cm" draw:shadow-color="#6a99d0" loext:shadow-blur="0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6.495cm" fo:min-width="12.145cm" fo:padding-top="0.15cm" fo:padding-bottom="0.15cm" fo:padding-left="0.275cm" fo:padding-right="0.275cm" draw:shadow="visible" draw:shadow-offset-x="0.051cm" draw:shadow-offset-y="-0.051cm" draw:shadow-color="#6a99d0" loext:decorative="false"/>
    </style:style>
    <style:style style:name="gr6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395cm" fo:min-width="12.195cm" fo:padding-top="0.15cm" fo:padding-bottom="0.15cm" fo:padding-left="0.275cm" fo:padding-right="0.275cm" draw:shadow="hidden" draw:shadow-offset-x="0.051cm" draw:shadow-offset-y="-0.051cm" draw:shadow-color="#6a99d0" loext:decorative="false"/>
      <style:paragraph-properties style:writing-mode="lr-tb"/>
    </style:style>
    <style:style style:name="gr7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448cm" fo:min-width="12.195cm" fo:padding-top="0.15cm" fo:padding-bottom="0.15cm" fo:padding-left="0.275cm" fo:padding-right="0.275cm" draw:shadow="hidden" draw:shadow-offset-x="0.051cm" draw:shadow-offset-y="-0.051cm" draw:shadow-color="#6a99d0" loext:decorative="false"/>
      <style:paragraph-properties style:writing-mode="lr-tb"/>
    </style:style>
    <style:style style:name="gr8" style:family="graphic" style:parent-style-name="standard">
      <style:graphic-properties svg:stroke-width="0.051cm" svg:stroke-color="#6a99d0" draw:marker-start-width="0.279cm" draw:marker-end-width="0.279cm" draw:fill="solid" draw:fill-color="#bdd7ee" draw:textarea-horizontal-align="right" draw:textarea-vertical-align="top" draw:auto-grow-height="false" fo:min-height="7.393cm" fo:min-width="4.604cm" fo:padding-top="0.151cm" fo:padding-bottom="0.151cm" fo:padding-left="0.276cm" fo:padding-right="0.276cm" draw:shadow="visible" draw:shadow-offset-x="0.051cm" draw:shadow-offset-y="-0.051cm" draw:shadow-color="#6a99d0" loext:decorative="false"/>
      <style:paragraph-properties style:writing-mode="lr-tb"/>
    </style:style>
    <style:style style:name="gr9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652cm" fo:min-width="2.531cm" fo:padding-top="0.15cm" fo:padding-bottom="0.15cm" fo:padding-left="0.275cm" fo:padding-right="0.275cm" loext:decorative="false"/>
      <style:paragraph-properties style:writing-mode="lr-tb"/>
    </style:style>
    <style:style style:name="gr10" style:family="graphic" style:parent-style-name="standard">
      <style:graphic-properties svg:stroke-width="0.051cm" svg:stroke-color="#6a99d0" draw:marker-start="Arrowheads_20_1" draw:marker-start-width="0.381cm" draw:marker-end="Arrowheads_20_2" draw:marker-end-width="0.381cm" draw:fill="solid" draw:fill-color="#ffffff" draw:textarea-vertical-align="middle" fo:padding-top="0.15cm" fo:padding-bottom="0.15cm" fo:padding-left="0.275cm" fo:padding-right="0.275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2" style:family="graphic" style:parent-style-name="standard">
      <style:graphic-properties svg:stroke-width="0.051cm" svg:stroke-color="#6a99d0" draw:marker-start-width="0.279cm" draw:marker-end-width="0.279cm" draw:fill="solid" draw:fill-color="#bdd7ee" draw:textarea-horizontal-align="right" draw:textarea-vertical-align="top" draw:auto-grow-height="false" fo:min-height="7.291cm" fo:min-width="4.502cm" fo:padding-top="0.151cm" fo:padding-bottom="0.151cm" fo:padding-left="0.276cm" fo:padding-right="0.276cm" draw:shadow="visible" draw:shadow-offset-x="0.051cm" draw:shadow-offset-y="-0.051cm" draw:shadow-color="#6a99d0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cm" fo:min-width="0cm" loext:decorative="false"/>
      <style:paragraph-properties style:writing-mode="lr-tb"/>
    </style:style>
    <style:style style:name="gr14" style:family="graphic" style:parent-style-name="standard">
      <style:graphic-properties svg:stroke-width="0.051cm" svg:stroke-color="#6a99d0" draw:marker-start-width="0.279cm" draw:marker-end-width="0.279cm" draw:fill="solid" draw:fill-color="#bdd7ee" draw:textarea-horizontal-align="right" draw:textarea-vertical-align="top" draw:auto-grow-height="false" fo:min-height="9.831cm" fo:min-width="7.143cm" fo:padding-top="0.151cm" fo:padding-bottom="0.151cm" fo:padding-left="0.276cm" fo:padding-right="0.276cm" draw:shadow="visible" draw:shadow-offset-x="0.051cm" draw:shadow-offset-y="-0.051cm" draw:shadow-color="#6a99d0" loext:decorative="false"/>
      <style:paragraph-properties style:writing-mode="lr-tb"/>
    </style:style>
    <style:style style:name="gr15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0.993cm" fo:min-width="1.406cm" fo:padding-top="0.15cm" fo:padding-bottom="0.15cm" fo:padding-left="0.275cm" fo:padding-right="0.275cm" loext:decorative="false"/>
      <style:paragraph-properties style:writing-mode="lr-tb"/>
    </style:style>
    <style:style style:name="gr16" style:family="graphic" style:parent-style-name="standard">
      <style:graphic-properties svg:stroke-width="0.051cm" svg:stroke-color="#6a99d0" draw:marker-start-width="0.279cm" draw:marker-end-width="0.279cm" draw:fill="solid" draw:fill-color="#bdd7ee" draw:textarea-horizontal-align="right" draw:textarea-vertical-align="top" draw:auto-grow-height="false" fo:min-height="10.074cm" fo:min-width="7.143cm" fo:padding-top="0.151cm" fo:padding-bottom="0.151cm" fo:padding-left="0.276cm" fo:padding-right="0.276cm" draw:shadow="visible" draw:shadow-offset-x="0.051cm" draw:shadow-offset-y="-0.051cm" draw:shadow-color="#6a99d0" loext:decorative="false"/>
      <style:paragraph-properties style:writing-mode="lr-tb"/>
    </style:style>
    <style:style style:name="gr17" style:family="graphic" style:parent-style-name="standard">
      <style:graphic-properties svg:stroke-color="#6a99d0" draw:fill="solid" draw:fill-color="#ffffff" draw:textarea-horizontal-align="justify" draw:textarea-vertical-align="middle" draw:auto-grow-height="false" fo:min-height="0.64cm" fo:min-width="1.635cm" draw:shadow="visible" draw:shadow-offset-x="0.051cm" draw:shadow-offset-y="-0.051cm" draw:shadow-color="#6a99d0" loext:shadow-blur="0cm" loext:decorative="false"/>
      <style:paragraph-properties style:writing-mode="lr-tb"/>
    </style:style>
    <style:style style:name="gr18" style:family="graphic" style:parent-style-name="standard">
      <style:graphic-properties svg:stroke-color="#6a99d0" draw:fill="solid" draw:fill-color="#ffffff" draw:textarea-horizontal-align="justify" draw:textarea-vertical-align="middle" draw:auto-grow-height="false" fo:min-height="0.64cm" fo:min-width="3.324cm" draw:shadow="visible" draw:shadow-offset-x="0.051cm" draw:shadow-offset-y="-0.051cm" draw:shadow-color="#6a99d0" loext:shadow-blur="0cm" loext:decorative="false"/>
      <style:paragraph-properties style:writing-mode="lr-tb"/>
    </style:style>
    <style:style style:name="gr19" style:family="graphic" style:parent-style-name="standard">
      <style:graphic-properties svg:stroke-color="#6a99d0" draw:fill="solid" draw:fill-color="#ffffff" draw:textarea-horizontal-align="justify" draw:textarea-vertical-align="middle" draw:auto-grow-height="false" fo:min-height="0.64cm" fo:min-width="4.27cm" draw:shadow="visible" draw:shadow-offset-x="0.051cm" draw:shadow-offset-y="-0.051cm" draw:shadow-color="#6a99d0" loext:shadow-blur="0cm" loext:decorative="false"/>
      <style:paragraph-properties style:writing-mode="lr-tb"/>
    </style:style>
    <style:style style:name="gr20" style:family="graphic" style:parent-style-name="objectwithoutfill">
      <style:graphic-properties svg:stroke-width="0.025cm" svg:stroke-color="#6a99d0" draw:marker-start-width="0.229cm" draw:marker-end-width="0.229cm" draw:fill="none" draw:fill-color="#ffffff" draw:textarea-vertical-align="middle" fo:padding-top="0.137cm" fo:padding-bottom="0.137cm" fo:padding-left="0.262cm" fo:padding-right="0.262cm" draw:shadow="hidden" draw:shadow-offset-x="0.051cm" draw:shadow-offset-y="-0.051cm" draw:shadow-color="#6a99d0" loext:shadow-blur="0cm" loext:decorative="false"/>
    </style:style>
    <style:style style:name="gr21" style:family="graphic" style:parent-style-name="standard">
      <style:graphic-properties svg:stroke-color="#6a99d0" draw:fill="solid" draw:fill-color="#ffffff" draw:textarea-horizontal-align="justify" draw:textarea-vertical-align="middle" draw:auto-grow-height="false" fo:min-height="0.64cm" fo:min-width="6.036cm" draw:shadow="visible" draw:shadow-offset-x="0.051cm" draw:shadow-offset-y="-0.051cm" draw:shadow-color="#6a99d0" loext:shadow-blur="0cm" loext:decorative="false"/>
      <style:paragraph-properties style:writing-mode="lr-tb"/>
    </style:style>
    <style:style style:name="gr22" style:family="graphic" style:parent-style-name="standard">
      <style:graphic-properties svg:stroke-width="0.051cm" svg:stroke-color="#6a99d0" draw:marker-start-width="0.279cm" draw:marker-end-width="0.279cm" draw:fill="solid" draw:fill-color="#bdd7ee" draw:textarea-horizontal-align="left" draw:textarea-vertical-align="top" draw:auto-grow-height="false" fo:min-height="10.074cm" fo:min-width="7.143cm" fo:padding-top="0.151cm" fo:padding-bottom="0.151cm" fo:padding-left="0.276cm" fo:padding-right="0.276cm" draw:shadow="visible" draw:shadow-offset-x="0.051cm" draw:shadow-offset-y="-0.051cm" draw:shadow-color="#6a99d0" loext:decorative="false"/>
      <style:paragraph-properties style:writing-mode="lr-tb"/>
    </style:style>
    <style:style style:name="gr23" style:family="graphic" style:parent-style-name="objectwithoutfill">
      <style:graphic-properties svg:stroke-width="0.102cm" svg:stroke-color="#6a99d0" draw:marker-start-width="0.356cm" draw:marker-end="Arrowheads_20_3" draw:marker-end-width="0.457cm" draw:fill="none" draw:fill-color="#ffffff" draw:textarea-vertical-align="middle" fo:padding-top="0.176cm" fo:padding-bottom="0.176cm" fo:padding-left="0.301cm" fo:padding-right="0.301cm" draw:shadow="hidden" draw:shadow-offset-x="0.051cm" draw:shadow-offset-y="-0.051cm" draw:shadow-color="#6a99d0" loext:shadow-blur="0cm" loext:decorative="false"/>
    </style:style>
    <style:style style:name="gr24" style:family="graphic" style:parent-style-name="objectwithoutfill">
      <style:graphic-properties svg:stroke-width="0.102cm" svg:stroke-color="#6a99d0" draw:marker-start="Arrowheads_20_4" draw:marker-start-width="0.356cm" draw:marker-end="" draw:marker-end-width="0.457cm" draw:fill="none" draw:fill-color="#ffffff" draw:textarea-vertical-align="middle" fo:padding-top="0.176cm" fo:padding-bottom="0.176cm" fo:padding-left="0.301cm" fo:padding-right="0.301cm" draw:shadow="hidden" draw:shadow-offset-x="0.051cm" draw:shadow-offset-y="-0.051cm" draw:shadow-color="#6a99d0" loext:shadow-blur="0cm" loext:decorative="false"/>
    </style:style>
    <style:style style:name="gr25" style:family="graphic" style:parent-style-name="objectwithoutfill">
      <style:graphic-properties svg:stroke-width="0.102cm" svg:stroke-color="#6a99d0" draw:marker-start="Arrowheads_20_5" draw:marker-start-width="0.356cm" draw:marker-end="" draw:marker-end-width="0.457cm" draw:fill="none" draw:fill-color="#ffffff" draw:textarea-vertical-align="middle" fo:padding-top="0.176cm" fo:padding-bottom="0.176cm" fo:padding-left="0.301cm" fo:padding-right="0.301cm" draw:shadow="hidden" draw:shadow-offset-x="0.051cm" draw:shadow-offset-y="-0.051cm" draw:shadow-color="#6a99d0" loext:shadow-blur="0cm" loext:decorative="false"/>
    </style:style>
    <style:style style:name="gr26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6.495cm" fo:min-width="12.195cm" fo:padding-top="0.15cm" fo:padding-bottom="0.15cm" fo:padding-left="0.275cm" fo:padding-right="0.275cm" draw:shadow="visible" draw:shadow-offset-x="0.051cm" draw:shadow-offset-y="-0.051cm" draw:shadow-color="#6a99d0" loext:decorative="false"/>
    </style:style>
    <style:style style:name="gr27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395cm" fo:min-width="5.816cm" fo:padding-top="0.15cm" fo:padding-bottom="0.15cm" fo:padding-left="0.275cm" fo:padding-right="0.275cm" draw:shadow="hidden" draw:shadow-offset-x="0.051cm" draw:shadow-offset-y="-0.051cm" draw:shadow-color="#6a99d0" loext:decorative="false"/>
      <style:paragraph-properties style:writing-mode="lr-tb"/>
    </style:style>
    <style:style style:name="gr28" style:family="graphic" style:parent-style-name="standard">
      <style:graphic-properties svg:stroke-width="0.051cm" svg:stroke-color="#6a99d0" draw:marker-start-width="0.279cm" draw:marker-end-width="0.279cm" draw:fill="solid" draw:fill-color="#bdd7ee" draw:textarea-horizontal-align="justify" draw:textarea-vertical-align="top" draw:auto-grow-height="false" fo:min-height="3.15cm" fo:min-width="12.245cm" fo:padding-top="0.15cm" fo:padding-bottom="0.15cm" fo:padding-left="0.275cm" fo:padding-right="0.275cm" draw:shadow="hidden" draw:shadow-offset-x="0.051cm" draw:shadow-offset-y="-0.051cm" draw:shadow-color="#6a99d0" loext:shadow-blur="0cm" loext:decorative="false"/>
      <style:paragraph-properties style:writing-mode="lr-tb"/>
    </style:style>
    <style:style style:name="gr29" style:family="graphic" style:parent-style-name="standard">
      <style:graphic-properties svg:stroke-width="0.254cm" svg:stroke-color="#ffffff" draw:marker-start-width="0.584cm" draw:marker-end-width="0.584cm" svg:stroke-linecap="round" draw:fill="solid" draw:fill-color="#ffffff" draw:textarea-vertical-align="middle" fo:padding-top="0.252cm" fo:padding-bottom="0.252cm" fo:padding-left="0.377cm" fo:padding-right="0.377cm" draw:shadow="hidden" draw:shadow-offset-x="0.051cm" draw:shadow-offset-y="-0.051cm" draw:shadow-color="#6a99d0" loext:shadow-blur="0cm" loext:decorative="false"/>
    </style:style>
    <style:style style:name="gr30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3.295cm" fo:min-width="12.195cm" fo:padding-top="0.15cm" fo:padding-bottom="0.15cm" fo:padding-left="0.275cm" fo:padding-right="0.275cm" draw:shadow="visible" draw:shadow-offset-x="0.051cm" draw:shadow-offset-y="-0.051cm" draw:shadow-color="#6a99d0" loext:decorative="false"/>
    </style:style>
    <style:style style:name="gr31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395cm" fo:min-width="2.649cm" fo:padding-top="0.15cm" fo:padding-bottom="0.15cm" fo:padding-left="0.275cm" fo:padding-right="0.275cm" draw:shadow="hidden" draw:shadow-offset-x="0.051cm" draw:shadow-offset-y="-0.051cm" draw:shadow-color="#6a99d0" loext:decorative="false"/>
      <style:paragraph-properties style:writing-mode="lr-tb"/>
    </style:style>
    <style:style style:name="gr32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395cm" fo:min-width="5.848cm" fo:padding-top="0.15cm" fo:padding-bottom="0.15cm" fo:padding-left="0.275cm" fo:padding-right="0.275cm" draw:shadow="hidden" draw:shadow-offset-x="0.051cm" draw:shadow-offset-y="-0.051cm" draw:shadow-color="#6a99d0" loext:decorative="false"/>
      <style:paragraph-properties style:writing-mode="lr-tb"/>
    </style:style>
    <style:style style:name="gr33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395cm" fo:min-width="4.071cm" fo:padding-top="0.15cm" fo:padding-bottom="0.15cm" fo:padding-left="0.275cm" fo:padding-right="0.275cm" draw:shadow="hidden" draw:shadow-offset-x="0.051cm" draw:shadow-offset-y="-0.051cm" draw:shadow-color="#6a99d0" loext:decorative="false"/>
      <style:paragraph-properties style:writing-mode="lr-tb"/>
    </style:style>
    <style:style style:name="gr34" style:family="graphic" style:parent-style-name="standard">
      <style:graphic-properties svg:stroke-width="0.051cm" svg:stroke-color="#6a99d0" draw:marker-start-width="0.279cm" draw:marker-end-width="0.279cm" draw:fill="solid" draw:fill-color="#bdd7ee" draw:textarea-horizontal-align="justify" draw:textarea-vertical-align="top" draw:auto-grow-height="false" fo:min-height="3.1cm" fo:min-width="12.195cm" fo:padding-top="0.15cm" fo:padding-bottom="0.15cm" fo:padding-left="0.275cm" fo:padding-right="0.275cm" draw:shadow="hidden" draw:shadow-offset-x="0.051cm" draw:shadow-offset-y="-0.051cm" draw:shadow-color="#6a99d0" loext:shadow-blur="0cm" loext:decorative="false"/>
      <style:paragraph-properties style:writing-mode="lr-tb"/>
    </style:style>
    <style:style style:name="gr35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395cm" fo:min-width="2.65cm" fo:padding-top="0.15cm" fo:padding-bottom="0.15cm" fo:padding-left="0.275cm" fo:padding-right="0.275cm" draw:shadow="hidden" draw:shadow-offset-x="0.051cm" draw:shadow-offset-y="-0.051cm" draw:shadow-color="#6a99d0" loext:decorative="false"/>
      <style:paragraph-properties style:writing-mode="lr-tb"/>
    </style:style>
    <style:style style:name="gr36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395cm" fo:min-width="5.869cm" fo:padding-top="0.15cm" fo:padding-bottom="0.15cm" fo:padding-left="0.275cm" fo:padding-right="0.275cm" draw:shadow="hidden" draw:shadow-offset-x="0.051cm" draw:shadow-offset-y="-0.051cm" draw:shadow-color="#6a99d0" loext:decorative="false"/>
      <style:paragraph-properties style:writing-mode="lr-tb"/>
    </style:style>
    <style:style style:name="gr37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395cm" fo:min-width="8.914cm" fo:padding-top="0.15cm" fo:padding-bottom="0.15cm" fo:padding-left="0.275cm" fo:padding-right="0.275cm" draw:shadow="hidden" draw:shadow-offset-x="0.051cm" draw:shadow-offset-y="-0.051cm" draw:shadow-color="#6a99d0" loext:decorative="false"/>
      <style:paragraph-properties style:writing-mode="lr-tb"/>
    </style:style>
    <style:style style:name="gr38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395cm" fo:min-width="2.752cm" fo:padding-top="0.15cm" fo:padding-bottom="0.15cm" fo:padding-left="0.275cm" fo:padding-right="0.275cm" draw:shadow="hidden" draw:shadow-offset-x="0.051cm" draw:shadow-offset-y="-0.051cm" draw:shadow-color="#6a99d0" loext:decorative="false"/>
      <style:paragraph-properties style:writing-mode="lr-tb"/>
    </style:style>
    <style:style style:name="gr39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395cm" fo:min-width="2.597cm" fo:padding-top="0.15cm" fo:padding-bottom="0.15cm" fo:padding-left="0.275cm" fo:padding-right="0.275cm" draw:shadow="hidden" draw:shadow-offset-x="0.051cm" draw:shadow-offset-y="-0.051cm" draw:shadow-color="#6a99d0" loext:decorative="false"/>
      <style:paragraph-properties style:writing-mode="lr-tb"/>
    </style:style>
    <style:style style:name="gr40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395cm" fo:min-width="1.227cm" fo:padding-top="0.15cm" fo:padding-bottom="0.15cm" fo:padding-left="0.275cm" fo:padding-right="0.275cm" draw:shadow="hidden" draw:shadow-offset-x="0.051cm" draw:shadow-offset-y="-0.051cm" draw:shadow-color="#6a99d0" loext:decorative="false"/>
      <style:paragraph-properties style:writing-mode="lr-tb"/>
    </style:style>
    <style:style style:name="gr41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395cm" fo:min-width="1.064cm" fo:padding-top="0.15cm" fo:padding-bottom="0.15cm" fo:padding-left="0.275cm" fo:padding-right="0.275cm" draw:shadow="hidden" draw:shadow-offset-x="0.051cm" draw:shadow-offset-y="-0.051cm" draw:shadow-color="#6a99d0" loext:decorative="false"/>
      <style:paragraph-properties style:writing-mode="lr-tb"/>
    </style:style>
    <style:style style:name="gr42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395cm" fo:min-width="23.899cm" fo:padding-top="0.15cm" fo:padding-bottom="0.15cm" fo:padding-left="0.275cm" fo:padding-right="0.275cm" draw:shadow="visible" draw:shadow-offset-x="0.051cm" draw:shadow-offset-y="-0.051cm" draw:shadow-color="#6a99d0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3cm" fo:min-width="0cm" draw:shadow="hidden" draw:shadow-offset-x="0.051cm" draw:shadow-offset-y="-0.051cm" draw:shadow-color="#6a99d0" loext:shadow-blur="0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5cm" fo:min-width="0cm" draw:shadow="hidden" draw:shadow-offset-x="0.051cm" draw:shadow-offset-y="-0.051cm" draw:shadow-color="#6a99d0" loext:shadow-blur="0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0cm" draw:shadow="hidden" draw:shadow-offset-x="0.051cm" draw:shadow-offset-y="-0.051cm" draw:shadow-color="#6a99d0" loext:shadow-blur="0cm" loext:decorative="false"/>
      <style:paragraph-properties style:writing-mode="lr-tb"/>
    </style:style>
    <style:style style:name="gr46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395cm" fo:min-width="1.536cm" fo:padding-top="0.15cm" fo:padding-bottom="0.15cm" fo:padding-left="0.275cm" fo:padding-right="0.275cm" draw:shadow="hidden" draw:shadow-offset-x="0.051cm" draw:shadow-offset-y="-0.051cm" draw:shadow-color="#6a99d0" loext:decorative="false"/>
      <style:paragraph-properties style:writing-mode="lr-tb"/>
    </style:style>
    <style:style style:name="gr47" style:family="graphic" style:parent-style-name="standard">
      <style:graphic-properties svg:stroke-width="0.051cm" svg:stroke-color="#6a99d0" draw:marker-start-width="0.279cm" draw:marker-end-width="0.279cm" draw:fill="solid" draw:fill-color="#bdd7ee" draw:textarea-horizontal-align="justify" draw:textarea-vertical-align="middle" draw:auto-grow-height="false" fo:min-height="1.395cm" fo:min-width="4.944cm" fo:padding-top="0.15cm" fo:padding-bottom="0.15cm" fo:padding-left="0.275cm" fo:padding-right="0.275cm" draw:shadow="hidden" draw:shadow-offset-x="0.051cm" draw:shadow-offset-y="-0.051cm" draw:shadow-color="#6a99d0" loext:decorative="false"/>
      <style:paragraph-properties style:writing-mode="lr-tb"/>
    </style:style>
    <style:style style:name="gr48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395cm" fo:min-width="3.587cm" fo:padding-top="0.15cm" fo:padding-bottom="0.15cm" fo:padding-left="0.275cm" fo:padding-right="0.275cm" draw:shadow="hidden" draw:shadow-offset-x="0.051cm" draw:shadow-offset-y="-0.051cm" draw:shadow-color="#6a99d0" loext:decorative="false"/>
      <style:paragraph-properties style:writing-mode="lr-tb"/>
    </style:style>
    <style:style style:name="gr49" style:family="graphic">
      <style:graphic-properties loext:decorative="false"/>
    </style:style>
    <style:style style:name="gr50" style:family="graphic" style:parent-style-name="objectwithoutfill">
      <style:graphic-properties svg:stroke-width="0.152cm" svg:stroke-color="#ffffff" draw:marker-start-width="0.432cm" draw:marker-end-width="0.432cm" svg:stroke-linecap="round" draw:fill="none" draw:fill-color="#ffffff" draw:textarea-vertical-align="middle" fo:padding-top="0.201cm" fo:padding-bottom="0.201cm" fo:padding-left="0.326cm" fo:padding-right="0.326cm" draw:shadow="hidden" draw:shadow-offset-x="0.051cm" draw:shadow-offset-y="-0.051cm" draw:shadow-color="#6a99d0" loext:shadow-blur="0cm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text-align="center"/>
      <style:text-properties fo:font-size="16pt"/>
    </style:style>
    <style:style style:name="P2" style:family="paragraph">
      <loext:graphic-properties draw:fill="solid" draw:fill-color="#ffffff"/>
      <style:paragraph-properties fo:text-align="center"/>
      <style:text-properties style:font-name="Calibri" fo:font-size="16pt" style:font-size-asian="16pt" style:font-size-complex="16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text-align="end"/>
    </style:style>
    <style:style style:name="P10" style:family="paragraph">
      <loext:graphic-properties draw:fill="solid" draw:fill-color="#bdd7ee"/>
      <style:paragraph-properties fo:text-align="end"/>
      <style:text-properties style:font-name="Calibri" fo:font-size="16pt" style:font-size-asian="16pt" style:font-size-complex="16pt"/>
    </style:style>
    <style:style style:name="P11" style:family="paragraph">
      <style:text-properties fo:font-size="14pt" fo:font-style="italic" style:font-size-asian="14pt" style:font-style-asian="italic" style:font-size-complex="14pt" style:font-style-complex="italic"/>
    </style:style>
    <style:style style:name="P12" style:family="paragraph">
      <loext:graphic-properties draw:fill="none" draw:fill-color="#ffffff"/>
      <style:text-properties style:font-name="Calibri" fo:font-size="14pt" fo:font-style="italic" style:font-size-asian="14pt" style:font-style-asian="italic" style:font-size-complex="14pt" style:font-style-complex="italic"/>
    </style:style>
    <style:style style:name="P13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4" style:family="paragraph">
      <loext:graphic-properties draw:fill="none" draw:fill-color="#ffffff"/>
      <style:paragraph-properties fo:text-align="center"/>
      <style:text-properties style:font-name="Calibri" fo:font-size="14pt" fo:font-style="italic" style:font-size-asian="14pt" style:font-style-asian="italic" style:font-size-complex="14pt" style:font-style-complex="italic"/>
    </style:style>
    <style:style style:name="P15" style:family="paragraph">
      <style:paragraph-properties fo:text-align="center"/>
      <style:text-properties fo:font-size="15pt" style:font-size-asian="15pt" style:font-size-complex="15pt"/>
    </style:style>
    <style:style style:name="P16" style:family="paragraph">
      <loext:graphic-properties draw:fill="solid" draw:fill-color="#ffffff"/>
      <style:paragraph-properties fo:text-align="center"/>
      <style:text-properties style:font-name="Calibri" fo:font-size="15pt" style:font-size-asian="15pt" style:font-size-complex="15pt"/>
    </style:style>
    <style:style style:name="P17" style:family="paragraph"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style:paragraph-properties fo:text-align="start"/>
    </style:style>
    <style:style style:name="P21" style:family="paragraph">
      <style:paragraph-properties fo:text-align="center"/>
      <style:text-properties style:font-name="Calibri" fo:font-size="16pt"/>
    </style:style>
    <style:style style:name="P22" style:family="paragraph">
      <style:paragraph-properties fo:text-align="center"/>
      <style:text-properties style:font-name="Calibri" fo:font-size="16pt" style:font-size-asian="16pt" style:font-size-complex="16pt"/>
    </style:style>
    <style:style style:name="P23" style:family="paragraph">
      <loext:graphic-properties draw:fill="solid" draw:fill-color="#bdd7ee"/>
      <style:paragraph-properties fo:text-align="center"/>
      <style:text-properties style:font-name="Calibri" fo:font-size="16pt" style:font-size-asian="16pt" style:font-size-complex="16pt"/>
    </style:style>
    <style:style style:name="P24" style:family="paragraph">
      <style:text-properties style:font-name="Calibri" fo:font-size="14pt" style:font-size-asian="14pt" style:font-size-complex="14pt"/>
    </style:style>
    <style:style style:name="P25" style:family="paragraph">
      <loext:graphic-properties draw:fill="none" draw:fill-color="#ffffff"/>
      <style:text-properties style:font-name="Calibri" fo:font-size="14pt" style:font-size-asian="14pt" style:font-size-complex="14pt"/>
    </style:style>
    <style:style style:name="P26" style:family="paragraph">
      <style:paragraph-properties fo:text-align="center"/>
      <style:text-properties style:font-name="Calibri" fo:font-size="14pt" style:font-size-asian="14pt" style:font-size-complex="14pt"/>
    </style:style>
    <style:style style:name="P27" style:family="paragraph">
      <loext:graphic-properties draw:fill="solid" draw:fill-color="#ffffff"/>
      <style:paragraph-properties fo:text-align="center"/>
      <style:text-properties style:font-name="Calibri" fo:font-size="14pt" style:font-size-asian="14pt" style:font-size-complex="14pt"/>
    </style:style>
    <style:style style:name="P28" style:family="paragraph">
      <loext:graphic-properties draw:fill="none" draw:fill-color="#ffffff"/>
      <style:paragraph-properties fo:text-align="center"/>
      <style:text-properties style:font-name="Calibri" fo:font-size="14pt" style:font-size-asian="14pt" style:font-size-complex="14pt"/>
    </style:style>
    <style:style style:name="T1" style:family="text">
      <style:text-properties style:font-name="Calibri" fo:font-size="16pt" style:font-size-asian="16pt" style:font-size-complex="16pt"/>
    </style:style>
    <style:style style:name="T2" style:family="text">
      <style:text-properties style:text-position="sub 58%" style:font-name="Calibri" fo:font-size="16pt" style:font-size-asian="16pt" style:font-size-complex="16pt"/>
    </style:style>
    <style:style style:name="T3" style:family="text">
      <style:text-properties style:text-position="sub 58%" style:font-name="Calibri" fo:font-size="18pt" style:font-size-asian="18pt" style:font-size-complex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name="Calibri" fo:font-size="14pt" fo:font-style="italic" style:font-size-asian="14pt" style:font-style-asian="italic" style:font-size-complex="14pt" style:font-style-complex="italic"/>
    </style:style>
    <style:style style:name="T6" style:family="text">
      <style:text-properties style:font-name="Calibri" fo:font-size="15pt" style:font-size-asian="15pt" style:font-size-complex="15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Calibri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1.956cm" svg:height="1.293cm" svg:x="6.045cm" svg:y="11.341cm">
          <text:p text:style-name="P1"><text:span text:style-name="T1">NET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738cm" svg:y1="10.134cm" svg:x2="4.075cm" svg:y2="11.341cm">
          <text:p/>
        </draw:line>
        <draw:custom-shape draw:style-name="gr1" draw:text-style-name="P2" draw:layer="layout" svg:width="1.956cm" svg:height="1.293cm" svg:x="6.672cm" svg:y="8.841cm">
          <text:p text:style-name="P1"><text:span text:style-name="T1">I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56cm" svg:height="1.293cm" svg:x="3.672cm" svg:y="6.441cm">
          <text:p text:style-name="P1"><text:span text:style-name="T1">TC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56cm" svg:height="1.293cm" svg:x="2.206cm" svg:y="3.888cm">
          <text:p text:style-name="P1"><text:span text:style-name="T1">App</text:span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56cm" svg:height="1.293cm" svg:x="5.206cm" svg:y="3.888cm">
          <text:p text:style-name="P1"><text:span text:style-name="T1">App</text:span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56cm" svg:height="1.293cm" svg:x="11.188cm" svg:y="3.888cm">
          <text:p text:style-name="P1"><text:span text:style-name="T1">App</text:span><text:span text:style-name="T2">Z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56cm" svg:height="1.293cm" svg:x="9.672cm" svg:y="6.441cm">
          <text:p text:style-name="P1"><text:span text:style-name="T1">UDP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638cm" svg:y1="7.734cm" svg:x2="7.657cm" svg:y2="8.841cm">
          <text:p/>
        </draw:line>
        <draw:line draw:style-name="gr2" draw:text-style-name="P3" draw:layer="layout" svg:x1="4.594cm" svg:y1="7.734cm" svg:x2="7.657cm" svg:y2="8.841cm">
          <text:p/>
        </draw:line>
        <draw:line draw:style-name="gr2" draw:text-style-name="P3" draw:layer="layout" svg:x1="9.298cm" svg:y1="5.181cm" svg:x2="10.638cm" svg:y2="6.441cm">
          <text:p/>
        </draw:line>
        <draw:line draw:style-name="gr2" draw:text-style-name="P3" draw:layer="layout" svg:x1="6.235cm" svg:y1="5.181cm" svg:x2="4.594cm" svg:y2="6.441cm">
          <text:p/>
        </draw:line>
        <draw:line draw:style-name="gr2" draw:text-style-name="P3" draw:layer="layout" svg:x1="3.227cm" svg:y1="5.181cm" svg:x2="4.594cm" svg:y2="6.441cm">
          <text:p/>
        </draw:line>
        <draw:frame draw:style-name="gr3" draw:text-style-name="P5" draw:layer="layout" svg:width="0.962cm" svg:height="0.979cm" svg:x="7.299cm" svg:y="3.988cm">
          <draw:text-box>
            <text:p text:style-name="P4"><text:span text:style-name="T1">..</text:span>.</text:p>
          </draw:text-box>
        </draw:frame>
        <draw:custom-shape draw:style-name="gr1" draw:text-style-name="P2" draw:layer="layout" svg:width="1.956cm" svg:height="1.293cm" svg:x="3.006cm" svg:y="11.341cm">
          <text:p text:style-name="P1"><text:span text:style-name="T1">NET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56cm" svg:height="1.293cm" svg:x="10.288cm" svg:y="11.341cm">
          <text:p text:style-name="P1"><text:span text:style-name="T1">NET</text:span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56cm" svg:height="1.293cm" svg:x="8.269cm" svg:y="3.888cm">
          <text:p text:style-name="P1"><text:span text:style-name="T1">App</text:span><text:span text:style-name="T2">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197cm" svg:y1="5.181cm" svg:x2="10.638cm" svg:y2="6.441cm">
          <text:p/>
        </draw:line>
        <draw:line draw:style-name="gr2" draw:text-style-name="P3" draw:layer="layout" svg:x1="7.738cm" svg:y1="10.134cm" svg:x2="7.165cm" svg:y2="11.342cm">
          <text:p/>
        </draw:line>
        <draw:line draw:style-name="gr2" draw:text-style-name="P3" draw:layer="layout" svg:x1="7.575cm" svg:y1="10.135cm" svg:x2="11.322cm" svg:y2="11.341cm">
          <text:p/>
        </draw:line>
        <draw:frame draw:style-name="gr3" draw:text-style-name="P5" draw:layer="layout" svg:width="0.962cm" svg:height="0.979cm" svg:x="8.699cm" svg:y="11.489cm">
          <draw:text-box>
            <text:p text:style-name="P4"><text:span text:style-name="T1">..</text:span>.</text:p>
          </draw:text-box>
        </draw:frame>
        <presentation:notes draw:style-name="dp1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5" draw:text-style-name="P3" draw:layer="layout" svg:width="12.745cm" svg:height="6.795cm" svg:x="5.085cm" svg:y="2.6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2.745cm" svg:height="1.695cm" svg:x="5.085cm" svg:y="2.606cm">
          <text:p text:style-name="P7"><text:span text:style-name="T4">Application Programs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2.745cm" svg:height="1.748cm" svg:x="5.085cm" svg:y="4.253cm">
          <text:p text:style-name="P7"><text:span text:style-name="T4">Process-to-Process Channels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2.745cm" svg:height="1.748cm" svg:x="5.085cm" svg:y="5.953cm">
          <text:p text:style-name="P7"><text:span text:style-name="T4">Host-to-Host Message Delivery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2.745cm" svg:height="1.748cm" svg:x="5.085cm" svg:y="7.653cm">
          <text:p text:style-name="P7"><text:span text:style-name="T4">Network Hardwa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8" draw:text-style-name="P10" draw:layer="layout" svg:width="5.104cm" svg:height="7.643cm" svg:x="7.643cm" svg:y="2.587cm">
          <text:p text:style-name="P9"><text:span text:style-name="T1">Host 1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081cm" svg:height="1.952cm" svg:x="8.655cm" svg:y="3.881cm">
          <text:p text:style-name="P7"><text:span text:style-name="T1">High-Level</text:span></text:p>
          <text:p text:style-name="P7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081cm" svg:height="1.952cm" svg:x="8.655cm" svg:y="7.793cm">
          <text:p text:style-name="P7"><text:span text:style-name="T1">Protocol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0.184cm" svg:y1="5.833cm" svg:x2="10.207cm" svg:y2="7.793cm">
          <text:p/>
        </draw:line>
        <draw:frame draw:style-name="gr11" draw:text-style-name="P12" draw:layer="layout" svg:width="2.272cm" svg:height="1.453cm" svg:x="10.124cm" svg:y="6.133cm">
          <draw:text-box>
            <text:p text:style-name="P11"><text:span text:style-name="T5">Service</text:span></text:p>
            <text:p text:style-name="P11"><text:span text:style-name="T5">interface</text:span></text:p>
          </draw:text-box>
        </draw:frame>
        <draw:custom-shape draw:style-name="gr12" draw:text-style-name="P10" draw:layer="layout" svg:width="5.104cm" svg:height="7.643cm" svg:x="16.743cm" svg:y="2.587cm">
          <text:p text:style-name="P9"><text:span text:style-name="T1">Host 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081cm" svg:height="1.952cm" svg:x="17.755cm" svg:y="3.881cm">
          <text:p text:style-name="P7"><text:span text:style-name="T1">High-Level</text:span></text:p>
          <text:p text:style-name="P7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081cm" svg:height="1.952cm" svg:x="17.755cm" svg:y="7.793cm">
          <text:p text:style-name="P7"><text:span text:style-name="T1">Protocol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9.284cm" svg:y1="5.833cm" svg:x2="19.307cm" svg:y2="7.793cm">
          <text:p/>
        </draw:line>
        <draw:frame draw:style-name="gr11" draw:text-style-name="P12" draw:layer="layout" svg:width="2.272cm" svg:height="1.453cm" svg:x="19.224cm" svg:y="6.133cm">
          <draw:text-box>
            <text:p text:style-name="P11"><text:span text:style-name="T5">Service</text:span></text:p>
            <text:p text:style-name="P11"><text:span text:style-name="T5">interface</text:span></text:p>
          </draw:text-box>
        </draw:frame>
        <draw:line draw:style-name="gr10" draw:text-style-name="P3" draw:layer="layout" svg:x1="17.755cm" svg:y1="8.772cm" svg:x2="11.736cm" svg:y2="8.769cm">
          <text:p/>
        </draw:line>
        <draw:frame draw:style-name="gr13" draw:text-style-name="P14" draw:layer="layout" svg:width="2.996cm" svg:height="1.453cm" svg:x="13.232cm" svg:y="8.772cm">
          <draw:text-box>
            <text:p text:style-name="P13"><text:span text:style-name="T5">Peer-to-peer</text:span></text:p>
            <text:p text:style-name="P13"><text:span text:style-name="T5">interfac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14" draw:text-style-name="P10" draw:layer="layout" svg:width="7.695cm" svg:height="10.133cm" svg:x="3.878cm" svg:y="2.561cm">
          <text:p text:style-name="P9"><text:span text:style-name="T1">Host 1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56cm" svg:height="1.293cm" svg:x="6.747cm" svg:y="10.967cm">
          <text:p text:style-name="P7"><text:span text:style-name="T1">ET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713cm" svg:y1="9.96cm" svg:x2="7.713cm" svg:y2="10.967cm">
          <text:p/>
        </draw:line>
        <draw:custom-shape draw:style-name="gr15" draw:text-style-name="P2" draw:layer="layout" svg:width="1.956cm" svg:height="1.293cm" svg:x="6.747cm" svg:y="8.667cm">
          <text:p text:style-name="P7"><text:span text:style-name="T1">IP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56cm" svg:height="1.293cm" svg:x="5.247cm" svg:y="6.467cm">
          <text:p text:style-name="P7"><text:span text:style-name="T1">TCP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1.956cm" svg:height="1.293cm" svg:x="4.181cm" svg:y="4.141cm">
          <text:p text:style-name="P15"><text:span text:style-name="T6">HTTTP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56cm" svg:height="1.293cm" svg:x="6.381cm" svg:y="4.141cm">
          <text:p text:style-name="P7"><text:span text:style-name="T1">FTP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56cm" svg:height="1.293cm" svg:x="9.001cm" svg:y="4.141cm">
          <text:p text:style-name="P7"><text:span text:style-name="T1">TFTP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56cm" svg:height="1.293cm" svg:x="8.147cm" svg:y="6.467cm">
          <text:p text:style-name="P7"><text:span text:style-name="T1">UDP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165cm" svg:y1="7.76cm" svg:x2="7.674cm" svg:y2="8.667cm">
          <text:p/>
        </draw:line>
        <draw:line draw:style-name="gr2" draw:text-style-name="P3" draw:layer="layout" svg:x1="6.18cm" svg:y1="7.76cm" svg:x2="7.674cm" svg:y2="8.667cm">
          <text:p/>
        </draw:line>
        <draw:line draw:style-name="gr2" draw:text-style-name="P3" draw:layer="layout" svg:x1="9.945cm" svg:y1="5.434cm" svg:x2="9.143cm" svg:y2="6.467cm">
          <text:p/>
        </draw:line>
        <draw:line draw:style-name="gr2" draw:text-style-name="P3" draw:layer="layout" svg:x1="7.345cm" svg:y1="5.435cm" svg:x2="6.15cm" svg:y2="6.467cm">
          <text:p/>
        </draw:line>
        <draw:line draw:style-name="gr2" draw:text-style-name="P3" draw:layer="layout" svg:x1="5.134cm" svg:y1="5.434cm" svg:x2="6.15cm" svg:y2="6.467cm">
          <text:p/>
        </draw:line>
        <draw:custom-shape draw:style-name="gr14" draw:text-style-name="P10" draw:layer="layout" svg:width="7.695cm" svg:height="10.133cm" svg:x="15.103cm" svg:y="2.535cm">
          <text:p text:style-name="P9"><text:span text:style-name="T1">Host 2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56cm" svg:height="1.293cm" svg:x="17.972cm" svg:y="10.941cm">
          <text:p text:style-name="P7"><text:span text:style-name="T1">ET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8.938cm" svg:y1="9.934cm" svg:x2="18.938cm" svg:y2="10.941cm">
          <text:p/>
        </draw:line>
        <draw:custom-shape draw:style-name="gr15" draw:text-style-name="P2" draw:layer="layout" svg:width="1.956cm" svg:height="1.293cm" svg:x="17.972cm" svg:y="8.641cm">
          <text:p text:style-name="P7"><text:span text:style-name="T1">IP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56cm" svg:height="1.293cm" svg:x="16.472cm" svg:y="6.441cm">
          <text:p text:style-name="P7"><text:span text:style-name="T1">TCP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1.956cm" svg:height="1.293cm" svg:x="15.406cm" svg:y="4.115cm">
          <text:p text:style-name="P15"><text:span text:style-name="T6">HTTTP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56cm" svg:height="1.293cm" svg:x="17.606cm" svg:y="4.115cm">
          <text:p text:style-name="P7"><text:span text:style-name="T1">FTP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56cm" svg:height="1.293cm" svg:x="20.226cm" svg:y="4.115cm">
          <text:p text:style-name="P7"><text:span text:style-name="T1">TFTP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56cm" svg:height="1.293cm" svg:x="19.372cm" svg:y="6.441cm">
          <text:p text:style-name="P7"><text:span text:style-name="T1">UDP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0.39cm" svg:y1="7.734cm" svg:x2="18.899cm" svg:y2="8.641cm">
          <text:p/>
        </draw:line>
        <draw:line draw:style-name="gr2" draw:text-style-name="P3" draw:layer="layout" svg:x1="17.405cm" svg:y1="7.734cm" svg:x2="18.899cm" svg:y2="8.641cm">
          <text:p/>
        </draw:line>
        <draw:line draw:style-name="gr2" draw:text-style-name="P3" draw:layer="layout" svg:x1="21.17cm" svg:y1="5.408cm" svg:x2="20.368cm" svg:y2="6.441cm">
          <text:p/>
        </draw:line>
        <draw:line draw:style-name="gr2" draw:text-style-name="P3" draw:layer="layout" svg:x1="18.57cm" svg:y1="5.409cm" svg:x2="17.375cm" svg:y2="6.441cm">
          <text:p/>
        </draw:line>
        <draw:line draw:style-name="gr2" draw:text-style-name="P3" draw:layer="layout" svg:x1="16.359cm" svg:y1="5.408cm" svg:x2="17.375cm" svg:y2="6.441cm">
          <text:p/>
        </draw:line>
        <draw:line draw:style-name="gr10" draw:text-style-name="P3" draw:layer="layout" svg:x1="17.972cm" svg:y1="11.568cm" svg:x2="8.703cm" svg:y2="11.568cm">
          <text:p/>
        </draw:lin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16" draw:text-style-name="P10" draw:layer="layout" svg:width="7.695cm" svg:height="10.376cm" svg:x="2.503cm" svg:y="2.535cm">
          <text:p text:style-name="P9"><text:span text:style-name="T1">Host 1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56cm" svg:height="1.293cm" svg:x="3.42cm" svg:y="11.141cm">
          <text:p text:style-name="P7"><text:span text:style-name="T1">ETH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56cm" svg:height="1.293cm" svg:x="3.42cm" svg:y="3.438cm">
          <text:p text:style-name="P7"><text:span text:style-name="T1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4.414cm" svg:y1="4.731cm" svg:x2="4.362cm" svg:y2="11.141cm">
          <text:p/>
        </draw:line>
        <draw:custom-shape draw:style-name="gr17" draw:text-style-name="P18" draw:layer="layout" svg:width="2.135cm" svg:height="0.89cm" svg:x="6.29cm" svg:y="4.868cm">
          <text:p text:style-name="P17"><text:span text:style-name="T7">Data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56cm" svg:height="1.293cm" svg:x="3.42cm" svg:y="5.941cm">
          <text:p text:style-name="P7"><text:span text:style-name="T1">UDP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56cm" svg:height="1.293cm" svg:x="3.42cm" svg:y="8.441cm">
          <text:p text:style-name="P7"><text:span text:style-name="T1">IP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3.824cm" svg:height="0.89cm" svg:x="5.752cm" svg:y="7.478cm">
          <text:p text:style-name="P7"><text:span text:style-name="T7">UDP <text:s text:c="4"/>Data</text:span><text:span text:style-name="T4"> <text:s/>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.77cm" svg:height="0.89cm" svg:x="5.028cm" svg:y="10.026cm">
          <text:p text:style-name="P7"><text:span text:style-name="T7">IP <text:s text:c="2"/>UDP <text:s text:c="3"/>Data</text:span><text:span text:style-name="T4"> <text:s text:c="2"/></text:span></text:p>
          <draw:enhanced-geometry svg:viewBox="0 0 21600 21600" draw:type="rectangle" draw:enhanced-path="M 0 0 L 21600 0 21600 21600 0 21600 0 0 Z N"/>
        </draw:custom-shape>
        <draw:line draw:style-name="gr20" draw:text-style-name="P19" draw:layer="layout" svg:x1="7.383cm" svg:y1="7.478cm" svg:x2="7.383cm" svg:y2="8.368cm">
          <text:p/>
        </draw:line>
        <draw:line draw:style-name="gr20" draw:text-style-name="P19" draw:layer="layout" svg:x1="7.579cm" svg:y1="10.051cm" svg:x2="7.579cm" svg:y2="10.941cm">
          <text:p/>
        </draw:line>
        <draw:line draw:style-name="gr20" draw:text-style-name="P19" draw:layer="layout" svg:x1="6.079cm" svg:y1="10.051cm" svg:x2="6.079cm" svg:y2="10.941cm">
          <text:p/>
        </draw:line>
        <draw:custom-shape draw:style-name="gr21" draw:text-style-name="P8" draw:layer="layout" svg:width="6.536cm" svg:height="0.89cm" svg:x="10.551cm" svg:y="12.103cm">
          <text:p text:style-name="P7"><text:span text:style-name="T7">ETH <text:s text:c="2"/>IP <text:s text:c="4"/>UDP <text:s text:c="5"/>Data</text:span><text:span text:style-name="T4"> <text:s text:c="3"/></text:span></text:p>
          <draw:enhanced-geometry svg:viewBox="0 0 21600 21600" draw:type="rectangle" draw:enhanced-path="M 0 0 L 21600 0 21600 21600 0 21600 0 0 Z N"/>
        </draw:custom-shape>
        <draw:line draw:style-name="gr20" draw:text-style-name="P19" draw:layer="layout" svg:x1="14.768cm" svg:y1="12.128cm" svg:x2="14.768cm" svg:y2="13.018cm">
          <text:p/>
        </draw:line>
        <draw:line draw:style-name="gr20" draw:text-style-name="P19" draw:layer="layout" svg:x1="13.068cm" svg:y1="12.128cm" svg:x2="13.068cm" svg:y2="13.018cm">
          <text:p/>
        </draw:line>
        <draw:line draw:style-name="gr20" draw:text-style-name="P19" draw:layer="layout" svg:x1="11.968cm" svg:y1="12.128cm" svg:x2="11.968cm" svg:y2="13.018cm">
          <text:p/>
        </draw:line>
        <draw:custom-shape draw:style-name="gr22" draw:text-style-name="P10" draw:layer="layout" svg:width="7.695cm" svg:height="10.376cm" svg:x="17.628cm" svg:y="2.51cm">
          <text:p text:style-name="P20"><text:span text:style-name="T1">Host 2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56cm" svg:height="1.293cm" svg:x="22.445cm" svg:y="11.116cm">
          <text:p text:style-name="P7"><text:span text:style-name="T1">ETH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56cm" svg:height="1.293cm" svg:x="22.445cm" svg:y="3.413cm">
          <text:p text:style-name="P7"><text:span text:style-name="T1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3.439cm" svg:y1="4.706cm" svg:x2="23.387cm" svg:y2="11.116cm">
          <text:p/>
        </draw:line>
        <draw:custom-shape draw:style-name="gr15" draw:text-style-name="P2" draw:layer="layout" svg:width="1.956cm" svg:height="1.293cm" svg:x="22.445cm" svg:y="5.916cm">
          <text:p text:style-name="P7"><text:span text:style-name="T1">UDP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56cm" svg:height="1.293cm" svg:x="22.445cm" svg:y="8.416cm">
          <text:p text:style-name="P7"><text:span text:style-name="T1">IP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445cm" svg:y1="11.696cm" svg:x2="5.376cm" svg:y2="11.791cm">
          <text:p/>
        </draw:line>
        <draw:line draw:style-name="gr23" draw:text-style-name="P19" draw:layer="layout" svg:x1="7.278cm" svg:y1="5.976cm" svg:x2="7.278cm" svg:y2="7.183cm">
          <text:p/>
        </draw:line>
        <draw:line draw:style-name="gr23" draw:text-style-name="P19" draw:layer="layout" svg:x1="7.278cm" svg:y1="8.651cm" svg:x2="7.278cm" svg:y2="9.858cm">
          <text:p/>
        </draw:line>
        <draw:custom-shape draw:style-name="gr17" draw:text-style-name="P18" draw:layer="layout" svg:width="2.135cm" svg:height="0.89cm" svg:x="19.216cm" svg:y="4.849cm">
          <text:p text:style-name="P17"><text:span text:style-name="T7">Data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3.824cm" svg:height="0.89cm" svg:x="18.678cm" svg:y="7.459cm">
          <text:p text:style-name="P7"><text:span text:style-name="T7">UDP <text:s text:c="4"/>Data</text:span><text:span text:style-name="T4"> <text:s/>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.77cm" svg:height="0.89cm" svg:x="17.954cm" svg:y="10.007cm">
          <text:p text:style-name="P7"><text:span text:style-name="T7">IP <text:s text:c="2"/>UDP <text:s text:c="3"/>Data</text:span><text:span text:style-name="T4"> <text:s text:c="2"/></text:span></text:p>
          <draw:enhanced-geometry svg:viewBox="0 0 21600 21600" draw:type="rectangle" draw:enhanced-path="M 0 0 L 21600 0 21600 21600 0 21600 0 0 Z N"/>
        </draw:custom-shape>
        <draw:line draw:style-name="gr20" draw:text-style-name="P19" draw:layer="layout" svg:x1="20.309cm" svg:y1="7.459cm" svg:x2="20.309cm" svg:y2="8.349cm">
          <text:p/>
        </draw:line>
        <draw:line draw:style-name="gr20" draw:text-style-name="P19" draw:layer="layout" svg:x1="20.505cm" svg:y1="10.032cm" svg:x2="20.505cm" svg:y2="10.922cm">
          <text:p/>
        </draw:line>
        <draw:line draw:style-name="gr20" draw:text-style-name="P19" draw:layer="layout" svg:x1="19.005cm" svg:y1="10.032cm" svg:x2="19.005cm" svg:y2="10.922cm">
          <text:p/>
        </draw:line>
        <draw:line draw:style-name="gr24" draw:text-style-name="P19" draw:layer="layout" svg:x1="20.204cm" svg:y1="5.957cm" svg:x2="20.204cm" svg:y2="7.164cm">
          <text:p/>
        </draw:line>
        <draw:line draw:style-name="gr25" draw:text-style-name="P19" draw:layer="layout" svg:x1="20.204cm" svg:y1="8.632cm" svg:x2="20.204cm" svg:y2="9.839cm">
          <text:p/>
        </draw:line>
        <draw:line draw:style-name="gr23" draw:text-style-name="P19" draw:layer="layout" svg:x1="12.441cm" svg:y1="13.381cm" svg:x2="14.746cm" svg:y2="13.381cm">
          <text:p/>
        </draw:lin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26" draw:text-style-name="P3" draw:layer="layout" svg:width="12.745cm" svg:height="6.795cm" svg:x="5.085cm" svg:y="2.6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6.366cm" svg:height="1.695cm" svg:x="5.085cm" svg:y="2.606cm">
          <text:p text:style-name="P21"><text:span text:style-name="T1">SrcPort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6.366cm" svg:height="1.695cm" svg:x="11.485cm" svg:y="2.606cm">
          <text:p text:style-name="P21"><text:span text:style-name="T1">DstPort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6.366cm" svg:height="1.695cm" svg:x="5.085cm" svg:y="4.306cm">
          <text:p text:style-name="P21"><text:span text:style-name="T1">Length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6.366cm" svg:height="1.695cm" svg:x="11.485cm" svg:y="4.306cm">
          <text:p text:style-name="P21"><text:span text:style-name="T1">Checksum</text:span></text:p>
          <draw:enhanced-geometry svg:viewBox="0 0 21600 21600" draw:type="rectangle" draw:enhanced-path="M 0 0 L 21600 0 21600 21600 0 21600 0 0 Z N"/>
        </draw:custom-shape>
        <draw:custom-shape draw:style-name="gr28" draw:text-style-name="P23" draw:layer="layout" svg:width="12.745cm" svg:height="3.4cm" svg:x="5.085cm" svg:y="6.001cm">
          <text:p text:style-name="P22"><text:span text:style-name="T1">Data</text:span></text:p>
          <draw:enhanced-geometry svg:viewBox="0 0 21600 21600" draw:type="rectangle" draw:enhanced-path="M 0 0 L 21600 0 21600 21600 0 21600 0 0 Z N"/>
        </draw:custom-shape>
        <draw:line draw:style-name="gr29" draw:text-style-name="P3" draw:layer="layout" svg:x1="5.059cm" svg:y1="8.27cm" svg:x2="7.597cm" svg:y2="7.659cm">
          <text:p/>
        </draw:line>
        <draw:line draw:style-name="gr29" draw:text-style-name="P3" draw:layer="layout" svg:x1="9.959cm" svg:y1="8.271cm" svg:x2="12.653cm" svg:y2="7.542cm">
          <text:p/>
        </draw:line>
        <draw:line draw:style-name="gr29" draw:text-style-name="P3" draw:layer="layout" svg:x1="15.264cm" svg:y1="8.272cm" svg:x2="18.016cm" svg:y2="7.456cm">
          <text:p/>
        </draw:line>
        <draw:line draw:style-name="gr29" draw:text-style-name="P3" draw:layer="layout" svg:x1="7.597cm" svg:y1="7.659cm" svg:x2="9.959cm" svg:y2="8.271cm">
          <text:p/>
        </draw:line>
        <draw:line draw:style-name="gr29" draw:text-style-name="P3" draw:layer="layout" svg:x1="12.653cm" svg:y1="7.542cm" svg:x2="15.264cm" svg:y2="8.272cm">
          <text:p/>
        </draw:line>
        <draw:frame draw:style-name="gr3" draw:text-style-name="P25" draw:layer="layout" svg:width="0.753cm" svg:height="0.852cm" svg:x="4.868cm" svg:y="1.84cm">
          <draw:text-box>
            <text:p text:style-name="P24">0</text:p>
          </draw:text-box>
        </draw:frame>
        <draw:frame draw:style-name="gr3" draw:text-style-name="P25" draw:layer="layout" svg:width="1.004cm" svg:height="0.852cm" svg:x="11.269cm" svg:y="1.84cm">
          <draw:text-box>
            <text:p text:style-name="P24">16</text:p>
          </draw:text-box>
        </draw:frame>
        <draw:frame draw:style-name="gr3" draw:text-style-name="P25" draw:layer="layout" svg:width="1.004cm" svg:height="0.852cm" svg:x="17.069cm" svg:y="1.84cm">
          <draw:text-box>
            <text:p text:style-name="P24">31</text:p>
          </draw:text-box>
        </draw:frame>
        <presentation:notes draw:style-name="dp1">
          <draw:page-thumbnail draw:style-name="gr4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30" draw:text-style-name="P3" draw:layer="layout" svg:width="12.745cm" svg:height="13.595cm" svg:x="5.085cm" svg:y="1.30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.199cm" svg:height="1.695cm" svg:x="8.341cm" svg:y="1.306cm">
          <text:p text:style-name="P21"><text:span text:style-name="T1">TOS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6.398cm" svg:height="1.695cm" svg:x="11.432cm" svg:y="1.306cm">
          <text:p text:style-name="P21"><text:span text:style-name="T1">Leng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6.366cm" svg:height="1.695cm" svg:x="5.085cm" svg:y="3.006cm">
          <text:p text:style-name="P21"><text:span text:style-name="T1">Ident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4.621cm" svg:height="1.695cm" svg:x="13.209cm" svg:y="3.011cm">
          <text:p text:style-name="P21"><text:span text:style-name="T1">Offset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12.745cm" svg:height="3.4cm" svg:x="5.085cm" svg:y="11.501cm">
          <text:p text:style-name="P22"><text:span text:style-name="T1">Data</text:span></text:p>
          <draw:enhanced-geometry svg:viewBox="0 0 21600 21600" draw:type="rectangle" draw:enhanced-path="M 0 0 L 21600 0 21600 21600 0 21600 0 0 Z N"/>
        </draw:custom-shape>
        <draw:line draw:style-name="gr29" draw:text-style-name="P3" draw:layer="layout" svg:x1="5.059cm" svg:y1="13.57cm" svg:x2="7.597cm" svg:y2="12.959cm">
          <text:p/>
        </draw:line>
        <draw:line draw:style-name="gr29" draw:text-style-name="P3" draw:layer="layout" svg:x1="9.959cm" svg:y1="13.571cm" svg:x2="12.653cm" svg:y2="12.842cm">
          <text:p/>
        </draw:line>
        <draw:line draw:style-name="gr29" draw:text-style-name="P3" draw:layer="layout" svg:x1="15.264cm" svg:y1="13.572cm" svg:x2="18.016cm" svg:y2="12.756cm">
          <text:p/>
        </draw:line>
        <draw:line draw:style-name="gr29" draw:text-style-name="P3" draw:layer="layout" svg:x1="7.597cm" svg:y1="12.959cm" svg:x2="9.959cm" svg:y2="13.571cm">
          <text:p/>
        </draw:line>
        <draw:line draw:style-name="gr29" draw:text-style-name="P3" draw:layer="layout" svg:x1="12.653cm" svg:y1="12.842cm" svg:x2="15.264cm" svg:y2="13.572cm">
          <text:p/>
        </draw:line>
        <draw:frame draw:style-name="gr3" draw:text-style-name="P25" draw:layer="layout" svg:width="0.753cm" svg:height="0.852cm" svg:x="4.868cm" svg:y="0.54cm">
          <draw:text-box>
            <text:p text:style-name="P24">0</text:p>
          </draw:text-box>
        </draw:frame>
        <draw:frame draw:style-name="gr3" draw:text-style-name="P25" draw:layer="layout" svg:width="1.004cm" svg:height="0.852cm" svg:x="11.269cm" svg:y="0.54cm">
          <draw:text-box>
            <text:p text:style-name="P24">16</text:p>
          </draw:text-box>
        </draw:frame>
        <draw:frame draw:style-name="gr3" draw:text-style-name="P25" draw:layer="layout" svg:width="1.004cm" svg:height="0.852cm" svg:x="17.069cm" svg:y="0.54cm">
          <draw:text-box>
            <text:p text:style-name="P24">31</text:p>
          </draw:text-box>
        </draw:frame>
        <draw:custom-shape draw:style-name="gr35" draw:text-style-name="P2" draw:layer="layout" svg:width="3.2cm" svg:height="1.695cm" svg:x="5.085cm" svg:y="4.706cm">
          <text:p text:style-name="P21"><text:span text:style-name="T1">TTL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6.419cm" svg:height="1.695cm" svg:x="11.432cm" svg:y="4.706cm">
          <text:p text:style-name="P21"><text:span text:style-name="T1">Checksum</text:span>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9.464cm" svg:height="1.695cm" svg:x="5.085cm" svg:y="9.806cm">
          <text:p text:style-name="P22"><text:span text:style-name="T1">Options (variable)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3.302cm" svg:height="1.695cm" svg:x="14.549cm" svg:y="9.806cm">
          <text:p text:style-name="P22"><text:span text:style-name="T1">Pad</text:span></text:p>
          <text:p text:style-name="P22"><text:span text:style-name="T1">(variable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745cm" svg:height="1.695cm" svg:x="5.085cm" svg:y="8.106cm">
          <text:p text:style-name="P21"><text:span text:style-name="T1">DestinationAdd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745cm" svg:height="1.695cm" svg:x="5.085cm" svg:y="6.406cm">
          <text:p text:style-name="P21"><text:span text:style-name="T1">SourceAddr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3.147cm" svg:height="1.695cm" svg:x="8.285cm" svg:y="4.706cm">
          <text:p text:style-name="P21"><text:span text:style-name="T1">Protocol</text:span></text:p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1.777cm" svg:height="1.695cm" svg:x="11.432cm" svg:y="3.006cm">
          <text:p text:style-name="P21"><text:span text:style-name="T1">Flags</text:span></text:p>
          <draw:enhanced-geometry svg:viewBox="0 0 21600 21600" draw:type="rectangle" draw:enhanced-path="M 0 0 L 21600 0 21600 21600 0 21600 0 0 Z N"/>
        </draw:custom-shape>
        <draw:custom-shape draw:style-name="gr41" draw:text-style-name="P27" draw:layer="layout" svg:width="1.614cm" svg:height="1.695cm" svg:x="6.727cm" svg:y="1.306cm">
          <text:p text:style-name="P26"><text:span text:style-name="T8">HLen</text:span></text:p>
          <draw:enhanced-geometry svg:viewBox="0 0 21600 21600" draw:type="rectangle" draw:enhanced-path="M 0 0 L 21600 0 21600 21600 0 21600 0 0 Z N"/>
        </draw:custom-shape>
        <draw:frame draw:style-name="gr3" draw:text-style-name="P25" draw:layer="layout" svg:width="1.998cm" svg:height="0.852cm" svg:x="4.894cm" svg:y="1.751cm">
          <draw:text-box>
            <text:p text:style-name="P24">Version</text:p>
          </draw:text-box>
        </draw:frame>
        <draw:frame draw:style-name="gr3" draw:text-style-name="P25" draw:layer="layout" svg:width="0.753cm" svg:height="0.852cm" svg:x="6.569cm" svg:y="0.54cm">
          <draw:text-box>
            <text:p text:style-name="P24">4</text:p>
          </draw:text-box>
        </draw:frame>
        <draw:frame draw:style-name="gr3" draw:text-style-name="P25" draw:layer="layout" svg:width="0.753cm" svg:height="0.852cm" svg:x="8.17cm" svg:y="0.54cm">
          <draw:text-box>
            <text:p text:style-name="P24">8</text:p>
          </draw:text-box>
        </draw:frame>
        <presentation:notes draw:style-name="dp1">
          <draw:page-thumbnail draw:style-name="gr4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42" draw:text-style-name="P3" draw:layer="layout" svg:width="24.449cm" svg:height="1.695cm" svg:x="1.585cm" svg:y="2.6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6.366cm" svg:height="1.695cm" svg:x="1.585cm" svg:y="2.606cm">
          <text:p text:style-name="P21"><text:span text:style-name="T1">SourceAddr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6.366cm" svg:height="1.695cm" svg:x="7.951cm" svg:y="2.606cm">
          <text:p text:style-name="P21"><text:span text:style-name="T1">DestinationAddr</text:span></text:p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1.219cm" svg:height="0.852cm" svg:x="4.268cm" svg:y="1.833cm">
          <draw:text-box>
            <text:p text:style-name="P24">48</text:p>
          </draw:text-box>
        </draw:frame>
        <draw:frame draw:style-name="gr44" draw:text-style-name="P25" draw:layer="layout" svg:width="1.004cm" svg:height="0.852cm" svg:x="10.569cm" svg:y="1.887cm">
          <draw:text-box>
            <text:p text:style-name="P24">48</text:p>
          </draw:text-box>
        </draw:frame>
        <draw:frame draw:style-name="gr45" draw:text-style-name="P25" draw:layer="layout" svg:width="1.004cm" svg:height="0.852cm" svg:x="14.869cm" svg:y="1.84cm">
          <draw:text-box>
            <text:p text:style-name="P24">16</text:p>
          </draw:text-box>
        </draw:frame>
        <draw:custom-shape draw:style-name="gr46" draw:text-style-name="P2" draw:layer="layout" svg:width="2.086cm" svg:height="1.695cm" svg:x="14.317cm" svg:y="2.606cm">
          <text:p text:style-name="P21"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5.494cm" svg:height="1.695cm" svg:x="16.403cm" svg:y="2.606cm">
          <text:p text:style-name="P21"><text:span text:style-name="T1">Body</text:span></text:p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4.137cm" svg:height="1.695cm" svg:x="21.897cm" svg:y="2.606cm">
          <text:p text:style-name="P21"><text:span text:style-name="T1">CRC</text:span></text:p>
          <draw:enhanced-geometry svg:viewBox="0 0 21600 21600" draw:type="rectangle" draw:enhanced-path="M 0 0 L 21600 0 21600 21600 0 21600 0 0 Z N"/>
        </draw:custom-shape>
        <draw:g draw:style-name="gr49">
          <draw:line draw:style-name="gr50" draw:text-style-name="P28" draw:layer="layout" svg:x1="20.921cm" svg:y1="2.407cm" svg:x2="20.483cm" svg:y2="3.452cm">
            <text:p/>
          </draw:line>
          <draw:line draw:style-name="gr50" draw:text-style-name="P28" draw:layer="layout" svg:x1="20.921cm" svg:y1="3.468cm" svg:x2="20.483cm" svg:y2="4.513cm">
            <text:p/>
          </draw:line>
          <draw:line draw:style-name="gr50" draw:text-style-name="P28" draw:layer="layout" svg:x1="20.921cm" svg:y1="3.452cm" svg:x2="20.483cm" svg:y2="3.452cm">
            <text:p/>
          </draw:line>
        </draw:g>
        <draw:frame draw:style-name="gr45" draw:text-style-name="P25" draw:layer="layout" svg:width="1.004cm" svg:height="0.852cm" svg:x="23.469cm" svg:y="1.84cm">
          <draw:text-box>
            <text:p text:style-name="P24">32</text:p>
          </draw:text-box>
        </draw:frame>
        <presentation:notes draw:style-name="dp1">
          <draw:page-thumbnail draw:style-name="gr4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5T15:00:22.541555000</meta:creation-date>
    <dc:date>2025-12-17T11:39:48.238055000</dc:date>
    <meta:editing-duration>PT21H46M34S</meta:editing-duration>
    <meta:editing-cycles>18</meta:editing-cycles>
    <meta:generator>LibreOffice/25.2.4.3$MacOSX_AARCH64 LibreOffice_project/33e196637044ead23f5c3226cde09b47731f7e27</meta:generator>
    <meta:print-date>2025-12-16T16:59:51.132733000</meta:print-date>
    <meta:printed-by>PDF files</meta:printed-by>
    <meta:document-statistic meta:object-count="192"/>
  </office:meta>
</office:document-meta>
</file>