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51cm" svg:stroke-color="#000000" draw:marker-start-width="0.279cm" draw:marker-end="Arrowheads_20_3" draw:marker-end-width="0.254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="Arrowheads_20_5" draw:marker-start-width="0.254cm" draw:marker-end="" draw:marker-end-width="0.381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8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2.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0.172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.152cm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alibri1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Calibri1"/>
    </style:style>
    <style:style style:name="P5" style:family="paragraph">
      <loext:graphic-properties draw:fill="none" draw:fill-color="#ffffff"/>
      <style:paragraph-properties fo:text-align="center"/>
      <style:text-properties style:font-name="Calibri1"/>
    </style:style>
    <style:style style:name="P6" style:family="paragraph">
      <loext:graphic-properties draw:fill="none" draw:fill-color="#ffffff"/>
      <style:text-properties style:font-name="Calibri1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line-height="50%"/>
    </style:style>
    <style:style style:name="P9" style:family="paragraph">
      <loext:graphic-properties draw:fill="none" draw:fill-color="#ffffff"/>
      <style:paragraph-properties fo:line-height="50%"/>
      <style:text-properties style:font-name="Calibri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alibri1" fo:font-size="14pt" style:font-size-asian="14pt" style:font-size-complex="14pt"/>
    </style:style>
    <style:style style:name="T2" style:family="text">
      <style:text-properties style:font-name="Calibri1" fo:font-size="6pt" style:font-size-asian="6pt" style:font-size-complex="6pt"/>
    </style:style>
    <style:style style:name="T3" style:family="text">
      <style:text-properties style:font-name="Calibri1"/>
    </style:style>
    <style:style style:name="T4" style:family="text">
      <style:text-properties style:font-name="Calibri1" fo:font-weight="bold" style:font-weight-asian="bold" style:font-weight-complex="bold"/>
    </style:style>
    <style:style style:name="T5" style:family="text">
      <style:text-properties style:font-name="Calibri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line draw:style-name="gr1" draw:text-style-name="P1" draw:layer="layout" svg:x1="7.645cm" svg:y1="1.872cm" svg:x2="7.613cm" svg:y2="13.873cm">
          <text:p/>
        </draw:line>
        <draw:line draw:style-name="gr1" draw:text-style-name="P1" draw:layer="layout" svg:x1="15.282cm" svg:y1="1.872cm" svg:x2="15.282cm" svg:y2="13.81cm">
          <text:p/>
        </draw:line>
        <draw:line draw:style-name="gr2" draw:text-style-name="P3" draw:layer="layout" svg:x1="7.682cm" svg:y1="2.632cm" svg:x2="15.301cm" svg:y2="3.619cm">
          <text:p text:style-name="P2"><text:span text:style-name="T1">Packet 0</text:span></text:p>
          <text:p text:style-name="P2"><text:span text:style-name="T2"/></text:p>
        </draw:line>
        <draw:line draw:style-name="gr3" draw:text-style-name="P3" draw:layer="layout" svg:x1="7.682cm" svg:y1="5.148cm" svg:x2="15.301cm" svg:y2="3.741cm">
          <text:p text:style-name="P2"><text:span text:style-name="T1">ACK 0</text:span></text:p>
          <text:p text:style-name="P2"><text:span text:style-name="T2"/></text:p>
        </draw:line>
        <draw:frame draw:style-name="gr4" draw:text-style-name="P4" draw:layer="layout" svg:width="2.314cm" svg:height="1.026cm" svg:x="6.635cm" svg:y="0.826cm">
          <draw:text-box>
            <text:p><text:span text:style-name="T3">Sender</text:span></text:p>
          </draw:text-box>
        </draw:frame>
        <draw:frame draw:style-name="gr5" draw:text-style-name="P5" draw:layer="layout" svg:width="2.7cm" svg:height="1.026cm" svg:x="13.881cm" svg:y="0.826cm">
          <draw:text-box>
            <text:p text:style-name="P2"><text:span text:style-name="T3">Receiver</text:span></text:p>
          </draw:text-box>
        </draw:frame>
        <draw:line draw:style-name="gr2" draw:text-style-name="P3" draw:layer="layout" svg:x1="7.683cm" svg:y1="5.245cm" svg:x2="15.302cm" svg:y2="6.232cm">
          <text:p text:style-name="P2"><text:span text:style-name="T1">Packet 1</text:span></text:p>
          <text:p text:style-name="P2"><text:span text:style-name="T2"/></text:p>
        </draw:line>
        <draw:line draw:style-name="gr3" draw:text-style-name="P3" draw:layer="layout" svg:x1="7.683cm" svg:y1="7.761cm" svg:x2="15.302cm" svg:y2="6.354cm">
          <text:p text:style-name="P2"><text:span text:style-name="T1">ACK 1</text:span></text:p>
          <text:p text:style-name="P2"><text:span text:style-name="T2"/></text:p>
        </draw:line>
        <draw:line draw:style-name="gr2" draw:text-style-name="P3" draw:layer="layout" svg:x1="7.683cm" svg:y1="7.886cm" svg:x2="15.302cm" svg:y2="8.873cm">
          <text:p text:style-name="P2"><text:span text:style-name="T1">Packet 0</text:span></text:p>
          <text:p text:style-name="P2"><text:span text:style-name="T2"/></text:p>
        </draw:line>
        <draw:line draw:style-name="gr3" draw:text-style-name="P3" draw:layer="layout" svg:x1="7.683cm" svg:y1="10.402cm" svg:x2="15.302cm" svg:y2="8.995cm">
          <text:p text:style-name="P2"><text:span text:style-name="T1">ACK 0</text:span></text:p>
          <text:p text:style-name="P2"><text:span text:style-name="T2"/></text:p>
        </draw:line>
        <draw:frame draw:style-name="gr6" draw:text-style-name="P6" draw:layer="layout" svg:width="0.672cm" svg:height="2.576cm" svg:x="10.952cm" svg:y="10.702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line draw:style-name="gr1" draw:text-style-name="P1" draw:layer="layout" svg:x1="7.645cm" svg:y1="1.872cm" svg:x2="7.613cm" svg:y2="8.508cm">
          <text:p/>
        </draw:line>
        <draw:line draw:style-name="gr1" draw:text-style-name="P1" draw:layer="layout" svg:x1="15.282cm" svg:y1="1.872cm" svg:x2="15.282cm" svg:y2="8.54cm">
          <text:p/>
        </draw:line>
        <draw:line draw:style-name="gr2" draw:text-style-name="P3" draw:layer="layout" svg:x1="7.682cm" svg:y1="2.632cm" svg:x2="15.301cm" svg:y2="3.619cm">
          <text:p/>
        </draw:line>
        <draw:line draw:style-name="gr3" draw:text-style-name="P3" draw:layer="layout" svg:x1="7.682cm" svg:y1="5.148cm" svg:x2="15.301cm" svg:y2="3.741cm">
          <text:p/>
        </draw:line>
        <draw:frame draw:style-name="gr4" draw:text-style-name="P4" draw:layer="layout" svg:width="2.314cm" svg:height="1.026cm" svg:x="6.635cm" svg:y="0.826cm">
          <draw:text-box>
            <text:p><text:span text:style-name="T3">Sender</text:span></text:p>
          </draw:text-box>
        </draw:frame>
        <draw:frame draw:style-name="gr5" draw:text-style-name="P5" draw:layer="layout" svg:width="2.7cm" svg:height="1.026cm" svg:x="13.881cm" svg:y="0.826cm">
          <draw:text-box>
            <text:p text:style-name="P2"><text:span text:style-name="T3">Receiver</text:span></text:p>
          </draw:text-box>
        </draw:frame>
        <draw:line draw:style-name="gr2" draw:text-style-name="P3" draw:layer="layout" svg:x1="7.67cm" svg:y1="2.99cm" svg:x2="15.289cm" svg:y2="3.977cm">
          <text:p/>
        </draw:line>
        <draw:line draw:style-name="gr3" draw:text-style-name="P3" draw:layer="layout" svg:x1="7.696cm" svg:y1="5.479cm" svg:x2="15.315cm" svg:y2="4.072cm">
          <text:p/>
        </draw:line>
        <draw:line draw:style-name="gr2" draw:text-style-name="P3" draw:layer="layout" svg:x1="7.658cm" svg:y1="3.348cm" svg:x2="15.277cm" svg:y2="4.335cm">
          <text:p/>
        </draw:line>
        <draw:line draw:style-name="gr3" draw:text-style-name="P3" draw:layer="layout" svg:x1="7.71cm" svg:y1="5.81cm" svg:x2="15.329cm" svg:y2="4.403cm">
          <text:p/>
        </draw:line>
        <draw:line draw:style-name="gr2" draw:text-style-name="P3" draw:layer="layout" svg:x1="7.646cm" svg:y1="4.906cm" svg:x2="15.265cm" svg:y2="5.893cm">
          <text:p/>
        </draw:line>
        <draw:line draw:style-name="gr2" draw:text-style-name="P3" draw:layer="layout" svg:x1="7.634cm" svg:y1="5.264cm" svg:x2="15.253cm" svg:y2="6.251cm">
          <text:p/>
        </draw:line>
        <draw:line draw:style-name="gr2" draw:text-style-name="P3" draw:layer="layout" svg:x1="7.622cm" svg:y1="5.622cm" svg:x2="15.241cm" svg:y2="6.609cm">
          <text:p/>
        </draw:line>
        <draw:frame draw:style-name="gr8" draw:text-style-name="P9" draw:layer="layout" svg:width="0.652cm" svg:height="1.286cm" svg:x="8.158cm" svg:y="3.448cm">
          <draw:text-box>
            <text:p text:style-name="P8"><text:span text:style-name="T5">.</text:span></text:p>
            <text:p text:style-name="P8"><text:span text:style-name="T5">.</text:span></text:p>
            <text:p text:style-name="P8"><text:span text:style-name="T5">.</text:span></text:p>
          </draw:text-box>
        </draw:frame>
        <draw:frame draw:style-name="gr8" draw:text-style-name="P9" draw:layer="layout" svg:width="0.652cm" svg:height="1.286cm" svg:x="8.158cm" svg:y="6.248cm">
          <draw:text-box>
            <text:p text:style-name="P8"><text:span text:style-name="T5">.</text:span></text:p>
            <text:p text:style-name="P8"><text:span text:style-name="T5">.</text:span></text:p>
            <text:p text:style-name="P8"><text:span text:style-name="T5">.</text:span></text:p>
          </draw:text-box>
        </draw:frame>
        <draw:line draw:style-name="gr2" draw:text-style-name="P3" draw:layer="layout" svg:x1="7.61cm" svg:y1="5.957cm" svg:x2="15.229cm" svg:y2="6.944cm">
          <text:p/>
        </draw:line>
        <presentation:notes draw:style-name="dp2">
          <draw:page-thumbnail draw:style-name="gr7" draw:layer="layout" svg:width="0.001cm" svg:height="0.001cm" svg:x="0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6-02-20T15:29:44.335327000</dc:date>
    <meta:editing-duration>PT5H42M22S</meta:editing-duration>
    <meta:editing-cycles>15</meta:editing-cycles>
    <meta:generator>LibreOffice/25.2.4.3$MacOSX_AARCH64 LibreOffice_project/33e196637044ead23f5c3226cde09b47731f7e27</meta:generator>
    <meta:document-statistic meta:object-count="63"/>
  </office:meta>
</office:document-meta>
</file>