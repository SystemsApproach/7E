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31F10000162927344125.png" manifest:media-type="image/png"/>
  <manifest:file-entry manifest:full-path="Pictures/100000010000026E0000025EE13B442D.png" manifest:media-type="image/png"/>
  <manifest:file-entry manifest:full-path="Pictures/10000001000002610000025C53D99BCC.png" manifest:media-type="image/png"/>
  <manifest:file-entry manifest:full-path="Pictures/100000010000028D000001FFF7EFA6DB.png" manifest:media-type="image/png"/>
  <manifest:file-entry manifest:full-path="Pictures/10000001000000B2000000B2DE3F4AED.png" manifest:media-type="image/png"/>
  <manifest:file-entry manifest:full-path="Pictures/10000001000002660000025F2AFDF2ED.png" manifest:media-type="image/png"/>
  <manifest:file-entry manifest:full-path="Pictures/100000010000000A0000000ABF8341B3.png" manifest:media-type="image/png"/>
  <manifest:file-entry manifest:full-path="Pictures/100000010000008000000080F71F6912.tif" manifest:media-type="image/tiff"/>
  <manifest:file-entry manifest:full-path="Pictures/1000000100000200000002006E3A800D.png" manifest:media-type="image/png"/>
  <manifest:file-entry manifest:full-path="Pictures/1000157A00000DE200000DE28400E631.svg" manifest:media-type="image/svg+xml"/>
  <manifest:file-entry manifest:full-path="Pictures/100000010000023D0000016F3529BC42.png" manifest:media-type="image/png"/>
  <manifest:file-entry manifest:full-path="Pictures/100096D60003E6D40001BB3458710C96.pdf" manifest:media-type="application/pdf"/>
  <manifest:file-entry manifest:full-path="Pictures/100000010000022100000162C6BA6631.png" manifest:media-type="image/png"/>
  <manifest:file-entry manifest:full-path="Pictures/100000010000014D0000025D29339EAD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Lato Bold" svg:font-family="'Lato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padding-top="0.053cm" fo:padding-bottom="0.053cm" fo:padding-left="0.053cm" fo:padding-right="0.053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horizontal" loext:decorative="false"/>
    </style:style>
    <style:style style:name="gr4" style:family="graphic" style:parent-style-name="standard">
      <style:graphic-properties draw:stroke="solid" svg:stroke-width="0.079cm" svg:stroke-color="#161616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75cm" draw:shadow-offset-y="0.075cm" draw:shadow-color="#000000" draw:shadow-opacity="40%" style:writing-mode="lr-tb" loext:decorative="false"/>
      <style:paragraph-properties style:writing-mode="lr-tb"/>
    </style:style>
    <style:style style:name="gr5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none" loext:decorative="false"/>
    </style:style>
    <style:style style:name="gr6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005cm" fo:padding-top="0.127cm" fo:padding-bottom="0.127cm" fo:padding-left="0.254cm" fo:padding-right="0.254cm" fo:wrap-option="no-wrap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446cm" fo:padding-top="0.127cm" fo:padding-bottom="0.127cm" fo:padding-left="0.254cm" fo:padding-right="0.254cm" fo:wrap-option="no-wrap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Graphics">
      <style:graphic-properties draw:stroke="none" draw:fill="none" draw:shadow="visible" draw:shadow-offset-x="0.075cm" draw:shadow-offset-y="0.075cm" draw:shadow-color="#000000" draw:shadow-opacity="40%" draw:luminance="70%" draw:contrast="-70%" style:mirror="none" loext:decorative="false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628cm" fo:padding-top="0.127cm" fo:padding-bottom="0.127cm" fo:padding-left="0.254cm" fo:padding-right="0.254cm" fo:wrap-option="no-wrap" loext:decorative="false"/>
      <style:paragraph-properties style:writing-mode="lr-tb"/>
    </style:style>
    <style:style style:name="gr12" style:family="graphic" style:parent-style-name="Graphics">
      <style:graphic-properties draw:stroke="none" draw:fill="none" style:mirror="none" loext:decorative="false"/>
    </style:style>
    <style:style style:name="gr13" style:family="graphic" style:parent-style-name="standard">
      <style:graphic-properties draw:stroke="solid" svg:stroke-width="0.079cm" svg:stroke-color="#6bbadd" svg:stroke-opacity="100%" svg:stroke-linecap="butt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66cm" fo:padding-top="0.127cm" fo:padding-bottom="0.127cm" fo:padding-left="0.254cm" fo:padding-right="0.254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3.169cm" fo:padding-top="0.127cm" fo:padding-bottom="0.127cm" fo:padding-left="0.254cm" fo:padding-right="0.254cm" fo:wrap-option="no-wrap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gradient-name="a1066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gradient" draw:fill-gradient-name="a1067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71cm" svg:stroke-color="#626262" svg:stroke-opacity="100%" svg:stroke-linecap="butt" draw:fill="none" fo:padding-top="0.16cm" fo:padding-bottom="0.16cm" fo:padding-left="0.285cm" fo:padding-right="0.285cm" loext:decorative="false"/>
    </style:style>
    <style:style style:name="gr22" style:family="graphic" style:parent-style-name="Graphics">
      <style:graphic-properties draw:stroke="none" draw:fill="none" style:mirror="horizontal" loext:decorative="false"/>
    </style:style>
    <style:style style:name="gr23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53cm" svg:stroke-color="#626262" svg:stroke-opacity="100%" svg:stroke-linecap="butt" draw:fill="non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solid" svg:stroke-width="0.026cm" svg:stroke-color="#313131" svg:stroke-opacity="100%" svg:stroke-linecap="butt" draw:fill="solid" draw:fill-color="#3131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313131" svg:stroke-opacity="100%" svg:stroke-linecap="round" draw:fill="non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solid" svg:stroke-width="0.159cm" svg:stroke-color="#313131" svg:stroke-opacity="100%" svg:stroke-linecap="round" draw:fill="non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solid" svg:stroke-width="0.05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>
      <style:graphic-properties draw:stroke="none" draw:fill="gradient" draw:fill-gradient-name="a1071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gradient" draw:fill-gradient-name="a107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center" draw:textarea-vertical-align="top" draw:auto-grow-height="true" draw:auto-grow-width="true" fo:min-height="0.425cm" fo:min-width="1.718cm" fo:padding-top="0.127cm" fo:padding-bottom="0.127cm" fo:padding-left="0.254cm" fo:padding-right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center" draw:textarea-vertical-align="top" draw:auto-grow-height="true" draw:auto-grow-width="true" fo:min-height="0.532cm" fo:min-width="0.532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ab2e34" svg:stroke-opacity="100%" svg:stroke-linecap="butt" draw:fill="solid" draw:fill-color="#ecbab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2a6b46" svg:stroke-opacity="100%" svg:stroke-linecap="butt" draw:fill="solid" draw:fill-color="#a6dc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9cm" svg:stroke-color="#ab2e34" svg:stroke-opacity="100%" svg:stroke-linecap="butt" draw:fill="none" fo:padding-top="0.164cm" fo:padding-bottom="0.164cm" fo:padding-left="0.289cm" fo:padding-right="0.289cm" loext:decorative="false"/>
    </style:style>
    <style:style style:name="gr37" style:family="graphic" style:parent-style-name="standard">
      <style:graphic-properties draw:stroke="solid" svg:stroke-width="0.079cm" svg:stroke-color="#2a6b46" svg:stroke-opacity="100%" svg:stroke-linecap="butt" draw:fill="none" fo:padding-top="0.164cm" fo:padding-bottom="0.164cm" fo:padding-left="0.289cm" fo:padding-right="0.289cm" loext:decorative="false"/>
    </style:style>
    <style:style style:name="gr38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gradient" draw:fill-gradient-name="a107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gradient" draw:fill-gradient-name="a1080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26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717cm" fo:padding-top="0.127cm" fo:padding-bottom="0.127cm" fo:padding-left="0.254cm" fo:padding-right="0.254cm" fo:wrap-option="no-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99bddf" svg:stroke-opacity="100%" svg:stroke-linecap="butt" draw:fill="solid" draw:fill-color="#99bdd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161616" draw:marker-end="a10818" svg:stroke-opacity="100%" svg:stroke-linecap="butt" draw:fill="non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solid" svg:stroke-width="0.035cm" svg:stroke-color="#161616" draw:marker-start="a10820" svg:stroke-opacity="100%" svg:stroke-linecap="butt" draw:fill="non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draw:fill="gradient" draw:fill-gradient-name="a1086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dash" draw:stroke-dash="SysDot" svg:stroke-width="0.071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SysDash" svg:stroke-width="0.071cm" svg:stroke-color="#c00000" svg:stroke-opacity="100%" svg:stroke-linecap="butt" draw:fill="none" fo:padding-top="0.16cm" fo:padding-bottom="0.16cm" fo:padding-left="0.285cm" fo:padding-right="0.285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draw:fill="gradient" draw:fill-gradient-name="a109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gradient" draw:fill-gradient-name="a1098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c00000" svg:stroke-opacity="100%" svg:stroke-linecap="butt" draw:fill="solid" draw:fill-color="#c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71cm" svg:stroke-color="#c00000" draw:marker-end="a1101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71cm" svg:stroke-color="#c00000" draw:marker-end="a11027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gradient" draw:fill-gradient-name="a1106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44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2.632cm" fo:padding-top="0.127cm" fo:padding-bottom="0.127cm" fo:padding-left="0.254cm" fo:padding-right="0.254cm" fo:wrap-option="no-wrap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1.712cm" fo:min-width="2.77cm" fo:padding-top="0.127cm" fo:padding-bottom="0.127cm" fo:padding-left="0.254cm" fo:padding-right="0.254cm" fo:wrap-option="no-wrap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1.799cm" fo:padding-top="0.127cm" fo:padding-bottom="0.127cm" fo:padding-left="0.254cm" fo:padding-right="0.254cm" fo:wrap-option="no-wrap" loext:decorative="false"/>
      <style:paragraph-properties style:writing-mode="lr-tb"/>
    </style:style>
    <style:style style:name="gr62" style:family="graphic" style:parent-style-name="standard">
      <style:graphic-properties draw:stroke="none" draw:fill="gradient" draw:fill-gradient-name="a111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="gradient" draw:fill-gradient-name="a1122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62cm" svg:stroke-color="#626262" draw:marker-end="a11229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gradient" draw:fill-gradient-name="a1129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="gradient" draw:fill-gradient-name="a1132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middle" draw:auto-grow-height="false" draw:auto-grow-width="false" fo:min-height="0.976cm" fo:min-width="2.8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626262" svg:stroke-opacity="100%" svg:stroke-linecap="butt" draw:fill="solid" draw:fill-color="#99bddf" draw:opacity="100%" draw:textarea-horizontal-align="center" draw:textarea-vertical-align="top" draw:auto-grow-height="false" draw:auto-grow-width="false" fo:min-height="2.094cm" fo:min-width="1.2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3cm" svg:stroke-color="#626262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53cm" svg:stroke-color="#99bddf" draw:marker-start="a11366" draw:marker-end="a11367" svg:stroke-opacity="100%" svg:stroke-linecap="butt" draw:fill="none" fo:padding-top="0.151cm" fo:padding-bottom="0.151cm" fo:padding-left="0.276cm" fo:padding-right="0.276cm" loext:decorative="false"/>
    </style:style>
    <style:style style:name="gr72" style:family="graphic" style:parent-style-name="standard">
      <style:graphic-properties draw:stroke="solid" svg:stroke-width="0.053cm" svg:stroke-color="#99bddf" draw:marker-start="a11369" draw:marker-end="a11370" svg:stroke-opacity="100%" svg:stroke-linecap="butt" draw:fill="none" fo:padding-top="0.151cm" fo:padding-bottom="0.151cm" fo:padding-left="0.276cm" fo:padding-right="0.276cm" loext:decorative="false"/>
    </style:style>
    <style:style style:name="gr73" style:family="graphic" style:parent-style-name="standard">
      <style:graphic-properties draw:stroke="dash" draw:stroke-dash="SysDot" svg:stroke-width="0.053cm" svg:stroke-color="#99bddf" draw:marker-end="a11373" svg:stroke-opacity="100%" svg:stroke-linecap="butt" draw:fill="none" fo:padding-top="0.151cm" fo:padding-bottom="0.151cm" fo:padding-left="0.276cm" fo:padding-right="0.276cm" loext:decorative="false"/>
    </style:style>
    <style:style style:name="gr74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46cm" fo:padding-top="0.127cm" fo:padding-bottom="0.127cm" fo:padding-left="0.254cm" fo:padding-right="0.254cm" fo:wrap-option="no-wrap" loext:decorative="false"/>
      <style:paragraph-properties style:writing-mode="lr-tb"/>
    </style:style>
    <style:style style:name="gr75" style:family="graphic" style:parent-style-name="standard">
      <style:graphic-properties draw:stroke="dash" draw:stroke-dash="SysDot" svg:stroke-width="0.053cm" svg:stroke-color="#99bddf" draw:marker-end="a11379" svg:stroke-opacity="100%" svg:stroke-linecap="butt" draw:fill="none" fo:padding-top="0.151cm" fo:padding-bottom="0.151cm" fo:padding-left="0.276cm" fo:padding-right="0.276cm" loext:decorative="false"/>
    </style:style>
    <style:style style:name="gr76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68cm" fo:padding-top="0.127cm" fo:padding-bottom="0.127cm" fo:padding-left="0.254cm" fo:padding-right="0.254cm" fo:wrap-option="no-wrap" loext:decorative="false"/>
      <style:paragraph-properties style:writing-mode="lr-tb"/>
    </style:style>
    <style:style style:name="gr77" style:family="graphic" style:parent-style-name="standard">
      <style:graphic-properties draw:stroke="dash" draw:stroke-dash="SysDot" svg:stroke-width="0.053cm" svg:stroke-color="#99bddf" draw:marker-end="a11385" svg:stroke-opacity="100%" svg:stroke-linecap="butt" draw:fill="none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73cm" fo:min-width="0.633cm" fo:padding-top="0.127cm" fo:padding-bottom="0.127cm" fo:padding-left="0.254cm" fo:padding-right="0.254cm" fo:wrap-option="no-wrap" loext:decorative="false"/>
      <style:paragraph-properties style:writing-mode="lr-tb"/>
    </style:style>
    <style:style style:name="gr79" style:family="graphic" style:parent-style-name="standard">
      <style:graphic-properties draw:stroke="solid" svg:stroke-width="0.053cm" svg:stroke-color="#99bddf" draw:marker-start="a11390" draw:marker-end="a11391" svg:stroke-opacity="100%" svg:stroke-linecap="butt" draw:fill="none" fo:padding-top="0.151cm" fo:padding-bottom="0.151cm" fo:padding-left="0.276cm" fo:padding-right="0.276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86cm" fo:padding-top="0.127cm" fo:padding-bottom="0.127cm" fo:padding-left="0.254cm" fo:padding-right="0.254cm" fo:wrap-option="no-wrap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211cm" fo:padding-top="0.127cm" fo:padding-bottom="0.127cm" fo:padding-left="0.254cm" fo:padding-right="0.254cm" fo:wrap-option="no-wrap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887cm" fo:padding-top="0.127cm" fo:padding-bottom="0.127cm" fo:padding-left="0.254cm" fo:padding-right="0.254cm" fo:wrap-option="no-wrap" loext:decorative="false"/>
      <style:paragraph-properties style:writing-mode="lr-tb"/>
    </style:style>
    <style:style style:name="gr83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min-height="0.757cm" fo:min-width="0.79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dash" draw:stroke-dash="SysDot" svg:stroke-width="0.053cm" svg:stroke-color="#a2a2a2" svg:stroke-opacity="100%" svg:stroke-linecap="butt" draw:fill="none" fo:padding-top="0.151cm" fo:padding-bottom="0.151cm" fo:padding-left="0.276cm" fo:padding-right="0.276cm" loext:decorative="false"/>
    </style:style>
    <style:style style:name="gr85" style:family="graphic" style:parent-style-name="standard">
      <style:graphic-properties draw:stroke="dash" draw:stroke-dash="SysDot" svg:stroke-width="0.053cm" svg:stroke-color="#6bbadd" svg:stroke-opacity="100%" svg:stroke-linecap="butt" draw:fill="non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solid" svg:stroke-width="0.03cm" svg:stroke-color="#99bddf" svg:stroke-opacity="100%" svg:stroke-linecap="butt" draw:fill="solid" draw:fill-color="#99bddf" draw:opacity="100%" fo:padding-top="0.14cm" fo:padding-bottom="0.14cm" fo:padding-left="0.265cm" fo:padding-right="0.265cm" loext:decorative="false"/>
    </style:style>
    <style:style style:name="gr87" style:family="graphic" style:parent-style-name="standard">
      <style:graphic-properties draw:stroke="solid" svg:stroke-width="0.026cm" svg:stroke-color="#a2a2a2" svg:stroke-opacity="100%" svg:stroke-linecap="butt" draw:fill="solid" draw:fill-color="#a2a2a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03cm" svg:stroke-color="#a2a2a2" svg:stroke-opacity="100%" svg:stroke-linecap="butt" draw:fill="solid" draw:fill-color="#a2a2a2" draw:opacity="100%" fo:padding-top="0.14cm" fo:padding-bottom="0.14cm" fo:padding-left="0.265cm" fo:padding-right="0.265cm" loext:decorative="false"/>
    </style:style>
    <style:style style:name="gr89" style:family="graphic" style:parent-style-name="standard">
      <style:graphic-properties draw:stroke="solid" svg:stroke-width="0.026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3.659cm" fo:padding-top="0.127cm" fo:padding-bottom="0.127cm" fo:padding-left="0.254cm" fo:padding-right="0.254cm" fo:wrap-option="no-wrap" loext:decorative="false"/>
      <style:paragraph-properties style:writing-mode="lr-tb"/>
    </style:style>
    <style:style style:name="gr91" style:family="graphic" style:parent-style-name="standard">
      <style:graphic-properties draw:stroke="solid" svg:stroke-width="0.035cm" svg:stroke-color="#313131" svg:stroke-opacity="100%" svg:stroke-linecap="butt" draw:fill="solid" draw:fill-color="#c9c9c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313131" svg:stroke-opacity="100%" svg:stroke-linecap="butt" draw:fill="solid" draw:fill-color="#ecece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35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313131" svg:stroke-opacity="100%" svg:stroke-linecap="butt" draw:fill="solid" draw:fill-color="#37b8f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35cm" svg:stroke-color="#313131" svg:stroke-opacity="100%" svg:stroke-linecap="butt" draw:fill="solid" draw:fill-color="#7a7a7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solid" svg:stroke-width="0.035cm" svg:stroke-color="#313131" svg:stroke-opacity="100%" svg:stroke-linecap="butt" draw:fill="solid" draw:fill-color="#bfdee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solid" svg:stroke-width="0.079cm" svg:stroke-color="#313131" draw:marker-end="a12100" svg:stroke-opacity="100%" svg:stroke-linecap="butt" draw:fill="none" fo:padding-top="0.164cm" fo:padding-bottom="0.164cm" fo:padding-left="0.289cm" fo:padding-right="0.289cm" loext:decorative="false"/>
    </style:style>
    <style:style style:name="gr98" style:family="graphic" style:parent-style-name="standard">
      <style:graphic-properties draw:stroke="solid" svg:stroke-width="0.079cm" svg:stroke-color="#313131" draw:marker-end="a12102" svg:stroke-opacity="100%" svg:stroke-linecap="butt" draw:fill="none" fo:padding-top="0.164cm" fo:padding-bottom="0.164cm" fo:padding-left="0.289cm" fo:padding-right="0.289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516cm" fo:padding-top="0.127cm" fo:padding-bottom="0.127cm" fo:padding-left="0.254cm" fo:padding-right="0.254cm" fo:wrap-option="no-wrap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028cm" fo:padding-top="0.127cm" fo:padding-bottom="0.127cm" fo:padding-left="0.254cm" fo:padding-right="0.254cm" fo:wrap-option="no-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5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178cm" fo:padding-top="0.127cm" fo:padding-bottom="0.127cm" fo:padding-left="0.254cm" fo:padding-right="0.254cm" fo:wrap-option="no-wrap" loext:decorative="false"/>
      <style:paragraph-properties style:writing-mode="lr-tb"/>
    </style:style>
    <style:style style:name="gr103" style:family="graphic" style:parent-style-name="standard">
      <style:graphic-properties draw:stroke="solid" svg:stroke-width="0.03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806cm" fo:padding-top="0.127cm" fo:padding-bottom="0.127cm" fo:padding-left="0.254cm" fo:padding-right="0.254cm" fo:wrap-option="no-wrap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3.397cm" fo:padding-top="0.127cm" fo:padding-bottom="0.127cm" fo:padding-left="0.254cm" fo:padding-right="0.254cm" fo:wrap-option="no-wrap" loext:decorative="false"/>
      <style:paragraph-properties style:writing-mode="lr-tb"/>
    </style:style>
    <style:style style:name="gr106" style:family="graphic" style:parent-style-name="standard">
      <style:graphic-properties draw:stroke="solid" svg:stroke-width="0.079cm" svg:stroke-color="#313131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1.951cm" fo:padding-top="0.127cm" fo:padding-bottom="0.127cm" fo:padding-left="0.254cm" fo:padding-right="0.254cm" fo:wrap-option="no-wrap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4.181cm" fo:padding-top="0.127cm" fo:padding-bottom="0.127cm" fo:padding-left="0.254cm" fo:padding-right="0.254cm" fo:wrap-option="no-wrap" loext:decorative="false"/>
      <style:paragraph-properties style:writing-mode="lr-tb"/>
    </style:style>
    <style:style style:name="gr109" style:family="graphic" style:parent-style-name="standard">
      <style:graphic-properties draw:stroke="solid" svg:stroke-width="0.026cm" svg:stroke-color="#313131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3cm" svg:stroke-color="#ff0000" draw:marker-end="a12204" svg:stroke-opacity="100%" svg:stroke-linecap="butt" draw:fill="none" fo:padding-top="0.14cm" fo:padding-bottom="0.14cm" fo:padding-left="0.265cm" fo:padding-right="0.265cm" loext:decorative="fals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346cm" fo:padding-top="0.127cm" fo:padding-bottom="0.127cm" fo:padding-left="0.254cm" fo:padding-right="0.254cm" fo:wrap-option="no-wrap" loext:decorative="false"/>
      <style:paragraph-properties style:writing-mode="lr-tb"/>
    </style:style>
    <style:style style:name="gr112" style:family="graphic" style:parent-style-name="standard">
      <style:graphic-properties draw:stroke="solid" svg:stroke-width="0.026cm" svg:stroke-color="#2e75b6" svg:stroke-opacity="100%" svg:stroke-linecap="butt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4.277cm" fo:padding-top="0.127cm" fo:padding-bottom="0.127cm" fo:padding-left="0.254cm" fo:padding-right="0.254cm" fo:wrap-option="no-wrap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2.902cm" fo:padding-top="0.127cm" fo:padding-bottom="0.127cm" fo:padding-left="0.254cm" fo:padding-right="0.254cm" fo:wrap-option="no-wrap" loext:decorative="false"/>
      <style:paragraph-properties style:writing-mode="lr-tb"/>
    </style:style>
    <style:style style:name="gr115" style:family="graphic" style:parent-style-name="standard">
      <style:graphic-properties draw:stroke="solid" svg:stroke-width="0.03cm" svg:stroke-color="#313131" draw:marker-end="a12258" svg:stroke-opacity="100%" svg:stroke-linecap="butt" draw:fill="none" fo:padding-top="0.14cm" fo:padding-bottom="0.14cm" fo:padding-left="0.265cm" fo:padding-right="0.265cm" loext:decorative="false"/>
    </style:style>
    <style:style style:name="gr116" style:family="graphic" style:parent-style-name="standard">
      <style:graphic-properties draw:stroke="solid" svg:stroke-width="0.03cm" svg:stroke-color="#313131" draw:marker-end="a12260" svg:stroke-opacity="100%" svg:stroke-linecap="butt" draw:fill="none" fo:padding-top="0.14cm" fo:padding-bottom="0.14cm" fo:padding-left="0.265cm" fo:padding-right="0.265cm" loext:decorative="false"/>
    </style:style>
    <style:style style:name="gr117" style:family="graphic" style:parent-style-name="standard">
      <style:graphic-properties draw:stroke="solid" svg:stroke-width="0.062cm" svg:stroke-color="#626262" svg:stroke-opacity="100%" svg:stroke-linecap="butt" draw:fill="none" fo:padding-top="0.156cm" fo:padding-bottom="0.156cm" fo:padding-left="0.281cm" fo:padding-right="0.281cm" loext:decorative="false"/>
    </style:style>
    <style:style style:name="gr118" style:family="graphic" style:parent-style-name="standard">
      <style:graphic-properties draw:stroke="solid" svg:stroke-width="0.026cm" svg:stroke-color="#b2d6ea" svg:stroke-opacity="100%" svg:stroke-linecap="butt" draw:fill="solid" draw:fill-color="#b2d6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26cm" svg:stroke-color="#a1a1a1" svg:stroke-opacity="100%" svg:stroke-linecap="butt" draw:fill="solid" draw:fill-color="#a1a1a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26cm" svg:stroke-color="#2e99c8" svg:stroke-opacity="100%" svg:stroke-linecap="butt" draw:fill="solid" draw:fill-color="#2e99c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26cm" svg:stroke-color="#161616" svg:stroke-opacity="100%" svg:stroke-linecap="butt" draw:fill="solid" draw:fill-color="#16161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solid" svg:stroke-width="0.026cm" svg:stroke-color="#626262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solid" svg:stroke-width="0.026cm" svg:stroke-color="#313131" svg:stroke-opacity="100%" svg:stroke-linecap="butt" draw:fill="solid" draw:fill-color="#62626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center" draw:textarea-vertical-align="top" draw:auto-grow-height="true" draw:auto-grow-width="true" fo:min-height="0.601cm" fo:min-width="5.002cm" fo:padding-top="0.127cm" fo:padding-bottom="0.127cm" fo:padding-left="0.254cm" fo:padding-right="0.254cm" fo:wrap-option="no-wrap" loext:decorative="false"/>
      <style:paragraph-properties style:writing-mode="lr-tb"/>
    </style:style>
    <style:style style:name="gr126" style:family="graphic" style:parent-style-name="standard">
      <style:graphic-properties draw:stroke="none" draw:fill="bitmap" draw:fill-image-name="a12317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draw:fill="bitmap" draw:fill-image-name="a12321" style:repeat="repeat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4-cust-Title-and-Content-notes">
      <style:graphic-properties draw:fill-color="#ffffff" draw:auto-grow-height="false" fo:min-height="11.431cm" loext:decorative="false"/>
      <style:paragraph-properties style:writing-mode="lr-tb"/>
    </style:style>
    <style:style style:name="pr3" style:family="presentation" style:parent-style-name="Master1-Layout24-cust-Title-and-Content-notes">
      <style:graphic-properties draw:stroke="none" draw:fill="none" draw:fill-color="#ffffff" draw:textarea-horizontal-align="left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9bddf" draw:opacity="100%"/>
      <style:paragraph-properties style:writing-mode="lr-tb" style:font-independent-line-spacing="true"/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gradient" draw:fill-gradient-name="a10668"/>
      <style:paragraph-properties style:writing-mode="lr-tb" style:font-independent-line-spacing="true"/>
    </style:style>
    <style:style style:name="P9" style:family="paragraph">
      <loext:graphic-properties draw:fill="gradient" draw:fill-gradient-name="a10673"/>
      <style:paragraph-properties style:writing-mode="lr-tb" style:font-independent-line-spacing="true"/>
    </style:style>
    <style:style style:name="P10" style:family="paragraph">
      <loext:graphic-properties draw:fill="solid" draw:fill-color="#313131" draw:opacity="100%"/>
      <style:paragraph-properties style:writing-mode="lr-tb" style:font-independent-line-spacing="true"/>
    </style:style>
    <style:style style:name="P11" style:family="paragraph">
      <loext:graphic-properties draw:fill-color="#ffffff"/>
    </style:style>
    <style:style style:name="P12" style:family="paragraph">
      <loext:graphic-properties draw:fill="gradient" draw:fill-gradient-name="a10719"/>
      <style:paragraph-properties style:writing-mode="lr-tb" style:font-independent-line-spacing="true"/>
    </style:style>
    <style:style style:name="P13" style:family="paragraph">
      <loext:graphic-properties draw:fill="gradient" draw:fill-gradient-name="a10723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20%" fo:text-align="center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solid" draw:fill-color="#ecbabc" draw:opacity="100%"/>
      <style:paragraph-properties style:writing-mode="lr-tb" style:font-independent-line-spacing="true"/>
    </style:style>
    <style:style style:name="P17" style:family="paragraph">
      <loext:graphic-properties draw:fill="solid" draw:fill-color="#a6dcbd" draw:opacity="100%"/>
      <style:paragraph-properties style:writing-mode="lr-tb" style:font-independent-line-spacing="true"/>
    </style:style>
    <style:style style:name="P18" style:family="paragraph">
      <loext:graphic-properties draw:fill="solid" draw:fill-color="#2e75b6" draw:opacity="100%"/>
      <style:paragraph-properties style:writing-mode="lr-tb" style:font-independent-line-spacing="true"/>
    </style:style>
    <style:style style:name="P19" style:family="paragraph">
      <loext:graphic-properties draw:fill="gradient" draw:fill-gradient-name="a10795"/>
      <style:paragraph-properties style:writing-mode="lr-tb" style:font-independent-line-spacing="true"/>
    </style:style>
    <style:style style:name="P20" style:family="paragraph">
      <loext:graphic-properties draw:fill="gradient" draw:fill-gradient-name="a10800"/>
      <style:paragraph-properties style:writing-mode="lr-tb" style:font-independent-line-spacing="true"/>
    </style:style>
    <style:style style:name="P21" style:family="paragraph">
      <loext:graphic-properties draw:fill="gradient" draw:fill-gradient-name="a10861"/>
      <style:paragraph-properties style:writing-mode="lr-tb" style:font-independent-line-spacing="true"/>
    </style:style>
    <style:style style:name="P22" style:family="paragraph">
      <loext:graphic-properties draw:fill="gradient" draw:fill-gradient-name="a10920"/>
      <style:paragraph-properties style:writing-mode="lr-tb" style:font-independent-line-spacing="true"/>
    </style:style>
    <style:style style:name="P23" style:family="paragraph">
      <loext:graphic-properties draw:fill="gradient" draw:fill-gradient-name="a10985"/>
      <style:paragraph-properties style:writing-mode="lr-tb" style:font-independent-line-spacing="true"/>
    </style:style>
    <style:style style:name="P24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25" style:family="paragraph">
      <loext:graphic-properties draw:fill="gradient" draw:fill-gradient-name="a11067"/>
      <style:paragraph-properties style:writing-mode="lr-tb" style:font-independent-line-spacing="true"/>
    </style:style>
    <style:style style:name="P26" style:family="paragraph">
      <loext:graphic-properties draw:fill="gradient" draw:fill-gradient-name="a11195"/>
      <style:paragraph-properties style:writing-mode="lr-tb" style:font-independent-line-spacing="true"/>
    </style:style>
    <style:style style:name="P27" style:family="paragraph">
      <loext:graphic-properties draw:fill="gradient" draw:fill-gradient-name="a11225"/>
      <style:paragraph-properties style:writing-mode="lr-tb" style:font-independent-line-spacing="true"/>
    </style:style>
    <style:style style:name="P28" style:family="paragraph">
      <loext:graphic-properties draw:fill="gradient" draw:fill-gradient-name="a11291"/>
      <style:paragraph-properties style:writing-mode="lr-tb" style:font-independent-line-spacing="true"/>
    </style:style>
    <style:style style:name="P29" style:family="paragraph">
      <loext:graphic-properties draw:fill="gradient" draw:fill-gradient-name="a11320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  <style:text-properties fo:color="#000000" loext:opacity="100%"/>
    </style:style>
    <style:style style:name="P31" style:family="paragraph">
      <loext:graphic-properties draw:fill="solid" draw:fill-color="#99bddf" draw:opacity="100%"/>
      <style:paragraph-properties fo:margin-left="0cm" fo:margin-right="0cm" fo:margin-top="0cm" fo:margin-bottom="0cm" fo:line-height="90%" fo:text-align="center" fo:text-indent="0cm" style:punctuation-wrap="hanging" loext:tab-stop-distance="0cm" style:writing-mode="lr-tb" style:font-independent-line-spacing="true">
        <style:tab-stops/>
      </style:paragraph-properties>
      <style:text-properties fo:color="#000000" loext:opacity="100%"/>
    </style:style>
    <style:style style:name="P32" style:family="paragraph">
      <loext:graphic-properties draw:fill="solid" draw:fill-color="#99bdd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3" style:family="paragraph">
      <loext:graphic-properties draw:fill="none"/>
      <style:paragraph-properties style:font-independent-line-spacing="true"/>
      <style:text-properties fo:font-size="11pt" style:font-size-asian="11pt" style:font-size-complex="11pt"/>
    </style:style>
    <style:style style:name="P34" style:family="paragraph">
      <loext:graphic-properties draw:fill="solid" draw:fill-color="#2e75b6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35" style:family="paragraph">
      <style:paragraph-properties fo:margin-left="0cm" fo:margin-right="0cm" fo:margin-top="0cm" fo:margin-bottom="0cm" fo:line-height="80%" fo:text-align="center" fo:text-indent="0cm" style:punctuation-wrap="hanging" loext:tab-stop-distance="0cm" style:writing-mode="lr-tb">
        <style:tab-stops/>
      </style:paragraph-properties>
    </style:style>
    <style:style style:name="P36" style:family="paragraph">
      <loext:graphic-properties draw:fill="solid" draw:fill-color="#99bddf" draw:opacity="100%"/>
    </style:style>
    <style:style style:name="P37" style:family="paragraph">
      <loext:graphic-properties draw:fill="solid" draw:fill-color="#a2a2a2" draw:opacity="100%"/>
      <style:paragraph-properties style:writing-mode="lr-tb" style:font-independent-line-spacing="true"/>
    </style:style>
    <style:style style:name="P38" style:family="paragraph">
      <loext:graphic-properties draw:fill="solid" draw:fill-color="#a2a2a2" draw:opacity="100%"/>
    </style:style>
    <style:style style:name="P39" style:family="paragraph">
      <loext:graphic-properties draw:fill="solid" draw:fill-color="#c9c9c9" draw:opacity="100%"/>
      <style:paragraph-properties style:writing-mode="lr-tb" style:font-independent-line-spacing="true"/>
    </style:style>
    <style:style style:name="P40" style:family="paragraph">
      <loext:graphic-properties draw:fill="solid" draw:fill-color="#ececec" draw:opacity="100%"/>
      <style:paragraph-properties style:writing-mode="lr-tb" style:font-independent-line-spacing="true"/>
    </style:style>
    <style:style style:name="P41" style:family="paragraph">
      <loext:graphic-properties draw:fill="solid" draw:fill-color="#b2d6ea" draw:opacity="100%"/>
      <style:paragraph-properties style:writing-mode="lr-tb" style:font-independent-line-spacing="true"/>
    </style:style>
    <style:style style:name="P42" style:family="paragraph">
      <loext:graphic-properties draw:fill="solid" draw:fill-color="#37b8f2" draw:opacity="100%"/>
      <style:paragraph-properties style:writing-mode="lr-tb" style:font-independent-line-spacing="true"/>
    </style:style>
    <style:style style:name="P43" style:family="paragraph">
      <loext:graphic-properties draw:fill="solid" draw:fill-color="#7a7a7a" draw:opacity="100%"/>
      <style:paragraph-properties style:writing-mode="lr-tb" style:font-independent-line-spacing="true"/>
    </style:style>
    <style:style style:name="P44" style:family="paragraph">
      <loext:graphic-properties draw:fill="solid" draw:fill-color="#bfdee0" draw:opacity="100%"/>
      <style:paragraph-properties style:writing-mode="lr-tb" style:font-independent-line-spacing="tru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46" style:family="paragraph">
      <loext:graphic-properties draw:fill="none" draw:fill-color="#ffffff"/>
      <style:paragraph-properties style:font-independent-line-spacing="true"/>
    </style:style>
    <style:style style:name="P47" style:family="paragraph">
      <loext:graphic-properties draw:fill="solid" draw:fill-color="#a1a1a1" draw:opacity="100%"/>
      <style:paragraph-properties style:writing-mode="lr-tb" style:font-independent-line-spacing="true"/>
    </style:style>
    <style:style style:name="P48" style:family="paragraph">
      <loext:graphic-properties draw:fill="solid" draw:fill-color="#2e99c8" draw:opacity="100%"/>
      <style:paragraph-properties style:writing-mode="lr-tb" style:font-independent-line-spacing="true"/>
    </style:style>
    <style:style style:name="P49" style:family="paragraph">
      <loext:graphic-properties draw:fill="solid" draw:fill-color="#161616" draw:opacity="100%"/>
      <style:paragraph-properties style:writing-mode="lr-tb" style:font-independent-line-spacing="true"/>
    </style:style>
    <style:style style:name="P50" style:family="paragraph">
      <loext:graphic-properties draw:fill="solid" draw:fill-color="#626262" draw:opacity="100%"/>
      <style:paragraph-properties style:writing-mode="lr-tb" style:font-independent-line-spacing="true"/>
    </style:style>
    <style:style style:name="P51" style:family="paragraph">
      <loext:graphic-properties draw:fill="bitmap" draw:fill-image-name="a12317" style:repeat="repeat"/>
      <style:paragraph-properties style:writing-mode="lr-tb" style:font-independent-line-spacing="true"/>
    </style:style>
    <style:style style:name="P52" style:family="paragraph">
      <loext:graphic-properties draw:fill="bitmap" draw:fill-image-name="a12321" style:repeat="repeat"/>
      <style:paragraph-properties style:writing-mode="lr-tb" style:font-independent-line-spacing="true"/>
    </style:style>
    <style:style style:name="P5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language-complex="mr" style:country-complex="IN" style:font-style-complex="normal" style:font-weight-complex="normal"/>
    </style:style>
    <style:style style:name="T2" style:family="text">
      <style:text-properties fo:font-variant="normal" fo:text-transform="none" fo:color="#a2a2a2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language-complex="mr" style:country-complex="IN" style:font-style-complex="normal" style:font-weight-complex="normal"/>
    </style:style>
    <style:style style:name="T3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3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4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5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6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7" style:family="text">
      <style:text-properties fo:font-variant="normal" fo:text-transform="none" fo:color="#626262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font-variant="normal" fo:text-transform="none" fo:color="#a2a2a2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161616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2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name-complex="Calibri1" style:font-size-complex="6pt" style:font-style-complex="normal" style:font-weight-complex="normal"/>
    </style:style>
    <style:style style:name="T23" style:family="text">
      <style:text-properties fo:font-variant="normal" fo:text-transform="none" fo:color="#313131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161616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" style:family="text">
      <style:text-properties fo:font-variant="normal" fo:text-transform="none" fo:color="#313131" loext:opacity="100%" style:text-line-through-style="none" style:text-line-through-type="none" style:text-position="0% 100%" style:font-name="Lato Bol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13131" loext:opacity="100%" style:text-line-through-style="none" style:text-line-through-type="none" style:text-position="0% 100%" style:font-name="Symbo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ymbol" style:font-size-asian="14pt" style:font-style-asian="normal" style:font-weight-asian="normal" style:font-name-complex="Symbol" style:font-size-complex="14pt" style:font-style-complex="normal" style:font-weight-complex="normal"/>
    </style:style>
    <style:style style:name="T28" style:family="text">
      <style:text-properties fo:font-variant="normal" fo:text-transform="none" fo:color="#313131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134095910" draw:style-name="dp1" draw:master-page-name="Master1-Layout24-cust-Title-and-Content" presentation:presentation-page-layout-name="AL1T0">
        <draw:custom-shape draw:name="Line" draw:style-name="gr1" draw:text-style-name="P1" draw:layer="layout" svg:width="3.751cm" svg:height="0.019cm" svg:x="15.125cm" svg:y="10.61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142" draw:style-name="gr2">
          <draw:custom-shape draw:name="Line" draw:style-name="gr1" draw:text-style-name="P1" draw:layer="layout" svg:width="0.422cm" svg:height="0.314cm" svg:x="16.599cm" svg:y="3.526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46" draw:style-name="gr3" draw:text-style-name="P2" draw:layer="layout" svg:width="0.169cm" svg:height="0.24cm" svg:x="15.607cm" svg:y="2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7" draw:style-name="gr3" draw:text-style-name="P2" draw:layer="layout" svg:width="0.169cm" svg:height="0.24cm" svg:x="15.724cm" svg:y="3.1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48" draw:style-name="gr3" draw:text-style-name="P2" draw:layer="layout" svg:width="0.169cm" svg:height="0.24cm" svg:x="15.321cm" svg:y="2.82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5.14cm" svg:y="4.07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51" draw:style-name="gr4" draw:text-style-name="P1" draw:layer="layout" svg:width="1.011cm" svg:height="0.39cm" draw:transform="rotate (0.178896248329419) translate (15.947cm 4.181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5.762cm" svg:y="4.43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6.992cm" svg:y="4.52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58" draw:style-name="gr3" draw:text-style-name="P2" draw:layer="layout" svg:width="0.169cm" svg:height="0.24cm" svg:x="13.984cm" svg:y="3.6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59" draw:style-name="gr3" draw:text-style-name="P2" draw:layer="layout" svg:width="0.169cm" svg:height="0.24cm" svg:x="13.77cm" svg:y="4.0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0" draw:style-name="gr3" draw:text-style-name="P2" draw:layer="layout" svg:width="0.169cm" svg:height="0.24cm" svg:x="14.328cm" svg:y="4.2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1" draw:style-name="gr3" draw:text-style-name="P2" draw:layer="layout" svg:width="0.169cm" svg:height="0.24cm" svg:x="14.385cm" svg:y="3.52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3" draw:style-name="gr3" draw:text-style-name="P2" draw:layer="layout" svg:width="0.169cm" svg:height="0.24cm" svg:x="14.639cm" svg:y="4.81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4" draw:style-name="gr3" draw:text-style-name="P2" draw:layer="layout" svg:width="0.169cm" svg:height="0.24cm" svg:x="14.66cm" svg:y="5.47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65" draw:style-name="gr3" draw:text-style-name="P2" draw:layer="layout" svg:width="0.169cm" svg:height="0.24cm" svg:x="14.998cm" svg:y="5.24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4.202cm" svg:y="4.626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167" draw:style-name="gr6" draw:text-style-name="P3" draw:layer="layout" svg:width="1.525cm" svg:height="0.7cm" svg:x="18.614cm" svg:y="4.232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8.427cm" svg:y="4.40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9.98cm" svg:y="4.4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813cm" svg:y="3.82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628cm" svg:y="4.34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175" draw:style-name="gr7" draw:text-style-name="P4" draw:layer="layout" svg:width="0.513cm" svg:height="1.191cm" svg:x="16.112cm" svg:y="4.592cm">
            <draw:text-box>
              <text:p/>
            </draw:text-box>
          </draw:frame>
        </draw:g>
        <draw:g draw:name="Group 182" draw:style-name="gr2">
          <draw:custom-shape draw:name="Line" draw:style-name="gr1" draw:text-style-name="P1" draw:layer="layout" svg:width="0.446cm" svg:height="0.395cm" svg:x="13.192cm" svg:y="6.072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0" draw:style-name="gr3" draw:text-style-name="P2" draw:layer="layout" svg:width="0.169cm" svg:height="0.24cm" svg:x="12.225cm" svg:y="5.353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1" draw:style-name="gr3" draw:text-style-name="P2" draw:layer="layout" svg:width="0.169cm" svg:height="0.24cm" svg:x="12.353cm" svg:y="5.792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2" draw:style-name="gr3" draw:text-style-name="P2" draw:layer="layout" svg:width="0.169cm" svg:height="0.24cm" svg:x="11.94cm" svg:y="5.456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11.758cm" svg:y="6.70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195" draw:style-name="gr4" draw:text-style-name="P1" draw:layer="layout" svg:width="1.011cm" svg:height="0.39cm" draw:transform="rotate (0.178896248329419) translate (12.565cm 6.81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2.38cm" svg:y="7.06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3.611cm" svg:y="7.15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198" draw:style-name="gr3" draw:text-style-name="P2" draw:layer="layout" svg:width="0.169cm" svg:height="0.24cm" svg:x="10.602cm" svg:y="6.2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199" draw:style-name="gr3" draw:text-style-name="P2" draw:layer="layout" svg:width="0.169cm" svg:height="0.24cm" svg:x="10.388cm" svg:y="6.72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0" draw:style-name="gr3" draw:text-style-name="P2" draw:layer="layout" svg:width="0.169cm" svg:height="0.24cm" svg:x="10.82cm" svg:y="6.86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1" draw:style-name="gr3" draw:text-style-name="P2" draw:layer="layout" svg:width="0.169cm" svg:height="0.24cm" svg:x="11.004cm" svg:y="6.15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3" draw:style-name="gr3" draw:text-style-name="P2" draw:layer="layout" svg:width="0.169cm" svg:height="0.24cm" svg:x="11.257cm" svg:y="7.399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4" draw:style-name="gr3" draw:text-style-name="P2" draw:layer="layout" svg:width="0.169cm" svg:height="0.24cm" svg:x="11.329cm" svg:y="8.05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05" draw:style-name="gr3" draw:text-style-name="P2" draw:layer="layout" svg:width="0.169cm" svg:height="0.24cm" svg:x="11.616cm" svg:y="7.88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10.82cm" svg:y="7.257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07" draw:style-name="gr6" draw:text-style-name="P3" draw:layer="layout" svg:width="1.525cm" svg:height="0.7cm" svg:x="15.232cm" svg:y="6.863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5.045cm" svg:y="7.033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6.599cm" svg:y="7.081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432cm" svg:y="6.452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3.246cm" svg:y="6.97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13" draw:style-name="gr7" draw:text-style-name="P4" draw:layer="layout" svg:width="0.513cm" svg:height="1.191cm" svg:x="12.731cm" svg:y="7.223cm">
            <draw:text-box>
              <text:p/>
            </draw:text-box>
          </draw:frame>
        </draw:g>
        <draw:g draw:name="Group 214" draw:style-name="gr2">
          <draw:custom-shape draw:name="Line" draw:style-name="gr1" draw:text-style-name="P1" draw:layer="layout" svg:width="0.55cm" svg:height="0.314cm" svg:x="11.329cm" svg:y="9.584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18" draw:style-name="gr3" draw:text-style-name="P2" draw:layer="layout" svg:width="0.169cm" svg:height="0.24cm" svg:x="10.466cm" svg:y="8.778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19" draw:style-name="gr3" draw:text-style-name="P2" draw:layer="layout" svg:width="0.169cm" svg:height="0.24cm" svg:x="10.574cm" svg:y="9.115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0" draw:style-name="gr3" draw:text-style-name="P2" draw:layer="layout" svg:width="0.169cm" svg:height="0.24cm" svg:x="10.18cm" svg:y="8.881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0.625cm" svg:height="0.519cm" svg:x="9.999cm" svg:y="10.134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Oval 223" draw:style-name="gr4" draw:text-style-name="P1" draw:layer="layout" svg:width="1.011cm" svg:height="0.39cm" draw:transform="rotate (0.178896248329419) translate (10.806cm 10.238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Image" draw:style-name="gr5" draw:text-style-name="P2" draw:layer="layout" svg:width="0.365cm" svg:height="0.286cm" svg:x="10.621cm" svg:y="10.494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custom-shape draw:name="Line" draw:style-name="gr1" draw:text-style-name="P1" draw:layer="layout" svg:width="1.448cm" svg:height="0.001cm" svg:x="11.851cm" svg:y="10.58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Picture 226" draw:style-name="gr3" draw:text-style-name="P2" draw:layer="layout" svg:width="0.169cm" svg:height="0.24cm" svg:x="8.843cm" svg:y="9.70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7" draw:style-name="gr3" draw:text-style-name="P2" draw:layer="layout" svg:width="0.169cm" svg:height="0.24cm" svg:x="8.629cm" svg:y="10.14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8" draw:style-name="gr3" draw:text-style-name="P2" draw:layer="layout" svg:width="0.169cm" svg:height="0.24cm" svg:x="9.061cm" svg:y="10.287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29" draw:style-name="gr3" draw:text-style-name="P2" draw:layer="layout" svg:width="0.169cm" svg:height="0.24cm" svg:x="9.244cm" svg:y="9.584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1" draw:style-name="gr3" draw:text-style-name="P2" draw:layer="layout" svg:width="0.169cm" svg:height="0.24cm" svg:x="9.498cm" svg:y="10.90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2" draw:style-name="gr3" draw:text-style-name="P2" draw:layer="layout" svg:width="0.169cm" svg:height="0.24cm" svg:x="9.569cm" svg:y="11.631cm">
            <draw:image xlink:href="Pictures/100000010000014D0000025D29339EAD.png" xlink:type="simple" xlink:show="embed" xlink:actuate="onLoad" draw:mime-type="image/png">
              <text:p/>
            </draw:image>
          </draw:frame>
          <draw:frame draw:name="Picture 233" draw:style-name="gr3" draw:text-style-name="P2" draw:layer="layout" svg:width="0.169cm" svg:height="0.24cm" svg:x="9.857cm" svg:y="11.305cm">
            <draw:image xlink:href="Pictures/100000010000014D0000025D29339EAD.png" xlink:type="simple" xlink:show="embed" xlink:actuate="onLoad" draw:mime-type="image/png">
              <text:p/>
            </draw:image>
          </draw:frame>
          <draw:custom-shape draw:name="Line" draw:style-name="gr1" draw:text-style-name="P1" draw:layer="layout" svg:width="1.56cm" svg:height="0.955cm" svg:x="9.061cm" svg:y="10.683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35" draw:style-name="gr6" draw:text-style-name="P3" draw:layer="layout" svg:width="1.525cm" svg:height="0.7cm" svg:x="13.473cm" svg:y="10.289cm">
            <text:p/>
            <draw:enhanced-geometry svg:viewBox="0 0 21600 21600" draw:mirror-horizontal="true" draw:type="non-primitive" draw:enhanced-path="M 0 0 L 21600 0 21600 21600 0 21600 Z N"/>
          </draw:custom-shape>
          <draw:frame draw:name="Image" draw:style-name="gr5" draw:text-style-name="P2" draw:layer="layout" svg:width="0.365cm" svg:height="0.286cm" svg:x="13.286cm" svg:y="10.459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4.839cm" svg:y="10.507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672cm" svg:y="9.878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Image" draw:style-name="gr5" draw:text-style-name="P2" draw:layer="layout" svg:width="0.365cm" svg:height="0.286cm" svg:x="11.487cm" svg:y="10.405cm">
            <draw:image xlink:href="Pictures/100000010000008000000080F71F6912.tif" xlink:type="simple" xlink:show="embed" xlink:actuate="onLoad" draw:mime-type="image/tiff">
              <text:p/>
            </draw:image>
            <svg:desc>Image</svg:desc>
          </draw:frame>
          <draw:frame draw:name="TextBox 241" draw:style-name="gr7" draw:text-style-name="P4" draw:layer="layout" svg:width="0.513cm" svg:height="1.191cm" svg:x="10.971cm" svg:y="10.648cm">
            <draw:text-box>
              <text:p/>
            </draw:text-box>
          </draw:frame>
        </draw:g>
        <draw:custom-shape draw:name="Line" draw:style-name="gr1" draw:text-style-name="P1" draw:layer="layout" svg:width="2.839cm" svg:height="2.219cm" svg:x="16.87cm" svg:y="7.26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" draw:style-name="gr1" draw:text-style-name="P1" draw:layer="layout" svg:width="1.683cm" svg:height="4.053cm" svg:x="20.273cm" svg:y="4.59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" draw:style-name="gr8" draw:text-style-name="P4" draw:layer="layout" svg:width="0.954cm" svg:height="1.026cm" svg:x="21.672cm" svg:y="5.723cm">
          <draw:text-box>
            <text:p text:style-name="P5"><text:span text:style-name="T1">…</text:span></text:p>
          </draw:text-box>
        </draw:frame>
        <draw:frame draw:name="TextBox 244" draw:style-name="gr8" draw:text-style-name="P4" draw:layer="layout" svg:width="0.954cm" svg:height="1.026cm" svg:x="16.428cm" svg:y="10.935cm">
          <draw:text-box>
            <text:p text:style-name="P5"><text:span text:style-name="T2">…</text:span></text:p>
          </draw:text-box>
        </draw:frame>
        <draw:g draw:name="Group 3" draw:style-name="gr9">
          <draw:frame draw:name="Picture 90" draw:style-name="gr10" draw:text-style-name="P2" draw:layer="layout" svg:width="6.048cm" svg:height="3.393cm" svg:x="18.432cm" svg:y="8.249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2" draw:style-name="gr11" draw:text-style-name="P4" draw:layer="layout" svg:width="3.136cm" svg:height="1.795cm" svg:x="20.081cm" svg:y="9.371cm">
            <draw:text-box>
              <text:p text:style-name="P6"><text:span text:style-name="T3">Backbone</text:span></text:p>
              <text:p text:style-name="P6"><text:span text:style-name="T3">(Internet)</text:span></text:p>
            </draw:text-box>
          </draw:frame>
        </draw:g>
        <draw:frame draw:name="Picture 89" draw:style-name="gr3" draw:text-style-name="P2" draw:layer="layout" svg:width="0.127cm" svg:height="0.181cm" draw:transform="rotate (-3.14159265358979) translate (13.574cm 6.015cm)">
          <draw:image xlink:href="Pictures/100000010000014D0000025D29339EAD.png" xlink:type="simple" xlink:show="embed" xlink:actuate="onLoad" draw:mime-type="image/png">
            <text:p/>
          </draw:image>
        </draw:frame>
        <draw:frame draw:name="Graphic 10" draw:style-name="gr12" draw:text-style-name="P2" draw:layer="layout" svg:width="1.239cm" svg:height="1.317cm" svg:x="13.389cm" svg:y="4.60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1" draw:style-name="gr12" draw:text-style-name="P2" draw:layer="layout" svg:width="1.239cm" svg:height="1.317cm" svg:x="12.403cm" svg:y="5.22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2" draw:style-name="gr12" draw:text-style-name="P2" draw:layer="layout" svg:width="1.239cm" svg:height="1.317cm" svg:x="10.969cm" svg:y="5.82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3" draw:style-name="gr12" draw:text-style-name="P2" draw:layer="layout" svg:width="1.239cm" svg:height="1.317cm" svg:x="9.989cm" svg:y="7.22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4" draw:style-name="gr12" draw:text-style-name="P2" draw:layer="layout" svg:width="1.239cm" svg:height="1.317cm" svg:x="10.525cm" svg:y="8.63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5" draw:style-name="gr12" draw:text-style-name="P2" draw:layer="layout" svg:width="1.239cm" svg:height="1.317cm" svg:x="9.224cm" svg:y="9.305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6" draw:style-name="gr12" draw:text-style-name="P2" draw:layer="layout" svg:width="1.239cm" svg:height="1.317cm" svg:x="8.239cm" svg:y="10.687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7" draw:style-name="gr12" draw:text-style-name="P2" draw:layer="layout" svg:width="1.239cm" svg:height="1.317cm" svg:x="14.368cm" svg:y="3.27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128" draw:style-name="gr12" draw:text-style-name="P2" draw:layer="layout" svg:width="1.239cm" svg:height="1.317cm" svg:x="15.787cm" svg:y="2.603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presentation:notes draw:style-name="dp2">
          <draw:frame draw:name="Notes Placeholder 1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View from 30,000 feet</text:span></text:p>
              <text:p text:style-name="P5"><text:span text:style-name="T4">Central Office </text:span><text:span text:style-name="T5"></text:span><text:span text:style-name="T4"> Edge</text:span></text:p>
              <text:p text:style-name="P5"><text:span text:style-name="T4">Smart-phones </text:span><text:span text:style-name="T5"></text:span><text:span text:style-name="T4"> Cyber-physical world</text:span></text:p>
            </draw:text-box>
          </draw:frame>
        </presentation:notes>
      </draw:page>
      <draw:page draw:name="Slide2134095925" draw:style-name="dp1" draw:master-page-name="Master1-Layout24-cust-Title-and-Content">
        <draw:custom-shape draw:name="Rectangle 69" draw:style-name="gr13" draw:text-style-name="P1" draw:layer="layout" svg:width="15.316cm" svg:height="10.528cm" svg:x="0.701cm" svg:y="2.2cm">
          <text:p text:style-name="P6"><text:span text:style-name="T3">Cellular Access Network</text:span></text:p>
          <draw:enhanced-geometry svg:viewBox="0 0 21600 21600" draw:type="non-primitive" draw:enhanced-path="M 0 0 L 21600 0 21600 21600 0 21600 Z N"/>
        </draw:custom-shape>
        <draw:custom-shape draw:name="Line" draw:style-name="gr1" draw:text-style-name="P1" draw:layer="layout" svg:width="1.275cm" svg:height="1.495cm" svg:x="7.679cm" svg:y="4.59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39" draw:style-name="gr14" draw:text-style-name="P4" draw:layer="layout" svg:width="1.234cm" svg:height="0.769cm" svg:x="6.547cm" svg:y="5.536cm">
          <draw:text-box>
            <text:p text:style-name="P5"><text:span text:style-name="T6">gNB</text:span></text:p>
          </draw:text-box>
        </draw:frame>
        <draw:frame draw:name="Picture 154" draw:style-name="gr3" draw:text-style-name="P2" draw:layer="layout" svg:width="0.372cm" svg:height="0.617cm" svg:x="5.837cm" svg:y="3.20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5" draw:style-name="gr3" draw:text-style-name="P2" draw:layer="layout" svg:width="0.372cm" svg:height="0.617cm" svg:x="8.494cm" svg:y="3.54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56" draw:style-name="gr3" draw:text-style-name="P2" draw:layer="layout" svg:width="0.372cm" svg:height="0.617cm" svg:x="5.206cm" svg:y="3.47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57" draw:style-name="gr15" draw:text-style-name="P4" draw:layer="layout" svg:width="1.168cm" svg:height="0.769cm" svg:x="5.389cm" svg:y="3.915cm">
          <draw:text-box>
            <text:p text:style-name="P5"><text:span text:style-name="T6">UEs</text:span></text:p>
          </draw:text-box>
        </draw:frame>
        <draw:custom-shape draw:name="Line" draw:style-name="gr1" draw:text-style-name="P1" draw:layer="layout" svg:width="1.38cm" svg:height="1.334cm" svg:x="4.806cm" svg:y="6.69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Oval 177" draw:style-name="gr4" draw:text-style-name="P1" draw:layer="layout" svg:width="2.232cm" svg:height="1.003cm" draw:transform="rotate (0.178896248329419) translate (6.575cm 6.931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Image" draw:style-name="gr5" draw:text-style-name="P2" draw:layer="layout" svg:width="0.806cm" svg:height="0.735cm" svg:x="6.179cm" svg:y="7.62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198cm" svg:height="0.002cm" svg:x="8.897cm" svg:y="7.85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Picture 180" draw:style-name="gr3" draw:text-style-name="P2" draw:layer="layout" svg:width="0.372cm" svg:height="0.617cm" svg:x="2.049cm" svg:y="5.678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1" draw:style-name="gr14" draw:text-style-name="P4" draw:layer="layout" svg:width="1.234cm" svg:height="0.769cm" svg:x="3.717cm" svg:y="7.48cm">
          <draw:text-box>
            <text:p text:style-name="P5"><text:span text:style-name="T6">gNB</text:span></text:p>
          </draw:text-box>
        </draw:frame>
        <draw:frame draw:name="Picture 183" draw:style-name="gr3" draw:text-style-name="P2" draw:layer="layout" svg:width="0.372cm" svg:height="0.617cm" svg:x="1.781cm" svg:y="6.73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84" draw:style-name="gr3" draw:text-style-name="P2" draw:layer="layout" svg:width="0.372cm" svg:height="0.617cm" svg:x="2.735cm" svg:y="7.09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85" draw:style-name="gr15" draw:text-style-name="P4" draw:layer="layout" svg:width="1.168cm" svg:height="0.769cm" svg:x="2.168cm" svg:y="6.36cm">
          <draw:text-box>
            <text:p text:style-name="P5"><text:span text:style-name="T6">UEs</text:span></text:p>
          </draw:text-box>
        </draw:frame>
        <draw:frame draw:name="Picture 186" draw:style-name="gr3" draw:text-style-name="P2" draw:layer="layout" svg:width="0.372cm" svg:height="0.617cm" svg:x="2.847cm" svg:y="5.282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79" draw:style-name="gr14" draw:text-style-name="P4" draw:layer="layout" svg:width="1.234cm" svg:height="0.769cm" svg:x="1.607cm" svg:y="10.969cm">
          <draw:text-box>
            <text:p text:style-name="P5"><text:span text:style-name="T6">gNB</text:span></text:p>
          </draw:text-box>
        </draw:frame>
        <draw:frame draw:name="Picture 86" draw:style-name="gr3" draw:text-style-name="P2" draw:layer="layout" svg:width="0.372cm" svg:height="0.617cm" svg:x="3.445cm" svg:y="8.969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88" draw:style-name="gr3" draw:text-style-name="P2" draw:layer="layout" svg:width="0.372cm" svg:height="0.617cm" svg:x="3.74cm" svg:y="10.306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1" draw:style-name="gr16" draw:text-style-name="P4" draw:layer="layout" svg:width="4.518cm" svg:height="0.769cm" svg:x="4.789cm" svg:y="9.732cm">
          <draw:text-box>
            <text:p text:style-name="P5"><text:span text:style-name="T6">UEs </text:span></text:p>
          </draw:text-box>
        </draw:frame>
        <draw:frame draw:name="Picture 102" draw:style-name="gr3" draw:text-style-name="P2" draw:layer="layout" svg:width="0.372cm" svg:height="0.617cm" svg:x="4.492cm" svg:y="9.71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Line" draw:style-name="gr1" draw:text-style-name="P1" draw:layer="layout" svg:width="3.445cm" svg:height="2.456cm" svg:x="2.735cm" svg:y="8.119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64" draw:style-name="gr6" draw:text-style-name="P3" draw:layer="layout" svg:width="3.368cm" svg:height="1.802cm" svg:x="11.813cm" svg:y="7.096cm">
          <text:p text:style-name="P6"><text:span text:style-name="T7">Mobile</text:span></text:p>
          <text:p text:style-name="P6"><text:span text:style-name="T7">Core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11.391cm" svg:y="7.53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Image" draw:style-name="gr5" draw:text-style-name="P2" draw:layer="layout" svg:width="0.806cm" svg:height="0.735cm" svg:x="14.821cm" svg:y="7.656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Line" draw:style-name="gr1" draw:text-style-name="P1" draw:layer="layout" svg:width="3.033cm" svg:height="0.001cm" svg:x="15.603cm" svg:y="8.0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Image" draw:style-name="gr5" draw:text-style-name="P2" draw:layer="layout" svg:width="0.806cm" svg:height="0.735cm" svg:x="8.501cm" svg:y="6.037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custom-shape draw:name="Rectangle 71" draw:style-name="gr17" draw:text-style-name="P1" draw:layer="layout" svg:width="9.801cm" svg:height="9.25cm" svg:x="0.932cm" svg:y="2.406cm">
          <text:p text:style-name="P7"><text:span text:style-name="T7">Radio Access Network</text:span></text:p>
          <draw:enhanced-geometry svg:viewBox="0 0 21600 21600" draw:mirror-horizontal="true" draw:type="non-primitive" draw:enhanced-path="M 0 0 L 21600 0 21600 21600 0 21600 Z N"/>
        </draw:custom-shape>
        <draw:frame draw:name="Image" draw:style-name="gr5" draw:text-style-name="P2" draw:layer="layout" svg:width="0.806cm" svg:height="0.735cm" svg:x="8.091cm" svg:y="7.393cm">
          <draw:image xlink:href="Pictures/100000010000008000000080F71F6912.tif" xlink:type="simple" xlink:show="embed" xlink:actuate="onLoad" draw:mime-type="image/tiff">
            <text:p/>
          </draw:image>
          <svg:desc>Image</svg:desc>
        </draw:frame>
        <draw:frame draw:name="TextBox 3" draw:style-name="gr18" draw:text-style-name="P4" draw:layer="layout" svg:width="3.677cm" svg:height="0.769cm" svg:x="6.953cm" svg:y="8.02cm">
          <draw:text-box>
            <text:p text:style-name="P5"><text:span text:style-name="T8">Backhaul Network</text:span></text:p>
          </draw:text-box>
        </draw:frame>
        <draw:g draw:name="Group 42" draw:style-name="gr9">
          <draw:frame draw:name="Picture 43" draw:style-name="gr10" draw:text-style-name="P2" draw:layer="layout" svg:width="6.048cm" svg:height="3.393cm" svg:x="18.252cm" svg:y="6.064cm">
            <draw:image xlink:href="Pictures/100000010000023D0000016F3529BC42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TextBox 44" draw:style-name="gr11" draw:text-style-name="P4" draw:layer="layout" svg:width="3.136cm" svg:height="1.795cm" svg:x="19.901cm" svg:y="7.187cm">
            <draw:text-box>
              <text:p text:style-name="P6"><text:span text:style-name="T9">Backbone</text:span></text:p>
              <text:p text:style-name="P6"><text:span text:style-name="T9">(Internet)</text:span></text:p>
            </draw:text-box>
          </draw:frame>
        </draw:g>
        <draw:frame draw:name="Graphic 40" draw:style-name="gr12" draw:text-style-name="P2" draw:layer="layout" svg:width="2.798cm" svg:height="3.393cm" svg:x="5.958cm" svg:y="2.488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41" draw:style-name="gr12" draw:text-style-name="P2" draw:layer="layout" svg:width="2.806cm" svg:height="3.393cm" svg:x="3.057cm" svg:y="4.424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draw:frame draw:name="Graphic 45" draw:style-name="gr12" draw:text-style-name="P2" draw:layer="layout" svg:width="2.806cm" svg:height="3.393cm" svg:x="0.896cm" svg:y="7.981cm">
          <draw:image xlink:href="Pictures/1000157A00000DE200000DE28400E631.svg" xlink:type="simple" xlink:show="embed" xlink:actuate="onLoad" draw:mime-type="image/svg+xml">
            <text:p/>
          </draw:image>
          <draw:image xlink:href="Pictures/10000001000000B2000000B2DE3F4AED.png" xlink:type="simple" xlink:show="embed" xlink:actuate="onLoad" draw:mime-type="image/png"/>
        </draw:frame>
        <presentation:notes draw:style-name="dp2"/>
      </draw:page>
      <draw:page draw:name="Slide2134095926" draw:style-name="dp1" draw:master-page-name="Master1-Layout24-cust-Title-and-Content">
        <draw:custom-shape draw:name="Triangle 6" draw:style-name="gr19" draw:text-style-name="P8" draw:layer="layout" svg:width="3.783cm" svg:height="4.368cm" draw:transform="rotate (1.68878058422971) translate (2.423cm 7.676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7" draw:style-name="gr5" draw:text-style-name="P2" draw:layer="layout" svg:width="0.576cm" svg:height="1.047cm" svg:x="2.375cm" svg:y="5.397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8" draw:style-name="gr20" draw:text-style-name="P9" draw:layer="layout" svg:width="3.783cm" svg:height="4.373cm" draw:transform="rotate (1.06133471813775) translate (1.846cm 8.177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9" draw:style-name="gr5" draw:text-style-name="P2" draw:layer="layout" svg:width="0.576cm" svg:height="1.047cm" svg:x="4.583cm" svg:y="6.85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0" draw:style-name="gr5" draw:text-style-name="P2" draw:layer="layout" svg:width="0.576cm" svg:height="1.047cm" svg:x="3.432cm" svg:y="8.338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1" draw:style-name="gr5" draw:text-style-name="P2" draw:layer="layout" svg:width="0.576cm" svg:height="1.047cm" svg:x="2.739cm" svg:y="7.217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2" draw:style-name="gr5" draw:text-style-name="P2" draw:layer="layout" svg:width="0.576cm" svg:height="1.047cm" svg:x="4.561cm" svg:y="4.964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13" draw:style-name="gr5" draw:text-style-name="P2" draw:layer="layout" svg:width="0.576cm" svg:height="1.047cm" svg:x="3.315cm" svg:y="4.346cm">
          <draw:image xlink:href="Pictures/100000010000014D0000025D29339EAD.png" xlink:type="simple" xlink:show="embed" xlink:actuate="onLoad" draw:mime-type="image/png">
            <text:p/>
          </draw:image>
        </draw:frame>
        <draw:connector draw:name="Straight Arrow Connector 14" draw:style-name="gr21" draw:text-style-name="P2" draw:layer="layout" draw:type="line" svg:x1="8.226cm" svg:y1="9.023cm" svg:x2="7.64cm" svg:y2="9.023cm" svg:d="M8226 9023h-586" svg:viewBox="0 0 587 1">
          <text:p/>
        </draw:connector>
        <draw:frame draw:name="Picture 15" draw:style-name="gr22" draw:text-style-name="P2" xml:id="id1" draw:id="id1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2" draw:id="id2" draw:layer="layout" svg:width="4.143cm" svg:height="1.92cm" svg:x="13.518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62cm" svg:y2="6.604cm" draw:start-shape="id1" draw:start-glue-point="3" draw:end-shape="id2" draw:end-glue-point="1" svg:d="M8121 8526h-500v1304h10554v-3226h-513" svg:viewBox="0 0 10555 3227">
          <text:p/>
        </draw:connector>
        <draw:connector draw:name="Straight Connector 59" draw:style-name="gr24" draw:text-style-name="P2" draw:layer="layout" draw:type="line" svg:x1="10.152cm" svg:y1="9.023cm" svg:x2="17.661cm" svg:y2="9.023cm" draw:end-shape="id3" draw:end-glue-point="1" svg:d="M10152 9023h7509" svg:viewBox="0 0 7510 1">
          <text:p/>
        </draw:connector>
        <draw:custom-shape draw:name="Rectangle 64" draw:style-name="gr6" draw:text-style-name="P3" xml:id="id3" draw:id="id3" draw:layer="layout" svg:width="4.143cm" svg:height="1.92cm" svg:x="13.517cm" svg:y="8.063cm">
          <text:p text:style-name="P6"><text:span text:style-name="T7">Mobile Core</text:span></text:p>
          <text:p text:style-name="P6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45" draw:style-name="gr2">
          <draw:g draw:name="Group 24" draw:style-name="gr2">
            <draw:custom-shape draw:name="Rectangle 3" draw:style-name="gr25" draw:text-style-name="P10" xml:id="id4" draw:id="id4" draw:layer="layout" svg:width="0.384cm" svg:height="0.361cm" svg:x="7.248cm" svg:y="8.828cm">
              <text:p/>
              <draw:enhanced-geometry svg:viewBox="0 0 21600 21600" draw:type="non-primitive" draw:enhanced-path="M 0 0 L 21600 0 21600 21600 0 21600 Z N"/>
            </draw:custom-shape>
            <draw:connector draw:name="Straight Connector 5" draw:style-name="gr26" draw:text-style-name="P2" draw:layer="layout" draw:type="line" svg:x1="7.44cm" svg:y1="8.828cm" svg:x2="7.44cm" svg:y2="5.576cm" draw:start-shape="id4" draw:start-glue-point="0" svg:d="M7440 8828v-3252" svg:viewBox="0 0 1 3253">
              <text:p/>
            </draw:connector>
            <draw:connector draw:name="Straight Connector 16" draw:style-name="gr27" draw:text-style-name="P2" draw:layer="layout" draw:type="line" svg:x1="7.711cm" svg:y1="6.577cm" svg:x2="7.711cm" svg:y2="5.576cm" svg:d="M7711 6577v-1001" svg:viewBox="0 0 1 1002">
              <text:p/>
            </draw:connector>
            <draw:connector draw:name="Straight Connector 21" draw:style-name="gr27" draw:text-style-name="P2" draw:layer="layout" draw:type="line" svg:x1="7.148cm" svg:y1="6.577cm" svg:x2="7.148cm" svg:y2="5.576cm" svg:d="M7148 6577v-1001" svg:viewBox="0 0 1 1002">
              <text:p/>
            </draw:connector>
          </draw:g>
          <draw:g draw:name="Group 39" draw:style-name="gr2">
            <draw:custom-shape draw:name="Arc 27" draw:style-name="gr28" draw:text-style-name="P1" draw:layer="layout" svg:width="0.694cm" svg:height="1.361cm" svg:x="7.44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9" draw:style-name="gr28" draw:text-style-name="P1" draw:layer="layout" svg:width="0.694cm" svg:height="1.361cm" svg:x="7.678cm" svg:y="5.396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0" draw:style-name="gr2">
            <draw:custom-shape draw:name="Arc 41" draw:style-name="gr28" draw:text-style-name="P1" draw:layer="layout" svg:width="0.694cm" svg:height="1.361cm" svg:x="6.737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43" draw:style-name="gr28" draw:text-style-name="P1" draw:layer="layout" svg:width="0.694cm" svg:height="1.361cm" svg:x="6.498cm" svg:y="5.396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7" draw:style-name="dp1" draw:master-page-name="Master1-Layout24-cust-Title-and-Content">
        <draw:custom-shape draw:name="Triangle 6" draw:style-name="gr30" draw:text-style-name="P12" draw:layer="layout" svg:width="3.783cm" svg:height="4.368cm" draw:transform="rotate (1.68878058422971) translate (2.564cm 7.701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8" draw:style-name="gr31" draw:text-style-name="P13" draw:layer="layout" svg:width="3.783cm" svg:height="4.373cm" draw:transform="rotate (1.06133471813775) translate (2.021cm 8.139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name="Straight Arrow Connector 14" draw:style-name="gr21" draw:text-style-name="P2" draw:layer="layout" draw:type="line" svg:x1="8.249cm" svg:y1="9.023cm" svg:x2="7.456cm" svg:y2="9.023cm" svg:d="M8249 9023h-793" svg:viewBox="0 0 794 1">
          <text:p/>
        </draw:connector>
        <draw:frame draw:name="Picture 15" draw:style-name="gr22" draw:text-style-name="P2" xml:id="id5" draw:id="id5" draw:layer="layout" svg:width="2.053cm" svg:height="1.607cm" svg:x="8.121cm" svg:y="7.723cm">
          <draw:image xlink:href="Pictures/100000010000028D000001FFF7EFA6DB.png" xlink:type="simple" xlink:show="embed" xlink:actuate="onLoad" draw:mime-type="image/png">
            <text:p/>
          </draw:image>
          <svg:desc>A close up of a logo

Description automatically generated</svg:desc>
        </draw:frame>
        <draw:custom-shape draw:name="Rectangle 17" draw:style-name="gr6" draw:text-style-name="P3" xml:id="id6" draw:id="id6" draw:layer="layout" svg:width="4.143cm" svg:height="1.92cm" svg:x="13.518cm" svg:y="5.644cm">
          <text:p text:style-name="P6"><text:span text:style-name="T7">Mobile Core</text:span></text:p>
          <text:p text:style-name="P6"><text:span text:style-name="T7">Control Plan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3" draw:style-name="gr23" draw:text-style-name="P1" draw:layer="layout" svg:width="4.686cm" svg:height="7.478cm" svg:x="5.871cm" svg:y="3.405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onnector draw:name="Elbow Connector 57" draw:style-name="gr24" draw:text-style-name="P2" draw:layer="layout" svg:x1="8.121cm" svg:y1="8.526cm" svg:x2="17.662cm" svg:y2="6.604cm" draw:start-shape="id5" draw:start-glue-point="3" draw:end-shape="id6" draw:end-glue-point="1" svg:d="M8121 8526h-500v1304h10554v-3226h-513" svg:viewBox="0 0 10555 3227">
          <text:p/>
        </draw:connector>
        <draw:connector draw:name="Straight Connector 59" draw:style-name="gr24" draw:text-style-name="P2" draw:layer="layout" draw:type="line" svg:x1="10.174cm" svg:y1="9.045cm" svg:x2="17.642cm" svg:y2="9.023cm" draw:end-shape="id7" draw:end-glue-point="1" svg:d="M10174 9045l7468-22" svg:viewBox="0 0 7469 23">
          <text:p/>
        </draw:connector>
        <draw:custom-shape draw:name="Rectangle 64" draw:style-name="gr6" draw:text-style-name="P3" xml:id="id7" draw:id="id7" draw:layer="layout" svg:width="4.143cm" svg:height="1.92cm" svg:x="13.498cm" svg:y="8.063cm">
          <text:p text:style-name="P14"><text:span text:style-name="T7">Mobile Core</text:span></text:p>
          <text:p text:style-name="P14"><text:span text:style-name="T7">User Plane</text:span></text:p>
          <draw:enhanced-geometry svg:viewBox="0 0 21600 21600" draw:mirror-horizontal="true" draw:type="non-primitive" draw:enhanced-path="M 0 0 L 21600 0 21600 21600 0 21600 Z N"/>
        </draw:custom-shape>
        <draw:g draw:name="Group 18" draw:style-name="gr9">
          <draw:frame draw:name="Picture 19" draw:style-name="gr5" draw:text-style-name="P2" draw:layer="layout" svg:width="1.174cm" svg:height="1.062cm" svg:x="3.301cm" svg:y="7.3cm">
            <draw:image xlink:href="Pictures/1000000100000200000002006E3A800D.png" xlink:type="simple" xlink:show="embed" xlink:actuate="onLoad" draw:mime-type="image/png">
              <text:p/>
            </draw:image>
          </draw:frame>
          <draw:frame draw:name="TextBox 20" draw:style-name="gr32" draw:text-style-name="P4" draw:layer="layout" svg:width="2.226cm" svg:height="0.679cm" svg:x="2.749cm" svg:y="8.348cm">
            <draw:text-box>
              <text:p text:style-name="P6"><text:span text:style-name="T10">Multimedia</text:span></text:p>
            </draw:text-box>
          </draw:frame>
        </draw:g>
        <draw:g draw:name="Group 21" draw:style-name="gr9">
          <draw:frame draw:name="Picture 22" draw:style-name="gr5" draw:text-style-name="P2" draw:layer="layout" svg:width="0.968cm" svg:height="1.022cm" svg:x="1.961cm" svg:y="5.081cm">
            <draw:image xlink:href="Pictures/10000001000002610000025C53D99BCC.png" xlink:type="simple" xlink:show="embed" xlink:actuate="onLoad" draw:mime-type="image/png">
              <text:p/>
            </draw:image>
          </draw:frame>
          <draw:frame draw:name="Picture 24" draw:style-name="gr5" draw:text-style-name="P2" draw:layer="layout" svg:width="0.971cm" svg:height="1.022cm" svg:x="4.205cm" svg:y="5.146cm">
            <draw:image xlink:href="Pictures/10000001000002660000025F2AFDF2ED.png" xlink:type="simple" xlink:show="embed" xlink:actuate="onLoad" draw:mime-type="image/png">
              <text:p/>
            </draw:image>
          </draw:frame>
          <draw:frame draw:name="Picture 25" draw:style-name="gr5" draw:text-style-name="P2" draw:layer="layout" svg:width="0.96cm" svg:height="0.996cm" svg:x="3.089cm" svg:y="5.126cm">
            <draw:image xlink:href="Pictures/100000010000026E0000025EE13B442D.png" xlink:type="simple" xlink:show="embed" xlink:actuate="onLoad" draw:mime-type="image/png">
              <text:p/>
            </draw:image>
          </draw:frame>
          <draw:frame draw:name="Picture 26" draw:style-name="gr5" draw:text-style-name="P2" draw:layer="layout" svg:width="0.422cm" svg:height="0.292cm" svg:x="2.313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7" draw:style-name="gr5" draw:text-style-name="P2" draw:layer="layout" svg:width="0.422cm" svg:height="0.292cm" svg:x="3.411cm" svg:y="4.75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Picture 28" draw:style-name="gr5" draw:text-style-name="P2" draw:layer="layout" svg:width="0.422cm" svg:height="0.292cm" svg:x="4.508cm" svg:y="4.765cm">
            <draw:image xlink:href="Pictures/100000010000022100000162C6BA6631.png" xlink:type="simple" xlink:show="embed" xlink:actuate="onLoad" draw:mime-type="image/png">
              <text:p/>
            </draw:image>
          </draw:frame>
          <draw:frame draw:name="TextBox 29" draw:style-name="gr33" draw:text-style-name="P4" draw:layer="layout" svg:width="1.04cm" svg:height="0.786cm" svg:x="3.037cm" svg:y="6.14cm">
            <draw:text-box>
              <text:p text:style-name="P6"><text:span text:style-name="T10">IoT</text:span></text:p>
            </draw:text-box>
          </draw:frame>
        </draw:g>
        <draw:custom-shape draw:name="Oval 40" draw:style-name="gr34" draw:text-style-name="P16" xml:id="id8" draw:id="id8" draw:layer="layout" svg:width="2.259cm" svg:height="1.177cm" svg:x="18.797cm" svg:y="7.552cm">
          <text:p text:style-name="P15"><text:span text:style-name="T11">IoT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5" draw:style-name="gr35" draw:text-style-name="P17" xml:id="id9" draw:id="id9" draw:layer="layout" svg:width="2.259cm" svg:height="1.177cm" svg:x="18.797cm" svg:y="9.395cm">
          <text:p text:style-name="P15"><text:span text:style-name="T11">Video App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3" draw:style-name="gr36" draw:text-style-name="P2" draw:layer="layout" draw:type="line" svg:x1="18.797cm" svg:y1="8.924cm" svg:x2="19.127cm" svg:y2="8.557cm" draw:end-shape="id8" draw:end-glue-point="5" svg:d="M18797 8924l330-367" svg:viewBox="0 0 331 368">
          <text:p/>
        </draw:connector>
        <draw:connector draw:name="Straight Connector 46" draw:style-name="gr37" draw:text-style-name="P2" draw:layer="layout" draw:type="line" svg:x1="18.797cm" svg:y1="9.168cm" svg:x2="19.127cm" svg:y2="9.567cm" draw:end-shape="id9" draw:end-glue-point="4" svg:d="M18797 9168l330 399" svg:viewBox="0 0 331 400">
          <text:p/>
        </draw:connector>
        <draw:g draw:name="Group 2" draw:style-name="gr2">
          <draw:g draw:name="Group 4" draw:style-name="gr2">
            <draw:custom-shape draw:name="Rectangle 33" draw:style-name="gr25" draw:text-style-name="P10" xml:id="id10" draw:id="id10" draw:layer="layout" svg:width="0.384cm" svg:height="0.361cm" svg:x="7.432cm" svg:y="8.817cm">
              <text:p/>
              <draw:enhanced-geometry svg:viewBox="0 0 21600 21600" draw:type="non-primitive" draw:enhanced-path="M 0 0 L 21600 0 21600 21600 0 21600 Z N"/>
            </draw:custom-shape>
            <draw:connector draw:name="Straight Connector 34" draw:style-name="gr26" draw:text-style-name="P2" draw:layer="layout" draw:type="line" svg:x1="7.624cm" svg:y1="8.817cm" svg:x2="7.624cm" svg:y2="5.565cm" draw:start-shape="id10" draw:start-glue-point="0" svg:d="M7624 8817v-3252" svg:viewBox="0 0 1 3253">
              <text:p/>
            </draw:connector>
            <draw:connector draw:name="Straight Connector 35" draw:style-name="gr27" draw:text-style-name="P2" draw:layer="layout" draw:type="line" svg:x1="7.894cm" svg:y1="6.566cm" svg:x2="7.894cm" svg:y2="5.565cm" svg:d="M7894 6566v-1001" svg:viewBox="0 0 1 1002">
              <text:p/>
            </draw:connector>
            <draw:connector draw:name="Straight Connector 37" draw:style-name="gr27" draw:text-style-name="P2" draw:layer="layout" draw:type="line" svg:x1="7.332cm" svg:y1="6.566cm" svg:x2="7.332cm" svg:y2="5.565cm" svg:d="M7332 6566v-1001" svg:viewBox="0 0 1 1002">
              <text:p/>
            </draw:connector>
          </draw:g>
          <draw:g draw:name="Group 5" draw:style-name="gr2">
            <draw:custom-shape draw:name="Arc 13" draw:style-name="gr28" draw:text-style-name="P1" draw:layer="layout" svg:width="0.694cm" svg:height="1.361cm" svg:x="7.624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31" draw:style-name="gr28" draw:text-style-name="P1" draw:layer="layout" svg:width="0.694cm" svg:height="1.361cm" svg:x="7.862cm" svg:y="5.385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7" draw:style-name="gr2">
            <draw:custom-shape draw:name="Arc 9" draw:style-name="gr28" draw:text-style-name="P1" draw:layer="layout" svg:width="0.694cm" svg:height="1.361cm" svg:x="6.9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1" draw:style-name="gr28" draw:text-style-name="P1" draw:layer="layout" svg:width="0.694cm" svg:height="1.361cm" svg:x="6.682cm" svg:y="5.385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connector draw:name="Straight Connector 1" draw:style-name="gr36" draw:text-style-name="P2" draw:layer="layout" draw:type="line" svg:x1="10.174cm" svg:y1="8.924cm" svg:x2="18.826cm" svg:y2="8.924cm" svg:d="M10174 8924h8652" svg:viewBox="0 0 8653 1">
          <text:p/>
        </draw:connector>
        <draw:connector draw:name="Straight Connector 30" draw:style-name="gr37" draw:text-style-name="P2" draw:layer="layout" draw:type="line" svg:x1="10.174cm" svg:y1="9.168cm" svg:x2="18.826cm" svg:y2="9.168cm" svg:d="M10174 9168h8652" svg:viewBox="0 0 8653 1">
          <text:p/>
        </draw:connector>
        <presentation:notes draw:style-name="dp3">
          <draw:page-thumbnail draw:style-name="gr29" draw:layer="layout" svg:width="16.933cm" svg:height="9.525cm" svg:x="1.058cm" svg:y="1.905cm" draw:page-number="4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88" draw:style-name="dp1" draw:master-page-name="Master1-Layout24-cust-Title-and-Content">
        <draw:custom-shape draw:name="Rectangle 4" draw:style-name="gr38" draw:text-style-name="P18" draw:layer="layout" svg:width="5.435cm" svg:height="1.797cm" draw:transform="rotate (1.5707963267949) translate (9.443cm 9.745cm)">
          <text:p text:style-name="P6"><text:span text:style-name="T12">RAN Stack</text:span></text:p>
          <draw:enhanced-geometry svg:viewBox="0 0 21600 21600" draw:type="non-primitive" draw:enhanced-path="M 0 0 L 21600 0 21600 21600 0 21600 Z N"/>
        </draw:custom-shape>
        <draw:connector draw:name="Straight Arrow Connector 14" draw:style-name="gr21" draw:text-style-name="P2" draw:layer="layout" draw:type="line" svg:x1="11.059cm" svg:y1="9.023cm" svg:x2="7.91cm" svg:y2="9.023cm" draw:start-shape="id11" draw:start-glue-point="1" svg:d="M11059 9023h-3149" svg:viewBox="0 0 3150 1">
          <text:p/>
        </draw:connector>
        <draw:custom-shape draw:name="Rectangle 23" draw:style-name="gr23" draw:text-style-name="P1" draw:layer="layout" svg:width="6.79cm" svg:height="7.478cm" svg:x="6.18cm" svg:y="2.6cm">
          <text:p text:style-name="P6"><text:span text:style-name="T7">Base Station</text:span></text:p>
          <draw:enhanced-geometry svg:viewBox="0 0 21600 21600" draw:mirror-horizontal="true" draw:type="non-primitive" draw:enhanced-path="M 0 0 L 21600 0 21600 21600 0 21600 Z N"/>
        </draw:custom-shape>
        <draw:custom-shape draw:name="Triangle 30" draw:style-name="gr39" draw:text-style-name="P19" draw:layer="layout" svg:width="3.783cm" svg:height="4.368cm" draw:transform="rotate (1.68878058422971) translate (2.678cm 6.854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1" draw:style-name="gr5" draw:text-style-name="P2" draw:layer="layout" svg:width="0.576cm" svg:height="1.047cm" svg:x="2.709cm" svg:y="4.575cm">
          <draw:image xlink:href="Pictures/100000010000014D0000025D29339EAD.png" xlink:type="simple" xlink:show="embed" xlink:actuate="onLoad" draw:mime-type="image/png">
            <text:p/>
          </draw:image>
        </draw:frame>
        <draw:custom-shape draw:name="Triangle 32" draw:style-name="gr40" draw:text-style-name="P20" draw:layer="layout" svg:width="3.783cm" svg:height="4.373cm" draw:transform="rotate (1.06133471813775) translate (2.15cm 7.395cm)">
          <text:p/>
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Picture 33" draw:style-name="gr5" draw:text-style-name="P2" draw:layer="layout" svg:width="0.576cm" svg:height="1.047cm" svg:x="4.916cm" svg:y="6.03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4" draw:style-name="gr5" draw:text-style-name="P2" draw:layer="layout" svg:width="0.576cm" svg:height="1.047cm" svg:x="3.766cm" svg:y="7.516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5" draw:style-name="gr5" draw:text-style-name="P2" draw:layer="layout" svg:width="0.576cm" svg:height="1.047cm" svg:x="3.072cm" svg:y="6.395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7" draw:style-name="gr5" draw:text-style-name="P2" draw:layer="layout" svg:width="0.576cm" svg:height="1.047cm" svg:x="4.895cm" svg:y="4.142cm">
          <draw:image xlink:href="Pictures/100000010000014D0000025D29339EAD.png" xlink:type="simple" xlink:show="embed" xlink:actuate="onLoad" draw:mime-type="image/png">
            <text:p/>
          </draw:image>
        </draw:frame>
        <draw:frame draw:name="Picture 38" draw:style-name="gr5" draw:text-style-name="P2" draw:layer="layout" svg:width="0.576cm" svg:height="1.047cm" svg:x="3.648cm" svg:y="3.524cm">
          <draw:image xlink:href="Pictures/100000010000014D0000025D29339EAD.png" xlink:type="simple" xlink:show="embed" xlink:actuate="onLoad" draw:mime-type="image/png">
            <text:p/>
          </draw:image>
        </draw:frame>
        <draw:frame draw:name="TextBox 10" draw:style-name="gr41" draw:text-style-name="P4" draw:layer="layout" svg:width="1.234cm" svg:height="0.855cm" svg:x="11.393cm" svg:y="8.723cm">
          <draw:text-box>
            <text:p text:style-name="P5"><text:span text:style-name="T13">CQI</text:span></text:p>
          </draw:text-box>
        </draw:frame>
        <draw:frame draw:name="TextBox 44" draw:style-name="gr42" draw:text-style-name="P4" xml:id="id12" draw:id="id12" draw:layer="layout" svg:width="1.225cm" svg:height="0.855cm" svg:x="11.391cm" svg:y="4.31cm">
          <draw:text-box>
            <text:p text:style-name="P5"><text:span text:style-name="T13">5QI</text:span></text:p>
          </draw:text-box>
        </draw:frame>
        <draw:custom-shape draw:name="Rectangle 11" draw:style-name="gr43" draw:text-style-name="P3" xml:id="id11" draw:id="id11" draw:layer="layout" svg:width="1.437cm" svg:height="1.142cm" svg:x="9.622cm" svg:y="8.452cm">
          <text:p text:style-name="P6"><text:span text:style-name="T14">Radio</text:span></text:p>
          <text:p text:style-name="P6"><text:span text:style-name="T14">TX/RX</text:span></text:p>
          <draw:enhanced-geometry svg:viewBox="0 0 21600 21600" draw:type="non-primitive" draw:enhanced-path="M 0 0 L 21600 0 21600 21600 0 21600 Z N"/>
        </draw:custom-shape>
        <draw:connector draw:name="Straight Arrow Connector 42" draw:style-name="gr44" draw:text-style-name="P2" draw:layer="layout" draw:type="line" svg:x1="12.003cm" svg:y1="5.165cm" svg:x2="12.01cm" svg:y2="6.036cm" draw:start-shape="id12" draw:start-glue-point="2" svg:d="M12003 5165l7 871" svg:viewBox="0 0 8 872">
          <text:p/>
        </draw:connector>
        <draw:connector draw:name="Straight Arrow Connector 50" draw:style-name="gr45" draw:text-style-name="P2" draw:layer="layout" draw:type="line" svg:x1="12.01cm" svg:y1="7.852cm" svg:x2="12.01cm" svg:y2="8.723cm" svg:d="M12010 7852v871" svg:viewBox="0 0 1 872">
          <text:p/>
        </draw:connector>
        <draw:g draw:name="Group 1" draw:style-name="gr2">
          <draw:g draw:name="Group 2" draw:style-name="gr2">
            <draw:custom-shape draw:name="Rectangle 17" draw:style-name="gr25" draw:text-style-name="P10" xml:id="id13" draw:id="id13" draw:layer="layout" svg:width="0.384cm" svg:height="0.48cm" svg:x="7.518cm" svg:y="8.709cm">
              <text:p/>
              <draw:enhanced-geometry svg:viewBox="0 0 21600 21600" draw:type="non-primitive" draw:enhanced-path="M 0 0 L 21600 0 21600 21600 0 21600 Z N"/>
            </draw:custom-shape>
            <draw:connector draw:name="Straight Connector 19" draw:style-name="gr26" draw:text-style-name="P2" draw:layer="layout" draw:type="line" svg:x1="7.71cm" svg:y1="8.709cm" svg:x2="7.71cm" svg:y2="4.382cm" draw:start-shape="id13" draw:start-glue-point="0" svg:d="M7710 8709v-4327" svg:viewBox="0 0 1 4328">
              <text:p/>
            </draw:connector>
            <draw:connector draw:name="Straight Connector 20" draw:style-name="gr27" draw:text-style-name="P2" draw:layer="layout" draw:type="line" svg:x1="7.981cm" svg:y1="5.713cm" svg:x2="7.981cm" svg:y2="4.382cm" svg:d="M7981 5713v-1331" svg:viewBox="0 0 1 1332">
              <text:p/>
            </draw:connector>
            <draw:connector draw:name="Straight Connector 21" draw:style-name="gr27" draw:text-style-name="P2" draw:layer="layout" draw:type="line" svg:x1="7.418cm" svg:y1="5.713cm" svg:x2="7.418cm" svg:y2="4.382cm" svg:d="M7418 5713v-1331" svg:viewBox="0 0 1 1332">
              <text:p/>
            </draw:connector>
          </draw:g>
          <draw:g draw:name="Group 3" draw:style-name="gr2">
            <draw:custom-shape draw:name="Arc 12" draw:style-name="gr28" draw:text-style-name="P1" draw:layer="layout" svg:width="0.694cm" svg:height="1.811cm" svg:x="7.71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5" draw:style-name="gr28" draw:text-style-name="P1" draw:layer="layout" svg:width="0.694cm" svg:height="1.811cm" svg:x="7.948cm" svg:y="4.142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811cm" svg:x="7.007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811cm" svg:x="6.769cm" svg:y="4.142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3">
          <draw:page-thumbnail draw:style-name="gr29" draw:layer="layout" svg:width="16.933cm" svg:height="9.525cm" svg:x="1.058cm" svg:y="1.905cm" draw:page-number="5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34095927" draw:style-name="dp1" draw:master-page-name="Master1-Layout24-cust-Title-and-Content">
        <draw:g draw:name="Group 1" draw:style-name="gr2">
          <draw:custom-shape draw:name="Triangle 31" draw:style-name="gr46" draw:text-style-name="P21" draw:layer="layout" svg:width="3.783cm" svg:height="4.372cm" draw:transform="rotate (1.95808488781244) translate (6.182cm 8.1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993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<text:p/>
          </draw:connector>
          <draw:frame draw:name="Picture 35" draw:style-name="gr22" draw:text-style-name="P2" draw:layer="layout" svg:width="2.053cm" svg:height="1.607cm" svg:x="11.026cm" svg:y="8.328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<text:p/>
          </draw:connector>
          <draw:custom-shape draw:name="Rectangle 116" draw:style-name="gr6" draw:text-style-name="P3" draw:layer="layout" svg:width="3.404cm" svg:height="1.378cm" svg:x="17.086cm" svg:y="8.939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6.1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<text:p/>
          </draw:connector>
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<text:p/>
          </draw:connector>
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<text:p/>
          </draw:connector>
          <draw:custom-shape draw:name="Rectangle 122" draw:style-name="gr47" draw:text-style-name="P1" draw:layer="layout" svg:width="4.662cm" svg:height="5.636cm" svg:x="8.898cm" svg:y="4.939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969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<text:p/>
          </draw:connector>
          <draw:custom-shape draw:name="Rectangle 17" draw:style-name="gr48" draw:text-style-name="P1" draw:layer="layout" svg:width="0.988cm" svg:height="0.763cm" svg:x="5.164cm" svg:y="5.166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4" draw:style-name="gr25" draw:text-style-name="P10" xml:id="id14" draw:id="id14" draw:layer="layout" svg:width="0.384cm" svg:height="0.361cm" svg:x="10.19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15" draw:style-name="gr26" draw:text-style-name="P2" draw:layer="layout" draw:type="line" svg:x1="10.382cm" svg:y1="9.472cm" svg:x2="10.382cm" svg:y2="6.22cm" draw:start-shape="id14" draw:start-glue-point="0" svg:d="M10382 9472v-3252" svg:viewBox="0 0 1 3253">
              <text:p/>
            </draw:connector>
            <draw:connector draw:name="Straight Connector 20" draw:style-name="gr27" draw:text-style-name="P2" draw:layer="layout" draw:type="line" svg:x1="10.653cm" svg:y1="7.22cm" svg:x2="10.653cm" svg:y2="6.22cm" svg:d="M10653 7220v-1000" svg:viewBox="0 0 1 1001">
              <text:p/>
            </draw:connector>
            <draw:connector draw:name="Straight Connector 21" draw:style-name="gr27" draw:text-style-name="P2" draw:layer="layout" draw:type="line" svg:x1="10.091cm" svg:y1="7.22cm" svg:x2="10.091cm" svg:y2="6.22cm" svg:d="M10091 7220v-1000" svg:viewBox="0 0 1 1001">
              <text:p/>
            </draw:connector>
          </draw:g>
          <draw:g draw:name="Group 4" draw:style-name="gr2">
            <draw:custom-shape draw:name="Arc 10" draw:style-name="gr28" draw:text-style-name="P1" draw:layer="layout" svg:width="0.694cm" svg:height="1.361cm" svg:x="10.382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10.621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79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94cm" svg:height="1.361cm" svg:x="9.441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6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8" draw:style-name="dp1" draw:master-page-name="Master1-Layout24-cust-Title-and-Content">
        <draw:g draw:name="Group 2" draw:style-name="gr2">
          <draw:custom-shape draw:name="Triangle 31" draw:style-name="gr51" draw:text-style-name="P22" draw:layer="layout" svg:width="3.783cm" svg:height="4.372cm" draw:transform="rotate (1.95808488781244) translate (6.182cm 8.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1" draw:style-name="gr2">
            <draw:frame draw:name="Picture 18" draw:style-name="gr5" draw:text-style-name="P2" draw:layer="layout" svg:width="0.576cm" svg:height="1.047cm" svg:x="6.233cm" svg:y="4.99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628cm" svg:x2="10.545cm" svg:y2="9.628cm" svg:d="M11131 9628h-586" svg:viewBox="0 0 587 1">
              <text:p/>
            </draw:connector>
            <draw:frame draw:name="Picture 35" draw:style-name="gr22" draw:text-style-name="P2" draw:layer="layout" svg:width="2.053cm" svg:height="1.607cm" svg:x="11.026cm" svg:y="8.32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628cm" svg:x2="12.996cm" svg:y2="9.628cm" svg:d="M17086 962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93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6.15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9.131cm" svg:x2="12.996cm" svg:y2="9.131cm" svg:d="M15041 9131h-2045" svg:viewBox="0 0 2046 1">
              <text:p/>
            </draw:connector>
            <draw:connector draw:name="Straight Arrow Connector 119" draw:style-name="gr21" draw:text-style-name="P2" draw:layer="layout" draw:type="line" svg:x1="15.041cm" svg:y1="6.803cm" svg:x2="15.041cm" svg:y2="9.131cm" svg:d="M15041 6803v2328" svg:viewBox="0 0 1 2329">
              <text:p/>
            </draw:connector>
            <draw:connector draw:name="Straight Arrow Connector 120" draw:style-name="gr21" draw:text-style-name="P2" draw:layer="layout" draw:type="line" svg:x1="17.068cm" svg:y1="6.805cm" svg:x2="15.024cm" svg:y2="6.805cm" svg:d="M17068 6805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939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96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6" draw:style-name="gr49" draw:text-style-name="P2" draw:layer="layout" draw:type="line" svg:x1="9.413cm" svg:y1="6.3cm" svg:x2="6.883cm" svg:y2="5.571cm" svg:d="M9413 6300l-2530-729" svg:viewBox="0 0 2531 730">
              <text:p/>
            </draw:connector>
            <draw:connector draw:name="Straight Arrow Connector 17" draw:style-name="gr49" draw:text-style-name="P2" draw:layer="layout" draw:type="line" svg:x1="14.846cm" svg:y1="8.939cm" svg:x2="13.082cm" svg:y2="8.939cm" svg:d="M14846 8939h-1764" svg:viewBox="0 0 1765 1">
              <text:p/>
            </draw:connector>
            <draw:connector draw:name="Straight Arrow Connector 19" draw:style-name="gr49" draw:text-style-name="P2" draw:layer="layout" draw:type="line" svg:x1="14.846cm" svg:y1="8.938cm" svg:x2="14.846cm" svg:y2="6.569cm" svg:d="M14846 8938v-2369" svg:viewBox="0 0 1 2370">
              <text:p/>
            </draw:connector>
            <draw:connector draw:name="Straight Arrow Connector 21" draw:style-name="gr49" draw:text-style-name="P2" draw:layer="layout" draw:type="line" svg:x1="17.085cm" svg:y1="6.597cm" svg:x2="14.87cm" svg:y2="6.602cm" svg:d="M17085 6597l-2215 5" svg:viewBox="0 0 2216 6">
              <text:p/>
            </draw:connector>
            <draw:custom-shape draw:name="Rectangle 29" draw:style-name="gr48" draw:text-style-name="P1" draw:layer="layout" svg:width="0.988cm" svg:height="0.763cm" svg:x="5.164cm" svg:y="5.166cm">
              <text:p text:style-name="P5"><text:span text:style-name="T8">UE</text:span></text:p>
              <draw:enhanced-geometry svg:viewBox="0 0 21600 21600" draw:mirror-horizontal="true" draw:type="non-primitive" draw:enhanced-path="M 0 0 L 21600 0 21600 21600 0 21600 Z N"/>
            </draw:custom-shape>
          </draw:g>
        </draw:g>
        <draw:g draw:name="Group 3" draw:style-name="gr2">
          <draw:g draw:name="Group 4" draw:style-name="gr2">
            <draw:custom-shape draw:name="Rectangle 15" draw:style-name="gr25" draw:text-style-name="P10" xml:id="id15" draw:id="id15" draw:layer="layout" svg:width="0.384cm" svg:height="0.361cm" svg:x="10.187cm" svg:y="9.472cm">
              <text:p/>
              <draw:enhanced-geometry svg:viewBox="0 0 21600 21600" draw:type="non-primitive" draw:enhanced-path="M 0 0 L 21600 0 21600 21600 0 21600 Z N"/>
            </draw:custom-shape>
            <draw:connector draw:name="Straight Connector 20" draw:style-name="gr26" draw:text-style-name="P2" draw:layer="layout" draw:type="line" svg:x1="10.379cm" svg:y1="9.472cm" svg:x2="10.379cm" svg:y2="6.22cm" draw:start-shape="id15" draw:start-glue-point="0" svg:d="M10379 9472v-3252" svg:viewBox="0 0 1 3253">
              <text:p/>
            </draw:connector>
            <draw:connector draw:name="Straight Connector 22" draw:style-name="gr27" draw:text-style-name="P2" draw:layer="layout" draw:type="line" svg:x1="10.65cm" svg:y1="7.22cm" svg:x2="10.65cm" svg:y2="6.22cm" svg:d="M10650 7220v-1000" svg:viewBox="0 0 1 1001">
              <text:p/>
            </draw:connector>
            <draw:connector draw:name="Straight Connector 24" draw:style-name="gr27" draw:text-style-name="P2" draw:layer="layout" draw:type="line" svg:x1="10.087cm" svg:y1="7.22cm" svg:x2="10.087cm" svg:y2="6.22cm" svg:d="M10087 7220v-1000" svg:viewBox="0 0 1 1001">
              <text:p/>
            </draw:connector>
          </draw:g>
          <draw:g draw:name="Group 5" draw:style-name="gr2">
            <draw:custom-shape draw:name="Arc 11" draw:style-name="gr28" draw:text-style-name="P1" draw:layer="layout" svg:width="0.694cm" svg:height="1.361cm" svg:x="10.379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3" draw:style-name="gr28" draw:text-style-name="P1" draw:layer="layout" svg:width="0.694cm" svg:height="1.361cm" svg:x="10.617cm" svg:y="6.04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6" draw:style-name="gr2">
            <draw:custom-shape draw:name="Arc 7" draw:style-name="gr28" draw:text-style-name="P1" draw:layer="layout" svg:width="0.694cm" svg:height="1.361cm" svg:x="9.676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9.437cm" svg:y="6.04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7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9" draw:style-name="dp1" draw:master-page-name="Master1-Layout24-cust-Title-and-Content">
        <draw:g draw:name="Group 1" draw:style-name="gr2">
          <draw:custom-shape draw:name="Triangle 31" draw:style-name="gr52" draw:text-style-name="P23" draw:layer="layout" svg:width="3.783cm" svg:height="4.372cm" draw:transform="rotate (1.95808488781244) translate (6.155cm 7.76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6.233cm" svg:y="4.654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1.131cm" svg:y1="9.29cm" svg:x2="10.545cm" svg:y2="9.29cm" svg:d="M11131 9290h-586" svg:viewBox="0 0 587 1">
            <text:p/>
          </draw:connector>
          <draw:frame draw:name="Picture 35" draw:style-name="gr22" draw:text-style-name="P2" draw:layer="layout" svg:width="2.053cm" svg:height="1.607cm" svg:x="11.026cm" svg:y="7.99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7.086cm" svg:y1="9.29cm" svg:x2="12.996cm" svg:y2="9.29cm" svg:d="M17086 9290h-4090" svg:viewBox="0 0 4091 1">
            <text:p/>
          </draw:connector>
          <draw:custom-shape draw:name="Rectangle 116" draw:style-name="gr6" draw:text-style-name="P3" draw:layer="layout" svg:width="3.404cm" svg:height="1.378cm" svg:x="17.086cm" svg:y="8.601cm">
            <text:p text:style-name="P6"><text:span text:style-name="T6">Mobile Core</text:span></text:p>
            <text:p text:style-name="P6"><text:span text:style-name="T6">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7.086cm" svg:y="5.811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5.041cm" svg:y1="8.793cm" svg:x2="12.996cm" svg:y2="8.793cm" svg:d="M15041 8793h-2045" svg:viewBox="0 0 2046 1">
            <text:p/>
          </draw:connector>
          <draw:connector draw:name="Straight Arrow Connector 119" draw:style-name="gr21" draw:text-style-name="P2" draw:layer="layout" draw:type="line" svg:x1="15.041cm" svg:y1="6.465cm" svg:x2="15.041cm" svg:y2="8.793cm" svg:d="M15041 6465v2328" svg:viewBox="0 0 1 2329">
            <text:p/>
          </draw:connector>
          <draw:connector draw:name="Straight Arrow Connector 120" draw:style-name="gr21" draw:text-style-name="P2" draw:layer="layout" draw:type="line" svg:x1="17.068cm" svg:y1="6.467cm" svg:x2="15.024cm" svg:y2="6.467cm" svg:d="M17068 6467h-2044" svg:viewBox="0 0 2045 1">
            <text:p/>
          </draw:connector>
          <draw:custom-shape draw:name="Rectangle 122" draw:style-name="gr47" draw:text-style-name="P1" draw:layer="layout" svg:width="4.662cm" svg:height="5.636cm" svg:x="8.898cm" svg:y="4.601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9.781cm" svg:y="4.631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9.413cm" svg:y1="5.962cm" svg:x2="6.883cm" svg:y2="5.233cm" svg:d="M9413 5962l-2530-729" svg:viewBox="0 0 2531 730">
            <text:p/>
          </draw:connector>
          <draw:custom-shape draw:name="Can 46" draw:style-name="gr53" draw:text-style-name="P24" draw:layer="layout" svg:width="0.307cm" svg:height="4.249cm" draw:transform="rotate (-1.5707963267949) translate (17.072cm 9.428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Can 125" draw:style-name="gr53" draw:text-style-name="P24" draw:layer="layout" svg:width="0.307cm" svg:height="4.249cm" draw:transform="rotate (-1.5707963267949) translate (17.072cm 8.893cm)">
            <text:p/>
            <draw:enhanced-geometry svg:viewBox="0 0 21600 21600" draw:mirror-horizontal="true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custom-shape draw:name="Arc 60" draw:style-name="gr54" draw:text-style-name="P1" draw:layer="layout" svg:width="1.13cm" svg:height="1.454cm" svg:x="15.761cm" svg:y="8.139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6" draw:style-name="gr48" draw:text-style-name="P1" draw:layer="layout" svg:width="2.333cm" svg:height="0.763cm" svg:x="16.217cm" svg:y="7.788cm">
            <text:p text:style-name="P5"><text:span text:style-name="T16">Voice Traffi</text:span><text:span text:style-name="T17">c</text:span></text:p>
            <draw:enhanced-geometry svg:viewBox="0 0 21600 21600" draw:mirror-horizontal="true" draw:type="non-primitive" draw:enhanced-path="M 0 0 L 21600 0 21600 21600 0 21600 Z N"/>
          </draw:custom-shape>
          <draw:custom-shape draw:name="Arc 127" draw:style-name="gr55" draw:text-style-name="P1" draw:layer="layout" svg:width="1.13cm" svg:height="1.454cm" draw:transform="rotate (-3.14159265358979) translate (15.798cm 10.549cm)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draw:name="Rectangle 128" draw:style-name="gr48" draw:text-style-name="P1" draw:layer="layout" svg:width="2.193cm" svg:height="0.699cm" svg:x="13.067cm" svg:y="10.23cm">
            <text:p text:style-name="P7"><text:span text:style-name="T16">Data Traffic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23" draw:style-name="gr48" draw:text-style-name="P1" draw:layer="layout" svg:width="0.988cm" svg:height="0.763cm" svg:x="5.164cm" svg:y="4.828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</draw:g>
        <draw:g draw:name="Group 2" draw:style-name="gr2">
          <draw:g draw:name="Group 3" draw:style-name="gr2">
            <draw:custom-shape draw:name="Rectangle 10" draw:style-name="gr25" draw:text-style-name="P10" xml:id="id16" draw:id="id16" draw:layer="layout" svg:width="0.384cm" svg:height="0.361cm" svg:x="10.194cm" svg:y="9.121cm">
              <text:p/>
              <draw:enhanced-geometry svg:viewBox="0 0 21600 21600" draw:type="non-primitive" draw:enhanced-path="M 0 0 L 21600 0 21600 21600 0 21600 Z N"/>
            </draw:custom-shape>
            <draw:connector draw:name="Straight Connector 11" draw:style-name="gr26" draw:text-style-name="P2" draw:layer="layout" draw:type="line" svg:x1="10.386cm" svg:y1="9.121cm" svg:x2="10.386cm" svg:y2="5.869cm" draw:start-shape="id16" draw:start-glue-point="0" svg:d="M10386 9121v-3252" svg:viewBox="0 0 1 3253">
              <text:p/>
            </draw:connector>
            <draw:connector draw:name="Straight Connector 12" draw:style-name="gr27" draw:text-style-name="P2" draw:layer="layout" draw:type="line" svg:x1="10.657cm" svg:y1="6.87cm" svg:x2="10.657cm" svg:y2="5.869cm" svg:d="M10657 6870v-1001" svg:viewBox="0 0 1 1002">
              <text:p/>
            </draw:connector>
            <draw:connector draw:name="Straight Connector 13" draw:style-name="gr27" draw:text-style-name="P2" draw:layer="layout" draw:type="line" svg:x1="10.095cm" svg:y1="6.87cm" svg:x2="10.095cm" svg:y2="5.869cm" svg:d="M10095 6870v-1001" svg:viewBox="0 0 1 1002">
              <text:p/>
            </draw:connector>
          </draw:g>
          <draw:g draw:name="Group 4" draw:style-name="gr2">
            <draw:custom-shape draw:name="Arc 8" draw:style-name="gr28" draw:text-style-name="P1" draw:layer="layout" svg:width="0.694cm" svg:height="1.361cm" svg:x="10.386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9" draw:style-name="gr28" draw:text-style-name="P1" draw:layer="layout" svg:width="0.694cm" svg:height="1.361cm" svg:x="10.625cm" svg:y="5.68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94cm" svg:height="1.361cm" svg:x="9.683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94cm" svg:height="1.361cm" svg:x="9.445cm" svg:y="5.68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8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Can be multiple “User Plane Tunnels” each with a different QCI and for a different application.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0" draw:style-name="dp1" draw:master-page-name="Master1-Layout24-cust-Title-and-Content">
        <draw:g draw:name="Group 7" draw:style-name="gr2">
          <draw:custom-shape draw:name="Triangle 31" draw:style-name="gr56" draw:text-style-name="P25" draw:layer="layout" svg:width="3.783cm" svg:height="4.372cm" draw:transform="rotate (1.95808488781244) translate (6.155cm 7.73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g draw:name="Group 6" draw:style-name="gr2">
            <draw:frame draw:name="Picture 18" draw:style-name="gr5" draw:text-style-name="P2" draw:layer="layout" svg:width="0.576cm" svg:height="1.047cm" svg:x="6.233cm" svg:y="4.623cm">
              <draw:image xlink:href="Pictures/100000010000014D0000025D29339EAD.png" xlink:type="simple" xlink:show="embed" xlink:actuate="onLoad" draw:mime-type="image/png">
                <text:p/>
              </draw:image>
            </draw:frame>
            <draw:connector draw:name="Straight Arrow Connector 114" draw:style-name="gr21" draw:text-style-name="P2" draw:layer="layout" draw:type="line" svg:x1="11.131cm" svg:y1="9.258cm" svg:x2="10.545cm" svg:y2="9.258cm" svg:d="M11131 9258h-586" svg:viewBox="0 0 587 1">
              <text:p/>
            </draw:connector>
            <draw:frame draw:name="Picture 35" draw:style-name="gr22" draw:text-style-name="P2" draw:layer="layout" svg:width="2.053cm" svg:height="1.607cm" svg:x="11.026cm" svg:y="7.958cm">
              <draw:image xlink:href="Pictures/100000010000028D000001FFF7EFA6DB.png" xlink:type="simple" xlink:show="embed" xlink:actuate="onLoad" draw:mime-type="image/png">
                <text:p/>
              </draw:image>
              <svg:desc>A close up of a logo

Description automatically generated</svg:desc>
            </draw:frame>
            <draw:connector draw:name="Straight Arrow Connector 115" draw:style-name="gr21" draw:text-style-name="P2" draw:layer="layout" draw:type="line" svg:x1="17.086cm" svg:y1="9.258cm" svg:x2="12.996cm" svg:y2="9.258cm" svg:d="M17086 9258h-4090" svg:viewBox="0 0 4091 1">
              <text:p/>
            </draw:connector>
            <draw:custom-shape draw:name="Rectangle 116" draw:style-name="gr6" draw:text-style-name="P3" draw:layer="layout" svg:width="3.404cm" svg:height="1.378cm" svg:x="17.086cm" svg:y="8.569cm">
              <text:p text:style-name="P6"><text:span text:style-name="T6">Mobile Core User Plane</text:span></text:p>
              <draw:enhanced-geometry svg:viewBox="0 0 21600 21600" draw:mirror-horizontal="true" draw:type="non-primitive" draw:enhanced-path="M 0 0 L 21600 0 21600 21600 0 21600 Z N"/>
            </draw:custom-shape>
            <draw:custom-shape draw:name="Rectangle 117" draw:style-name="gr6" draw:text-style-name="P3" draw:layer="layout" svg:width="3.404cm" svg:height="1.378cm" svg:x="17.086cm" svg:y="5.78cm">
              <text:p text:style-name="P6"><text:span text:style-name="T6">Mobile Core Control Plane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18" draw:style-name="gr21" draw:text-style-name="P2" draw:layer="layout" draw:type="line" svg:x1="15.041cm" svg:y1="8.761cm" svg:x2="12.996cm" svg:y2="8.761cm" svg:d="M15041 8761h-2045" svg:viewBox="0 0 2046 1">
              <text:p/>
            </draw:connector>
            <draw:connector draw:name="Straight Arrow Connector 119" draw:style-name="gr21" draw:text-style-name="P2" draw:layer="layout" draw:type="line" svg:x1="15.041cm" svg:y1="6.434cm" svg:x2="15.041cm" svg:y2="8.761cm" svg:d="M15041 6434v2327" svg:viewBox="0 0 1 2328">
              <text:p/>
            </draw:connector>
            <draw:connector draw:name="Straight Arrow Connector 120" draw:style-name="gr21" draw:text-style-name="P2" draw:layer="layout" draw:type="line" svg:x1="17.068cm" svg:y1="6.436cm" svg:x2="15.024cm" svg:y2="6.436cm" svg:d="M17068 6436h-2044" svg:viewBox="0 0 2045 1">
              <text:p/>
            </draw:connector>
            <draw:custom-shape draw:name="Rectangle 122" draw:style-name="gr47" draw:text-style-name="P1" draw:layer="layout" svg:width="4.662cm" svg:height="5.636cm" svg:x="8.898cm" svg:y="4.57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ectangle 44" draw:style-name="gr48" draw:text-style-name="P1" draw:layer="layout" svg:width="2.986cm" svg:height="0.848cm" svg:x="9.781cm" svg:y="4.599cm">
              <text:p text:style-name="P5"><text:span text:style-name="T15">Base Station</text:span></text:p>
              <draw:enhanced-geometry svg:viewBox="0 0 21600 21600" draw:mirror-horizontal="true" draw:type="non-primitive" draw:enhanced-path="M 0 0 L 21600 0 21600 21600 0 21600 Z N"/>
            </draw:custom-shape>
            <draw:connector draw:name="Straight Arrow Connector 123" draw:style-name="gr49" draw:text-style-name="P2" draw:layer="layout" draw:type="line" svg:x1="9.413cm" svg:y1="5.931cm" svg:x2="6.883cm" svg:y2="5.202cm" svg:d="M9413 5931l-2530-729" svg:viewBox="0 0 2531 730">
              <text:p/>
            </draw:connector>
            <draw:custom-shape draw:name="Rectangle 23" draw:style-name="gr48" draw:text-style-name="P1" draw:layer="layout" svg:width="0.988cm" svg:height="0.763cm" svg:x="5.164cm" svg:y="4.797cm">
              <text:p text:style-name="P5"><text:span text:style-name="T18">UE</text:span></text:p>
              <draw:enhanced-geometry svg:viewBox="0 0 21600 21600" draw:mirror-horizontal="true" draw:type="non-primitive" draw:enhanced-path="M 0 0 L 21600 0 21600 21600 0 21600 Z N"/>
            </draw:custom-shape>
            <draw:g draw:name="Group 2" draw:style-name="gr2">
              <draw:custom-shape draw:name="Rectangle 1" draw:style-name="gr57" draw:text-style-name="P1" draw:layer="layout" svg:width="0.283cm" svg:height="0.322cm" svg:x="14.335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25" draw:style-name="gr57" draw:text-style-name="P1" draw:layer="layout" svg:width="1.441cm" svg:height="0.322cm" svg:x="14.615cm" svg:y="9.498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4" draw:style-name="gr58" draw:text-style-name="P1" draw:layer="layout" svg:width="0.405cm" svg:height="1.998cm" draw:transform="rotate (-1.5707963267949) translate (16.182cm 9.952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5" draw:style-name="gr59" draw:text-style-name="P4" draw:layer="layout" svg:width="3.14cm" svg:height="0.684cm" svg:x="13.489cm" svg:y="10.261cm">
              <draw:text-box>
                <text:p text:style-name="P5"><text:span text:style-name="T19">GTP + UDP over IP</text:span></text:p>
              </draw:text-box>
            </draw:frame>
            <draw:custom-shape draw:name="Rectangle 29" draw:style-name="gr57" draw:text-style-name="P1" draw:layer="layout" svg:width="0.283cm" svg:height="0.322cm" svg:x="7.607cm" svg:y="5.653cm">
              <text:p/>
              <draw:enhanced-geometry svg:viewBox="0 0 21600 21600" draw:mirror-horizontal="true" draw:type="non-primitive" draw:enhanced-path="M 0 0 L 21600 0 21600 21600 0 21600 Z N"/>
            </draw:custom-shape>
            <draw:custom-shape draw:name="Right Brace 30" draw:style-name="gr58" draw:text-style-name="P1" draw:layer="layout" svg:width="0.278cm" svg:height="0.495cm" draw:transform="rotate (-1.5707963267949) translate (7.996cm 6.081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2" draw:style-name="gr60" draw:text-style-name="P4" draw:layer="layout" svg:width="3.278cm" svg:height="1.966cm" svg:x="5.708cm" svg:y="6.247cm">
              <draw:text-box>
                <text:p text:style-name="P6"><text:span text:style-name="T19">Physical Layer </text:span></text:p>
                <text:p text:style-name="P6"><text:span text:style-name="T19">Packets</text:span></text:p>
                <text:p text:style-name="P6"><text:span text:style-name="T19">Transmitted Using</text:span></text:p>
                <text:p text:style-name="P6"><text:span text:style-name="T19">Analog Modulation</text:span></text:p>
              </draw:text-box>
            </draw:frame>
            <draw:g draw:name="Group 33" draw:style-name="gr2">
              <draw:custom-shape draw:name="Rectangle 34" draw:style-name="gr57" draw:text-style-name="P1" draw:layer="layout" svg:width="0.283cm" svg:height="0.322cm" svg:x="14.816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  <draw:custom-shape draw:name="Rectangle 36" draw:style-name="gr57" draw:text-style-name="P1" draw:layer="layout" svg:width="1.441cm" svg:height="0.322cm" svg:x="15.096cm" svg:y="5.839cm">
                <text:p/>
                <draw:enhanced-geometry svg:viewBox="0 0 21600 21600" draw:mirror-horizontal="true" draw:type="non-primitive" draw:enhanced-path="M 0 0 L 21600 0 21600 21600 0 21600 Z N"/>
              </draw:custom-shape>
            </draw:g>
            <draw:custom-shape draw:name="Right Brace 37" draw:style-name="gr58" draw:text-style-name="P1" draw:layer="layout" svg:width="0.405cm" svg:height="1.998cm" draw:transform="rotate (1.5707963267949) translate (14.689cm 5.768cm)">
              <text:p/>
    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  <draw:frame draw:name="TextBox 38" draw:style-name="gr61" draw:text-style-name="P4" draw:layer="layout" svg:width="2.307cm" svg:height="0.684cm" svg:x="14.473cm" svg:y="4.834cm">
              <draw:text-box>
                <text:p text:style-name="P5"><text:span text:style-name="T19">SCTP over IP</text:span></text:p>
              </draw:text-box>
            </draw:frame>
          </draw:g>
        </draw:g>
        <draw:g draw:name="Group 3" draw:style-name="gr2">
          <draw:g draw:name="Group 8" draw:style-name="gr2">
            <draw:custom-shape draw:name="Rectangle 15" draw:style-name="gr25" draw:text-style-name="P10" xml:id="id17" draw:id="id17" draw:layer="layout" svg:width="0.384cm" svg:height="0.361cm" svg:x="10.162cm" svg:y="9.086cm">
              <text:p/>
              <draw:enhanced-geometry svg:viewBox="0 0 21600 21600" draw:type="non-primitive" draw:enhanced-path="M 0 0 L 21600 0 21600 21600 0 21600 Z N"/>
            </draw:custom-shape>
            <draw:connector draw:name="Straight Connector 16" draw:style-name="gr26" draw:text-style-name="P2" draw:layer="layout" draw:type="line" svg:x1="10.354cm" svg:y1="9.086cm" svg:x2="10.355cm" svg:y2="5.834cm" draw:start-shape="id17" draw:start-glue-point="0" svg:d="M10354 9086l1-3252" svg:viewBox="0 0 2 3253">
              <text:p/>
            </draw:connector>
            <draw:connector draw:name="Straight Connector 17" draw:style-name="gr27" draw:text-style-name="P2" draw:layer="layout" draw:type="line" svg:x1="10.625cm" svg:y1="6.834cm" svg:x2="10.625cm" svg:y2="5.834cm" svg:d="M10625 6834v-1000" svg:viewBox="0 0 1 1001">
              <text:p/>
            </draw:connector>
            <draw:connector draw:name="Straight Connector 19" draw:style-name="gr27" draw:text-style-name="P2" draw:layer="layout" draw:type="line" svg:x1="10.063cm" svg:y1="6.834cm" svg:x2="10.063cm" svg:y2="5.834cm" svg:d="M10063 6834v-1000" svg:viewBox="0 0 1 1001">
              <text:p/>
            </draw:connector>
          </draw:g>
          <draw:g draw:name="Group 9" draw:style-name="gr2">
            <draw:custom-shape draw:name="Arc 13" draw:style-name="gr28" draw:text-style-name="P1" draw:layer="layout" svg:width="0.694cm" svg:height="1.361cm" svg:x="10.355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4" draw:style-name="gr28" draw:text-style-name="P1" draw:layer="layout" svg:width="0.694cm" svg:height="1.361cm" svg:x="10.593cm" svg:y="5.653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0" draw:style-name="gr2">
            <draw:custom-shape draw:name="Arc 11" draw:style-name="gr28" draw:text-style-name="P1" draw:layer="layout" svg:width="0.694cm" svg:height="1.361cm" svg:x="9.651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2" draw:style-name="gr28" draw:text-style-name="P1" draw:layer="layout" svg:width="0.694cm" svg:height="1.361cm" svg:x="9.413cm" svg:y="5.653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9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TP = Stream Control Transport Protocol </text:span><text:span text:style-name="T5"></text:span><text:span text:style-name="T4"> alternative to TCP</text:span></text:p>
              <text:p text:style-name="P5"><text:span text:style-name="T4">GTP = (General Packet Radio Service) Tunneling Protocol </text:span><text:span text:style-name="T5"></text:span><text:span text:style-name="T4"> alternative to GRE (Generic Routing Encapsulation)</text:span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1" draw:style-name="dp1" draw:master-page-name="Master1-Layout24-cust-Title-and-Content">
        <draw:g draw:name="Group 1" draw:style-name="gr2">
          <draw:connector draw:name="Straight Arrow Connector 42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31" draw:style-name="gr62" draw:text-style-name="P26" draw:layer="layout" svg:width="3.783cm" svg:height="4.372cm" draw:transform="rotate (1.95808488781244) translate (8.13cm 7.116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name="Picture 18" draw:style-name="gr5" draw:text-style-name="P2" draw:layer="layout" svg:width="0.576cm" svg:height="1.047cm" svg:x="7.991cm" svg:y="3.648cm">
            <draw:image xlink:href="Pictures/100000010000014D0000025D29339EAD.png" xlink:type="simple" xlink:show="embed" xlink:actuate="onLoad" draw:mime-type="image/png">
              <text:p/>
            </draw:image>
          </draw:frame>
          <draw:connector draw:name="Straight Arrow Connector 114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35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11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11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11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1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11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12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122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44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123" draw:style-name="gr49" draw:text-style-name="P2" draw:layer="layout" draw:type="line" svg:x1="11.444cm" svg:y1="5.343cm" svg:x2="8.642cm" svg:y2="4.227cm" svg:d="M11444 5343l-2802-1116" svg:viewBox="0 0 2803 1117">
            <text:p/>
          </draw:connector>
          <draw:custom-shape draw:name="Rectangle 23" draw:style-name="gr48" draw:text-style-name="P1" draw:layer="layout" svg:width="0.988cm" svg:height="0.763cm" svg:x="7.075cm" svg:y="3.822cm">
            <text:p text:style-name="P5"><text:span text:style-name="T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40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43" draw:style-name="gr63" draw:text-style-name="P27" draw:layer="layout" svg:width="3.783cm" svg:height="4.372cm" draw:transform="rotate (1.95808488781244) translate (4.86cm 9.861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Arc 9" draw:style-name="gr64" draw:text-style-name="P1" draw:layer="layout" svg:width="3.602cm" svg:height="5.211cm" svg:x="6.02cm" svg:y="4.507cm">
            <text:p/>
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80 270" draw:enhanced-path="S M ?f52 ?f53 A ?f130 ?f131 ?f132 ?f133 ?f52 ?f53 ?f127 ?f129 W ?f134 ?f135 ?f136 ?f137 ?f52 ?f53 ?f127 ?f129 L ?f12 ?f9 Z N F M ?f52 ?f53 A ?f130 ?f131 ?f132 ?f133 ?f52 ?f53 ?f127 ?f129 W ?f134 ?f135 ?f136 ?f137 ?f52 ?f53 ?f127 ?f12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name="Straight Arrow Connector 46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47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48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49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50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52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41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</draw:g>
        <draw:g draw:name="Group 2" draw:style-name="gr2">
          <draw:g draw:name="Group 3" draw:style-name="gr2">
            <draw:custom-shape draw:name="Rectangle 11" draw:style-name="gr25" draw:text-style-name="P10" xml:id="id18" draw:id="id18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2" draw:style-name="gr26" draw:text-style-name="P2" draw:layer="layout" draw:type="line" svg:x1="12.258cm" svg:y1="8.113cm" svg:x2="12.258cm" svg:y2="4.861cm" draw:start-shape="id18" draw:start-glue-point="0" svg:d="M12258 8113v-3252" svg:viewBox="0 0 1 3253">
              <text:p/>
            </draw:connector>
            <draw:connector draw:name="Straight Connector 13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4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4" draw:style-name="gr2">
            <draw:custom-shape draw:name="Arc 8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0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5" draw:style-name="gr2">
            <draw:custom-shape draw:name="Arc 6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7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5" draw:style-name="gr2">
          <draw:g draw:name="Group 16" draw:style-name="gr2">
            <draw:custom-shape draw:name="Rectangle 25" draw:style-name="gr25" draw:text-style-name="P10" xml:id="id19" draw:id="id19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6" draw:style-name="gr26" draw:text-style-name="P2" draw:layer="layout" draw:type="line" svg:x1="8.954cm" svg:y1="11.141cm" svg:x2="8.954cm" svg:y2="7.889cm" draw:start-shape="id19" draw:start-glue-point="0" svg:d="M8954 11141v-3252" svg:viewBox="0 0 1 3253">
              <text:p/>
            </draw:connector>
            <draw:connector draw:name="Straight Connector 27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8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7" draw:style-name="gr2">
            <draw:custom-shape draw:name="Arc 22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4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9" draw:style-name="gr2">
            <draw:custom-shape draw:name="Arc 20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1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0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32" draw:style-name="dp1" draw:master-page-name="Master1-Layout24-cust-Title-and-Content">
        <draw:g draw:name="Group 36" draw:style-name="gr2">
          <draw:connector draw:name="Straight Arrow Connector 37" draw:style-name="gr21" draw:text-style-name="P2" draw:layer="layout" draw:type="line" svg:x1="13.711cm" svg:y1="8.283cm" svg:x2="10.542cm" svg:y2="10.285cm" svg:d="M13711 8283l-3169 2002" svg:viewBox="0 0 3170 2003">
            <text:p/>
          </draw:connector>
          <draw:custom-shape draw:name="Triangle 45" draw:style-name="gr65" draw:text-style-name="P28" draw:layer="layout" svg:width="3.783cm" svg:height="5.797cm" draw:transform="rotate (1.79768912955416) translate (6.249cm 7.532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53" draw:style-name="gr21" draw:text-style-name="P2" draw:layer="layout" draw:type="line" svg:x1="12.89cm" svg:y1="8.283cm" svg:x2="12.303cm" svg:y2="8.283cm" svg:d="M12890 8283h-587" svg:viewBox="0 0 588 1">
            <text:p/>
          </draw:connector>
          <draw:frame draw:name="Picture 54" draw:style-name="gr22" draw:text-style-name="P2" draw:layer="layout" svg:width="2.053cm" svg:height="1.607cm" svg:x="12.785cm" svg:y="6.98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connector draw:name="Straight Arrow Connector 55" draw:style-name="gr21" draw:text-style-name="P2" draw:layer="layout" draw:type="line" svg:x1="18.844cm" svg:y1="8.283cm" svg:x2="14.754cm" svg:y2="8.283cm" svg:d="M18844 8283h-4090" svg:viewBox="0 0 4091 1">
            <text:p/>
          </draw:connector>
          <draw:custom-shape draw:name="Rectangle 56" draw:style-name="gr6" draw:text-style-name="P3" draw:layer="layout" svg:width="3.404cm" svg:height="1.378cm" svg:x="18.844cm" svg:y="7.595cm">
            <text:p text:style-name="P6"><text:span text:style-name="T6">Mobile Core User Plane</text:span></text:p>
            <draw:enhanced-geometry svg:viewBox="0 0 21600 21600" draw:mirror-horizontal="true" draw:type="non-primitive" draw:enhanced-path="M 0 0 L 21600 0 21600 21600 0 21600 Z N"/>
          </draw:custom-shape>
          <draw:custom-shape draw:name="Rectangle 57" draw:style-name="gr6" draw:text-style-name="P3" draw:layer="layout" svg:width="3.404cm" svg:height="1.378cm" svg:x="18.844cm" svg:y="4.805cm">
            <text:p text:style-name="P6"><text:span text:style-name="T6">Mobile Core Control Plan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58" draw:style-name="gr21" draw:text-style-name="P2" draw:layer="layout" draw:type="line" svg:x1="16.799cm" svg:y1="7.787cm" svg:x2="14.754cm" svg:y2="7.787cm" svg:d="M16799 7787h-2045" svg:viewBox="0 0 2046 1">
            <text:p/>
          </draw:connector>
          <draw:connector draw:name="Straight Arrow Connector 59" draw:style-name="gr21" draw:text-style-name="P2" draw:layer="layout" draw:type="line" svg:x1="16.799cm" svg:y1="5.459cm" svg:x2="16.799cm" svg:y2="7.787cm" svg:d="M16799 5459v2328" svg:viewBox="0 0 1 2329">
            <text:p/>
          </draw:connector>
          <draw:connector draw:name="Straight Arrow Connector 60" draw:style-name="gr21" draw:text-style-name="P2" draw:layer="layout" draw:type="line" svg:x1="18.827cm" svg:y1="5.461cm" svg:x2="16.782cm" svg:y2="5.461cm" svg:d="M18827 5461h-2045" svg:viewBox="0 0 2046 1">
            <text:p/>
          </draw:connector>
          <draw:custom-shape draw:name="Rectangle 61" draw:style-name="gr47" draw:text-style-name="P1" draw:layer="layout" svg:width="4.662cm" svg:height="5.636cm" svg:x="10.656cm" svg:y="3.595cm">
            <text:p/>
            <draw:enhanced-geometry svg:viewBox="0 0 21600 21600" draw:mirror-horizontal="true" draw:type="non-primitive" draw:enhanced-path="M 0 0 L 21600 0 21600 21600 0 21600 Z N"/>
          </draw:custom-shape>
          <draw:custom-shape draw:name="Rectangle 62" draw:style-name="gr48" draw:text-style-name="P1" draw:layer="layout" svg:width="2.986cm" svg:height="0.848cm" svg:x="11.539cm" svg:y="3.624cm">
            <text:p text:style-name="P5"><text:span text:style-name="T15">Base Station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3" draw:style-name="gr49" draw:text-style-name="P2" draw:layer="layout" draw:type="line" svg:x1="11.363cm" svg:y1="5.675cm" svg:x2="7.169cm" svg:y2="5.452cm" draw:end-shape="id20" draw:end-glue-point="1" svg:d="M11363 5675l-4194-223" svg:viewBox="0 0 4195 224">
            <text:p/>
          </draw:connector>
          <draw:custom-shape draw:name="Rectangle 64" draw:style-name="gr48" draw:text-style-name="P1" draw:layer="layout" svg:width="0.988cm" svg:height="0.763cm" svg:x="6.668cm" svg:y="3.822cm">
            <text:p text:style-name="P5"><text:span text:style-name="T18">UE</text:span></text:p>
            <draw:enhanced-geometry svg:viewBox="0 0 21600 21600" draw:mirror-horizontal="true" draw:type="non-primitive" draw:enhanced-path="M 0 0 L 21600 0 21600 21600 0 21600 Z N"/>
          </draw:custom-shape>
          <draw:connector draw:name="Straight Arrow Connector 66" draw:style-name="gr21" draw:text-style-name="P2" draw:layer="layout" draw:type="line" svg:x1="9.576cm" svg:y1="11.313cm" svg:x2="8.99cm" svg:y2="11.313cm" svg:d="M9576 11313h-586" svg:viewBox="0 0 587 1">
            <text:p/>
          </draw:connector>
          <draw:custom-shape draw:name="Triangle 67" draw:style-name="gr66" draw:text-style-name="P29" draw:layer="layout" svg:width="4.08cm" svg:height="4.874cm" draw:transform="rotate (2.25147473507269) translate (6.232cm 9.27cm)">
            <text:p/>
            <draw:enhanced-geometry svg:viewBox="0 0 21600 21600" draw:mirror-horizontal="true" draw:path-stretchpoint-x="21600" draw:path-stretchpoint-y="21600" draw:text-areas="?f10 ?f6 ?f12 ?f3" draw:glue-points="?f11 ?f2 ?f10 ?f6 ?f0 ?f3 ?f11 ?f3 ?f1 ?f3 ?f12 ?f6" draw:type="non-primitive" draw:modifiers="27156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name="Straight Arrow Connector 69" draw:style-name="gr21" draw:text-style-name="P2" draw:layer="layout" draw:type="line" svg:x1="17.756cm" svg:y1="10.824cm" svg:x2="11.281cm" svg:y2="10.824cm" svg:d="M17756 10824h-6475" svg:viewBox="0 0 6476 1">
            <text:p/>
          </draw:connector>
          <draw:connector draw:name="Straight Arrow Connector 70" draw:style-name="gr21" draw:text-style-name="P2" draw:layer="layout" draw:type="line" svg:x1="17.756cm" svg:y1="5.89cm" svg:x2="17.738cm" svg:y2="10.811cm" svg:d="M17756 5890l-18 4921" svg:viewBox="0 0 19 4922">
            <text:p/>
          </draw:connector>
          <draw:connector draw:name="Straight Arrow Connector 71" draw:style-name="gr21" draw:text-style-name="P2" draw:layer="layout" draw:type="line" svg:x1="18.844cm" svg:y1="5.89cm" svg:x2="17.738cm" svg:y2="5.89cm" svg:d="M18844 5890h-1106" svg:viewBox="0 0 1107 1">
            <text:p/>
          </draw:connector>
          <draw:connector draw:name="Straight Arrow Connector 72" draw:style-name="gr21" draw:text-style-name="P2" draw:layer="layout" draw:type="line" svg:x1="18.346cm" svg:y1="11.313cm" svg:x2="11.305cm" svg:y2="11.313cm" svg:d="M18346 11313h-7041" svg:viewBox="0 0 7042 1">
            <text:p/>
          </draw:connector>
          <draw:connector draw:name="Straight Arrow Connector 73" draw:style-name="gr21" draw:text-style-name="P2" draw:layer="layout" draw:type="line" svg:x1="18.326cm" svg:y1="8.689cm" svg:x2="18.326cm" svg:y2="11.338cm" svg:d="M18326 8689v2649" svg:viewBox="0 0 1 2650">
            <text:p/>
          </draw:connector>
          <draw:connector draw:name="Straight Arrow Connector 74" draw:style-name="gr21" draw:text-style-name="P2" draw:layer="layout" draw:type="line" svg:x1="18.844cm" svg:y1="8.689cm" svg:x2="18.291cm" svg:y2="8.689cm" svg:d="M18844 8689h-553" svg:viewBox="0 0 554 1">
            <text:p/>
          </draw:connector>
          <draw:frame draw:name="Picture 75" draw:style-name="gr22" draw:text-style-name="P2" draw:layer="layout" svg:width="2.053cm" svg:height="1.607cm" svg:x="9.472cm" svg:y="10.013cm">
            <draw:image xlink:href="Pictures/100000010000028D000001FFF7EFA6DB.png" xlink:type="simple" xlink:show="embed" xlink:actuate="onLoad" draw:mime-type="image/png">
              <text:p/>
            </draw:image>
            <svg:desc>A close up of a logo

Description automatically generated</svg:desc>
          </draw:frame>
          <draw:frame draw:name="Picture 51" draw:style-name="gr5" draw:text-style-name="P2" xml:id="id20" draw:id="id20" draw:layer="layout" svg:width="0.559cm" svg:height="1.016cm" svg:x="6.61cm" svg:y="4.944cm">
            <draw:image xlink:href="Pictures/100000010000014D0000025D29339EAD.png" xlink:type="simple" xlink:show="embed" xlink:actuate="onLoad" draw:mime-type="image/png">
              <text:p/>
            </draw:image>
          </draw:frame>
        </draw:g>
        <draw:connector draw:name="Straight Arrow Connector 32" draw:style-name="gr49" draw:text-style-name="P2" draw:layer="layout" draw:type="line" svg:x1="8.14cm" svg:y1="8.473cm" svg:x2="6.889cm" svg:y2="5.96cm" draw:end-shape="id20" draw:end-glue-point="2" svg:d="M8140 8473l-1251-2513" svg:viewBox="0 0 1252 2514">
          <text:p/>
        </draw:connector>
        <draw:g draw:name="Group 1" draw:style-name="gr2">
          <draw:g draw:name="Group 2" draw:style-name="gr2">
            <draw:custom-shape draw:name="Rectangle 9" draw:style-name="gr25" draw:text-style-name="P10" xml:id="id21" draw:id="id21" draw:layer="layout" svg:width="0.332cm" svg:height="0.361cm" svg:x="12.092cm" svg:y="8.113cm">
              <text:p/>
              <draw:enhanced-geometry svg:viewBox="0 0 21600 21600" draw:type="non-primitive" draw:enhanced-path="M 0 0 L 21600 0 21600 21600 0 21600 Z N"/>
            </draw:custom-shape>
            <draw:connector draw:name="Straight Connector 10" draw:style-name="gr26" draw:text-style-name="P2" draw:layer="layout" draw:type="line" svg:x1="12.258cm" svg:y1="8.113cm" svg:x2="12.258cm" svg:y2="4.861cm" draw:start-shape="id21" draw:start-glue-point="0" svg:d="M12258 8113v-3252" svg:viewBox="0 0 1 3253">
              <text:p/>
            </draw:connector>
            <draw:connector draw:name="Straight Connector 11" draw:style-name="gr27" draw:text-style-name="P2" draw:layer="layout" draw:type="line" svg:x1="12.493cm" svg:y1="5.861cm" svg:x2="12.493cm" svg:y2="4.861cm" svg:d="M12493 5861v-1000" svg:viewBox="0 0 1 1001">
              <text:p/>
            </draw:connector>
            <draw:connector draw:name="Straight Connector 12" draw:style-name="gr27" draw:text-style-name="P2" draw:layer="layout" draw:type="line" svg:x1="12.006cm" svg:y1="5.861cm" svg:x2="12.006cm" svg:y2="4.861cm" svg:d="M12006 5861v-1000" svg:viewBox="0 0 1 1001">
              <text:p/>
            </draw:connector>
          </draw:g>
          <draw:g draw:name="Group 3" draw:style-name="gr2">
            <draw:custom-shape draw:name="Arc 7" draw:style-name="gr28" draw:text-style-name="P1" draw:layer="layout" svg:width="0.6cm" svg:height="1.361cm" svg:x="12.258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8" draw:style-name="gr28" draw:text-style-name="P1" draw:layer="layout" svg:width="0.6cm" svg:height="1.361cm" svg:x="12.465cm" svg:y="4.68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4" draw:style-name="gr2">
            <draw:custom-shape draw:name="Arc 5" draw:style-name="gr28" draw:text-style-name="P1" draw:layer="layout" svg:width="0.6cm" svg:height="1.361cm" svg:x="11.65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6" draw:style-name="gr28" draw:text-style-name="P1" draw:layer="layout" svg:width="0.6cm" svg:height="1.361cm" svg:x="11.444cm" svg:y="4.68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draw:g draw:name="Group 13" draw:style-name="gr2">
          <draw:g draw:name="Group 14" draw:style-name="gr2">
            <draw:custom-shape draw:name="Rectangle 21" draw:style-name="gr25" draw:text-style-name="P10" xml:id="id22" draw:id="id22" draw:layer="layout" svg:width="0.332cm" svg:height="0.361cm" svg:x="8.788cm" svg:y="11.141cm">
              <text:p/>
              <draw:enhanced-geometry svg:viewBox="0 0 21600 21600" draw:type="non-primitive" draw:enhanced-path="M 0 0 L 21600 0 21600 21600 0 21600 Z N"/>
            </draw:custom-shape>
            <draw:connector draw:name="Straight Connector 22" draw:style-name="gr26" draw:text-style-name="P2" draw:layer="layout" draw:type="line" svg:x1="8.954cm" svg:y1="11.141cm" svg:x2="8.954cm" svg:y2="7.889cm" draw:start-shape="id22" draw:start-glue-point="0" svg:d="M8954 11141v-3252" svg:viewBox="0 0 1 3253">
              <text:p/>
            </draw:connector>
            <draw:connector draw:name="Straight Connector 23" draw:style-name="gr27" draw:text-style-name="P2" draw:layer="layout" draw:type="line" svg:x1="9.188cm" svg:y1="8.889cm" svg:x2="9.188cm" svg:y2="7.889cm" svg:d="M9188 8889v-1000" svg:viewBox="0 0 1 1001">
              <text:p/>
            </draw:connector>
            <draw:connector draw:name="Straight Connector 24" draw:style-name="gr27" draw:text-style-name="P2" draw:layer="layout" draw:type="line" svg:x1="8.702cm" svg:y1="8.889cm" svg:x2="8.702cm" svg:y2="7.889cm" svg:d="M8702 8889v-1000" svg:viewBox="0 0 1 1001">
              <text:p/>
            </draw:connector>
          </draw:g>
          <draw:g draw:name="Group 15" draw:style-name="gr2">
            <draw:custom-shape draw:name="Arc 19" draw:style-name="gr28" draw:text-style-name="P1" draw:layer="layout" svg:width="0.6cm" svg:height="1.361cm" svg:x="8.954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20" draw:style-name="gr28" draw:text-style-name="P1" draw:layer="layout" svg:width="0.6cm" svg:height="1.361cm" svg:x="9.16cm" svg:y="7.709cm">
              <text:p/>
              <draw:enhanced-geometry svg:viewBox="0 0 21600 21600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  <draw:g draw:name="Group 16" draw:style-name="gr2">
            <draw:custom-shape draw:name="Arc 17" draw:style-name="gr28" draw:text-style-name="P1" draw:layer="layout" svg:width="0.6cm" svg:height="1.361cm" svg:x="8.346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custom-shape draw:name="Arc 18" draw:style-name="gr28" draw:text-style-name="P1" draw:layer="layout" svg:width="0.6cm" svg:height="1.361cm" svg:x="8.14cm" svg:y="7.709cm">
              <text:p/>
              <draw:enhanced-geometry svg:viewBox="0 0 21600 21600" draw:mirror-horizontal="true" draw:path-stretchpoint-x="21600" draw:path-stretchpoint-y="21600" draw:text-areas="?f71 ?f77 ?f59 ?f65" draw:glue-points="?f52 ?f53 ?f12 ?f9 ?f54 ?f55" draw:type="non-primitive" draw:modifiers="193.831 347.2148" draw:enhanced-path="S M ?f52 ?f53 A ?f130 ?f131 ?f132 ?f133 ?f52 ?f53 ?f127 ?f129 W ?f134 ?f135 ?f136 ?f137 ?f52 ?f53 ?f127 ?f129 L ?f12 ?f9 Z N F M ?f52 ?f53 A ?f130 ?f131 ?f132 ?f133 ?f52 ?f53 ?f127 ?f129 W ?f134 ?f135 ?f136 ?f137 ?f52 ?f53 ?f127 ?f129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</draw:g>
        </draw:g>
        <presentation:notes draw:style-name="dp2">
          <draw:page-thumbnail draw:name="Slide Image Placeholder 1" draw:style-name="gr29" draw:layer="layout" svg:width="12.7cm" svg:height="7.144cm" svg:x="6.35cm" svg:y="1.429cm" draw:page-number="11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<text:line-break/></text:span><text:span text:style-name="T4"/></text:p>
              <text:p text:style-name="P5"><text:span text:style-name="T4"/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1258" draw:style-name="dp1" draw:master-page-name="Master1-Layout24-cust-Title-and-Content">
        <draw:connector draw:name="Straight Arrow Connector 11" draw:style-name="gr21" draw:text-style-name="P2" draw:layer="layout" draw:type="line" svg:x1="16.997cm" svg:y1="8.796cm" svg:x2="13.033cm" svg:y2="6.957cm" draw:start-shape="id23" draw:start-glue-point="3" draw:end-shape="id24" svg:d="M16997 8796l-3964-1839" svg:viewBox="0 0 3965 1840">
          <text:p/>
        </draw:connector>
        <draw:custom-shape draw:name="Rectangle 12" draw:style-name="gr6" draw:text-style-name="P3" xml:id="id23" draw:id="id23" draw:layer="layout" svg:width="3.404cm" svg:height="1.378cm" svg:x="16.997cm" svg:y="8.107cm">
          <text:p text:style-name="P6"><text:span text:style-name="T20">Core-UP</text:span></text:p>
          <draw:enhanced-geometry svg:viewBox="0 0 21600 21600" draw:mirror-horizontal="true" draw:type="non-primitive" draw:enhanced-path="M 0 0 L 21600 0 21600 21600 0 21600 Z N"/>
        </draw:custom-shape>
        <draw:connector draw:name="Straight Arrow Connector 16" draw:style-name="gr21" draw:text-style-name="P2" draw:layer="layout" draw:type="line" svg:x1="16.997cm" svg:y1="5.218cm" svg:x2="13.033cm" svg:y2="6.957cm" draw:start-shape="id25" draw:start-glue-point="3" draw:end-shape="id24" svg:d="M16997 5218l-3964 1739" svg:viewBox="0 0 3965 1740">
          <text:p/>
        </draw:connector>
        <draw:custom-shape draw:name="Rectangle 34" draw:style-name="gr67" draw:text-style-name="P31" xml:id="id24" draw:id="id24" draw:layer="layout" svg:width="3.404cm" svg:height="1.23cm" svg:x="9.629cm" svg:y="6.342cm">
          <text:p text:style-name="P30"><text:span text:style-name="T21">Base</text:span></text:p>
          <text:p text:style-name="P30"><text:span text:style-name="T21">Station</text:span></text:p>
          <draw:enhanced-geometry svg:viewBox="0 0 21600 21600" draw:mirror-horizontal="true" draw:mirror-vertical="false" draw:type="non-primitive" draw:enhanced-path="M 0 0 L 21600 0 21600 21600 0 21600 Z N"/>
        </draw:custom-shape>
        <draw:custom-shape draw:name="Rectangle 41" draw:style-name="gr68" draw:text-style-name="P32" draw:layer="layout" svg:width="1.712cm" svg:height="2.348cm" svg:x="3.617cm" svg:y="5.907cm">
          <text:p text:style-name="P6"><text:span text:style-name="T22"/></text:p>
          <text:p text:style-name="P6"><text:span text:style-name="T20">UE</text:span></text:p>
          <text:p text:style-name="P6"><text:span text:style-name="T20"/></text:p>
          <draw:enhanced-geometry svg:viewBox="0 0 21600 21600" draw:mirror-horizontal="true" draw:type="non-primitive" draw:enhanced-path="M 0 0 L 21600 0 21600 21600 0 21600 Z N"/>
        </draw:custom-shape>
        <draw:custom-shape draw:name="Left Brace 42" draw:style-name="gr69" draw:text-style-name="P1" draw:layer="layout" svg:width="0.664cm" svg:height="10.772cm" draw:transform="rotate (1.5707963267949) translate (9.629cm 10.274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draw:name="Rectangle 46" draw:style-name="gr70" draw:text-style-name="P1" draw:layer="layout" svg:width="7.316cm" svg:height="0.848cm" svg:x="11.375cm" svg:y="10.163cm">
          <text:p text:style-name="P6"><text:span text:style-name="T23">Secure Private Network</text:span></text:p>
          <draw:enhanced-geometry svg:viewBox="0 0 21600 21600" draw:type="non-primitive" draw:enhanced-path="M 0 0 L 21600 0 21600 21600 0 21600 Z N"/>
        </draw:custom-shape>
        <draw:connector draw:name="Straight Arrow Connector 54" draw:style-name="gr71" draw:text-style-name="P2" draw:layer="layout" draw:type="line" svg:x1="5.687cm" svg:y1="6.957cm" svg:x2="9.359cm" svg:y2="6.957cm" svg:d="M5687 6957h3672" svg:viewBox="0 0 3673 1">
          <text:p/>
        </draw:connector>
        <draw:connector draw:name="Straight Arrow Connector 62" draw:style-name="gr72" draw:text-style-name="P2" draw:layer="layout" draw:type="line" svg:x1="5.687cm" svg:y1="6.005cm" svg:x2="16.786cm" svg:y2="4.804cm" svg:d="M5687 6005l11099-1201" svg:viewBox="0 0 11100 1202">
          <text:p/>
        </draw:connector>
        <draw:connector draw:name="Straight Arrow Connector 66" draw:style-name="gr73" draw:text-style-name="P2" draw:layer="layout" draw:type="line" svg:x1="18.691cm" svg:y1="6.087cm" svg:x2="18.691cm" svg:y2="7.827cm" svg:d="M18691 6087v1740" svg:viewBox="0 0 1 1741">
          <text:p/>
        </draw:connector>
        <draw:frame draw:name="TextBox 68" draw:style-name="gr74" draw:text-style-name="P4" draw:layer="layout" svg:width="1.154cm" svg:height="0.727cm" svg:x="18.529cm" svg:y="6.572cm">
          <draw:text-box>
            <text:p text:style-name="P6"><text:span text:style-name="T24">(3a)</text:span></text:p>
          </draw:text-box>
        </draw:frame>
        <draw:connector draw:name="Straight Arrow Connector 70" draw:style-name="gr75" draw:text-style-name="P2" draw:layer="layout" draw:type="line" svg:x1="16.786cm" svg:y1="4.993cm" svg:x2="13.229cm" svg:y2="6.467cm" svg:d="M16786 4993l-3557 1474" svg:viewBox="0 0 3558 1475">
          <text:p/>
        </draw:connector>
        <draw:frame draw:name="TextBox 73" draw:style-name="gr76" draw:text-style-name="P4" draw:layer="layout" svg:width="1.176cm" svg:height="0.727cm" svg:x="13.449cm" svg:y="5.379cm">
          <draw:text-box>
            <text:p text:style-name="P6"><text:span text:style-name="T24">(3b)</text:span></text:p>
          </draw:text-box>
        </draw:frame>
        <draw:connector draw:name="Straight Arrow Connector 74" draw:style-name="gr77" draw:text-style-name="P2" draw:layer="layout" draw:type="line" svg:x1="16.786cm" svg:y1="4.993cm" svg:x2="5.687cm" svg:y2="6.693cm" svg:d="M16786 4993l-11099 1700" svg:viewBox="0 0 11100 1701">
          <text:p/>
        </draw:connector>
        <draw:frame draw:name="TextBox 78" draw:style-name="gr78" draw:text-style-name="P4" draw:layer="layout" svg:width="1.141cm" svg:height="0.727cm" svg:x="6.832cm" svg:y="5.747cm">
          <draw:text-box>
            <text:p text:style-name="P6"><text:span text:style-name="T24">(3c)</text:span></text:p>
          </draw:text-box>
        </draw:frame>
        <draw:connector draw:name="Straight Arrow Connector 79" draw:style-name="gr79" draw:text-style-name="P2" draw:layer="layout" draw:type="line" svg:x1="5.687cm" svg:y1="7.909cm" svg:x2="16.786cm" svg:y2="9.058cm" svg:d="M5687 7909l11099 1149" svg:viewBox="0 0 11100 1150">
          <text:p/>
        </draw:connector>
        <draw:frame draw:name="TextBox 82" draw:style-name="gr80" draw:text-style-name="P4" draw:layer="layout" svg:width="0.994cm" svg:height="0.769cm" svg:x="7.203cm" svg:y="6.859cm">
          <draw:text-box>
            <text:p text:style-name="P5"><text:span text:style-name="T11">(1)</text:span></text:p>
          </draw:text-box>
        </draw:frame>
        <draw:frame draw:name="TextBox 83" draw:style-name="gr80" draw:text-style-name="P4" draw:layer="layout" svg:width="0.994cm" svg:height="0.769cm" svg:x="10.74cm" svg:y="4.608cm">
          <draw:text-box>
            <text:p text:style-name="P5"><text:span text:style-name="T11">(2)</text:span></text:p>
          </draw:text-box>
        </draw:frame>
        <draw:frame draw:name="TextBox 84" draw:style-name="gr80" draw:text-style-name="P4" draw:layer="layout" svg:width="0.994cm" svg:height="0.769cm" svg:x="10.846cm" svg:y="8.458cm">
          <draw:text-box>
            <text:p text:style-name="P5"><text:span text:style-name="T11">(4)</text:span></text:p>
          </draw:text-box>
        </draw:frame>
        <draw:frame draw:name="TextBox 88" draw:style-name="gr81" draw:text-style-name="P33" draw:layer="layout" svg:width="1.719cm" svg:height="0.721cm" draw:transform="rotate (0.436332312998582) translate (14.268cm 6.387cm)">
          <draw:text-box>
            <text:p text:style-name="P5"><text:span text:style-name="T24">SCTP/IP</text:span></text:p>
          </draw:text-box>
        </draw:frame>
        <draw:frame draw:name="TextBox 90" draw:style-name="gr82" draw:text-style-name="P33" draw:layer="layout" svg:width="2.395cm" svg:height="0.721cm" draw:transform="rotate (-0.436332312998582) translate (14.556cm 6.924cm)">
          <draw:text-box>
            <text:p text:style-name="P5"><text:span text:style-name="T24">GTP/UDP/IP</text:span></text:p>
          </draw:text-box>
        </draw:frame>
        <draw:custom-shape draw:name="Rectangle 23" draw:style-name="gr83" draw:text-style-name="P34" draw:layer="layout" svg:width="1.299cm" svg:height="1.011cm" svg:x="3.825cm" svg:y="7.044cm">
          <text:p text:style-name="P6"><text:span text:style-name="T25">SI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3" draw:style-name="gr6" draw:text-style-name="P3" xml:id="id25" draw:id="id25" draw:layer="layout" svg:width="3.404cm" svg:height="1.378cm" svg:x="16.997cm" svg:y="4.529cm">
          <text:p text:style-name="P6"><text:span text:style-name="T20">Core-CP</text:span></text:p>
          <draw:enhanced-geometry svg:viewBox="0 0 21600 21600" draw:mirror-horizontal="true" draw:type="non-primitive" draw:enhanced-path="M 0 0 L 21600 0 21600 21600 0 21600 Z N"/>
        </draw:custom-shape>
        <presentation:notes draw:style-name="dp3">
          <draw:page-thumbnail draw:style-name="gr29" draw:layer="layout" svg:width="16.933cm" svg:height="9.525cm" svg:x="1.058cm" svg:y="1.905cm" draw:page-number="12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59" draw:style-name="dp1" draw:master-page-name="Master1-Layout24-cust-Title-and-Content">
        <draw:connector draw:name="Straight Connector 93" draw:style-name="gr84" draw:text-style-name="P2" draw:layer="layout" draw:type="line" svg:x1="6.935cm" svg:y1="10.066cm" svg:x2="6.694cm" svg:y2="10.072cm" draw:start-shape="id26" draw:start-glue-point="3" draw:end-shape="id27" draw:end-glue-point="1" svg:d="M6935 10066l-241 6" svg:viewBox="0 0 242 7">
          <text:p/>
        </draw:connector>
        <draw:connector draw:name="Straight Connector 22" draw:style-name="gr85" draw:text-style-name="P2" draw:layer="layout" draw:type="line" svg:x1="6.92cm" svg:y1="7.325cm" svg:x2="6.694cm" svg:y2="7.317cm" draw:start-shape="id28" draw:start-glue-point="3" draw:end-shape="id29" draw:end-glue-point="1" svg:d="M6920 7325l-226-8" svg:viewBox="0 0 227 9">
          <text:p/>
        </draw:connector>
        <draw:custom-shape draw:name="Rectangle 25" draw:style-name="gr6" draw:text-style-name="P3" draw:layer="layout" svg:width="2.042cm" svg:height="1.378cm" svg:x="9.611cm" svg:y="8.052cm">
          <text:p text:style-name="P35"><text:span text:style-name="T23">Base</text:span></text:p>
          <text:p text:style-name="P35"><text:span text:style-name="T23">Station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6" draw:style-name="gr6" draw:text-style-name="P3" xml:id="id29" draw:id="id29" draw:layer="layout" svg:width="2.042cm" svg:height="1.378cm" svg:x="4.652cm" svg:y="6.628cm">
          <text:p text:style-name="P6"><text:span text:style-name="T23">UE1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27" draw:style-name="gr6" draw:text-style-name="P3" xml:id="id27" draw:id="id27" draw:layer="layout" svg:width="2.042cm" svg:height="1.378cm" svg:x="4.652cm" svg:y="9.383cm">
          <text:p text:style-name="P6"><text:span text:style-name="T23">UE2</text:span></text:p>
          <draw:enhanced-geometry svg:viewBox="0 0 21600 21600" draw:mirror-horizontal="true" draw:type="non-primitive" draw:enhanced-path="M 0 0 L 21600 0 21600 21600 0 21600 Z N"/>
        </draw:custom-shape>
        <draw:g draw:name="Group 7" draw:style-name="gr2">
          <draw:custom-shape draw:name="Oval 2" draw:style-name="gr43" draw:text-style-name="P3" xml:id="id28" draw:id="id28" draw:layer="layout" svg:width="0.143cm" svg:height="0.378cm" draw:transform="rotate (-0.349065850398867) translate (6.997cm 7.152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9" draw:style-name="gr43" draw:text-style-name="P3" xml:id="id30" draw:id="id30" draw:layer="layout" svg:width="0.143cm" svg:height="0.378cm" draw:transform="rotate (-0.349065850398867) translate (9.319cm 8.007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4" draw:style-name="gr86" draw:text-style-name="P36" draw:layer="layout" draw:type="line" svg:x1="7.068cm" svg:y1="7.164cm" svg:x2="9.39cm" svg:y2="8.019cm" draw:start-shape="id28" draw:start-glue-point="0" draw:end-shape="id30" draw:end-glue-point="0" svg:d="M7068 7164l2322 855" svg:viewBox="0 0 2323 856">
            <text:p/>
          </draw:connector>
          <draw:connector draw:name="Straight Connector 6" draw:style-name="gr86" draw:text-style-name="P36" draw:layer="layout" draw:type="line" svg:x1="6.913cm" svg:y1="7.559cm" svg:x2="9.234cm" svg:y2="8.414cm" svg:d="M6913 7559l2321 855" svg:viewBox="0 0 2322 856">
            <text:p/>
          </draw:connector>
        </draw:g>
        <draw:g draw:name="Group 53" draw:style-name="gr2">
          <draw:custom-shape draw:name="Oval 55" draw:style-name="gr43" draw:text-style-name="P3" xml:id="id32" draw:id="id32" draw:layer="layout" svg:width="0.144cm" svg:height="0.385cm" svg:x="11.912cm" svg:y="8.08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56" draw:style-name="gr43" draw:text-style-name="P3" xml:id="id31" draw:id="id31" draw:layer="layout" svg:width="0.144cm" svg:height="0.385cm" svg:x="14.4cm" svg:y="8.09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57" draw:style-name="gr86" draw:text-style-name="P36" draw:layer="layout" draw:type="line" svg:x1="11.984cm" svg:y1="8.088cm" svg:x2="14.472cm" svg:y2="8.097cm" svg:d="M11984 8088l2488 9" svg:viewBox="0 0 2489 10">
            <text:p/>
          </draw:connector>
          <draw:connector draw:name="Straight Connector 58" draw:style-name="gr86" draw:text-style-name="P36" draw:layer="layout" draw:type="line" svg:x1="11.984cm" svg:y1="8.473cm" svg:x2="14.472cm" svg:y2="8.482cm" svg:d="M11984 8473l2488 9" svg:viewBox="0 0 2489 10">
            <text:p/>
          </draw:connector>
        </draw:g>
        <draw:g draw:name="Group 75" draw:style-name="gr2">
          <draw:custom-shape draw:name="Oval 76" draw:style-name="gr87" draw:text-style-name="P37" xml:id="id26" draw:id="id26" draw:layer="layout" svg:width="0.143cm" svg:height="0.378cm" draw:transform="rotate (0.349065850398866) translate (6.883cm 9.884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77" draw:style-name="gr87" draw:text-style-name="P37" xml:id="id33" draw:id="id33" draw:layer="layout" svg:width="0.143cm" svg:height="0.378cm" draw:transform="rotate (0.349065850398866) translate (9.211cm 9.046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80" draw:style-name="gr88" draw:text-style-name="P38" draw:layer="layout" draw:type="line" svg:x1="6.945cm" svg:y1="9.848cm" svg:x2="9.278cm" svg:y2="9.022cm" draw:start-shape="id26" draw:start-glue-point="0" svg:d="M6945 9848l2333-826" svg:viewBox="0 0 2334 827">
            <text:p/>
          </draw:connector>
          <draw:connector draw:name="Straight Connector 81" draw:style-name="gr88" draw:text-style-name="P38" draw:layer="layout" draw:type="line" svg:x1="7.091cm" svg:y1="10.225cm" svg:x2="9.419cm" svg:y2="9.388cm" svg:d="M7091 10225l2328-837" svg:viewBox="0 0 2329 838">
            <text:p/>
          </draw:connector>
        </draw:g>
        <draw:connector draw:name="Straight Connector 9" draw:style-name="gr85" draw:text-style-name="P2" draw:layer="layout" draw:type="line" svg:x1="14.544cm" svg:y1="8.289cm" svg:x2="16.871cm" svg:y2="8.271cm" draw:start-shape="id31" draw:start-glue-point="1" svg:d="M14544 8289l2327-18" svg:viewBox="0 0 2328 19">
          <text:p/>
        </draw:connector>
        <draw:connector draw:name="Straight Connector 87" draw:style-name="gr85" draw:text-style-name="P2" draw:layer="layout" draw:type="line" svg:x1="9.401cm" svg:y1="8.238cm" svg:x2="12.056cm" svg:y2="8.28cm" draw:start-shape="id30" draw:start-glue-point="1" draw:end-shape="id32" draw:end-glue-point="1" svg:d="M9401 8238l2655 42" svg:viewBox="0 0 2656 43">
          <text:p/>
        </draw:connector>
        <draw:connector draw:name="Straight Connector 89" draw:style-name="gr84" draw:text-style-name="P2" draw:layer="layout" draw:type="line" svg:x1="14.554cm" svg:y1="9.127cm" svg:x2="16.88cm" svg:y2="9.109cm" svg:d="M14554 9127l2326-18" svg:viewBox="0 0 2327 19">
          <text:p/>
        </draw:connector>
        <draw:connector draw:name="Straight Connector 91" draw:style-name="gr84" draw:text-style-name="P2" draw:layer="layout" draw:type="line" svg:x1="9.422cm" svg:y1="9.17cm" svg:x2="12.056cm" svg:y2="9.169cm" draw:start-shape="id33" draw:start-glue-point="1" draw:end-shape="id34" draw:end-glue-point="1" svg:d="M9422 9170l2634-1" svg:viewBox="0 0 2635 2">
          <text:p/>
        </draw:connector>
        <draw:custom-shape draw:name="Oval 99" draw:style-name="gr89" draw:text-style-name="P1" draw:layer="layout" svg:width="0.442cm" svg:height="3.606cm" svg:x="12.947cm" svg:y="6.87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101" draw:style-name="gr90" draw:text-style-name="P4" draw:layer="layout" svg:width="4.167cm" svg:height="1.453cm" svg:x="11.085cm" svg:y="10.579cm">
          <draw:text-box>
            <text:p text:style-name="P6"><text:span text:style-name="T23">Base Station to</text:span></text:p>
            <text:p text:style-name="P6"><text:span text:style-name="T23">Core-UP Tunnel(s)</text:span></text:p>
          </draw:text-box>
        </draw:frame>
        <draw:custom-shape draw:name="Rectangle 12" draw:style-name="gr6" draw:text-style-name="P3" draw:layer="layout" svg:width="2.042cm" svg:height="1.378cm" svg:x="14.805cm" svg:y="8.005cm">
          <text:p text:style-name="P6"><text:span text:style-name="T23">Core UP</text:span></text:p>
          <draw:enhanced-geometry svg:viewBox="0 0 21600 21600" draw:mirror-horizontal="true" draw:type="non-primitive" draw:enhanced-path="M 0 0 L 21600 0 21600 21600 0 21600 Z N"/>
        </draw:custom-shape>
        <draw:g draw:name="Group 59" draw:style-name="gr2">
          <draw:custom-shape draw:name="Oval 60" draw:style-name="gr87" draw:text-style-name="P37" xml:id="id34" draw:id="id34" draw:layer="layout" svg:width="0.144cm" svg:height="0.385cm" svg:x="11.912cm" svg:y="8.97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61" draw:style-name="gr87" draw:text-style-name="P37" draw:layer="layout" svg:width="0.144cm" svg:height="0.385cm" svg:x="14.4cm" svg:y="8.98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Connector 63" draw:style-name="gr88" draw:text-style-name="P38" draw:layer="layout" draw:type="line" svg:x1="11.984cm" svg:y1="8.977cm" svg:x2="14.472cm" svg:y2="8.986cm" svg:d="M11984 8977l2488 9" svg:viewBox="0 0 2489 10">
            <text:p/>
          </draw:connector>
          <draw:connector draw:name="Straight Connector 64" draw:style-name="gr88" draw:text-style-name="P38" draw:layer="layout" draw:type="line" svg:x1="11.984cm" svg:y1="9.361cm" svg:x2="14.472cm" svg:y2="9.37cm" svg:d="M11984 9361l2488 9" svg:viewBox="0 0 2489 10">
            <text:p/>
          </draw:connector>
        </draw:g>
        <presentation:notes draw:style-name="dp3">
          <draw:page-thumbnail draw:style-name="gr29" draw:layer="layout" svg:width="16.933cm" svg:height="9.525cm" svg:x="1.058cm" svg:y="1.905cm" draw:page-number="1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45" draw:style-name="dp1" draw:master-page-name="Master1-Layout24-cust-Title-and-Content">
        <draw:custom-shape draw:name="Rectangle 7" draw:style-name="gr91" draw:text-style-name="P39" draw:layer="layout" svg:width="1.24cm" svg:height="0.695cm" svg:x="2.056cm" svg:y="2.577cm">
          <text:p/>
          <draw:enhanced-geometry svg:viewBox="0 0 21600 21600" draw:type="non-primitive" draw:enhanced-path="M 0 0 L 21600 0 21600 21600 0 21600 Z N"/>
        </draw:custom-shape>
        <draw:custom-shape draw:name="Rectangle 22" draw:style-name="gr91" draw:text-style-name="P39" draw:layer="layout" svg:width="1.24cm" svg:height="0.695cm" svg:x="2.056cm" svg:y="3.273cm">
          <text:p/>
          <draw:enhanced-geometry svg:viewBox="0 0 21600 21600" draw:type="non-primitive" draw:enhanced-path="M 0 0 L 21600 0 21600 21600 0 21600 Z N"/>
        </draw:custom-shape>
        <draw:custom-shape draw:name="Rectangle 23" draw:style-name="gr91" draw:text-style-name="P39" draw:layer="layout" svg:width="1.24cm" svg:height="0.695cm" svg:x="2.056cm" svg:y="3.968cm">
          <text:p/>
          <draw:enhanced-geometry svg:viewBox="0 0 21600 21600" draw:type="non-primitive" draw:enhanced-path="M 0 0 L 21600 0 21600 21600 0 21600 Z N"/>
        </draw:custom-shape>
        <draw:custom-shape draw:name="Rectangle 24" draw:style-name="gr91" draw:text-style-name="P39" draw:layer="layout" svg:width="1.24cm" svg:height="0.695cm" svg:x="2.056cm" svg:y="4.664cm">
          <text:p/>
          <draw:enhanced-geometry svg:viewBox="0 0 21600 21600" draw:type="non-primitive" draw:enhanced-path="M 0 0 L 21600 0 21600 21600 0 21600 Z N"/>
        </draw:custom-shape>
        <draw:custom-shape draw:name="Rectangle 25" draw:style-name="gr92" draw:text-style-name="P40" draw:layer="layout" svg:width="1.24cm" svg:height="0.695cm" svg:x="2.056cm" svg:y="5.359cm">
          <text:p/>
          <draw:enhanced-geometry svg:viewBox="0 0 21600 21600" draw:type="non-primitive" draw:enhanced-path="M 0 0 L 21600 0 21600 21600 0 21600 Z N"/>
        </draw:custom-shape>
        <draw:custom-shape draw:name="Rectangle 26" draw:style-name="gr92" draw:text-style-name="P40" draw:layer="layout" svg:width="1.24cm" svg:height="0.695cm" svg:x="2.056cm" svg:y="6.047cm">
          <text:p/>
          <draw:enhanced-geometry svg:viewBox="0 0 21600 21600" draw:type="non-primitive" draw:enhanced-path="M 0 0 L 21600 0 21600 21600 0 21600 Z N"/>
        </draw:custom-shape>
        <draw:custom-shape draw:name="Rectangle 27" draw:style-name="gr92" draw:text-style-name="P40" draw:layer="layout" svg:width="1.24cm" svg:height="0.695cm" svg:x="2.056cm" svg:y="6.75cm">
          <text:p/>
          <draw:enhanced-geometry svg:viewBox="0 0 21600 21600" draw:type="non-primitive" draw:enhanced-path="M 0 0 L 21600 0 21600 21600 0 21600 Z N"/>
        </draw:custom-shape>
        <draw:custom-shape draw:name="Rectangle 28" draw:style-name="gr92" draw:text-style-name="P40" draw:layer="layout" svg:width="1.24cm" svg:height="0.695cm" svg:x="2.056cm" svg:y="7.446cm">
          <text:p/>
          <draw:enhanced-geometry svg:viewBox="0 0 21600 21600" draw:type="non-primitive" draw:enhanced-path="M 0 0 L 21600 0 21600 21600 0 21600 Z N"/>
        </draw:custom-shape>
        <draw:custom-shape draw:name="Rectangle 29" draw:style-name="gr92" draw:text-style-name="P40" draw:layer="layout" svg:width="1.24cm" svg:height="0.695cm" svg:x="2.056cm" svg:y="8.141cm">
          <text:p/>
          <draw:enhanced-geometry svg:viewBox="0 0 21600 21600" draw:type="non-primitive" draw:enhanced-path="M 0 0 L 21600 0 21600 21600 0 21600 Z N"/>
        </draw:custom-shape>
        <draw:custom-shape draw:name="Rectangle 30" draw:style-name="gr93" draw:text-style-name="P41" draw:layer="layout" svg:width="1.24cm" svg:height="0.695cm" svg:x="2.056cm" svg:y="8.836cm">
          <text:p/>
          <draw:enhanced-geometry svg:viewBox="0 0 21600 21600" draw:type="non-primitive" draw:enhanced-path="M 0 0 L 21600 0 21600 21600 0 21600 Z N"/>
        </draw:custom-shape>
        <draw:custom-shape draw:name="Rectangle 31" draw:style-name="gr93" draw:text-style-name="P41" draw:layer="layout" svg:width="1.24cm" svg:height="0.695cm" svg:x="2.056cm" svg:y="9.532cm">
          <text:p/>
          <draw:enhanced-geometry svg:viewBox="0 0 21600 21600" draw:type="non-primitive" draw:enhanced-path="M 0 0 L 21600 0 21600 21600 0 21600 Z N"/>
        </draw:custom-shape>
        <draw:custom-shape draw:name="Rectangle 32" draw:style-name="gr93" draw:text-style-name="P41" draw:layer="layout" svg:width="1.24cm" svg:height="0.695cm" svg:x="2.056cm" svg:y="10.227cm">
          <text:p/>
          <draw:enhanced-geometry svg:viewBox="0 0 21600 21600" draw:type="non-primitive" draw:enhanced-path="M 0 0 L 21600 0 21600 21600 0 21600 Z N"/>
        </draw:custom-shape>
        <draw:custom-shape draw:name="Rectangle 33" draw:style-name="gr91" draw:text-style-name="P39" draw:layer="layout" svg:width="1.24cm" svg:height="0.695cm" svg:x="3.296cm" svg:y="2.577cm">
          <text:p/>
          <draw:enhanced-geometry svg:viewBox="0 0 21600 21600" draw:type="non-primitive" draw:enhanced-path="M 0 0 L 21600 0 21600 21600 0 21600 Z N"/>
        </draw:custom-shape>
        <draw:custom-shape draw:name="Rectangle 34" draw:style-name="gr91" draw:text-style-name="P39" draw:layer="layout" svg:width="1.24cm" svg:height="0.695cm" svg:x="3.296cm" svg:y="3.273cm">
          <text:p/>
          <draw:enhanced-geometry svg:viewBox="0 0 21600 21600" draw:type="non-primitive" draw:enhanced-path="M 0 0 L 21600 0 21600 21600 0 21600 Z N"/>
        </draw:custom-shape>
        <draw:custom-shape draw:name="Rectangle 35" draw:style-name="gr91" draw:text-style-name="P39" draw:layer="layout" svg:width="1.24cm" svg:height="0.695cm" svg:x="3.296cm" svg:y="3.968cm">
          <text:p/>
          <draw:enhanced-geometry svg:viewBox="0 0 21600 21600" draw:type="non-primitive" draw:enhanced-path="M 0 0 L 21600 0 21600 21600 0 21600 Z N"/>
        </draw:custom-shape>
        <draw:custom-shape draw:name="Rectangle 36" draw:style-name="gr91" draw:text-style-name="P39" draw:layer="layout" svg:width="1.24cm" svg:height="0.695cm" svg:x="3.296cm" svg:y="4.664cm">
          <text:p/>
          <draw:enhanced-geometry svg:viewBox="0 0 21600 21600" draw:type="non-primitive" draw:enhanced-path="M 0 0 L 21600 0 21600 21600 0 21600 Z N"/>
        </draw:custom-shape>
        <draw:custom-shape draw:name="Rectangle 37" draw:style-name="gr92" draw:text-style-name="P40" draw:layer="layout" svg:width="1.24cm" svg:height="0.695cm" svg:x="3.296cm" svg:y="5.359cm">
          <text:p/>
          <draw:enhanced-geometry svg:viewBox="0 0 21600 21600" draw:type="non-primitive" draw:enhanced-path="M 0 0 L 21600 0 21600 21600 0 21600 Z N"/>
        </draw:custom-shape>
        <draw:custom-shape draw:name="Rectangle 38" draw:style-name="gr92" draw:text-style-name="P40" draw:layer="layout" svg:width="1.24cm" svg:height="0.695cm" svg:x="3.296cm" svg:y="6.047cm">
          <text:p/>
          <draw:enhanced-geometry svg:viewBox="0 0 21600 21600" draw:type="non-primitive" draw:enhanced-path="M 0 0 L 21600 0 21600 21600 0 21600 Z N"/>
        </draw:custom-shape>
        <draw:custom-shape draw:name="Rectangle 39" draw:style-name="gr92" draw:text-style-name="P40" draw:layer="layout" svg:width="1.24cm" svg:height="0.695cm" svg:x="3.296cm" svg:y="6.75cm">
          <text:p/>
          <draw:enhanced-geometry svg:viewBox="0 0 21600 21600" draw:type="non-primitive" draw:enhanced-path="M 0 0 L 21600 0 21600 21600 0 21600 Z N"/>
        </draw:custom-shape>
        <draw:custom-shape draw:name="Rectangle 40" draw:style-name="gr92" draw:text-style-name="P40" draw:layer="layout" svg:width="1.24cm" svg:height="0.695cm" svg:x="3.296cm" svg:y="7.446cm">
          <text:p/>
          <draw:enhanced-geometry svg:viewBox="0 0 21600 21600" draw:type="non-primitive" draw:enhanced-path="M 0 0 L 21600 0 21600 21600 0 21600 Z N"/>
        </draw:custom-shape>
        <draw:custom-shape draw:name="Rectangle 41" draw:style-name="gr92" draw:text-style-name="P40" draw:layer="layout" svg:width="1.24cm" svg:height="0.695cm" svg:x="3.296cm" svg:y="8.141cm">
          <text:p/>
          <draw:enhanced-geometry svg:viewBox="0 0 21600 21600" draw:type="non-primitive" draw:enhanced-path="M 0 0 L 21600 0 21600 21600 0 21600 Z N"/>
        </draw:custom-shape>
        <draw:custom-shape draw:name="Rectangle 42" draw:style-name="gr93" draw:text-style-name="P41" draw:layer="layout" svg:width="1.24cm" svg:height="0.695cm" svg:x="3.296cm" svg:y="8.836cm">
          <text:p/>
          <draw:enhanced-geometry svg:viewBox="0 0 21600 21600" draw:type="non-primitive" draw:enhanced-path="M 0 0 L 21600 0 21600 21600 0 21600 Z N"/>
        </draw:custom-shape>
        <draw:custom-shape draw:name="Rectangle 43" draw:style-name="gr93" draw:text-style-name="P41" draw:layer="layout" svg:width="1.24cm" svg:height="0.695cm" svg:x="3.296cm" svg:y="9.532cm">
          <text:p/>
          <draw:enhanced-geometry svg:viewBox="0 0 21600 21600" draw:type="non-primitive" draw:enhanced-path="M 0 0 L 21600 0 21600 21600 0 21600 Z N"/>
        </draw:custom-shape>
        <draw:custom-shape draw:name="Rectangle 44" draw:style-name="gr93" draw:text-style-name="P41" draw:layer="layout" svg:width="1.24cm" svg:height="0.695cm" svg:x="3.296cm" svg:y="10.227cm">
          <text:p/>
          <draw:enhanced-geometry svg:viewBox="0 0 21600 21600" draw:type="non-primitive" draw:enhanced-path="M 0 0 L 21600 0 21600 21600 0 21600 Z N"/>
        </draw:custom-shape>
        <draw:custom-shape draw:name="Rectangle 45" draw:style-name="gr93" draw:text-style-name="P41" draw:layer="layout" svg:width="1.24cm" svg:height="0.695cm" svg:x="4.536cm" svg:y="2.577cm">
          <text:p/>
          <draw:enhanced-geometry svg:viewBox="0 0 21600 21600" draw:type="non-primitive" draw:enhanced-path="M 0 0 L 21600 0 21600 21600 0 21600 Z N"/>
        </draw:custom-shape>
        <draw:custom-shape draw:name="Rectangle 46" draw:style-name="gr93" draw:text-style-name="P41" draw:layer="layout" svg:width="1.24cm" svg:height="0.695cm" svg:x="4.536cm" svg:y="3.273cm">
          <text:p/>
          <draw:enhanced-geometry svg:viewBox="0 0 21600 21600" draw:type="non-primitive" draw:enhanced-path="M 0 0 L 21600 0 21600 21600 0 21600 Z N"/>
        </draw:custom-shape>
        <draw:custom-shape draw:name="Rectangle 47" draw:style-name="gr93" draw:text-style-name="P41" draw:layer="layout" svg:width="1.24cm" svg:height="0.695cm" svg:x="4.536cm" svg:y="3.968cm">
          <text:p/>
          <draw:enhanced-geometry svg:viewBox="0 0 21600 21600" draw:type="non-primitive" draw:enhanced-path="M 0 0 L 21600 0 21600 21600 0 21600 Z N"/>
        </draw:custom-shape>
        <draw:custom-shape draw:name="Rectangle 48" draw:style-name="gr93" draw:text-style-name="P41" draw:layer="layout" svg:width="1.24cm" svg:height="0.695cm" svg:x="4.536cm" svg:y="4.664cm">
          <text:p/>
          <draw:enhanced-geometry svg:viewBox="0 0 21600 21600" draw:type="non-primitive" draw:enhanced-path="M 0 0 L 21600 0 21600 21600 0 21600 Z N"/>
        </draw:custom-shape>
        <draw:custom-shape draw:name="Rectangle 49" draw:style-name="gr92" draw:text-style-name="P40" draw:layer="layout" svg:width="1.24cm" svg:height="0.695cm" svg:x="4.536cm" svg:y="5.359cm">
          <text:p/>
          <draw:enhanced-geometry svg:viewBox="0 0 21600 21600" draw:type="non-primitive" draw:enhanced-path="M 0 0 L 21600 0 21600 21600 0 21600 Z N"/>
        </draw:custom-shape>
        <draw:custom-shape draw:name="Rectangle 50" draw:style-name="gr92" draw:text-style-name="P40" draw:layer="layout" svg:width="1.24cm" svg:height="0.695cm" svg:x="4.536cm" svg:y="6.047cm">
          <text:p/>
          <draw:enhanced-geometry svg:viewBox="0 0 21600 21600" draw:type="non-primitive" draw:enhanced-path="M 0 0 L 21600 0 21600 21600 0 21600 Z N"/>
        </draw:custom-shape>
        <draw:custom-shape draw:name="Rectangle 51" draw:style-name="gr92" draw:text-style-name="P40" draw:layer="layout" svg:width="1.24cm" svg:height="0.695cm" svg:x="4.536cm" svg:y="6.75cm">
          <text:p/>
          <draw:enhanced-geometry svg:viewBox="0 0 21600 21600" draw:type="non-primitive" draw:enhanced-path="M 0 0 L 21600 0 21600 21600 0 21600 Z N"/>
        </draw:custom-shape>
        <draw:custom-shape draw:name="Rectangle 52" draw:style-name="gr92" draw:text-style-name="P40" draw:layer="layout" svg:width="1.24cm" svg:height="0.695cm" svg:x="4.536cm" svg:y="7.446cm">
          <text:p/>
          <draw:enhanced-geometry svg:viewBox="0 0 21600 21600" draw:type="non-primitive" draw:enhanced-path="M 0 0 L 21600 0 21600 21600 0 21600 Z N"/>
        </draw:custom-shape>
        <draw:custom-shape draw:name="Rectangle 53" draw:style-name="gr92" draw:text-style-name="P40" draw:layer="layout" svg:width="1.24cm" svg:height="0.695cm" svg:x="4.536cm" svg:y="8.141cm">
          <text:p/>
          <draw:enhanced-geometry svg:viewBox="0 0 21600 21600" draw:type="non-primitive" draw:enhanced-path="M 0 0 L 21600 0 21600 21600 0 21600 Z N"/>
        </draw:custom-shape>
        <draw:custom-shape draw:name="Rectangle 54" draw:style-name="gr93" draw:text-style-name="P41" draw:layer="layout" svg:width="1.24cm" svg:height="0.695cm" svg:x="4.536cm" svg:y="8.836cm">
          <text:p/>
          <draw:enhanced-geometry svg:viewBox="0 0 21600 21600" draw:type="non-primitive" draw:enhanced-path="M 0 0 L 21600 0 21600 21600 0 21600 Z N"/>
        </draw:custom-shape>
        <draw:custom-shape draw:name="Rectangle 55" draw:style-name="gr93" draw:text-style-name="P41" draw:layer="layout" svg:width="1.24cm" svg:height="0.695cm" svg:x="4.536cm" svg:y="9.532cm">
          <text:p/>
          <draw:enhanced-geometry svg:viewBox="0 0 21600 21600" draw:type="non-primitive" draw:enhanced-path="M 0 0 L 21600 0 21600 21600 0 21600 Z N"/>
        </draw:custom-shape>
        <draw:custom-shape draw:name="Rectangle 56" draw:style-name="gr93" draw:text-style-name="P41" draw:layer="layout" svg:width="1.24cm" svg:height="0.695cm" svg:x="4.536cm" svg:y="10.227cm">
          <text:p/>
          <draw:enhanced-geometry svg:viewBox="0 0 21600 21600" draw:type="non-primitive" draw:enhanced-path="M 0 0 L 21600 0 21600 21600 0 21600 Z N"/>
        </draw:custom-shape>
        <draw:custom-shape draw:name="Rectangle 57" draw:style-name="gr93" draw:text-style-name="P41" draw:layer="layout" svg:width="1.24cm" svg:height="0.695cm" svg:x="5.775cm" svg:y="2.577cm">
          <text:p/>
          <draw:enhanced-geometry svg:viewBox="0 0 21600 21600" draw:type="non-primitive" draw:enhanced-path="M 0 0 L 21600 0 21600 21600 0 21600 Z N"/>
        </draw:custom-shape>
        <draw:custom-shape draw:name="Rectangle 58" draw:style-name="gr93" draw:text-style-name="P41" draw:layer="layout" svg:width="1.24cm" svg:height="0.695cm" svg:x="5.775cm" svg:y="3.273cm">
          <text:p/>
          <draw:enhanced-geometry svg:viewBox="0 0 21600 21600" draw:type="non-primitive" draw:enhanced-path="M 0 0 L 21600 0 21600 21600 0 21600 Z N"/>
        </draw:custom-shape>
        <draw:custom-shape draw:name="Rectangle 59" draw:style-name="gr93" draw:text-style-name="P41" draw:layer="layout" svg:width="1.24cm" svg:height="0.695cm" svg:x="5.775cm" svg:y="3.968cm">
          <text:p/>
          <draw:enhanced-geometry svg:viewBox="0 0 21600 21600" draw:type="non-primitive" draw:enhanced-path="M 0 0 L 21600 0 21600 21600 0 21600 Z N"/>
        </draw:custom-shape>
        <draw:custom-shape draw:name="Rectangle 60" draw:style-name="gr93" draw:text-style-name="P41" draw:layer="layout" svg:width="1.24cm" svg:height="0.695cm" svg:x="5.775cm" svg:y="4.664cm">
          <text:p/>
          <draw:enhanced-geometry svg:viewBox="0 0 21600 21600" draw:type="non-primitive" draw:enhanced-path="M 0 0 L 21600 0 21600 21600 0 21600 Z N"/>
        </draw:custom-shape>
        <draw:custom-shape draw:name="Rectangle 61" draw:style-name="gr94" draw:text-style-name="P42" draw:layer="layout" svg:width="1.24cm" svg:height="0.695cm" svg:x="5.775cm" svg:y="5.359cm">
          <text:p/>
          <draw:enhanced-geometry svg:viewBox="0 0 21600 21600" draw:type="non-primitive" draw:enhanced-path="M 0 0 L 21600 0 21600 21600 0 21600 Z N"/>
        </draw:custom-shape>
        <draw:custom-shape draw:name="Rectangle 62" draw:style-name="gr94" draw:text-style-name="P42" draw:layer="layout" svg:width="1.24cm" svg:height="0.695cm" svg:x="5.775cm" svg:y="6.047cm">
          <text:p/>
          <draw:enhanced-geometry svg:viewBox="0 0 21600 21600" draw:type="non-primitive" draw:enhanced-path="M 0 0 L 21600 0 21600 21600 0 21600 Z N"/>
        </draw:custom-shape>
        <draw:custom-shape draw:name="Rectangle 63" draw:style-name="gr94" draw:text-style-name="P42" draw:layer="layout" svg:width="1.24cm" svg:height="0.695cm" svg:x="5.775cm" svg:y="6.75cm">
          <text:p/>
          <draw:enhanced-geometry svg:viewBox="0 0 21600 21600" draw:type="non-primitive" draw:enhanced-path="M 0 0 L 21600 0 21600 21600 0 21600 Z N"/>
        </draw:custom-shape>
        <draw:custom-shape draw:name="Rectangle 64" draw:style-name="gr94" draw:text-style-name="P42" draw:layer="layout" svg:width="1.24cm" svg:height="0.695cm" svg:x="5.775cm" svg:y="7.446cm">
          <text:p/>
          <draw:enhanced-geometry svg:viewBox="0 0 21600 21600" draw:type="non-primitive" draw:enhanced-path="M 0 0 L 21600 0 21600 21600 0 21600 Z N"/>
        </draw:custom-shape>
        <draw:custom-shape draw:name="Rectangle 65" draw:style-name="gr94" draw:text-style-name="P42" draw:layer="layout" svg:width="1.24cm" svg:height="0.695cm" svg:x="5.775cm" svg:y="8.141cm">
          <text:p/>
          <draw:enhanced-geometry svg:viewBox="0 0 21600 21600" draw:type="non-primitive" draw:enhanced-path="M 0 0 L 21600 0 21600 21600 0 21600 Z N"/>
        </draw:custom-shape>
        <draw:custom-shape draw:name="Rectangle 66" draw:style-name="gr93" draw:text-style-name="P41" draw:layer="layout" svg:width="1.24cm" svg:height="0.695cm" svg:x="5.775cm" svg:y="8.836cm">
          <text:p/>
          <draw:enhanced-geometry svg:viewBox="0 0 21600 21600" draw:type="non-primitive" draw:enhanced-path="M 0 0 L 21600 0 21600 21600 0 21600 Z N"/>
        </draw:custom-shape>
        <draw:custom-shape draw:name="Rectangle 67" draw:style-name="gr93" draw:text-style-name="P41" draw:layer="layout" svg:width="1.24cm" svg:height="0.695cm" svg:x="5.775cm" svg:y="9.532cm">
          <text:p/>
          <draw:enhanced-geometry svg:viewBox="0 0 21600 21600" draw:type="non-primitive" draw:enhanced-path="M 0 0 L 21600 0 21600 21600 0 21600 Z N"/>
        </draw:custom-shape>
        <draw:custom-shape draw:name="Rectangle 68" draw:style-name="gr93" draw:text-style-name="P41" draw:layer="layout" svg:width="1.24cm" svg:height="0.695cm" svg:x="5.775cm" svg:y="10.227cm">
          <text:p/>
          <draw:enhanced-geometry svg:viewBox="0 0 21600 21600" draw:type="non-primitive" draw:enhanced-path="M 0 0 L 21600 0 21600 21600 0 21600 Z N"/>
        </draw:custom-shape>
        <draw:custom-shape draw:name="Rectangle 69" draw:style-name="gr93" draw:text-style-name="P41" draw:layer="layout" svg:width="1.24cm" svg:height="0.695cm" svg:x="7.015cm" svg:y="2.577cm">
          <text:p/>
          <draw:enhanced-geometry svg:viewBox="0 0 21600 21600" draw:type="non-primitive" draw:enhanced-path="M 0 0 L 21600 0 21600 21600 0 21600 Z N"/>
        </draw:custom-shape>
        <draw:custom-shape draw:name="Rectangle 70" draw:style-name="gr93" draw:text-style-name="P41" draw:layer="layout" svg:width="1.24cm" svg:height="0.695cm" svg:x="7.015cm" svg:y="3.273cm">
          <text:p/>
          <draw:enhanced-geometry svg:viewBox="0 0 21600 21600" draw:type="non-primitive" draw:enhanced-path="M 0 0 L 21600 0 21600 21600 0 21600 Z N"/>
        </draw:custom-shape>
        <draw:custom-shape draw:name="Rectangle 71" draw:style-name="gr93" draw:text-style-name="P41" draw:layer="layout" svg:width="1.24cm" svg:height="0.695cm" svg:x="7.015cm" svg:y="3.968cm">
          <text:p/>
          <draw:enhanced-geometry svg:viewBox="0 0 21600 21600" draw:type="non-primitive" draw:enhanced-path="M 0 0 L 21600 0 21600 21600 0 21600 Z N"/>
        </draw:custom-shape>
        <draw:custom-shape draw:name="Rectangle 72" draw:style-name="gr93" draw:text-style-name="P41" draw:layer="layout" svg:width="1.24cm" svg:height="0.695cm" svg:x="7.015cm" svg:y="4.664cm">
          <text:p/>
          <draw:enhanced-geometry svg:viewBox="0 0 21600 21600" draw:type="non-primitive" draw:enhanced-path="M 0 0 L 21600 0 21600 21600 0 21600 Z N"/>
        </draw:custom-shape>
        <draw:custom-shape draw:name="Rectangle 73" draw:style-name="gr94" draw:text-style-name="P42" draw:layer="layout" svg:width="1.24cm" svg:height="0.695cm" svg:x="7.015cm" svg:y="5.359cm">
          <text:p/>
          <draw:enhanced-geometry svg:viewBox="0 0 21600 21600" draw:type="non-primitive" draw:enhanced-path="M 0 0 L 21600 0 21600 21600 0 21600 Z N"/>
        </draw:custom-shape>
        <draw:custom-shape draw:name="Rectangle 74" draw:style-name="gr94" draw:text-style-name="P42" draw:layer="layout" svg:width="1.24cm" svg:height="0.695cm" svg:x="7.015cm" svg:y="6.047cm">
          <text:p/>
          <draw:enhanced-geometry svg:viewBox="0 0 21600 21600" draw:type="non-primitive" draw:enhanced-path="M 0 0 L 21600 0 21600 21600 0 21600 Z N"/>
        </draw:custom-shape>
        <draw:custom-shape draw:name="Rectangle 75" draw:style-name="gr94" draw:text-style-name="P42" draw:layer="layout" svg:width="1.24cm" svg:height="0.695cm" svg:x="7.015cm" svg:y="6.75cm">
          <text:p/>
          <draw:enhanced-geometry svg:viewBox="0 0 21600 21600" draw:type="non-primitive" draw:enhanced-path="M 0 0 L 21600 0 21600 21600 0 21600 Z N"/>
        </draw:custom-shape>
        <draw:custom-shape draw:name="Rectangle 76" draw:style-name="gr94" draw:text-style-name="P42" draw:layer="layout" svg:width="1.24cm" svg:height="0.695cm" svg:x="7.015cm" svg:y="7.446cm">
          <text:p/>
          <draw:enhanced-geometry svg:viewBox="0 0 21600 21600" draw:type="non-primitive" draw:enhanced-path="M 0 0 L 21600 0 21600 21600 0 21600 Z N"/>
        </draw:custom-shape>
        <draw:custom-shape draw:name="Rectangle 77" draw:style-name="gr94" draw:text-style-name="P42" draw:layer="layout" svg:width="1.24cm" svg:height="0.695cm" svg:x="7.015cm" svg:y="8.141cm">
          <text:p/>
          <draw:enhanced-geometry svg:viewBox="0 0 21600 21600" draw:type="non-primitive" draw:enhanced-path="M 0 0 L 21600 0 21600 21600 0 21600 Z N"/>
        </draw:custom-shape>
        <draw:custom-shape draw:name="Rectangle 78" draw:style-name="gr95" draw:text-style-name="P43" draw:layer="layout" svg:width="1.24cm" svg:height="0.695cm" svg:x="7.015cm" svg:y="8.836cm">
          <text:p/>
          <draw:enhanced-geometry svg:viewBox="0 0 21600 21600" draw:type="non-primitive" draw:enhanced-path="M 0 0 L 21600 0 21600 21600 0 21600 Z N"/>
        </draw:custom-shape>
        <draw:custom-shape draw:name="Rectangle 79" draw:style-name="gr95" draw:text-style-name="P43" draw:layer="layout" svg:width="1.24cm" svg:height="0.695cm" svg:x="7.015cm" svg:y="9.532cm">
          <text:p/>
          <draw:enhanced-geometry svg:viewBox="0 0 21600 21600" draw:type="non-primitive" draw:enhanced-path="M 0 0 L 21600 0 21600 21600 0 21600 Z N"/>
        </draw:custom-shape>
        <draw:custom-shape draw:name="Rectangle 80" draw:style-name="gr95" draw:text-style-name="P43" draw:layer="layout" svg:width="1.24cm" svg:height="0.695cm" svg:x="7.015cm" svg:y="10.227cm">
          <text:p/>
          <draw:enhanced-geometry svg:viewBox="0 0 21600 21600" draw:type="non-primitive" draw:enhanced-path="M 0 0 L 21600 0 21600 21600 0 21600 Z N"/>
        </draw:custom-shape>
        <draw:custom-shape draw:name="Rectangle 81" draw:style-name="gr96" draw:text-style-name="P44" draw:layer="layout" svg:width="1.24cm" svg:height="0.695cm" svg:x="8.255cm" svg:y="2.577cm">
          <text:p/>
          <draw:enhanced-geometry svg:viewBox="0 0 21600 21600" draw:type="non-primitive" draw:enhanced-path="M 0 0 L 21600 0 21600 21600 0 21600 Z N"/>
        </draw:custom-shape>
        <draw:custom-shape draw:name="Rectangle 82" draw:style-name="gr96" draw:text-style-name="P44" draw:layer="layout" svg:width="1.24cm" svg:height="0.695cm" svg:x="8.255cm" svg:y="3.273cm">
          <text:p/>
          <draw:enhanced-geometry svg:viewBox="0 0 21600 21600" draw:type="non-primitive" draw:enhanced-path="M 0 0 L 21600 0 21600 21600 0 21600 Z N"/>
        </draw:custom-shape>
        <draw:custom-shape draw:name="Rectangle 83" draw:style-name="gr96" draw:text-style-name="P44" draw:layer="layout" svg:width="1.24cm" svg:height="0.695cm" svg:x="8.255cm" svg:y="3.968cm">
          <text:p/>
          <draw:enhanced-geometry svg:viewBox="0 0 21600 21600" draw:type="non-primitive" draw:enhanced-path="M 0 0 L 21600 0 21600 21600 0 21600 Z N"/>
        </draw:custom-shape>
        <draw:custom-shape draw:name="Rectangle 84" draw:style-name="gr96" draw:text-style-name="P44" draw:layer="layout" svg:width="1.24cm" svg:height="0.695cm" svg:x="8.255cm" svg:y="4.664cm">
          <text:p/>
          <draw:enhanced-geometry svg:viewBox="0 0 21600 21600" draw:type="non-primitive" draw:enhanced-path="M 0 0 L 21600 0 21600 21600 0 21600 Z N"/>
        </draw:custom-shape>
        <draw:custom-shape draw:name="Rectangle 85" draw:style-name="gr94" draw:text-style-name="P42" draw:layer="layout" svg:width="1.24cm" svg:height="0.695cm" svg:x="8.255cm" svg:y="5.359cm">
          <text:p/>
          <draw:enhanced-geometry svg:viewBox="0 0 21600 21600" draw:type="non-primitive" draw:enhanced-path="M 0 0 L 21600 0 21600 21600 0 21600 Z N"/>
        </draw:custom-shape>
        <draw:custom-shape draw:name="Rectangle 86" draw:style-name="gr94" draw:text-style-name="P42" draw:layer="layout" svg:width="1.24cm" svg:height="0.695cm" svg:x="8.255cm" svg:y="6.047cm">
          <text:p/>
          <draw:enhanced-geometry svg:viewBox="0 0 21600 21600" draw:type="non-primitive" draw:enhanced-path="M 0 0 L 21600 0 21600 21600 0 21600 Z N"/>
        </draw:custom-shape>
        <draw:custom-shape draw:name="Rectangle 87" draw:style-name="gr94" draw:text-style-name="P42" draw:layer="layout" svg:width="1.24cm" svg:height="0.695cm" svg:x="8.255cm" svg:y="6.75cm">
          <text:p/>
          <draw:enhanced-geometry svg:viewBox="0 0 21600 21600" draw:type="non-primitive" draw:enhanced-path="M 0 0 L 21600 0 21600 21600 0 21600 Z N"/>
        </draw:custom-shape>
        <draw:custom-shape draw:name="Rectangle 88" draw:style-name="gr94" draw:text-style-name="P42" draw:layer="layout" svg:width="1.24cm" svg:height="0.695cm" svg:x="8.255cm" svg:y="7.446cm">
          <text:p/>
          <draw:enhanced-geometry svg:viewBox="0 0 21600 21600" draw:type="non-primitive" draw:enhanced-path="M 0 0 L 21600 0 21600 21600 0 21600 Z N"/>
        </draw:custom-shape>
        <draw:custom-shape draw:name="Rectangle 89" draw:style-name="gr94" draw:text-style-name="P42" draw:layer="layout" svg:width="1.24cm" svg:height="0.695cm" svg:x="8.255cm" svg:y="8.141cm">
          <text:p/>
          <draw:enhanced-geometry svg:viewBox="0 0 21600 21600" draw:type="non-primitive" draw:enhanced-path="M 0 0 L 21600 0 21600 21600 0 21600 Z N"/>
        </draw:custom-shape>
        <draw:custom-shape draw:name="Rectangle 90" draw:style-name="gr95" draw:text-style-name="P43" draw:layer="layout" svg:width="1.24cm" svg:height="0.695cm" svg:x="8.255cm" svg:y="8.836cm">
          <text:p/>
          <draw:enhanced-geometry svg:viewBox="0 0 21600 21600" draw:type="non-primitive" draw:enhanced-path="M 0 0 L 21600 0 21600 21600 0 21600 Z N"/>
        </draw:custom-shape>
        <draw:custom-shape draw:name="Rectangle 91" draw:style-name="gr95" draw:text-style-name="P43" draw:layer="layout" svg:width="1.24cm" svg:height="0.695cm" svg:x="8.255cm" svg:y="9.532cm">
          <text:p/>
          <draw:enhanced-geometry svg:viewBox="0 0 21600 21600" draw:type="non-primitive" draw:enhanced-path="M 0 0 L 21600 0 21600 21600 0 21600 Z N"/>
        </draw:custom-shape>
        <draw:custom-shape draw:name="Rectangle 92" draw:style-name="gr95" draw:text-style-name="P43" draw:layer="layout" svg:width="1.24cm" svg:height="0.695cm" svg:x="8.255cm" svg:y="10.227cm">
          <text:p/>
          <draw:enhanced-geometry svg:viewBox="0 0 21600 21600" draw:type="non-primitive" draw:enhanced-path="M 0 0 L 21600 0 21600 21600 0 21600 Z N"/>
        </draw:custom-shape>
        <draw:custom-shape draw:name="Rectangle 93" draw:style-name="gr96" draw:text-style-name="P44" draw:layer="layout" svg:width="1.24cm" svg:height="0.695cm" svg:x="9.495cm" svg:y="2.577cm">
          <text:p/>
          <draw:enhanced-geometry svg:viewBox="0 0 21600 21600" draw:type="non-primitive" draw:enhanced-path="M 0 0 L 21600 0 21600 21600 0 21600 Z N"/>
        </draw:custom-shape>
        <draw:custom-shape draw:name="Rectangle 94" draw:style-name="gr96" draw:text-style-name="P44" draw:layer="layout" svg:width="1.24cm" svg:height="0.695cm" svg:x="9.495cm" svg:y="3.273cm">
          <text:p/>
          <draw:enhanced-geometry svg:viewBox="0 0 21600 21600" draw:type="non-primitive" draw:enhanced-path="M 0 0 L 21600 0 21600 21600 0 21600 Z N"/>
        </draw:custom-shape>
        <draw:custom-shape draw:name="Rectangle 95" draw:style-name="gr96" draw:text-style-name="P44" draw:layer="layout" svg:width="1.24cm" svg:height="0.695cm" svg:x="9.495cm" svg:y="3.968cm">
          <text:p/>
          <draw:enhanced-geometry svg:viewBox="0 0 21600 21600" draw:type="non-primitive" draw:enhanced-path="M 0 0 L 21600 0 21600 21600 0 21600 Z N"/>
        </draw:custom-shape>
        <draw:custom-shape draw:name="Rectangle 96" draw:style-name="gr96" draw:text-style-name="P44" draw:layer="layout" svg:width="1.24cm" svg:height="0.695cm" svg:x="9.495cm" svg:y="4.664cm">
          <text:p/>
          <draw:enhanced-geometry svg:viewBox="0 0 21600 21600" draw:type="non-primitive" draw:enhanced-path="M 0 0 L 21600 0 21600 21600 0 21600 Z N"/>
        </draw:custom-shape>
        <draw:custom-shape draw:name="Rectangle 97" draw:style-name="gr94" draw:text-style-name="P42" draw:layer="layout" svg:width="1.24cm" svg:height="0.695cm" svg:x="9.495cm" svg:y="5.359cm">
          <text:p/>
          <draw:enhanced-geometry svg:viewBox="0 0 21600 21600" draw:type="non-primitive" draw:enhanced-path="M 0 0 L 21600 0 21600 21600 0 21600 Z N"/>
        </draw:custom-shape>
        <draw:custom-shape draw:name="Rectangle 98" draw:style-name="gr94" draw:text-style-name="P42" draw:layer="layout" svg:width="1.24cm" svg:height="0.695cm" svg:x="9.495cm" svg:y="6.047cm">
          <text:p/>
          <draw:enhanced-geometry svg:viewBox="0 0 21600 21600" draw:type="non-primitive" draw:enhanced-path="M 0 0 L 21600 0 21600 21600 0 21600 Z N"/>
        </draw:custom-shape>
        <draw:custom-shape draw:name="Rectangle 99" draw:style-name="gr94" draw:text-style-name="P42" draw:layer="layout" svg:width="1.24cm" svg:height="0.695cm" svg:x="9.495cm" svg:y="6.75cm">
          <text:p/>
          <draw:enhanced-geometry svg:viewBox="0 0 21600 21600" draw:type="non-primitive" draw:enhanced-path="M 0 0 L 21600 0 21600 21600 0 21600 Z N"/>
        </draw:custom-shape>
        <draw:custom-shape draw:name="Rectangle 100" draw:style-name="gr94" draw:text-style-name="P42" draw:layer="layout" svg:width="1.24cm" svg:height="0.695cm" svg:x="9.495cm" svg:y="7.446cm">
          <text:p/>
          <draw:enhanced-geometry svg:viewBox="0 0 21600 21600" draw:type="non-primitive" draw:enhanced-path="M 0 0 L 21600 0 21600 21600 0 21600 Z N"/>
        </draw:custom-shape>
        <draw:custom-shape draw:name="Rectangle 102" draw:style-name="gr95" draw:text-style-name="P43" draw:layer="layout" svg:width="1.24cm" svg:height="0.695cm" svg:x="9.495cm" svg:y="8.836cm">
          <text:p/>
          <draw:enhanced-geometry svg:viewBox="0 0 21600 21600" draw:type="non-primitive" draw:enhanced-path="M 0 0 L 21600 0 21600 21600 0 21600 Z N"/>
        </draw:custom-shape>
        <draw:custom-shape draw:name="Rectangle 103" draw:style-name="gr95" draw:text-style-name="P43" draw:layer="layout" svg:width="1.24cm" svg:height="0.695cm" svg:x="9.495cm" svg:y="9.532cm">
          <text:p/>
          <draw:enhanced-geometry svg:viewBox="0 0 21600 21600" draw:type="non-primitive" draw:enhanced-path="M 0 0 L 21600 0 21600 21600 0 21600 Z N"/>
        </draw:custom-shape>
        <draw:custom-shape draw:name="Rectangle 104" draw:style-name="gr95" draw:text-style-name="P43" draw:layer="layout" svg:width="1.24cm" svg:height="0.695cm" svg:x="9.495cm" svg:y="10.227cm">
          <text:p/>
          <draw:enhanced-geometry svg:viewBox="0 0 21600 21600" draw:type="non-primitive" draw:enhanced-path="M 0 0 L 21600 0 21600 21600 0 21600 Z N"/>
        </draw:custom-shape>
        <draw:custom-shape draw:name="Rectangle 105" draw:style-name="gr95" draw:text-style-name="P43" draw:layer="layout" svg:width="1.24cm" svg:height="0.695cm" svg:x="10.734cm" svg:y="2.577cm">
          <text:p/>
          <draw:enhanced-geometry svg:viewBox="0 0 21600 21600" draw:type="non-primitive" draw:enhanced-path="M 0 0 L 21600 0 21600 21600 0 21600 Z N"/>
        </draw:custom-shape>
        <draw:custom-shape draw:name="Rectangle 106" draw:style-name="gr95" draw:text-style-name="P43" draw:layer="layout" svg:width="1.24cm" svg:height="0.695cm" svg:x="10.734cm" svg:y="3.273cm">
          <text:p/>
          <draw:enhanced-geometry svg:viewBox="0 0 21600 21600" draw:type="non-primitive" draw:enhanced-path="M 0 0 L 21600 0 21600 21600 0 21600 Z N"/>
        </draw:custom-shape>
        <draw:custom-shape draw:name="Rectangle 107" draw:style-name="gr95" draw:text-style-name="P43" draw:layer="layout" svg:width="1.24cm" svg:height="0.695cm" svg:x="10.734cm" svg:y="3.968cm">
          <text:p/>
          <draw:enhanced-geometry svg:viewBox="0 0 21600 21600" draw:type="non-primitive" draw:enhanced-path="M 0 0 L 21600 0 21600 21600 0 21600 Z N"/>
        </draw:custom-shape>
        <draw:custom-shape draw:name="Rectangle 108" draw:style-name="gr95" draw:text-style-name="P43" draw:layer="layout" svg:width="1.24cm" svg:height="0.695cm" svg:x="10.734cm" svg:y="4.664cm">
          <text:p/>
          <draw:enhanced-geometry svg:viewBox="0 0 21600 21600" draw:type="non-primitive" draw:enhanced-path="M 0 0 L 21600 0 21600 21600 0 21600 Z N"/>
        </draw:custom-shape>
        <draw:custom-shape draw:name="Rectangle 109" draw:style-name="gr95" draw:text-style-name="P43" draw:layer="layout" svg:width="1.24cm" svg:height="0.695cm" svg:x="10.734cm" svg:y="5.359cm">
          <text:p/>
          <draw:enhanced-geometry svg:viewBox="0 0 21600 21600" draw:type="non-primitive" draw:enhanced-path="M 0 0 L 21600 0 21600 21600 0 21600 Z N"/>
        </draw:custom-shape>
        <draw:custom-shape draw:name="Rectangle 110" draw:style-name="gr95" draw:text-style-name="P43" draw:layer="layout" svg:width="1.24cm" svg:height="0.695cm" svg:x="10.734cm" svg:y="6.047cm">
          <text:p/>
          <draw:enhanced-geometry svg:viewBox="0 0 21600 21600" draw:type="non-primitive" draw:enhanced-path="M 0 0 L 21600 0 21600 21600 0 21600 Z N"/>
        </draw:custom-shape>
        <draw:custom-shape draw:name="Rectangle 111" draw:style-name="gr92" draw:text-style-name="P40" draw:layer="layout" svg:width="1.24cm" svg:height="0.695cm" svg:x="10.734cm" svg:y="6.75cm">
          <text:p/>
          <draw:enhanced-geometry svg:viewBox="0 0 21600 21600" draw:type="non-primitive" draw:enhanced-path="M 0 0 L 21600 0 21600 21600 0 21600 Z N"/>
        </draw:custom-shape>
        <draw:custom-shape draw:name="Rectangle 112" draw:style-name="gr92" draw:text-style-name="P40" draw:layer="layout" svg:width="1.24cm" svg:height="0.695cm" svg:x="10.734cm" svg:y="7.446cm">
          <text:p/>
          <draw:enhanced-geometry svg:viewBox="0 0 21600 21600" draw:type="non-primitive" draw:enhanced-path="M 0 0 L 21600 0 21600 21600 0 21600 Z N"/>
        </draw:custom-shape>
        <draw:custom-shape draw:name="Rectangle 113" draw:style-name="gr92" draw:text-style-name="P40" draw:layer="layout" svg:width="1.24cm" svg:height="0.695cm" svg:x="10.734cm" svg:y="8.141cm">
          <text:p/>
          <draw:enhanced-geometry svg:viewBox="0 0 21600 21600" draw:type="non-primitive" draw:enhanced-path="M 0 0 L 21600 0 21600 21600 0 21600 Z N"/>
        </draw:custom-shape>
        <draw:custom-shape draw:name="Rectangle 114" draw:style-name="gr92" draw:text-style-name="P40" draw:layer="layout" svg:width="1.24cm" svg:height="0.695cm" svg:x="10.734cm" svg:y="8.836cm">
          <text:p/>
          <draw:enhanced-geometry svg:viewBox="0 0 21600 21600" draw:type="non-primitive" draw:enhanced-path="M 0 0 L 21600 0 21600 21600 0 21600 Z N"/>
        </draw:custom-shape>
        <draw:custom-shape draw:name="Rectangle 115" draw:style-name="gr96" draw:text-style-name="P44" draw:layer="layout" svg:width="1.24cm" svg:height="0.695cm" svg:x="10.734cm" svg:y="9.532cm">
          <text:p/>
          <draw:enhanced-geometry svg:viewBox="0 0 21600 21600" draw:type="non-primitive" draw:enhanced-path="M 0 0 L 21600 0 21600 21600 0 21600 Z N"/>
        </draw:custom-shape>
        <draw:custom-shape draw:name="Rectangle 116" draw:style-name="gr96" draw:text-style-name="P44" draw:layer="layout" svg:width="1.24cm" svg:height="0.695cm" svg:x="10.734cm" svg:y="10.227cm">
          <text:p/>
          <draw:enhanced-geometry svg:viewBox="0 0 21600 21600" draw:type="non-primitive" draw:enhanced-path="M 0 0 L 21600 0 21600 21600 0 21600 Z N"/>
        </draw:custom-shape>
        <draw:custom-shape draw:name="Rectangle 117" draw:style-name="gr95" draw:text-style-name="P43" draw:layer="layout" svg:width="1.24cm" svg:height="0.695cm" svg:x="11.974cm" svg:y="2.577cm">
          <text:p/>
          <draw:enhanced-geometry svg:viewBox="0 0 21600 21600" draw:type="non-primitive" draw:enhanced-path="M 0 0 L 21600 0 21600 21600 0 21600 Z N"/>
        </draw:custom-shape>
        <draw:custom-shape draw:name="Rectangle 118" draw:style-name="gr95" draw:text-style-name="P43" draw:layer="layout" svg:width="1.24cm" svg:height="0.695cm" svg:x="11.974cm" svg:y="3.273cm">
          <text:p/>
          <draw:enhanced-geometry svg:viewBox="0 0 21600 21600" draw:type="non-primitive" draw:enhanced-path="M 0 0 L 21600 0 21600 21600 0 21600 Z N"/>
        </draw:custom-shape>
        <draw:custom-shape draw:name="Rectangle 119" draw:style-name="gr95" draw:text-style-name="P43" draw:layer="layout" svg:width="1.24cm" svg:height="0.695cm" svg:x="11.974cm" svg:y="3.968cm">
          <text:p/>
          <draw:enhanced-geometry svg:viewBox="0 0 21600 21600" draw:type="non-primitive" draw:enhanced-path="M 0 0 L 21600 0 21600 21600 0 21600 Z N"/>
        </draw:custom-shape>
        <draw:custom-shape draw:name="Rectangle 120" draw:style-name="gr95" draw:text-style-name="P43" draw:layer="layout" svg:width="1.24cm" svg:height="0.695cm" svg:x="11.974cm" svg:y="4.664cm">
          <text:p/>
          <draw:enhanced-geometry svg:viewBox="0 0 21600 21600" draw:type="non-primitive" draw:enhanced-path="M 0 0 L 21600 0 21600 21600 0 21600 Z N"/>
        </draw:custom-shape>
        <draw:custom-shape draw:name="Rectangle 121" draw:style-name="gr95" draw:text-style-name="P43" draw:layer="layout" svg:width="1.24cm" svg:height="0.695cm" svg:x="11.974cm" svg:y="5.359cm">
          <text:p/>
          <draw:enhanced-geometry svg:viewBox="0 0 21600 21600" draw:type="non-primitive" draw:enhanced-path="M 0 0 L 21600 0 21600 21600 0 21600 Z N"/>
        </draw:custom-shape>
        <draw:custom-shape draw:name="Rectangle 122" draw:style-name="gr95" draw:text-style-name="P43" draw:layer="layout" svg:width="1.24cm" svg:height="0.695cm" svg:x="11.974cm" svg:y="6.047cm">
          <text:p/>
          <draw:enhanced-geometry svg:viewBox="0 0 21600 21600" draw:type="non-primitive" draw:enhanced-path="M 0 0 L 21600 0 21600 21600 0 21600 Z N"/>
        </draw:custom-shape>
        <draw:custom-shape draw:name="Rectangle 123" draw:style-name="gr92" draw:text-style-name="P40" draw:layer="layout" svg:width="1.24cm" svg:height="0.695cm" svg:x="11.974cm" svg:y="6.75cm">
          <text:p/>
          <draw:enhanced-geometry svg:viewBox="0 0 21600 21600" draw:type="non-primitive" draw:enhanced-path="M 0 0 L 21600 0 21600 21600 0 21600 Z N"/>
        </draw:custom-shape>
        <draw:custom-shape draw:name="Rectangle 124" draw:style-name="gr92" draw:text-style-name="P40" draw:layer="layout" svg:width="1.24cm" svg:height="0.695cm" svg:x="11.974cm" svg:y="7.446cm">
          <text:p/>
          <draw:enhanced-geometry svg:viewBox="0 0 21600 21600" draw:type="non-primitive" draw:enhanced-path="M 0 0 L 21600 0 21600 21600 0 21600 Z N"/>
        </draw:custom-shape>
        <draw:custom-shape draw:name="Rectangle 125" draw:style-name="gr92" draw:text-style-name="P40" draw:layer="layout" svg:width="1.24cm" svg:height="0.695cm" svg:x="11.974cm" svg:y="8.141cm">
          <text:p/>
          <draw:enhanced-geometry svg:viewBox="0 0 21600 21600" draw:type="non-primitive" draw:enhanced-path="M 0 0 L 21600 0 21600 21600 0 21600 Z N"/>
        </draw:custom-shape>
        <draw:custom-shape draw:name="Rectangle 126" draw:style-name="gr92" draw:text-style-name="P40" draw:layer="layout" svg:width="1.24cm" svg:height="0.695cm" svg:x="11.974cm" svg:y="8.836cm">
          <text:p/>
          <draw:enhanced-geometry svg:viewBox="0 0 21600 21600" draw:type="non-primitive" draw:enhanced-path="M 0 0 L 21600 0 21600 21600 0 21600 Z N"/>
        </draw:custom-shape>
        <draw:custom-shape draw:name="Rectangle 127" draw:style-name="gr96" draw:text-style-name="P44" draw:layer="layout" svg:width="1.24cm" svg:height="0.695cm" svg:x="11.974cm" svg:y="9.532cm">
          <text:p/>
          <draw:enhanced-geometry svg:viewBox="0 0 21600 21600" draw:type="non-primitive" draw:enhanced-path="M 0 0 L 21600 0 21600 21600 0 21600 Z N"/>
        </draw:custom-shape>
        <draw:custom-shape draw:name="Rectangle 128" draw:style-name="gr96" draw:text-style-name="P44" draw:layer="layout" svg:width="1.24cm" svg:height="0.695cm" svg:x="11.974cm" svg:y="10.227cm">
          <text:p/>
          <draw:enhanced-geometry svg:viewBox="0 0 21600 21600" draw:type="non-primitive" draw:enhanced-path="M 0 0 L 21600 0 21600 21600 0 21600 Z N"/>
        </draw:custom-shape>
        <draw:custom-shape draw:name="Rectangle 129" draw:style-name="gr95" draw:text-style-name="P43" draw:layer="layout" svg:width="1.24cm" svg:height="0.695cm" svg:x="13.214cm" svg:y="2.577cm">
          <text:p/>
          <draw:enhanced-geometry svg:viewBox="0 0 21600 21600" draw:type="non-primitive" draw:enhanced-path="M 0 0 L 21600 0 21600 21600 0 21600 Z N"/>
        </draw:custom-shape>
        <draw:custom-shape draw:name="Rectangle 130" draw:style-name="gr95" draw:text-style-name="P43" draw:layer="layout" svg:width="1.24cm" svg:height="0.695cm" svg:x="13.214cm" svg:y="3.273cm">
          <text:p/>
          <draw:enhanced-geometry svg:viewBox="0 0 21600 21600" draw:type="non-primitive" draw:enhanced-path="M 0 0 L 21600 0 21600 21600 0 21600 Z N"/>
        </draw:custom-shape>
        <draw:custom-shape draw:name="Rectangle 131" draw:style-name="gr95" draw:text-style-name="P43" draw:layer="layout" svg:width="1.24cm" svg:height="0.695cm" svg:x="13.214cm" svg:y="3.968cm">
          <text:p/>
          <draw:enhanced-geometry svg:viewBox="0 0 21600 21600" draw:type="non-primitive" draw:enhanced-path="M 0 0 L 21600 0 21600 21600 0 21600 Z N"/>
        </draw:custom-shape>
        <draw:custom-shape draw:name="Rectangle 132" draw:style-name="gr95" draw:text-style-name="P43" draw:layer="layout" svg:width="1.24cm" svg:height="0.695cm" svg:x="13.214cm" svg:y="4.664cm">
          <text:p/>
          <draw:enhanced-geometry svg:viewBox="0 0 21600 21600" draw:type="non-primitive" draw:enhanced-path="M 0 0 L 21600 0 21600 21600 0 21600 Z N"/>
        </draw:custom-shape>
        <draw:custom-shape draw:name="Rectangle 133" draw:style-name="gr95" draw:text-style-name="P43" draw:layer="layout" svg:width="1.24cm" svg:height="0.695cm" svg:x="13.214cm" svg:y="5.359cm">
          <text:p/>
          <draw:enhanced-geometry svg:viewBox="0 0 21600 21600" draw:type="non-primitive" draw:enhanced-path="M 0 0 L 21600 0 21600 21600 0 21600 Z N"/>
        </draw:custom-shape>
        <draw:custom-shape draw:name="Rectangle 134" draw:style-name="gr95" draw:text-style-name="P43" draw:layer="layout" svg:width="1.24cm" svg:height="0.695cm" svg:x="13.214cm" svg:y="6.047cm">
          <text:p/>
          <draw:enhanced-geometry svg:viewBox="0 0 21600 21600" draw:type="non-primitive" draw:enhanced-path="M 0 0 L 21600 0 21600 21600 0 21600 Z N"/>
        </draw:custom-shape>
        <draw:custom-shape draw:name="Rectangle 135" draw:style-name="gr92" draw:text-style-name="P40" draw:layer="layout" svg:width="1.24cm" svg:height="0.695cm" svg:x="13.214cm" svg:y="6.75cm">
          <text:p/>
          <draw:enhanced-geometry svg:viewBox="0 0 21600 21600" draw:type="non-primitive" draw:enhanced-path="M 0 0 L 21600 0 21600 21600 0 21600 Z N"/>
        </draw:custom-shape>
        <draw:custom-shape draw:name="Rectangle 136" draw:style-name="gr92" draw:text-style-name="P40" draw:layer="layout" svg:width="1.24cm" svg:height="0.695cm" svg:x="13.214cm" svg:y="7.446cm">
          <text:p/>
          <draw:enhanced-geometry svg:viewBox="0 0 21600 21600" draw:type="non-primitive" draw:enhanced-path="M 0 0 L 21600 0 21600 21600 0 21600 Z N"/>
        </draw:custom-shape>
        <draw:custom-shape draw:name="Rectangle 137" draw:style-name="gr92" draw:text-style-name="P40" draw:layer="layout" svg:width="1.24cm" svg:height="0.695cm" svg:x="13.214cm" svg:y="8.141cm">
          <text:p/>
          <draw:enhanced-geometry svg:viewBox="0 0 21600 21600" draw:type="non-primitive" draw:enhanced-path="M 0 0 L 21600 0 21600 21600 0 21600 Z N"/>
        </draw:custom-shape>
        <draw:custom-shape draw:name="Rectangle 138" draw:style-name="gr92" draw:text-style-name="P40" draw:layer="layout" svg:width="1.24cm" svg:height="0.695cm" svg:x="13.214cm" svg:y="8.836cm">
          <text:p/>
          <draw:enhanced-geometry svg:viewBox="0 0 21600 21600" draw:type="non-primitive" draw:enhanced-path="M 0 0 L 21600 0 21600 21600 0 21600 Z N"/>
        </draw:custom-shape>
        <draw:custom-shape draw:name="Rectangle 139" draw:style-name="gr96" draw:text-style-name="P44" draw:layer="layout" svg:width="1.24cm" svg:height="0.695cm" svg:x="13.214cm" svg:y="9.532cm">
          <text:p/>
          <draw:enhanced-geometry svg:viewBox="0 0 21600 21600" draw:type="non-primitive" draw:enhanced-path="M 0 0 L 21600 0 21600 21600 0 21600 Z N"/>
        </draw:custom-shape>
        <draw:custom-shape draw:name="Rectangle 140" draw:style-name="gr96" draw:text-style-name="P44" draw:layer="layout" svg:width="1.24cm" svg:height="0.695cm" svg:x="13.214cm" svg:y="10.227cm">
          <text:p/>
          <draw:enhanced-geometry svg:viewBox="0 0 21600 21600" draw:type="non-primitive" draw:enhanced-path="M 0 0 L 21600 0 21600 21600 0 21600 Z N"/>
        </draw:custom-shape>
        <draw:custom-shape draw:name="Rectangle 141" draw:style-name="gr94" draw:text-style-name="P42" draw:layer="layout" svg:width="1.24cm" svg:height="0.695cm" svg:x="14.454cm" svg:y="2.577cm">
          <text:p/>
          <draw:enhanced-geometry svg:viewBox="0 0 21600 21600" draw:type="non-primitive" draw:enhanced-path="M 0 0 L 21600 0 21600 21600 0 21600 Z N"/>
        </draw:custom-shape>
        <draw:custom-shape draw:name="Rectangle 142" draw:style-name="gr94" draw:text-style-name="P42" draw:layer="layout" svg:width="1.24cm" svg:height="0.695cm" svg:x="14.454cm" svg:y="3.273cm">
          <text:p/>
          <draw:enhanced-geometry svg:viewBox="0 0 21600 21600" draw:type="non-primitive" draw:enhanced-path="M 0 0 L 21600 0 21600 21600 0 21600 Z N"/>
        </draw:custom-shape>
        <draw:custom-shape draw:name="Rectangle 143" draw:style-name="gr94" draw:text-style-name="P42" draw:layer="layout" svg:width="1.24cm" svg:height="0.695cm" svg:x="14.454cm" svg:y="3.968cm">
          <text:p/>
          <draw:enhanced-geometry svg:viewBox="0 0 21600 21600" draw:type="non-primitive" draw:enhanced-path="M 0 0 L 21600 0 21600 21600 0 21600 Z N"/>
        </draw:custom-shape>
        <draw:custom-shape draw:name="Rectangle 144" draw:style-name="gr94" draw:text-style-name="P42" draw:layer="layout" svg:width="1.24cm" svg:height="0.695cm" svg:x="14.454cm" svg:y="4.664cm">
          <text:p/>
          <draw:enhanced-geometry svg:viewBox="0 0 21600 21600" draw:type="non-primitive" draw:enhanced-path="M 0 0 L 21600 0 21600 21600 0 21600 Z N"/>
        </draw:custom-shape>
        <draw:custom-shape draw:name="Rectangle 145" draw:style-name="gr94" draw:text-style-name="P42" draw:layer="layout" svg:width="1.24cm" svg:height="0.695cm" svg:x="14.454cm" svg:y="5.359cm">
          <text:p/>
          <draw:enhanced-geometry svg:viewBox="0 0 21600 21600" draw:type="non-primitive" draw:enhanced-path="M 0 0 L 21600 0 21600 21600 0 21600 Z N"/>
        </draw:custom-shape>
        <draw:custom-shape draw:name="Rectangle 146" draw:style-name="gr94" draw:text-style-name="P42" draw:layer="layout" svg:width="1.24cm" svg:height="0.695cm" svg:x="14.454cm" svg:y="6.047cm">
          <text:p/>
          <draw:enhanced-geometry svg:viewBox="0 0 21600 21600" draw:type="non-primitive" draw:enhanced-path="M 0 0 L 21600 0 21600 21600 0 21600 Z N"/>
        </draw:custom-shape>
        <draw:custom-shape draw:name="Rectangle 147" draw:style-name="gr94" draw:text-style-name="P42" draw:layer="layout" svg:width="1.24cm" svg:height="0.695cm" svg:x="14.454cm" svg:y="6.75cm">
          <text:p/>
          <draw:enhanced-geometry svg:viewBox="0 0 21600 21600" draw:type="non-primitive" draw:enhanced-path="M 0 0 L 21600 0 21600 21600 0 21600 Z N"/>
        </draw:custom-shape>
        <draw:custom-shape draw:name="Rectangle 148" draw:style-name="gr94" draw:text-style-name="P42" draw:layer="layout" svg:width="1.24cm" svg:height="0.695cm" svg:x="14.454cm" svg:y="7.446cm">
          <text:p/>
          <draw:enhanced-geometry svg:viewBox="0 0 21600 21600" draw:type="non-primitive" draw:enhanced-path="M 0 0 L 21600 0 21600 21600 0 21600 Z N"/>
        </draw:custom-shape>
        <draw:custom-shape draw:name="Rectangle 149" draw:style-name="gr94" draw:text-style-name="P42" draw:layer="layout" svg:width="1.24cm" svg:height="0.695cm" svg:x="14.454cm" svg:y="8.141cm">
          <text:p/>
          <draw:enhanced-geometry svg:viewBox="0 0 21600 21600" draw:type="non-primitive" draw:enhanced-path="M 0 0 L 21600 0 21600 21600 0 21600 Z N"/>
        </draw:custom-shape>
        <draw:custom-shape draw:name="Rectangle 150" draw:style-name="gr91" draw:text-style-name="P39" draw:layer="layout" svg:width="1.24cm" svg:height="0.695cm" svg:x="14.454cm" svg:y="8.836cm">
          <text:p/>
          <draw:enhanced-geometry svg:viewBox="0 0 21600 21600" draw:type="non-primitive" draw:enhanced-path="M 0 0 L 21600 0 21600 21600 0 21600 Z N"/>
        </draw:custom-shape>
        <draw:custom-shape draw:name="Rectangle 151" draw:style-name="gr91" draw:text-style-name="P39" draw:layer="layout" svg:width="1.24cm" svg:height="0.695cm" svg:x="14.454cm" svg:y="9.532cm">
          <text:p/>
          <draw:enhanced-geometry svg:viewBox="0 0 21600 21600" draw:type="non-primitive" draw:enhanced-path="M 0 0 L 21600 0 21600 21600 0 21600 Z N"/>
        </draw:custom-shape>
        <draw:custom-shape draw:name="Rectangle 152" draw:style-name="gr91" draw:text-style-name="P39" draw:layer="layout" svg:width="1.24cm" svg:height="0.695cm" svg:x="14.454cm" svg:y="10.227cm">
          <text:p/>
          <draw:enhanced-geometry svg:viewBox="0 0 21600 21600" draw:type="non-primitive" draw:enhanced-path="M 0 0 L 21600 0 21600 21600 0 21600 Z N"/>
        </draw:custom-shape>
        <draw:custom-shape draw:name="Rectangle 153" draw:style-name="gr94" draw:text-style-name="P42" draw:layer="layout" svg:width="1.24cm" svg:height="0.695cm" svg:x="15.693cm" svg:y="2.577cm">
          <text:p/>
          <draw:enhanced-geometry svg:viewBox="0 0 21600 21600" draw:type="non-primitive" draw:enhanced-path="M 0 0 L 21600 0 21600 21600 0 21600 Z N"/>
        </draw:custom-shape>
        <draw:custom-shape draw:name="Rectangle 154" draw:style-name="gr94" draw:text-style-name="P42" draw:layer="layout" svg:width="1.24cm" svg:height="0.695cm" svg:x="15.693cm" svg:y="3.273cm">
          <text:p/>
          <draw:enhanced-geometry svg:viewBox="0 0 21600 21600" draw:type="non-primitive" draw:enhanced-path="M 0 0 L 21600 0 21600 21600 0 21600 Z N"/>
        </draw:custom-shape>
        <draw:custom-shape draw:name="Rectangle 155" draw:style-name="gr94" draw:text-style-name="P42" draw:layer="layout" svg:width="1.24cm" svg:height="0.695cm" svg:x="15.693cm" svg:y="3.968cm">
          <text:p/>
          <draw:enhanced-geometry svg:viewBox="0 0 21600 21600" draw:type="non-primitive" draw:enhanced-path="M 0 0 L 21600 0 21600 21600 0 21600 Z N"/>
        </draw:custom-shape>
        <draw:custom-shape draw:name="Rectangle 156" draw:style-name="gr94" draw:text-style-name="P42" draw:layer="layout" svg:width="1.24cm" svg:height="0.695cm" svg:x="15.693cm" svg:y="4.664cm">
          <text:p/>
          <draw:enhanced-geometry svg:viewBox="0 0 21600 21600" draw:type="non-primitive" draw:enhanced-path="M 0 0 L 21600 0 21600 21600 0 21600 Z N"/>
        </draw:custom-shape>
        <draw:custom-shape draw:name="Rectangle 157" draw:style-name="gr94" draw:text-style-name="P42" draw:layer="layout" svg:width="1.24cm" svg:height="0.695cm" svg:x="15.693cm" svg:y="5.359cm">
          <text:p/>
          <draw:enhanced-geometry svg:viewBox="0 0 21600 21600" draw:type="non-primitive" draw:enhanced-path="M 0 0 L 21600 0 21600 21600 0 21600 Z N"/>
        </draw:custom-shape>
        <draw:custom-shape draw:name="Rectangle 158" draw:style-name="gr94" draw:text-style-name="P42" draw:layer="layout" svg:width="1.24cm" svg:height="0.695cm" svg:x="15.693cm" svg:y="6.047cm">
          <text:p/>
          <draw:enhanced-geometry svg:viewBox="0 0 21600 21600" draw:type="non-primitive" draw:enhanced-path="M 0 0 L 21600 0 21600 21600 0 21600 Z N"/>
        </draw:custom-shape>
        <draw:custom-shape draw:name="Rectangle 159" draw:style-name="gr94" draw:text-style-name="P42" draw:layer="layout" svg:width="1.24cm" svg:height="0.695cm" svg:x="15.693cm" svg:y="6.75cm">
          <text:p/>
          <draw:enhanced-geometry svg:viewBox="0 0 21600 21600" draw:type="non-primitive" draw:enhanced-path="M 0 0 L 21600 0 21600 21600 0 21600 Z N"/>
        </draw:custom-shape>
        <draw:custom-shape draw:name="Rectangle 160" draw:style-name="gr94" draw:text-style-name="P42" draw:layer="layout" svg:width="1.24cm" svg:height="0.695cm" svg:x="15.693cm" svg:y="7.446cm">
          <text:p/>
          <draw:enhanced-geometry svg:viewBox="0 0 21600 21600" draw:type="non-primitive" draw:enhanced-path="M 0 0 L 21600 0 21600 21600 0 21600 Z N"/>
        </draw:custom-shape>
        <draw:custom-shape draw:name="Rectangle 161" draw:style-name="gr94" draw:text-style-name="P42" draw:layer="layout" svg:width="1.24cm" svg:height="0.695cm" svg:x="15.693cm" svg:y="8.141cm">
          <text:p/>
          <draw:enhanced-geometry svg:viewBox="0 0 21600 21600" draw:type="non-primitive" draw:enhanced-path="M 0 0 L 21600 0 21600 21600 0 21600 Z N"/>
        </draw:custom-shape>
        <draw:custom-shape draw:name="Rectangle 162" draw:style-name="gr91" draw:text-style-name="P39" draw:layer="layout" svg:width="1.24cm" svg:height="0.695cm" svg:x="15.693cm" svg:y="8.836cm">
          <text:p/>
          <draw:enhanced-geometry svg:viewBox="0 0 21600 21600" draw:type="non-primitive" draw:enhanced-path="M 0 0 L 21600 0 21600 21600 0 21600 Z N"/>
        </draw:custom-shape>
        <draw:custom-shape draw:name="Rectangle 163" draw:style-name="gr91" draw:text-style-name="P39" draw:layer="layout" svg:width="1.24cm" svg:height="0.695cm" svg:x="15.693cm" svg:y="9.532cm">
          <text:p/>
          <draw:enhanced-geometry svg:viewBox="0 0 21600 21600" draw:type="non-primitive" draw:enhanced-path="M 0 0 L 21600 0 21600 21600 0 21600 Z N"/>
        </draw:custom-shape>
        <draw:custom-shape draw:name="Rectangle 164" draw:style-name="gr91" draw:text-style-name="P39" draw:layer="layout" svg:width="1.24cm" svg:height="0.695cm" svg:x="15.693cm" svg:y="10.227cm">
          <text:p/>
          <draw:enhanced-geometry svg:viewBox="0 0 21600 21600" draw:type="non-primitive" draw:enhanced-path="M 0 0 L 21600 0 21600 21600 0 21600 Z N"/>
        </draw:custom-shape>
        <draw:connector draw:name="Straight Connector 168" draw:style-name="gr97" draw:text-style-name="P2" draw:layer="layout" draw:type="line" svg:x1="1.406cm" svg:y1="11.618cm" svg:x2="1.406cm" svg:y2="1.882cm" svg:d="M1406 11618v-9736" svg:viewBox="0 0 1 9737">
          <text:p/>
        </draw:connector>
        <draw:connector draw:name="Straight Arrow Connector 177" draw:style-name="gr98" draw:text-style-name="P2" draw:layer="layout" draw:type="line" svg:x1="1.406cm" svg:y1="11.588cm" svg:x2="20.048cm" svg:y2="11.588cm" svg:d="M1406 11588h18642" svg:viewBox="0 0 18643 1">
          <text:p/>
        </draw:connector>
        <draw:frame draw:name="TextBox 179" draw:style-name="gr99" draw:text-style-name="P4" draw:layer="layout" svg:width="5.024cm" svg:height="1.026cm" svg:x="8.225cm" svg:y="11.588cm">
          <draw:text-box>
            <text:p text:style-name="P5"><text:span text:style-name="T26">Time (Symbols)</text:span></text:p>
          </draw:text-box>
        </draw:frame>
        <draw:frame draw:name="TextBox 181" draw:style-name="gr100" draw:text-style-name="P4" draw:layer="layout" svg:width="3.536cm" svg:height="1.026cm" draw:transform="rotate (1.5707963267949) translate (0.35cm 8.489cm)">
          <draw:text-box>
            <text:p text:style-name="P5"><text:span text:style-name="T26">Frequency</text:span></text:p>
          </draw:text-box>
        </draw:frame>
        <draw:g draw:name="Group 211" draw:style-name="gr2">
          <draw:custom-shape draw:name="Right Brace 182" draw:style-name="gr101" draw:text-style-name="P1" draw:layer="layout" svg:width="0.127cm" svg:height="0.695cm" svg:x="22.864cm" svg:y="10.51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183" draw:style-name="gr102" draw:text-style-name="P4" draw:layer="layout" svg:width="2.686cm" svg:height="0.855cm" svg:x="22.871cm" svg:y="10.387cm">
            <draw:text-box>
              <text:p text:style-name="P5"><text:span text:style-name="T27">D</text:span><text:span text:style-name="T28">f = 15kHz</text:span></text:p>
            </draw:text-box>
          </draw:frame>
        </draw:g>
        <draw:custom-shape draw:name="Right Brace 184" draw:style-name="gr103" draw:text-style-name="P1" draw:layer="layout" svg:width="0.423cm" svg:height="17.364cm" draw:transform="rotate (1.5707963267949) translate (2.056cm 1.526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85" draw:style-name="gr104" draw:text-style-name="P4" draw:layer="layout" svg:width="1.314cm" svg:height="0.855cm" svg:x="5.783cm" svg:y="1.244cm">
          <draw:text-box>
            <text:p text:style-name="P5"><text:span text:style-name="T28">PRB</text:span></text:p>
          </draw:text-box>
        </draw:frame>
        <draw:frame draw:name="TextBox 225" draw:style-name="gr105" draw:text-style-name="P4" draw:layer="layout" svg:width="3.905cm" svg:height="1.624cm" svg:x="19.789cm" svg:y="5.911cm">
          <draw:text-box>
            <text:p text:style-name="P6"><text:span text:style-name="T7">12 subcarriers </text:span></text:p>
            <text:p text:style-name="P5"><text:span text:style-name="T7"><text:s/>= 180 kHz</text:span></text:p>
          </draw:text-box>
        </draw:frame>
        <draw:custom-shape draw:name="Rectangle 226" draw:style-name="gr106" draw:text-style-name="P1" draw:layer="layout" svg:width="1.24cm" svg:height="0.695cm" svg:x="21.455cm" svg:y="10.513cm">
          <text:p/>
          <draw:enhanced-geometry svg:viewBox="0 0 21600 21600" draw:type="non-primitive" draw:enhanced-path="M 0 0 L 21600 0 21600 21600 0 21600 Z N"/>
        </draw:custom-shape>
        <draw:g draw:name="Group 229" draw:style-name="gr2">
          <draw:custom-shape draw:name="Right Brace 227" draw:style-name="gr103" draw:text-style-name="P1" draw:layer="layout" svg:width="0.288cm" svg:height="1.24cm" draw:transform="rotate (-1.5707963267949) translate (22.695cm 11.301cm)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name="TextBox 228" draw:style-name="gr107" draw:text-style-name="P4" draw:layer="layout" svg:width="2.459cm" svg:height="1.453cm" svg:x="20.863cm" svg:y="11.49cm">
            <draw:text-box>
              <text:p text:style-name="P6"><text:span text:style-name="T28">1 OFDMA</text:span></text:p>
              <text:p text:style-name="P6"><text:span text:style-name="T28">Symbol</text:span></text:p>
            </draw:text-box>
          </draw:frame>
        </draw:g>
        <draw:frame draw:name="TextBox 234" draw:style-name="gr108" draw:text-style-name="P4" draw:layer="layout" svg:width="4.689cm" svg:height="0.94cm" svg:x="20.193cm" svg:y="9.437cm">
          <draw:text-box>
            <text:p text:style-name="P5"><text:span text:style-name="T7">Resource Unit</text:span></text:p>
          </draw:text-box>
        </draw:frame>
        <draw:custom-shape draw:name="Rectangle 235" draw:style-name="gr94" draw:text-style-name="P42" draw:layer="layout" svg:width="1.24cm" svg:height="0.695cm" svg:x="9.495cm" svg:y="8.14cm">
          <text:p/>
          <draw:enhanced-geometry svg:viewBox="0 0 21600 21600" draw:type="non-primitive" draw:enhanced-path="M 0 0 L 21600 0 21600 21600 0 21600 Z N"/>
        </draw:custom-shape>
        <draw:custom-shape draw:name="Rectangle 210" draw:style-name="gr109" draw:text-style-name="P41" draw:layer="layout" svg:width="1.24cm" svg:height="0.695cm" svg:x="16.933cm" svg:y="2.576cm">
          <text:p/>
          <draw:enhanced-geometry svg:viewBox="0 0 21600 21600" draw:type="non-primitive" draw:enhanced-path="M 0 0 L 21600 0 21600 21600 0 21600 Z N"/>
        </draw:custom-shape>
        <draw:custom-shape draw:name="Rectangle 212" draw:style-name="gr109" draw:text-style-name="P41" draw:layer="layout" svg:width="1.24cm" svg:height="0.695cm" svg:x="16.933cm" svg:y="3.272cm">
          <text:p/>
          <draw:enhanced-geometry svg:viewBox="0 0 21600 21600" draw:type="non-primitive" draw:enhanced-path="M 0 0 L 21600 0 21600 21600 0 21600 Z N"/>
        </draw:custom-shape>
        <draw:custom-shape draw:name="Rectangle 213" draw:style-name="gr109" draw:text-style-name="P41" draw:layer="layout" svg:width="1.24cm" svg:height="0.695cm" svg:x="16.933cm" svg:y="3.967cm">
          <text:p/>
          <draw:enhanced-geometry svg:viewBox="0 0 21600 21600" draw:type="non-primitive" draw:enhanced-path="M 0 0 L 21600 0 21600 21600 0 21600 Z N"/>
        </draw:custom-shape>
        <draw:custom-shape draw:name="Rectangle 214" draw:style-name="gr109" draw:text-style-name="P41" draw:layer="layout" svg:width="1.24cm" svg:height="0.695cm" svg:x="16.933cm" svg:y="4.663cm">
          <text:p/>
          <draw:enhanced-geometry svg:viewBox="0 0 21600 21600" draw:type="non-primitive" draw:enhanced-path="M 0 0 L 21600 0 21600 21600 0 21600 Z N"/>
        </draw:custom-shape>
        <draw:custom-shape draw:name="Rectangle 215" draw:style-name="gr109" draw:text-style-name="P41" draw:layer="layout" svg:width="1.24cm" svg:height="0.695cm" svg:x="16.933cm" svg:y="5.358cm">
          <text:p/>
          <draw:enhanced-geometry svg:viewBox="0 0 21600 21600" draw:type="non-primitive" draw:enhanced-path="M 0 0 L 21600 0 21600 21600 0 21600 Z N"/>
        </draw:custom-shape>
        <draw:custom-shape draw:name="Rectangle 216" draw:style-name="gr109" draw:text-style-name="P41" draw:layer="layout" svg:width="1.24cm" svg:height="0.695cm" svg:x="16.933cm" svg:y="6.046cm">
          <text:p/>
          <draw:enhanced-geometry svg:viewBox="0 0 21600 21600" draw:type="non-primitive" draw:enhanced-path="M 0 0 L 21600 0 21600 21600 0 21600 Z N"/>
        </draw:custom-shape>
        <draw:custom-shape draw:name="Rectangle 217" draw:style-name="gr109" draw:text-style-name="P41" draw:layer="layout" svg:width="1.24cm" svg:height="0.695cm" svg:x="16.933cm" svg:y="6.735cm">
          <text:p/>
          <draw:enhanced-geometry svg:viewBox="0 0 21600 21600" draw:type="non-primitive" draw:enhanced-path="M 0 0 L 21600 0 21600 21600 0 21600 Z N"/>
        </draw:custom-shape>
        <draw:custom-shape draw:name="Rectangle 218" draw:style-name="gr109" draw:text-style-name="P41" draw:layer="layout" svg:width="1.24cm" svg:height="0.695cm" svg:x="16.933cm" svg:y="7.43cm">
          <text:p/>
          <draw:enhanced-geometry svg:viewBox="0 0 21600 21600" draw:type="non-primitive" draw:enhanced-path="M 0 0 L 21600 0 21600 21600 0 21600 Z N"/>
        </draw:custom-shape>
        <draw:custom-shape draw:name="Rectangle 219" draw:style-name="gr109" draw:text-style-name="P41" draw:layer="layout" svg:width="1.24cm" svg:height="0.695cm" svg:x="16.933cm" svg:y="8.126cm">
          <text:p/>
          <draw:enhanced-geometry svg:viewBox="0 0 21600 21600" draw:type="non-primitive" draw:enhanced-path="M 0 0 L 21600 0 21600 21600 0 21600 Z N"/>
        </draw:custom-shape>
        <draw:custom-shape draw:name="Rectangle 220" draw:style-name="gr91" draw:text-style-name="P39" draw:layer="layout" svg:width="1.24cm" svg:height="0.695cm" svg:x="16.933cm" svg:y="8.821cm">
          <text:p/>
          <draw:enhanced-geometry svg:viewBox="0 0 21600 21600" draw:type="non-primitive" draw:enhanced-path="M 0 0 L 21600 0 21600 21600 0 21600 Z N"/>
        </draw:custom-shape>
        <draw:custom-shape draw:name="Rectangle 221" draw:style-name="gr91" draw:text-style-name="P39" draw:layer="layout" svg:width="1.24cm" svg:height="0.695cm" svg:x="16.933cm" svg:y="9.517cm">
          <text:p/>
          <draw:enhanced-geometry svg:viewBox="0 0 21600 21600" draw:type="non-primitive" draw:enhanced-path="M 0 0 L 21600 0 21600 21600 0 21600 Z N"/>
        </draw:custom-shape>
        <draw:custom-shape draw:name="Rectangle 222" draw:style-name="gr91" draw:text-style-name="P39" draw:layer="layout" svg:width="1.24cm" svg:height="0.695cm" svg:x="16.933cm" svg:y="10.212cm">
          <text:p/>
          <draw:enhanced-geometry svg:viewBox="0 0 21600 21600" draw:type="non-primitive" draw:enhanced-path="M 0 0 L 21600 0 21600 21600 0 21600 Z N"/>
        </draw:custom-shape>
        <draw:custom-shape draw:name="Rectangle 223" draw:style-name="gr109" draw:text-style-name="P41" draw:layer="layout" svg:width="1.24cm" svg:height="0.695cm" svg:x="18.173cm" svg:y="2.576cm">
          <text:p/>
          <draw:enhanced-geometry svg:viewBox="0 0 21600 21600" draw:type="non-primitive" draw:enhanced-path="M 0 0 L 21600 0 21600 21600 0 21600 Z N"/>
        </draw:custom-shape>
        <draw:custom-shape draw:name="Rectangle 230" draw:style-name="gr109" draw:text-style-name="P41" draw:layer="layout" svg:width="1.24cm" svg:height="0.695cm" svg:x="18.173cm" svg:y="3.272cm">
          <text:p/>
          <draw:enhanced-geometry svg:viewBox="0 0 21600 21600" draw:type="non-primitive" draw:enhanced-path="M 0 0 L 21600 0 21600 21600 0 21600 Z N"/>
        </draw:custom-shape>
        <draw:custom-shape draw:name="Rectangle 231" draw:style-name="gr109" draw:text-style-name="P41" draw:layer="layout" svg:width="1.24cm" svg:height="0.695cm" svg:x="18.173cm" svg:y="3.967cm">
          <text:p/>
          <draw:enhanced-geometry svg:viewBox="0 0 21600 21600" draw:type="non-primitive" draw:enhanced-path="M 0 0 L 21600 0 21600 21600 0 21600 Z N"/>
        </draw:custom-shape>
        <draw:custom-shape draw:name="Rectangle 232" draw:style-name="gr109" draw:text-style-name="P41" draw:layer="layout" svg:width="1.24cm" svg:height="0.695cm" svg:x="18.173cm" svg:y="4.663cm">
          <text:p/>
          <draw:enhanced-geometry svg:viewBox="0 0 21600 21600" draw:type="non-primitive" draw:enhanced-path="M 0 0 L 21600 0 21600 21600 0 21600 Z N"/>
        </draw:custom-shape>
        <draw:custom-shape draw:name="Rectangle 236" draw:style-name="gr109" draw:text-style-name="P41" draw:layer="layout" svg:width="1.24cm" svg:height="0.695cm" svg:x="18.173cm" svg:y="5.358cm">
          <text:p/>
          <draw:enhanced-geometry svg:viewBox="0 0 21600 21600" draw:type="non-primitive" draw:enhanced-path="M 0 0 L 21600 0 21600 21600 0 21600 Z N"/>
        </draw:custom-shape>
        <draw:custom-shape draw:name="Rectangle 237" draw:style-name="gr109" draw:text-style-name="P41" draw:layer="layout" svg:width="1.24cm" svg:height="0.695cm" svg:x="18.173cm" svg:y="6.046cm">
          <text:p/>
          <draw:enhanced-geometry svg:viewBox="0 0 21600 21600" draw:type="non-primitive" draw:enhanced-path="M 0 0 L 21600 0 21600 21600 0 21600 Z N"/>
        </draw:custom-shape>
        <draw:custom-shape draw:name="Rectangle 238" draw:style-name="gr109" draw:text-style-name="P41" draw:layer="layout" svg:width="1.24cm" svg:height="0.695cm" svg:x="18.173cm" svg:y="6.735cm">
          <text:p/>
          <draw:enhanced-geometry svg:viewBox="0 0 21600 21600" draw:type="non-primitive" draw:enhanced-path="M 0 0 L 21600 0 21600 21600 0 21600 Z N"/>
        </draw:custom-shape>
        <draw:custom-shape draw:name="Rectangle 239" draw:style-name="gr109" draw:text-style-name="P41" draw:layer="layout" svg:width="1.24cm" svg:height="0.695cm" svg:x="18.173cm" svg:y="7.43cm">
          <text:p/>
          <draw:enhanced-geometry svg:viewBox="0 0 21600 21600" draw:type="non-primitive" draw:enhanced-path="M 0 0 L 21600 0 21600 21600 0 21600 Z N"/>
        </draw:custom-shape>
        <draw:custom-shape draw:name="Rectangle 240" draw:style-name="gr109" draw:text-style-name="P41" draw:layer="layout" svg:width="1.24cm" svg:height="0.695cm" svg:x="18.173cm" svg:y="8.126cm">
          <text:p/>
          <draw:enhanced-geometry svg:viewBox="0 0 21600 21600" draw:type="non-primitive" draw:enhanced-path="M 0 0 L 21600 0 21600 21600 0 21600 Z N"/>
        </draw:custom-shape>
        <draw:custom-shape draw:name="Rectangle 241" draw:style-name="gr91" draw:text-style-name="P39" draw:layer="layout" svg:width="1.24cm" svg:height="0.695cm" svg:x="18.173cm" svg:y="8.821cm">
          <text:p/>
          <draw:enhanced-geometry svg:viewBox="0 0 21600 21600" draw:type="non-primitive" draw:enhanced-path="M 0 0 L 21600 0 21600 21600 0 21600 Z N"/>
        </draw:custom-shape>
        <draw:custom-shape draw:name="Rectangle 242" draw:style-name="gr91" draw:text-style-name="P39" draw:layer="layout" svg:width="1.24cm" svg:height="0.695cm" svg:x="18.173cm" svg:y="9.517cm">
          <text:p/>
          <draw:enhanced-geometry svg:viewBox="0 0 21600 21600" draw:type="non-primitive" draw:enhanced-path="M 0 0 L 21600 0 21600 21600 0 21600 Z N"/>
        </draw:custom-shape>
        <draw:custom-shape draw:name="Rectangle 243" draw:style-name="gr91" draw:text-style-name="P39" draw:layer="layout" svg:width="1.24cm" svg:height="0.695cm" svg:x="18.173cm" svg:y="10.212cm">
          <text:p/>
          <draw:enhanced-geometry svg:viewBox="0 0 21600 21600" draw:type="non-primitive" draw:enhanced-path="M 0 0 L 21600 0 21600 21600 0 21600 Z N"/>
        </draw:custom-shape>
        <draw:connector draw:name="Straight Arrow Connector 233" draw:style-name="gr110" draw:text-style-name="P2" draw:layer="layout" draw:type="line" svg:x1="22.093cm" svg:y1="10.861cm" svg:x2="17.556cm" svg:y2="9.245cm" svg:d="M22093 10861l-4537-1616" svg:viewBox="0 0 4538 1617">
          <text:p/>
        </draw:connector>
        <draw:custom-shape draw:name="Right Brace 1" draw:style-name="gr103" draw:text-style-name="P1" draw:layer="layout" svg:width="0.41cm" svg:height="8.284cm" svg:x="19.551cm" svg:y="2.57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44" draw:style-name="gr103" draw:text-style-name="P1" draw:layer="layout" svg:width="0.575cm" svg:height="8.678cm" draw:transform="rotate (1.5707963267949) translate (2.056cm 2.547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245" draw:style-name="gr103" draw:text-style-name="P1" draw:layer="layout" svg:width="0.557cm" svg:height="8.701cm" draw:transform="rotate (1.5707963267949) translate (10.734cm 2.529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246" draw:style-name="gr111" draw:text-style-name="P45" draw:layer="layout" svg:width="8.081cm" svg:height="0.94cm" svg:x="6.716cm" svg:y="0.309cm">
          <draw:text-box>
            <text:p text:style-name="P5"><text:span text:style-name="T7">Transmission Time Interval = 1ms</text:span></text:p>
          </draw:text-box>
        </draw:frame>
        <draw:frame draw:name="TextBox 247" draw:style-name="gr104" draw:text-style-name="P4" draw:layer="layout" svg:width="1.314cm" svg:height="0.855cm" svg:x="14.454cm" svg:y="1.25cm">
          <draw:text-box>
            <text:p text:style-name="P5"><text:span text:style-name="T28">PRB</text:span></text:p>
          </draw:text-box>
        </draw:frame>
        <presentation:notes draw:style-name="dp2">
          <draw:page-thumbnail draw:name="Slide Image Placeholder 1" draw:style-name="gr29" draw:layer="layout" svg:width="16.933cm" svg:height="9.525cm" svg:x="1.058cm" svg:y="1.905cm" draw:page-number="14" presentation:class="page"/>
          <draw:frame draw:name="Notes Placeholder 2" presentation:style-name="pr3" draw:text-style-name="P4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2134095920" draw:style-name="dp1" draw:master-page-name="Master1-Layout24-cust-Title-and-Content">
        <draw:custom-shape draw:name="Rectangle 4" draw:style-name="gr112" draw:text-style-name="P18" xml:id="id36" draw:id="id36" draw:layer="layout" svg:width="8.391cm" svg:height="1.368cm" svg:x="6.587cm" svg:y="6.568cm">
          <text:p text:style-name="P6"><text:span text:style-name="T29">Scheduler</text:span></text:p>
          <draw:enhanced-geometry svg:viewBox="0 0 21600 21600" draw:type="non-primitive" draw:enhanced-path="M 0 0 L 21600 0 21600 21600 0 21600 Z N"/>
        </draw:custom-shape>
        <draw:frame draw:name="TextBox 5" draw:style-name="gr113" draw:text-style-name="P4" xml:id="id35" draw:id="id35" draw:layer="layout" svg:width="4.785cm" svg:height="1.453cm" svg:x="16.493cm" svg:y="6.529cm">
          <draw:text-box>
            <text:p text:style-name="P6"><text:span text:style-name="T28">Requested 5QI</text:span></text:p>
            <text:p text:style-name="P6"><text:span text:style-name="T28">(subscriber assigned)</text:span></text:p>
          </draw:text-box>
        </draw:frame>
        <draw:frame draw:name="TextBox 6" draw:style-name="gr114" draw:text-style-name="P4" xml:id="id37" draw:id="id37" draw:layer="layout" svg:width="3.41cm" svg:height="1.453cm" svg:x="1.833cm" svg:y="6.529cm">
          <draw:text-box>
            <text:p text:style-name="P6"><text:span text:style-name="T28">Reported CQI</text:span></text:p>
            <text:p text:style-name="P6"><text:span text:style-name="T28">(from devices)</text:span></text:p>
          </draw:text-box>
        </draw:frame>
        <draw:connector draw:name="Straight Arrow Connector 8" draw:style-name="gr115" draw:text-style-name="P2" draw:layer="layout" draw:type="line" svg:x1="16.493cm" svg:y1="7.255cm" svg:x2="14.978cm" svg:y2="7.252cm" draw:start-shape="id35" draw:start-glue-point="3" draw:end-shape="id36" draw:end-glue-point="1" svg:d="M16493 7255l-1515-3" svg:viewBox="0 0 1516 4">
          <text:p/>
        </draw:connector>
        <draw:connector draw:name="Straight Arrow Connector 12" draw:style-name="gr116" draw:text-style-name="P2" draw:layer="layout" draw:type="line" svg:x1="5.243cm" svg:y1="7.255cm" svg:x2="6.587cm" svg:y2="7.252cm" draw:start-shape="id37" draw:start-glue-point="1" draw:end-shape="id36" draw:end-glue-point="3" svg:d="M5243 7255l1344-3" svg:viewBox="0 0 1345 4">
          <text:p/>
        </draw:connector>
        <draw:g draw:name="Group 14" draw:style-name="gr9">
          <draw:connector draw:name="Straight Connector 15" draw:style-name="gr117" draw:text-style-name="P2" draw:layer="layout" draw:type="line" svg:x1="7.222cm" svg:y1="2.957cm" svg:x2="7.222cm" svg:y2="5.228cm" svg:d="M7222 2957v2271" svg:viewBox="0 0 1 2272">
            <text:p/>
          </draw:connector>
          <draw:connector draw:name="Straight Connector 16" draw:style-name="gr117" draw:text-style-name="P2" draw:layer="layout" draw:type="line" svg:x1="8.056cm" svg:y1="2.957cm" svg:x2="8.056cm" svg:y2="5.228cm" svg:d="M8056 2957v2271" svg:viewBox="0 0 1 2272">
            <text:p/>
          </draw:connector>
          <draw:connector draw:name="Straight Connector 17" draw:style-name="gr117" draw:text-style-name="P2" draw:layer="layout" draw:type="line" svg:x1="8.071cm" svg:y1="5.228cm" svg:x2="7.208cm" svg:y2="5.228cm" svg:d="M8071 5228h-863" svg:viewBox="0 0 864 1">
            <text:p/>
          </draw:connector>
        </draw:g>
        <draw:g draw:name="Group 22" draw:style-name="gr9">
          <draw:connector draw:name="Straight Connector 23" draw:style-name="gr117" draw:text-style-name="P2" draw:layer="layout" draw:type="line" svg:x1="8.845cm" svg:y1="2.946cm" svg:x2="8.845cm" svg:y2="5.218cm" svg:d="M8845 2946v2272" svg:viewBox="0 0 1 2273">
            <text:p/>
          </draw:connector>
          <draw:connector draw:name="Straight Connector 24" draw:style-name="gr117" draw:text-style-name="P2" draw:layer="layout" draw:type="line" svg:x1="9.68cm" svg:y1="2.946cm" svg:x2="9.68cm" svg:y2="5.218cm" svg:d="M9680 2946v2272" svg:viewBox="0 0 1 2273">
            <text:p/>
          </draw:connector>
          <draw:connector draw:name="Straight Connector 25" draw:style-name="gr117" draw:text-style-name="P2" draw:layer="layout" draw:type="line" svg:x1="9.694cm" svg:y1="5.218cm" svg:x2="8.831cm" svg:y2="5.218cm" svg:d="M9694 5218h-863" svg:viewBox="0 0 864 1">
            <text:p/>
          </draw:connector>
        </draw:g>
        <draw:g draw:name="Group 26" draw:style-name="gr9">
          <draw:connector draw:name="Straight Connector 27" draw:style-name="gr117" draw:text-style-name="P2" draw:layer="layout" draw:type="line" svg:x1="10.371cm" svg:y1="2.946cm" svg:x2="10.371cm" svg:y2="5.218cm" svg:d="M10371 2946v2272" svg:viewBox="0 0 1 2273">
            <text:p/>
          </draw:connector>
          <draw:connector draw:name="Straight Connector 28" draw:style-name="gr117" draw:text-style-name="P2" draw:layer="layout" draw:type="line" svg:x1="11.205cm" svg:y1="2.946cm" svg:x2="11.205cm" svg:y2="5.218cm" svg:d="M11205 2946v2272" svg:viewBox="0 0 1 2273">
            <text:p/>
          </draw:connector>
          <draw:connector draw:name="Straight Connector 29" draw:style-name="gr117" draw:text-style-name="P2" draw:layer="layout" draw:type="line" svg:x1="11.22cm" svg:y1="5.218cm" svg:x2="10.357cm" svg:y2="5.218cm" svg:d="M11220 5218h-863" svg:viewBox="0 0 864 1">
            <text:p/>
          </draw:connector>
        </draw:g>
        <draw:g draw:name="Group 30" draw:style-name="gr9">
          <draw:connector draw:name="Straight Connector 31" draw:style-name="gr117" draw:text-style-name="P2" draw:layer="layout" draw:type="line" svg:x1="11.897cm" svg:y1="2.946cm" svg:x2="11.897cm" svg:y2="5.218cm" svg:d="M11897 2946v2272" svg:viewBox="0 0 1 2273">
            <text:p/>
          </draw:connector>
          <draw:connector draw:name="Straight Connector 32" draw:style-name="gr117" draw:text-style-name="P2" draw:layer="layout" draw:type="line" svg:x1="12.731cm" svg:y1="2.946cm" svg:x2="12.731cm" svg:y2="5.218cm" svg:d="M12731 2946v2272" svg:viewBox="0 0 1 2273">
            <text:p/>
          </draw:connector>
          <draw:connector draw:name="Straight Connector 33" draw:style-name="gr117" draw:text-style-name="P2" draw:layer="layout" draw:type="line" svg:x1="12.745cm" svg:y1="5.218cm" svg:x2="11.882cm" svg:y2="5.218cm" svg:d="M12745 5218h-863" svg:viewBox="0 0 864 1">
            <text:p/>
          </draw:connector>
        </draw:g>
        <draw:g draw:name="Group 34" draw:style-name="gr9">
          <draw:connector draw:name="Straight Connector 35" draw:style-name="gr117" draw:text-style-name="P2" draw:layer="layout" draw:type="line" svg:x1="13.422cm" svg:y1="2.946cm" svg:x2="13.422cm" svg:y2="5.218cm" svg:d="M13422 2946v2272" svg:viewBox="0 0 1 2273">
            <text:p/>
          </draw:connector>
          <draw:connector draw:name="Straight Connector 36" draw:style-name="gr117" draw:text-style-name="P2" draw:layer="layout" draw:type="line" svg:x1="14.257cm" svg:y1="2.946cm" svg:x2="14.257cm" svg:y2="5.218cm" svg:d="M14257 2946v2272" svg:viewBox="0 0 1 2273">
            <text:p/>
          </draw:connector>
          <draw:connector draw:name="Straight Connector 37" draw:style-name="gr117" draw:text-style-name="P2" draw:layer="layout" draw:type="line" svg:x1="14.271cm" svg:y1="5.218cm" svg:x2="13.408cm" svg:y2="5.218cm" svg:d="M14271 5218h-863" svg:viewBox="0 0 864 1">
            <text:p/>
          </draw:connector>
        </draw:g>
        <draw:custom-shape draw:name="Rectangle 38" draw:style-name="gr118" draw:text-style-name="P41" draw:layer="layout" svg:width="0.663cm" svg:height="0.531cm" svg:x="13.511cm" svg:y="4.609cm">
          <text:p/>
          <draw:enhanced-geometry svg:viewBox="0 0 21600 21600" draw:type="non-primitive" draw:enhanced-path="M 0 0 L 21600 0 21600 21600 0 21600 Z N"/>
        </draw:custom-shape>
        <draw:custom-shape draw:name="Rectangle 40" draw:style-name="gr119" draw:text-style-name="P47" draw:layer="layout" svg:width="0.663cm" svg:height="0.531cm" svg:x="10.454cm" svg:y="4.609cm">
          <text:p/>
          <draw:enhanced-geometry svg:viewBox="0 0 21600 21600" draw:type="non-primitive" draw:enhanced-path="M 0 0 L 21600 0 21600 21600 0 21600 Z N"/>
        </draw:custom-shape>
        <draw:custom-shape draw:name="Rectangle 41" draw:style-name="gr120" draw:text-style-name="P48" draw:layer="layout" svg:width="0.663cm" svg:height="0.531cm" svg:x="8.934cm" svg:y="4.609cm">
          <text:p/>
          <draw:enhanced-geometry svg:viewBox="0 0 21600 21600" draw:type="non-primitive" draw:enhanced-path="M 0 0 L 21600 0 21600 21600 0 21600 Z N"/>
        </draw:custom-shape>
        <draw:custom-shape draw:name="Rectangle 43" draw:style-name="gr121" draw:text-style-name="P49" draw:layer="layout" svg:width="0.663cm" svg:height="0.531cm" svg:x="7.305cm" svg:y="4.606cm">
          <text:p/>
          <draw:enhanced-geometry svg:viewBox="0 0 21600 21600" draw:type="non-primitive" draw:enhanced-path="M 0 0 L 21600 0 21600 21600 0 21600 Z N"/>
        </draw:custom-shape>
        <draw:custom-shape draw:name="Rectangle 44" draw:style-name="gr118" draw:text-style-name="P41" draw:layer="layout" svg:width="0.663cm" svg:height="0.531cm" svg:x="13.508cm" svg:y="3.987cm">
          <text:p/>
          <draw:enhanced-geometry svg:viewBox="0 0 21600 21600" draw:type="non-primitive" draw:enhanced-path="M 0 0 L 21600 0 21600 21600 0 21600 Z N"/>
        </draw:custom-shape>
        <draw:custom-shape draw:name="Rectangle 45" draw:style-name="gr118" draw:text-style-name="P41" draw:layer="layout" svg:width="0.663cm" svg:height="0.531cm" svg:x="13.508cm" svg:y="3.354cm">
          <text:p/>
          <draw:enhanced-geometry svg:viewBox="0 0 21600 21600" draw:type="non-primitive" draw:enhanced-path="M 0 0 L 21600 0 21600 21600 0 21600 Z N"/>
        </draw:custom-shape>
        <draw:custom-shape draw:name="Rectangle 47" draw:style-name="gr119" draw:text-style-name="P47" draw:layer="layout" svg:width="0.663cm" svg:height="0.531cm" svg:x="10.454cm" svg:y="3.987cm">
          <text:p/>
          <draw:enhanced-geometry svg:viewBox="0 0 21600 21600" draw:type="non-primitive" draw:enhanced-path="M 0 0 L 21600 0 21600 21600 0 21600 Z N"/>
        </draw:custom-shape>
        <draw:custom-shape draw:name="Rectangle 48" draw:style-name="gr119" draw:text-style-name="P47" draw:layer="layout" svg:width="0.663cm" svg:height="0.531cm" svg:x="10.454cm" svg:y="3.365cm">
          <text:p/>
          <draw:enhanced-geometry svg:viewBox="0 0 21600 21600" draw:type="non-primitive" draw:enhanced-path="M 0 0 L 21600 0 21600 21600 0 21600 Z N"/>
        </draw:custom-shape>
        <draw:custom-shape draw:name="Rectangle 49" draw:style-name="gr119" draw:text-style-name="P47" draw:layer="layout" svg:width="0.663cm" svg:height="0.531cm" svg:x="10.454cm" svg:y="2.743cm">
          <text:p/>
          <draw:enhanced-geometry svg:viewBox="0 0 21600 21600" draw:type="non-primitive" draw:enhanced-path="M 0 0 L 21600 0 21600 21600 0 21600 Z N"/>
        </draw:custom-shape>
        <draw:custom-shape draw:name="Rectangle 51" draw:style-name="gr121" draw:text-style-name="P49" draw:layer="layout" svg:width="0.663cm" svg:height="0.531cm" svg:x="7.305cm" svg:y="4.012cm">
          <text:p/>
          <draw:enhanced-geometry svg:viewBox="0 0 21600 21600" draw:type="non-primitive" draw:enhanced-path="M 0 0 L 21600 0 21600 21600 0 21600 Z N"/>
        </draw:custom-shape>
        <draw:custom-shape draw:name="Rectangle 52" draw:style-name="gr121" draw:text-style-name="P49" draw:layer="layout" svg:width="0.663cm" svg:height="0.531cm" svg:x="7.308cm" svg:y="3.377cm">
          <text:p/>
          <draw:enhanced-geometry svg:viewBox="0 0 21600 21600" draw:type="non-primitive" draw:enhanced-path="M 0 0 L 21600 0 21600 21600 0 21600 Z N"/>
        </draw:custom-shape>
        <draw:g draw:name="Group 119" draw:style-name="gr2">
          <draw:custom-shape draw:name="Rectangle 58" draw:style-name="gr122" draw:text-style-name="P50" draw:layer="layout" svg:width="0.709cm" svg:height="0.713cm" svg:x="6.587cm" svg:y="9.158cm">
            <text:p/>
            <draw:enhanced-geometry svg:viewBox="0 0 21600 21600" draw:type="non-primitive" draw:enhanced-path="M 0 0 L 21600 0 21600 21600 0 21600 Z N"/>
          </draw:custom-shape>
          <draw:custom-shape draw:name="Rectangle 59" draw:style-name="gr122" draw:text-style-name="P50" draw:layer="layout" svg:width="0.709cm" svg:height="0.713cm" svg:x="7.4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0" draw:style-name="gr122" draw:text-style-name="P50" draw:layer="layout" svg:width="0.709cm" svg:height="0.713cm" svg:x="8.313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1" draw:style-name="gr122" draw:text-style-name="P50" draw:layer="layout" svg:width="0.709cm" svg:height="0.713cm" svg:x="9.176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2" draw:style-name="gr122" draw:text-style-name="P50" draw:layer="layout" svg:width="0.709cm" svg:height="0.713cm" svg:x="10.039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3" draw:style-name="gr122" draw:text-style-name="P50" draw:layer="layout" svg:width="0.709cm" svg:height="0.713cm" svg:x="10.902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4" draw:style-name="gr122" draw:text-style-name="P50" draw:layer="layout" svg:width="0.709cm" svg:height="0.713cm" svg:x="11.76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5" draw:style-name="gr122" draw:text-style-name="P50" draw:layer="layout" svg:width="0.709cm" svg:height="0.713cm" svg:x="12.628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6" draw:style-name="gr122" draw:text-style-name="P50" draw:layer="layout" svg:width="0.709cm" svg:height="0.713cm" svg:x="13.491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7" draw:style-name="gr122" draw:text-style-name="P50" draw:layer="layout" svg:width="0.709cm" svg:height="0.713cm" svg:x="14.355cm" svg:y="9.158cm">
            <text:p/>
            <draw:enhanced-geometry svg:viewBox="0 0 21600 21600" draw:type="non-primitive" draw:enhanced-path="M 0 0 L 21600 0 21600 21600 0 21600 Z N"/>
          </draw:custom-shape>
          <draw:custom-shape draw:name="Rectangle 68" draw:style-name="gr122" draw:text-style-name="P50" draw:layer="layout" svg:width="0.709cm" svg:height="0.713cm" svg:x="6.587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69" draw:style-name="gr122" draw:text-style-name="P50" draw:layer="layout" svg:width="0.709cm" svg:height="0.713cm" svg:x="7.4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0" draw:style-name="gr122" draw:text-style-name="P50" draw:layer="layout" svg:width="0.709cm" svg:height="0.713cm" svg:x="8.313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1" draw:style-name="gr122" draw:text-style-name="P50" draw:layer="layout" svg:width="0.709cm" svg:height="0.713cm" svg:x="9.176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2" draw:style-name="gr122" draw:text-style-name="P50" draw:layer="layout" svg:width="0.709cm" svg:height="0.713cm" svg:x="10.039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3" draw:style-name="gr122" draw:text-style-name="P50" draw:layer="layout" svg:width="0.709cm" svg:height="0.713cm" svg:x="10.902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4" draw:style-name="gr122" draw:text-style-name="P50" draw:layer="layout" svg:width="0.709cm" svg:height="0.713cm" svg:x="11.76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5" draw:style-name="gr122" draw:text-style-name="P50" draw:layer="layout" svg:width="0.709cm" svg:height="0.713cm" svg:x="12.628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6" draw:style-name="gr122" draw:text-style-name="P50" draw:layer="layout" svg:width="0.709cm" svg:height="0.713cm" svg:x="13.491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7" draw:style-name="gr122" draw:text-style-name="P50" draw:layer="layout" svg:width="0.709cm" svg:height="0.713cm" svg:x="14.355cm" svg:y="10.009cm">
            <text:p/>
            <draw:enhanced-geometry svg:viewBox="0 0 21600 21600" draw:type="non-primitive" draw:enhanced-path="M 0 0 L 21600 0 21600 21600 0 21600 Z N"/>
          </draw:custom-shape>
          <draw:custom-shape draw:name="Rectangle 78" draw:style-name="gr122" draw:text-style-name="P50" draw:layer="layout" svg:width="0.709cm" svg:height="0.713cm" svg:x="6.587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79" draw:style-name="gr122" draw:text-style-name="P50" draw:layer="layout" svg:width="0.709cm" svg:height="0.713cm" svg:x="7.4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0" draw:style-name="gr122" draw:text-style-name="P50" draw:layer="layout" svg:width="0.709cm" svg:height="0.713cm" svg:x="8.313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1" draw:style-name="gr122" draw:text-style-name="P50" draw:layer="layout" svg:width="0.709cm" svg:height="0.713cm" svg:x="9.176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2" draw:style-name="gr122" draw:text-style-name="P50" draw:layer="layout" svg:width="0.709cm" svg:height="0.713cm" svg:x="10.039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3" draw:style-name="gr122" draw:text-style-name="P50" draw:layer="layout" svg:width="0.709cm" svg:height="0.713cm" svg:x="10.902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4" draw:style-name="gr122" draw:text-style-name="P50" draw:layer="layout" svg:width="0.709cm" svg:height="0.713cm" svg:x="11.765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5" draw:style-name="gr122" draw:text-style-name="P50" draw:layer="layout" svg:width="0.709cm" svg:height="0.713cm" svg:x="12.628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6" draw:style-name="gr122" draw:text-style-name="P50" draw:layer="layout" svg:width="0.709cm" svg:height="0.713cm" svg:x="13.491cm" svg:y="10.827cm">
            <text:p/>
            <draw:enhanced-geometry svg:viewBox="0 0 21600 21600" draw:type="non-primitive" draw:enhanced-path="M 0 0 L 21600 0 21600 21600 0 21600 Z N"/>
          </draw:custom-shape>
          <draw:custom-shape draw:name="Rectangle 87" draw:style-name="gr122" draw:text-style-name="P50" draw:layer="layout" svg:width="0.709cm" svg:height="0.713cm" svg:x="14.355cm" svg:y="10.827cm">
            <text:p/>
            <draw:enhanced-geometry svg:viewBox="0 0 21600 21600" draw:type="non-primitive" draw:enhanced-path="M 0 0 L 21600 0 21600 21600 0 21600 Z N"/>
          </draw:custom-shape>
          <draw:g draw:name="Group 88" draw:style-name="gr2">
            <draw:custom-shape draw:name="Rectangle 89" draw:style-name="gr118" draw:text-style-name="P41" draw:layer="layout" svg:width="0.709cm" svg:height="0.713cm" svg:x="6.587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0" draw:style-name="gr118" draw:text-style-name="P41" draw:layer="layout" svg:width="0.709cm" svg:height="0.713cm" svg:x="7.45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1" draw:style-name="gr118" draw:text-style-name="P41" draw:layer="layout" svg:width="0.709cm" svg:height="0.713cm" svg:x="8.313cm" svg:y="9.158cm">
              <text:p/>
              <draw:enhanced-geometry svg:viewBox="0 0 21600 21600" draw:type="non-primitive" draw:enhanced-path="M 0 0 L 21600 0 21600 21600 0 21600 Z N"/>
            </draw:custom-shape>
            <draw:custom-shape draw:name="Rectangle 92" draw:style-name="gr118" draw:text-style-name="P41" draw:layer="layout" svg:width="0.709cm" svg:height="0.713cm" svg:x="6.587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3" draw:style-name="gr118" draw:text-style-name="P41" draw:layer="layout" svg:width="0.709cm" svg:height="0.713cm" svg:x="7.45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4" draw:style-name="gr118" draw:text-style-name="P41" draw:layer="layout" svg:width="0.709cm" svg:height="0.713cm" svg:x="8.313cm" svg:y="10.009cm">
              <text:p/>
              <draw:enhanced-geometry svg:viewBox="0 0 21600 21600" draw:type="non-primitive" draw:enhanced-path="M 0 0 L 21600 0 21600 21600 0 21600 Z N"/>
            </draw:custom-shape>
            <draw:custom-shape draw:name="Rectangle 95" draw:style-name="gr118" draw:text-style-name="P41" draw:layer="layout" svg:width="0.709cm" svg:height="0.713cm" svg:x="6.587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6" draw:style-name="gr118" draw:text-style-name="P41" draw:layer="layout" svg:width="0.709cm" svg:height="0.713cm" svg:x="7.45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7" draw:style-name="gr118" draw:text-style-name="P41" draw:layer="layout" svg:width="0.709cm" svg:height="0.713cm" svg:x="8.313cm" svg:y="10.827cm">
              <text:p/>
              <draw:enhanced-geometry svg:viewBox="0 0 21600 21600" draw:type="non-primitive" draw:enhanced-path="M 0 0 L 21600 0 21600 21600 0 21600 Z N"/>
            </draw:custom-shape>
            <draw:custom-shape draw:name="Rectangle 98" draw:style-name="gr119" draw:text-style-name="P47" draw:layer="layout" svg:width="0.709cm" svg:height="0.713cm" svg:x="9.176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99" draw:style-name="gr119" draw:text-style-name="P47" draw:layer="layout" svg:width="0.709cm" svg:height="0.713cm" svg:x="10.039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0" draw:style-name="gr119" draw:text-style-name="P47" draw:layer="layout" svg:width="0.709cm" svg:height="0.713cm" svg:x="10.902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1" draw:style-name="gr119" draw:text-style-name="P47" draw:layer="layout" svg:width="0.709cm" svg:height="0.713cm" svg:x="11.765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2" draw:style-name="gr119" draw:text-style-name="P47" draw:layer="layout" svg:width="0.709cm" svg:height="0.713cm" svg:x="12.628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3" draw:style-name="gr119" draw:text-style-name="P47" draw:layer="layout" svg:width="0.709cm" svg:height="0.713cm" svg:x="13.491cm" svg:y="10.014cm">
              <text:p/>
              <draw:enhanced-geometry svg:viewBox="0 0 21600 21600" draw:type="non-primitive" draw:enhanced-path="M 0 0 L 21600 0 21600 21600 0 21600 Z N"/>
            </draw:custom-shape>
            <draw:custom-shape draw:name="Rectangle 104" draw:style-name="gr119" draw:text-style-name="P47" draw:layer="layout" svg:width="0.709cm" svg:height="0.713cm" svg:x="9.176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5" draw:style-name="gr119" draw:text-style-name="P47" draw:layer="layout" svg:width="0.709cm" svg:height="0.713cm" svg:x="10.039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6" draw:style-name="gr119" draw:text-style-name="P47" draw:layer="layout" svg:width="0.709cm" svg:height="0.713cm" svg:x="10.902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7" draw:style-name="gr119" draw:text-style-name="P47" draw:layer="layout" svg:width="0.709cm" svg:height="0.713cm" svg:x="11.765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8" draw:style-name="gr119" draw:text-style-name="P47" draw:layer="layout" svg:width="0.709cm" svg:height="0.713cm" svg:x="12.628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09" draw:style-name="gr119" draw:text-style-name="P47" draw:layer="layout" svg:width="0.709cm" svg:height="0.713cm" svg:x="13.491cm" svg:y="10.832cm">
              <text:p/>
              <draw:enhanced-geometry svg:viewBox="0 0 21600 21600" draw:type="non-primitive" draw:enhanced-path="M 0 0 L 21600 0 21600 21600 0 21600 Z N"/>
            </draw:custom-shape>
            <draw:custom-shape draw:name="Rectangle 110" draw:style-name="gr120" draw:text-style-name="P48" draw:layer="layout" svg:width="0.709cm" svg:height="0.713cm" svg:x="9.173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1" draw:style-name="gr120" draw:text-style-name="P48" draw:layer="layout" svg:width="0.709cm" svg:height="0.713cm" svg:x="10.036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2" draw:style-name="gr120" draw:text-style-name="P48" draw:layer="layout" svg:width="0.709cm" svg:height="0.713cm" svg:x="10.899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3" draw:style-name="gr120" draw:text-style-name="P48" draw:layer="layout" svg:width="0.709cm" svg:height="0.713cm" svg:x="11.762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4" draw:style-name="gr121" draw:text-style-name="P49" draw:layer="layout" svg:width="0.709cm" svg:height="0.713cm" svg:x="12.628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5" draw:style-name="gr121" draw:text-style-name="P49" draw:layer="layout" svg:width="0.709cm" svg:height="0.713cm" svg:x="13.491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6" draw:style-name="gr121" draw:text-style-name="P49" draw:layer="layout" svg:width="0.709cm" svg:height="0.713cm" svg:x="14.355cm" svg:y="9.155cm">
              <text:p/>
              <draw:enhanced-geometry svg:viewBox="0 0 21600 21600" draw:type="non-primitive" draw:enhanced-path="M 0 0 L 21600 0 21600 21600 0 21600 Z N"/>
            </draw:custom-shape>
            <draw:custom-shape draw:name="Rectangle 117" draw:style-name="gr121" draw:text-style-name="P49" draw:layer="layout" svg:width="0.709cm" svg:height="0.713cm" svg:x="14.355cm" svg:y="10.006cm">
              <text:p/>
              <draw:enhanced-geometry svg:viewBox="0 0 21600 21600" draw:type="non-primitive" draw:enhanced-path="M 0 0 L 21600 0 21600 21600 0 21600 Z N"/>
            </draw:custom-shape>
            <draw:custom-shape draw:name="Rectangle 118" draw:style-name="gr121" draw:text-style-name="P49" draw:layer="layout" svg:width="0.709cm" svg:height="0.713cm" svg:x="14.355cm" svg:y="10.824cm">
              <text:p/>
              <draw:enhanced-geometry svg:viewBox="0 0 21600 21600" draw:type="non-primitive" draw:enhanced-path="M 0 0 L 21600 0 21600 21600 0 21600 Z N"/>
            </draw:custom-shape>
          </draw:g>
        </draw:g>
        <draw:custom-shape draw:name="Down Arrow 127" draw:style-name="gr123" draw:text-style-name="P50" draw:layer="layout" svg:width="0.677cm" svg:height="0.987cm" svg:x="10.444cm" svg:y="5.44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Down Arrow 128" draw:style-name="gr123" draw:text-style-name="P50" draw:layer="layout" svg:width="0.677cm" svg:height="0.987cm" svg:x="10.444cm" svg:y="8.053cm">
          <text:p/>
          <draw:enhanced-geometry svg:viewBox="0 0 21600 21600" draw:text-areas="?f0 0 ?f2 ?f5" draw:glue-points="0 ?f1 21600 ?f1" draw:type="non-primitive" draw:modifiers="1419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Right Brace 131" draw:style-name="gr103" draw:text-style-name="P1" draw:layer="layout" svg:width="0.225cm" svg:height="2.194cm" svg:x="14.984cm" svg:y="2.94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2" draw:style-name="gr124" draw:text-style-name="P4" draw:layer="layout" svg:width="7.658cm" svg:height="1.453cm" svg:x="15.611cm" svg:y="3.335cm">
          <draw:text-box>
            <text:p text:style-name="P5"><text:span text:style-name="T28">Select segments to transmit</text:span></text:p>
            <text:p text:style-name="P5"><text:span text:style-name="T28">from a set of subscriber queues</text:span></text:p>
          </draw:text-box>
        </draw:frame>
        <draw:custom-shape draw:name="Right Brace 133" draw:style-name="gr103" draw:text-style-name="P1" draw:layer="layout" svg:width="0.295cm" svg:height="2.382cm" svg:x="6.174cm" svg:y="9.155cm">
          <text:p/>
          <draw:enhanced-geometry svg:viewBox="0 0 21600 21600" draw:mirror-horizontal="true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34" draw:style-name="gr125" draw:text-style-name="P4" draw:layer="layout" svg:width="5.51cm" svg:height="0.855cm" svg:x="0.792cm" svg:y="9.919cm">
          <draw:text-box>
            <text:p text:style-name="P6"><text:span text:style-name="T28">Allocate Resource Blocks</text:span></text:p>
          </draw:text-box>
        </draw:frame>
        <draw:custom-shape draw:name="Rectangle 2" draw:style-name="gr126" draw:text-style-name="P51" draw:layer="layout" svg:width="0.663cm" svg:height="0.531cm" svg:x="11.966cm" svg:y="3.986cm">
          <text:p/>
          <draw:enhanced-geometry svg:viewBox="0 0 21600 21600" draw:type="non-primitive" draw:enhanced-path="M 0 0 L 21600 0 21600 21600 0 21600 Z N"/>
        </draw:custom-shape>
        <draw:custom-shape draw:name="Rectangle 3" draw:style-name="gr127" draw:text-style-name="P52" draw:layer="layout" svg:width="0.663cm" svg:height="0.531cm" svg:x="11.983cm" svg:y="4.6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Slide Image Placeholder 1" draw:style-name="gr29" draw:layer="layout" svg:width="12.7cm" svg:height="7.144cm" svg:x="6.35cm" svg:y="1.429cm" draw:page-number="15" presentation:class="page"/>
          <draw:frame draw:name="Notes Placeholder 2" presentation:style-name="pr1" draw:text-style-name="P4" draw:layer="layout" svg:width="15.24cm" svg:height="11.43cm" svg:x="1.905cm" svg:y="12.065cm" presentation:class="notes">
            <draw:text-box>
              <text:p text:style-name="P5"><text:span text:style-name="T4">Scheduler is the Abstract Interface:</text:span></text:p>
              <text:p text:style-name="P5"><text:span text:style-name="T4">Two parameters: CQI, QCI</text:span></text:p>
            </draw:text-box>
          </draw:frame>
          <draw:frame draw:name="Slide Number Placeholder 3" draw:style-name="gr50" draw:text-style-name="P4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6" draw:style-name="dp4" draw:master-page-name="Master1-Layout24-cust-Title-and-Content">
        <draw:frame draw:style-name="gr128" draw:text-style-name="P53" draw:layer="layout" svg:width="24.13cm" svg:height="10.706cm" svg:x="1.27cm" svg:y="2.54cm">
          <draw:image xlink:href="Pictures/100096D60003E6D40001BB3458710C96.pdf" xlink:type="simple" xlink:show="embed" xlink:actuate="onLoad" draw:mime-type="application/pdf">
            <text:p/>
          </draw:image>
          <draw:image xlink:href="Pictures/10000001000031F10000162927344125.png" xlink:type="simple" xlink:show="embed" xlink:actuate="onLoad" draw:mime-type="image/png"/>
        </draw:frame>
        <presentation:notes draw:style-name="dp2">
          <draw:page-thumbnail draw:style-name="gr29" draw:layer="layout" svg:width="16.933cm" svg:height="9.525cm" svg:x="1.058cm" svg:y="1.905cm" draw:page-number="16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Lato Bold" svg:font-family="'Lato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0668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673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719" draw:style="linear" draw:start-color="#ffffff" draw:end-color="#f6dcde" draw:start-intensity="100%" draw:end-intensity="100%" draw:angle="0deg" draw:border="0%">
      <loext:gradient-stop svg:offset="0" loext:color-type="rgb" loext:color-value="#ffffff"/>
      <loext:gradient-stop svg:offset="1" loext:color-type="rgb" loext:color-value="#f6dcde"/>
    </draw:gradient>
    <draw:gradient draw:name="a10723" draw:style="linear" draw:start-color="#f8fcfd" draw:end-color="#d2edde" draw:start-intensity="100%" draw:end-intensity="100%" draw:angle="0deg" draw:border="0%">
      <loext:gradient-stop svg:offset="0" loext:color-type="rgb" loext:color-value="#f8fcfd"/>
      <loext:gradient-stop svg:offset="1" loext:color-type="rgb" loext:color-value="#d2edde"/>
    </draw:gradient>
    <draw:gradient draw:name="a107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0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86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098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067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19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25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291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gradient draw:name="a11320" draw:style="linear" draw:start-color="#ffffff" draw:end-color="#d8d8d8" draw:start-intensity="100%" draw:end-intensity="100%" draw:angle="0deg" draw:border="0%">
      <loext:gradient-stop svg:offset="0" loext:color-type="rgb" loext:color-value="#ffffff"/>
      <loext:gradient-stop svg:offset="1" loext:color-type="rgb" loext:color-value="#d8d8d8"/>
    </draw:gradient>
    <draw:fill-image draw:name="a12317" xlink:href="Pictures/100000010000000A0000000ABF8341B3.png" xlink:type="simple" xlink:show="embed" xlink:actuate="onLoad"/>
    <draw:fill-image draw:name="a12321" xlink:href="Pictures/100000010000000A0000000ABF8341B3.png" xlink:type="simple" xlink:show="embed" xlink:actuate="onLoad"/>
    <draw:marker draw:name="Arrow" svg:viewBox="0 0 20 30" svg:d="M10 0l-10 30h20z"/>
    <draw:marker draw:name="a10818" svg:viewBox="0 0 20 30" svg:d="M10 0l-10 30h20z"/>
    <draw:marker draw:name="a10820" svg:viewBox="0 0 20 30" svg:d="M10 0l-10 30h20z"/>
    <draw:marker draw:name="a11019" svg:viewBox="0 0 20 30" svg:d="M10 0l-10 30h20z"/>
    <draw:marker draw:name="a11027" svg:viewBox="0 0 20 30" svg:d="M10 0l-10 30h20z"/>
    <draw:marker draw:name="a11229" svg:viewBox="0 0 20 30" svg:d="M10 0l-10 30h20z"/>
    <draw:marker draw:name="a11366" svg:viewBox="0 0 20 30" svg:d="M10 0l-10 30h20z"/>
    <draw:marker draw:name="a11367" svg:viewBox="0 0 20 30" svg:d="M10 0l-10 30h20z"/>
    <draw:marker draw:name="a11369" svg:viewBox="0 0 20 30" svg:d="M10 0l-10 30h20z"/>
    <draw:marker draw:name="a11370" svg:viewBox="0 0 20 30" svg:d="M10 0l-10 30h20z"/>
    <draw:marker draw:name="a11373" svg:viewBox="0 0 20 30" svg:d="M10 0l-10 30h20z"/>
    <draw:marker draw:name="a11379" svg:viewBox="0 0 20 30" svg:d="M10 0l-10 30h20z"/>
    <draw:marker draw:name="a11385" svg:viewBox="0 0 20 30" svg:d="M10 0l-10 30h20z"/>
    <draw:marker draw:name="a11390" svg:viewBox="0 0 20 30" svg:d="M10 0l-10 30h20z"/>
    <draw:marker draw:name="a11391" svg:viewBox="0 0 20 30" svg:d="M10 0l-10 30h20z"/>
    <draw:marker draw:name="a12100" svg:viewBox="0 0 20 30" svg:d="M10 0l-10 30h20z"/>
    <draw:marker draw:name="a12102" svg:viewBox="0 0 20 30" svg:d="M10 0l-10 30h20z"/>
    <draw:marker draw:name="a12204" svg:viewBox="0 0 20 30" svg:d="M10 0l-10 30h20z"/>
    <draw:marker draw:name="a12258" svg:viewBox="0 0 20 30" svg:d="M10 0l-10 30h20z"/>
    <draw:marker draw:name="a12260" svg:viewBox="0 0 20 30" svg:d="M10 0l-10 30h20z"/>
    <draw:stroke-dash draw:name="SysDash" draw:style="rect" draw:dots1="1" draw:dots1-length="0.071cm" draw:distance="0.071cm"/>
    <draw:stroke-dash draw:name="SysDot" draw:style="rect" draw:dots1="1" draw:dots1-length="0.053cm" draw:distance="0.053cm"/>
    <style:default-style style:family="graphic">
      <style:graphic-properties draw:stroke="solid" svg:stroke-width="0.026cm" svg:stroke-color="#6bbadd" svg:stroke-linecap="butt" draw:fill-color="#37b8f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10423" style:family="table-cell">
      <loext:graphic-properties draw:fill="solid" draw:fill-color="#e9edf4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10424" style:family="table-cell"/>
    <style:style style:name="a10425" style:family="table-cell">
      <loext:graphic-properties draw:fill="solid" draw:fill-color="#d0d8e8"/>
    </style:style>
    <style:style style:name="a10426" style:family="table-cell"/>
    <style:style style:name="a10427" style:family="table-cell">
      <loext:graphic-properties draw:fill="solid" draw:fill-color="#d0d8e8"/>
    </style:style>
    <style:style style:name="a10428" style:family="table-cell">
      <loext:graphic-properties draw:fill="solid" draw:fill-color="#4f81bd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29" style:family="table-cell">
      <loext:graphic-properties draw:fill="solid" draw:fill-color="#4f81bd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0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10431" style:family="table-cell">
      <loext:graphic-properties draw:fill="solid" draw:fill-color="#4f81bd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5C22544A-7EE6-4342-B048-85BDC9FD1C3A}">
      <table:first-row table:style-name="a10428"/>
      <table:last-row table:style-name="a10429"/>
      <table:first-column table:style-name="a10430"/>
      <table:last-column table:style-name="a10431"/>
      <table:body table:style-name="a10423"/>
      <table:even-rows table:style-name="a10426"/>
      <table:odd-rows table:style-name="a10427"/>
      <table:even-columns table:style-name="a10424"/>
      <table:odd-columns table:style-name="a10425"/>
    </table:table-template>
    <style:style style:name="Master1-Layout24-cust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4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4-cust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1" style:family="presentation">
      <style:graphic-properties draw:stroke="none" draw:fill="none" draw:auto-grow-height="false" draw:fit-to-size="false" style:shrink-to-fit="true">
        <text:list-style style:name="Master1-Layout24-cust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outline2" style:family="presentation" style:parent-style-name="Master1-Layout24-cust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4-cust-Title-and-Content-outline3" style:family="presentation" style:parent-style-name="Master1-Layout24-cust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4-cust-Title-and-Content-outline4" style:family="presentation" style:parent-style-name="Master1-Layout24-cust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4-cust-Title-and-Content-outline5" style:family="presentation" style:parent-style-name="Master1-Layout24-cust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6" style:family="presentation" style:parent-style-name="Master1-Layout24-cust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7" style:family="presentation" style:parent-style-name="Master1-Layout24-cust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8" style:family="presentation" style:parent-style-name="Master1-Layout24-cust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outline9" style:family="presentation" style:parent-style-name="Master1-Layout24-cust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4-cust-Title-and-Content-subtitle" style:family="presentation">
      <style:graphic-properties draw:stroke="none" draw:fill="none" draw:textarea-vertical-align="middle">
        <text:list-style style:name="Master1-Layout24-cust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Title-and-Content-title" style:family="presentation">
      <style:graphic-properties draw:stroke="none" draw:fill="none" draw:textarea-vertical-align="middle">
        <text:list-style style:name="Master1-Layout24-cust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9-cust-Title-and-Sub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9-cust-Title-and-Sub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1" style:family="presentation">
      <style:graphic-properties draw:stroke="none" draw:fill="none" draw:auto-grow-height="false" draw:fit-to-size="false" style:shrink-to-fit="true">
        <text:list-style style:name="Master1-Layout39-cust-Title-and-Sub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outline2" style:family="presentation" style:parent-style-name="Master1-Layout39-cust-Title-and-Subtitle-Only-outline1">
      <style:paragraph-properties fo:margin-top="0.4cm" fo:margin-bottom="0cm"/>
      <style:text-properties fo:font-size="28pt" style:font-size-asian="28pt" style:font-size-complex="28pt"/>
    </style:style>
    <style:style style:name="Master1-Layout39-cust-Title-and-Subtitle-Only-outline3" style:family="presentation" style:parent-style-name="Master1-Layout39-cust-Title-and-Subtitle-Only-outline2">
      <style:paragraph-properties fo:margin-top="0.3cm" fo:margin-bottom="0cm"/>
      <style:text-properties fo:font-size="24pt" style:font-size-asian="24pt" style:font-size-complex="24pt"/>
    </style:style>
    <style:style style:name="Master1-Layout39-cust-Title-and-Subtitle-Only-outline4" style:family="presentation" style:parent-style-name="Master1-Layout39-cust-Title-and-Subtitle-Only-outline3">
      <style:paragraph-properties fo:margin-top="0.2cm" fo:margin-bottom="0cm"/>
      <style:text-properties fo:font-size="20pt" style:font-size-asian="20pt" style:font-size-complex="20pt"/>
    </style:style>
    <style:style style:name="Master1-Layout39-cust-Title-and-Subtitle-Only-outline5" style:family="presentation" style:parent-style-name="Master1-Layout39-cust-Title-and-Subtitle-Only-outline4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6" style:family="presentation" style:parent-style-name="Master1-Layout39-cust-Title-and-Subtitle-Only-outline5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7" style:family="presentation" style:parent-style-name="Master1-Layout39-cust-Title-and-Subtitle-Only-outline6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8" style:family="presentation" style:parent-style-name="Master1-Layout39-cust-Title-and-Subtitle-Only-outline7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outline9" style:family="presentation" style:parent-style-name="Master1-Layout39-cust-Title-and-Subtitle-Only-outline8">
      <style:paragraph-properties fo:margin-top="0.1cm" fo:margin-bottom="0cm"/>
      <style:text-properties fo:font-size="20pt" style:font-size-asian="20pt" style:font-size-complex="20pt"/>
    </style:style>
    <style:style style:name="Master1-Layout39-cust-Title-and-Subtitle-Only-subtitle" style:family="presentation">
      <style:graphic-properties draw:stroke="none" draw:fill="none" draw:textarea-vertical-align="middle">
        <text:list-style style:name="Master1-Layout39-cust-Title-and-Sub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9-cust-Title-and-Subtitle-Only-title" style:family="presentation">
      <style:graphic-properties draw:stroke="none" draw:fill="none" draw:textarea-vertical-align="middle">
        <text:list-style style:name="Master1-Layout39-cust-Title-and-Sub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Layout24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Layout24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Layout24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39-cust-Title-and-Sub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39-cust-Title-and-Sub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39-cust-Title-and-Sub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26-02-04">2/4/2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Layout24-cust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24-cust-Title-and-Content-title" draw:layer="backgroundobjects" svg:width="22.859cm" svg:height="2.384cm" svg:x="1.27cm" svg:y="0.57cm" presentation:class="title" presentation:placeholder="true">
        <draw:text-box/>
      </draw:frame>
      <draw:frame presentation:style-name="Master1-Layout24-cust-Title-and-Content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2-04">2/4/26</text:date></text:span></text:p>
          </draw:text-box>
        </draw:frame>
        <draw:page-thumbnail draw:name="Slide Image Placeholder 3" presentation:style-name="Master1-Layout24-cust-Title-and-Content-title" draw:layer="backgroundobjects" svg:width="16.933cm" svg:height="9.525cm" svg:x="1.058cm" svg:y="1.905cm" presentation:class="page"/>
        <draw:frame draw:name="Notes Placeholder 4" presentation:style-name="Mpr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9-cust-Title-and-Sub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39-cust-Title-and-Subtitle-Only-title" draw:layer="backgroundobjects" svg:width="22.859cm" svg:height="2.384cm" svg:x="1.27cm" svg:y="0.57cm" presentation:class="title" presentation:placeholder="true">
        <draw:text-box/>
      </draw:frame>
      <draw:frame presentation:style-name="Master1-Layout39-cust-Title-and-Sub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6-02-04">2/4/26</text:date></text:span></text:p>
          </draw:text-box>
        </draw:frame>
        <draw:page-thumbnail draw:name="Slide Image Placeholder 3" presentation:style-name="Master1-Layout39-cust-Title-and-Subtitle-Only-title" draw:layer="backgroundobjects" svg:width="16.933cm" svg:height="9.525cm" svg:x="1.058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4"><text:span text:style-name="MT1">Second level</text:span></text:p>
                    <text:list>
                      <text:list-item>
                        <text:p text:style-name="MP5"><text:span text:style-name="MT1">Third level</text:span></text:p>
                        <text:list>
                          <text:list-item>
                            <text:p text:style-name="MP6"><text:span text:style-name="MT1">Fourth level</text:span></text:p>
                            <text:list>
                              <text:list-item>
                                <text:p text:style-name="MP7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remium Cloud</dc:title>
    <dc:description/>
    <dc:subject/>
    <meta:initial-creator>DesignSmash</meta:initial-creator>
    <meta:creation-date>2013-11-05T15:47:42Z</meta:creation-date>
    <dc:date>2026-02-04T14:40:21.628755000</dc:date>
    <meta:print-date>2023-04-18T21:12:46Z</meta:print-date>
    <meta:editing-cycles>1844</meta:editing-cycles>
    <meta:editing-duration>P1DT5H37M36S</meta:editing-duration>
    <meta:document-statistic meta:object-count="863"/>
  </office:meta>
</office:document-meta>
</file>