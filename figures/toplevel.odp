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70000008A3032A3C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cm" svg:height="1.198cm" svg:x="7.768cm" svg:y="5.268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" draw:text-style-name="P1" draw:layer="layout" svg:width="2.7cm" svg:height="1.198cm" svg:x="12.553cm" svg:y="2.111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" draw:text-style-name="P1" draw:layer="layout" svg:width="2.7cm" svg:height="1.198cm" svg:x="19.538cm" svg:y="2.111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" draw:text-style-name="P1" draw:layer="layout" svg:width="2.7cm" svg:height="1.198cm" svg:x="17.368cm" svg:y="5.268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" draw:text-style-name="P1" draw:layer="layout" svg:width="2.7cm" svg:height="1.198cm" svg:x="7.768cm" svg:y="12.468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" draw:text-style-name="P1" draw:layer="layout" svg:width="2.7cm" svg:height="1.198cm" svg:x="17.368cm" svg:y="12.468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1" draw:text-style-name="P1" draw:layer="layout" svg:width="2.7cm" svg:height="1.198cm" svg:x="12.553cm" svg:y="9.268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2" draw:text-style-name="P2" draw:layer="layout" svg:x1="15.123cm" svg:y1="2.566cm" svg:x2="19.911cm" svg:y2="2.566cm">
          <text:p/>
        </draw:line>
        <draw:line draw:style-name="gr2" draw:text-style-name="P2" draw:layer="layout" svg:x1="14.7cm" svg:y1="2.989cm" svg:x2="18.076cm" svg:y2="5.376cm">
          <text:p/>
        </draw:line>
        <draw:line draw:style-name="gr2" draw:text-style-name="P2" draw:layer="layout" svg:x1="14.534cm" svg:y1="9.333cm" svg:x2="18.368cm" svg:y2="6.335cm">
          <text:p/>
        </draw:line>
        <draw:line draw:style-name="gr2" draw:text-style-name="P2" draw:layer="layout" svg:x1="19.591cm" svg:y1="5.368cm" svg:x2="21cm" svg:y2="3.166cm">
          <text:p/>
        </draw:line>
        <draw:line draw:style-name="gr2" draw:text-style-name="P2" draw:layer="layout" svg:x1="9.972cm" svg:y1="5.329cm" svg:x2="12.935cm" svg:y2="3.181cm">
          <text:p/>
        </draw:line>
        <draw:line draw:style-name="gr2" draw:text-style-name="P2" draw:layer="layout" svg:x1="14.498cm" svg:y1="10.312cm" svg:x2="18.844cm" svg:y2="12.527cm">
          <text:p/>
        </draw:line>
        <draw:line draw:style-name="gr2" draw:text-style-name="P2" draw:layer="layout" svg:x1="10.211cm" svg:y1="13.033cm" svg:x2="17.641cm" svg:y2="13.033cm">
          <text:p/>
        </draw:line>
        <draw:line draw:style-name="gr2" draw:text-style-name="P2" draw:layer="layout" svg:x1="9.163cm" svg:y1="12.515cm" svg:x2="13.2cm" svg:y2="10.333cm">
          <text:p/>
        </draw:line>
        <draw:line draw:style-name="gr2" draw:text-style-name="P2" draw:layer="layout" svg:x1="9.295cm" svg:y1="6.312cm" svg:x2="13.409cm" svg:y2="9.348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5-12-15T12:46:33.520614000</dc:date>
    <meta:editing-duration>PT7H2M11S</meta:editing-duration>
    <meta:editing-cycles>8</meta:editing-cycles>
    <meta:generator>LibreOffice/25.2.4.3$MacOSX_AARCH64 LibreOffice_project/33e196637044ead23f5c3226cde09b47731f7e27</meta:generator>
    <meta:document-statistic meta:object-count="50"/>
  </office:meta>
</office:document-meta>
</file>