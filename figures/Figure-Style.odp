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65953AC9.png" manifest:media-type="image/png"/>
  <manifest:file-entry manifest:full-path="Pictures/10000001000001F3000001510BDF560F.png" manifest:media-type="image/png"/>
  <manifest:file-entry manifest:full-path="Pictures/100000010000053D000003B1B3F0749D.png" manifest:media-type="image/png"/>
  <manifest:file-entry manifest:full-path="Pictures/10000001000004B0000004B02D8E20B8.png" manifest:media-type="image/png"/>
  <manifest:file-entry manifest:full-path="Pictures/1000184A00001CAC00002AF8D75A7ACE.pdf" manifest:media-type="application/pdf"/>
  <manifest:file-entry manifest:full-path="Pictures/100008A0000046A9000046A969C5F579.svg" manifest:media-type="image/svg+xml"/>
  <manifest:file-entry manifest:full-path="Pictures/10000001000004B0000004B07B09B8D8.png" manifest:media-type="image/png"/>
  <manifest:file-entry manifest:full-path="Pictures/10000001000004B0000004B0923FE4BE.png" manifest:media-type="image/png"/>
  <manifest:file-entry manifest:full-path="Pictures/10000001000004B0000004B0D531CF7C.png" manifest:media-type="image/png"/>
  <manifest:file-entry manifest:full-path="Pictures/100000010000016F0000022688FE1F25.png" manifest:media-type="image/png"/>
  <manifest:file-entry manifest:full-path="Pictures/10000001000002C3000002C39E67A95F.png" manifest:media-type="image/png"/>
  <manifest:file-entry manifest:full-path="Pictures/1000000100000316000005E6C4157AF2.png" manifest:media-type="image/png"/>
  <manifest:file-entry manifest:full-path="Pictures/10000001000004B0000004B0B6C3AB3D.png" manifest:media-type="image/png"/>
  <manifest:file-entry manifest:full-path="Pictures/10004B2B000068C4000049D48AB69D38.pdf" manifest:media-type="application/pdf"/>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4"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5"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6"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graphic-properties style:protect="size" loext:decorative="false"/>
    </style:style>
    <style:style style:name="gr9"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10"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2"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3" style:family="graphic">
      <style:graphic-properties style:writing-mode="lr-tb" loext:decorative="false"/>
    </style:style>
    <style:style style:name="gr14"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6"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7"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8"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20"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1"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libri" fo:font-size="16pt" style:font-size-asian="16pt" style:font-size-complex="16pt"/>
    </style:style>
    <style:style style:name="P5" style:family="paragraph">
      <loext:graphic-properties draw:fill="solid" draw:fill-color="#0070c0"/>
      <style:paragraph-properties fo:text-align="center"/>
      <style:text-properties style:font-name="Calibri"/>
    </style:style>
    <style:style style:name="P6" style:family="paragraph">
      <loext:graphic-properties draw:fill="solid" draw:fill-color="#bdd7ee"/>
      <style:paragraph-properties fo:text-align="center"/>
      <style:text-properties style:font-name="Calibri"/>
    </style:style>
    <style:style style:name="P7" style:family="paragraph">
      <loext:graphic-properties draw:fill="solid" draw:fill-color="#6a99d0"/>
      <style:paragraph-properties fo:text-align="center"/>
      <style:text-properties style:font-name="Calibri"/>
    </style:style>
    <style:style style:name="P8" style:family="paragraph">
      <loext:graphic-properties draw:fill-color="#ffffff"/>
    </style:style>
    <style:style style:name="P9" style:family="paragraph">
      <loext:graphic-properties draw:fill="none" draw:fill-color="#ffffff"/>
      <style:text-properties style:font-name="Calibri" fo:font-size="14pt" style:font-size-asian="14pt" style:font-size-complex="14pt"/>
    </style:style>
    <style:style style:name="P10" style:family="paragraph">
      <loext:graphic-properties draw:fill="none" draw:fill-color="#ffffff"/>
      <style:paragraph-properties fo:text-align="center"/>
      <style:text-properties fo:font-size="14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text-properties style:font-name="Calibri" fo:font-size="14pt"/>
    </style:style>
    <style:style style:name="P14" style:family="paragraph">
      <loext:graphic-properties draw:fill="solid" draw:fill-color="#000000" draw:opacity="100%"/>
      <style:paragraph-properties style:writing-mode="lr-tb" style:font-independent-line-spacing="true"/>
    </style:style>
    <style:style style:name="T1" style:family="text">
      <style:text-properties style:font-name="Calibri" fo:font-size="16pt" style:font-size-asian="16pt" style:font-size-complex="16pt"/>
    </style:style>
    <style:style style:name="T2" style:family="text">
      <style:text-properties style:font-name="Calibri"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 fo:font-size="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C4157AF2.png" xlink:type="simple" xlink:show="embed" xlink:actuate="onLoad" draw:mime-type="image/png">
            <text:p/>
          </draw:image>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9E67A95F.png" xlink:type="simple" xlink:show="embed" xlink:actuate="onLoad" draw:mime-type="image/png"/>
        </draw:frame>
        <draw:frame draw:style-name="gr1" draw:text-style-name="P1" draw:layer="layout" svg:width="1.188cm" svg:height="1.782cm" svg:x="15.32cm" svg:y="10.678cm">
          <draw:image xlink:href="Pictures/1000184A00001CAC00002AF8D75A7ACE.pdf" xlink:type="simple" xlink:show="embed" xlink:actuate="onLoad" draw:mime-type="application/pdf">
            <text:p/>
          </draw:image>
          <draw:image xlink:href="Pictures/100000010000016F0000022688FE1F25.png" xlink:type="simple" xlink:show="embed" xlink:actuate="onLoad" draw:mime-type="image/png"/>
        </draw:frame>
        <draw:frame draw:style-name="gr1" draw:text-style-name="P1" draw:layer="layout" svg:width="2.983cm" svg:height="2.102cm" svg:x="10.736cm" svg:y="10.629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frame draw:style-name="gr2" draw:text-style-name="P2" draw:layer="layout" svg:width="6.729cm" svg:height="1.175cm" svg:x="1.842cm" svg:y="1.175cm">
          <draw:text-box>
            <text:p><text:span text:style-name="T1">Calibri (16pt by default)</text:span></text:p>
          </draw:text-box>
        </draw:frame>
        <draw:frame draw:style-name="gr2" draw:text-style-name="P2" draw:layer="layout" svg:width="6.729cm" svg:height="1.175cm" svg:x="1.843cm" svg:y="1.176cm">
          <draw:text-box>
            <text:p><text:span text:style-name="T1">Calibri (16pt by default)</text:span></text:p>
          </draw:text-box>
        </draw:frame>
        <draw:frame draw:style-name="gr3" draw:text-style-name="P4" draw:layer="layout" svg:width="4.506cm" svg:height="1.631cm" svg:x="5.984cm" svg:y="12.883cm">
          <draw:text-box>
            <text:p text:style-name="P3"><text:span text:style-name="T1">Generic</text:span></text:p>
            <text:p text:style-name="P3"><text:span text:style-name="T1">Switch</text:span></text:p>
          </draw:text-box>
        </draw:frame>
        <draw:frame draw:style-name="gr1" draw:text-style-name="P1" draw:layer="layout" svg:width="2.388cm" svg:height="1.682cm" svg:x="11.016cm" svg:y="10.826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frame draw:style-name="gr3" draw:text-style-name="P4" draw:layer="layout" svg:width="4.506cm" svg:height="1.631cm" svg:x="9.889cm" svg:y="12.884cm">
          <draw:text-box>
            <text:p text:style-name="P3"><text:span text:style-name="T1">User</text:span></text:p>
          </draw:text-box>
        </draw:frame>
        <draw:frame draw:style-name="gr3" draw:text-style-name="P4" draw:layer="layout" svg:width="4.506cm" svg:height="1.631cm" svg:x="5.984cm" svg:y="12.884cm">
          <draw:text-box>
            <text:p text:style-name="P3"><text:span text:style-name="T1">Generic</text:span></text:p>
            <text:p text:style-name="P3"><text:span text:style-name="T1">Switch</text:span></text:p>
          </draw:text-box>
        </draw:frame>
        <draw:frame draw:style-name="gr3" draw:text-style-name="P4" draw:layer="layout" svg:width="4.506cm" svg:height="1.631cm" svg:x="13.589cm" svg:y="12.885cm">
          <draw:text-box>
            <text:p text:style-name="P3"><text:span text:style-name="T1">UE</text:span></text:p>
            <text:p text:style-name="P3"><text:span text:style-name="T1">Phone</text:span></text:p>
          </draw:text-box>
        </draw:frame>
        <draw:frame draw:style-name="gr3" draw:text-style-name="P4" draw:layer="layout" svg:width="4.506cm" svg:height="1.631cm" svg:x="13.589cm" svg:y="12.886cm">
          <draw:text-box>
            <text:p text:style-name="P3"><text:span text:style-name="T1">UE</text:span></text:p>
            <text:p text:style-name="P3"><text:span text:style-name="T1">Phone</text:span></text:p>
          </draw:text-box>
        </draw:frame>
        <draw:frame draw:style-name="gr3" draw:text-style-name="P4" draw:layer="layout" svg:width="4.506cm" svg:height="1.631cm" svg:x="17.089cm" svg:y="12.887cm">
          <draw:text-box>
            <text:p text:style-name="P3"><text:span text:style-name="T1">Generic Office</text:span></text:p>
            <text:p text:style-name="P3"><text:span text:style-name="T1">or Enterprise</text:span></text:p>
          </draw:text-box>
        </draw:frame>
        <draw:frame draw:style-name="gr3" draw:text-style-name="P4" draw:layer="layout" svg:width="4.506cm" svg:height="1.631cm" svg:x="13.589cm" svg:y="12.887cm">
          <draw:text-box>
            <text:p text:style-name="P3"><text:span text:style-name="T1">UE</text:span></text:p>
            <text:p text:style-name="P3"><text:span text:style-name="T1">Phone</text:span></text:p>
          </draw:text-box>
        </draw:frame>
        <draw:frame draw:style-name="gr3" draw:text-style-name="P4" draw:layer="layout" svg:width="4.506cm" svg:height="1.631cm" svg:x="21.789cm" svg:y="12.888cm">
          <draw:text-box>
            <text:p text:style-name="P3"><text:span text:style-name="T1">5G</text:span></text:p>
            <text:p text:style-name="P3"><text:span text:style-name="T1">Basestation</text:span></text:p>
          </draw:text-box>
        </draw:frame>
        <draw:frame draw:style-name="gr3" draw:text-style-name="P4" draw:layer="layout" svg:width="4.506cm" svg:height="1.631cm" svg:x="21.735cm" svg:y="7.008cm">
          <draw:text-box>
            <text:p text:style-name="P3"><text:span text:style-name="T1">WiFi</text:span></text:p>
            <text:p text:style-name="P3"><text:span text:style-name="T1">Access Point</text:span></text:p>
          </draw:text-box>
        </draw:frame>
        <draw:custom-shape draw:style-name="gr4" draw:text-style-name="P5" draw:layer="layout" svg:width="1.461cm" svg:height="0.889cm" svg:x="2.158cm" svg:y="2.594cm">
          <text:p/>
          <draw:enhanced-geometry svg:viewBox="0 0 21600 21600" draw:type="rectangle" draw:enhanced-path="M 0 0 L 21600 0 21600 21600 0 21600 0 0 Z N"/>
        </draw:custom-shape>
        <draw:custom-shape draw:style-name="gr5" draw:text-style-name="P6" draw:layer="layout" svg:width="1.461cm" svg:height="0.889cm" svg:x="2.158cm" svg:y="5.283cm">
          <text:p/>
          <draw:enhanced-geometry svg:viewBox="0 0 21600 21600" draw:type="rectangle" draw:enhanced-path="M 0 0 L 21600 0 21600 21600 0 21600 0 0 Z N"/>
        </draw:custom-shape>
        <draw:frame draw:style-name="gr2" draw:text-style-name="P2" draw:layer="layout" svg:width="6.729cm" svg:height="1.175cm" svg:x="3.744cm" svg:y="2.577cm">
          <draw:text-box>
            <text:p><text:span text:style-name="T1">Darker Color 0070c0</text:span></text:p>
          </draw:text-box>
        </draw:frame>
        <draw:frame draw:style-name="gr2" draw:text-style-name="P2" draw:layer="layout" svg:width="6.729cm" svg:height="1.175cm" svg:x="3.745cm" svg:y="5.178cm">
          <draw:text-box>
            <text:p><text:span text:style-name="T1">Lighter Color bdd7ee</text:span></text:p>
          </draw:text-box>
        </draw:frame>
        <draw:custom-shape draw:style-name="gr6" draw:text-style-name="P7" draw:layer="layout" svg:width="1.461cm" svg:height="0.889cm" svg:x="2.126cm" svg:y="3.916cm">
          <text:p/>
          <draw:enhanced-geometry svg:viewBox="0 0 21600 21600" draw:type="rectangle" draw:enhanced-path="M 0 0 L 21600 0 21600 21600 0 21600 0 0 Z N"/>
        </draw:custom-shape>
        <draw:frame draw:style-name="gr2" draw:text-style-name="P2" draw:layer="layout" svg:width="6.729cm" svg:height="1.175cm" svg:x="3.745cm" svg:y="3.878cm">
          <draw:text-box>
            <text:p><text:span text:style-name="T1">Default Color 6a99d0</text:span></text:p>
          </draw:text-box>
        </draw:frame>
        <draw:frame draw:style-name="gr1" draw:text-style-name="P1" draw:layer="layout" svg:width="2.947cm" svg:height="2.947cm" svg:x="6.708cm" svg:y="9.936cm">
          <draw:image xlink:href="Pictures/10000001000004B0000004B0D531CF7C.png" xlink:type="simple" xlink:show="embed" xlink:actuate="onLoad" draw:mime-type="image/png">
            <text:p/>
          </draw:image>
        </draw:frame>
        <draw:frame draw:style-name="gr7" draw:text-style-name="P3" draw:layer="layout" svg:width="2.974cm" svg:height="2.974cm" svg:x="22.445cm" svg:y="4.55cm">
          <draw:image xlink:href="Pictures/10000001000004B0000004B0B6C3AB3D.png" xlink:type="simple" xlink:show="embed" xlink:actuate="onLoad" draw:mime-type="image/png">
            <text:p/>
          </draw:image>
        </draw:frame>
        <presentation:notes draw:style-name="dp2">
          <draw:page-thumbnail draw:style-name="gr8"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9" draw:text-style-name="P9" draw:layer="layout" svg:width="1.661cm" svg:height="0.852cm" svg:x="2.25cm" svg:y="4.423cm">
          <draw:text-box>
            <text:p><text:span text:style-name="T2">Client</text:span></text:p>
          </draw:text-box>
        </draw:frame>
        <draw:frame draw:style-name="gr10" draw:text-style-name="P10" draw:layer="layout" svg:width="3.316cm" svg:height="1.453cm" svg:x="9.238cm" svg:y="4.474cm">
          <draw:text-box>
            <text:p text:style-name="P3"><text:span text:style-name="T2">Server</text:span><text:span text:style-name="T3"> </text:span></text:p>
          </draw:text-box>
        </draw:frame>
        <draw:line draw:style-name="gr11" draw:text-style-name="P1" draw:layer="layout" svg:x1="4.507cm" svg:y1="2.8cm" svg:x2="9.204cm" svg:y2="2.806cm">
          <text:p/>
        </draw:line>
        <draw:line draw:style-name="gr12" draw:text-style-name="P1" draw:layer="layout" svg:x1="9.04cm" svg:y1="3.835cm" svg:x2="4.507cm" svg:y2="3.84cm">
          <text:p/>
        </draw:line>
        <draw:g draw:style-name="gr13">
          <draw:g draw:name="Group 2" draw:style-name="gr13">
            <draw:custom-shape draw:name="Rectangle 3" draw:style-name="gr14" draw:text-style-name="P11"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5" draw:text-style-name="P11"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6" draw:text-style-name="P12" draw:layer="layout" draw:type="line" svg:x1="5.821cm" svg:y1="1.182cm" svg:x2="4.635cm" svg:y2="2.15cm" svg:d="M5821 1182l-1186 968" svg:viewBox="0 0 1187 969">
              <text:p/>
            </draw:connector>
            <draw:connector draw:name="Straight Connector 4" draw:style-name="gr16" draw:text-style-name="P12" draw:layer="layout" draw:type="line" svg:x1="7.779cm" svg:y1="1.218cm" svg:x2="8.941cm" svg:y2="2.15cm" svg:d="M7779 1218l1162 932" svg:viewBox="0 0 1163 933">
              <text:p/>
            </draw:connector>
          </draw:g>
          <draw:frame draw:style-name="gr17" draw:text-style-name="P13" draw:layer="layout" svg:width="1.741cm" svg:height="0.852cm" svg:x="5.904cm" svg:y="1.303cm">
            <draw:text-box>
              <text:p><text:span text:style-name="T4">Query</text:span></text:p>
            </draw:text-box>
          </draw:frame>
        </draw:g>
        <draw:g draw:style-name="gr13">
          <draw:g draw:name="Group 2" draw:style-name="gr13">
            <draw:custom-shape draw:name="Rectangle 3" draw:style-name="gr18" draw:text-style-name="P11"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9" draw:text-style-name="P11"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6" draw:text-style-name="P12" draw:layer="layout" draw:type="line" svg:x1="5.847cm" svg:y1="4.658cm" svg:x2="4.675cm" svg:y2="5.626cm" svg:d="M5847 4658l-1172 968" svg:viewBox="0 0 1173 969">
              <text:p/>
            </draw:connector>
            <draw:connector draw:name="Straight Connector 4" draw:style-name="gr16" draw:text-style-name="P12" draw:layer="layout" draw:type="line" svg:x1="7.781cm" svg:y1="4.694cm" svg:x2="8.927cm" svg:y2="5.626cm" svg:d="M7781 4694l1146 932" svg:viewBox="0 0 1147 933">
              <text:p/>
            </draw:connector>
          </draw:g>
          <draw:frame draw:style-name="gr20" draw:text-style-name="P13" draw:layer="layout" svg:width="2.491cm" svg:height="0.852cm" svg:x="5.564cm" svg:y="4.779cm">
            <draw:text-box>
              <text:p><text:span text:style-name="T4">Response</text:span></text:p>
            </draw:text-box>
          </draw:frame>
        </draw:g>
        <draw:custom-shape draw:name="Freeform 2" draw:style-name="gr21" draw:text-style-name="P14" draw:layer="layout" svg:width="6.952cm" svg:height="3.252cm" svg:x="12.634cm" svg:y="9.7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10" draw:text-style-name="P10" draw:layer="layout" svg:width="3.316cm" svg:height="1.453cm" svg:x="15.153cm" svg:y="13.296cm">
          <draw:text-box>
            <text:p text:style-name="P3"><text:span text:style-name="T2">Cloud</text:span><text:span text:style-name="T3"> </text:span></text:p>
          </draw:text-box>
        </draw:frame>
        <draw:frame draw:style-name="gr1" draw:text-style-name="P1" draw:layer="layout" svg:width="2.926cm" svg:height="1.975cm" svg:x="5.419cm" svg:y="9.577cm">
          <draw:image xlink:href="Pictures/10000001000001F3000001510BDF560F.png" xlink:type="simple" xlink:show="embed" xlink:actuate="onLoad" draw:mime-type="image/png">
            <text:p/>
          </draw:image>
        </draw:frame>
        <draw:frame draw:style-name="gr10" draw:text-style-name="P10" draw:layer="layout" svg:width="3.316cm" svg:height="1.453cm" svg:x="5.187cm" svg:y="11.913cm">
          <draw:text-box>
            <text:p text:style-name="P3"><text:span text:style-name="T2">Router</text:span><text:span text:style-name="T3">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10" draw:text-style-name="P10" draw:layer="layout" svg:width="3.316cm" svg:height="1.453cm" svg:x="13.038cm" svg:y="4.475cm">
          <draw:text-box>
            <text:p text:style-name="P3"><text:span text:style-name="T2">Alt Server</text:span><text:span text:style-name="T3"> </text:span></text:p>
          </draw:text-box>
        </draw:frame>
        <draw:frame draw:style-name="gr10" draw:text-style-name="P10" draw:layer="layout" svg:width="3.316cm" svg:height="1.453cm" svg:x="16.538cm" svg:y="4.376cm">
          <draw:text-box>
            <text:p text:style-name="P3"><text:span text:style-name="T2">Alt Client</text:span><text:span text:style-name="T3"> </text:span></text:p>
          </draw:text-box>
        </draw:frame>
        <presentation:notes draw:style-name="dp2">
          <draw:page-thumbnail draw:style-name="gr8"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5-12-14T12:32:35.752132000</dc:date>
    <meta:editing-duration>PT33M58S</meta:editing-duration>
    <meta:editing-cycles>6</meta:editing-cycles>
    <meta:generator>LibreOffice/25.2.4.3$MacOSX_AARCH64 LibreOffice_project/33e196637044ead23f5c3226cde09b47731f7e27</meta:generator>
    <meta:document-statistic meta:object-count="88"/>
  </office:meta>
</office:document-meta>
</file>