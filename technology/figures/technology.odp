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1370000008A3032A3C2.png" manifest:media-type="image/png"/>
  <manifest:file-entry manifest:full-path="Pictures/10000001000004B0000004B0B10EE12D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Calibri" svg:font-family="Calibri"/>
    <style:font-face style:name="Calibri Light" svg:font-family="'Calibri Light'"/>
    <style:font-face style:name="Calibri1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gr1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2.03cm" fo:min-width="31.83cm" fo:padding-top="0.15cm" fo:padding-bottom="0.15cm" fo:padding-left="0.275cm" fo:padding-right="0.275cm" draw:shadow="visible" draw:shadow-offset-x="0.051cm" draw:shadow-offset-y="-0.051cm" draw:shadow-color="#6a99d0" loext:decorative="false"/>
    </style:style>
    <style:style style:name="gr2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1.976cm" fo:min-width="4.53cm" fo:padding-top="0.15cm" fo:padding-bottom="0.15cm" fo:padding-left="0.275cm" fo:padding-right="0.275cm" draw:shadow="hidden" draw:shadow-offset-x="0.051cm" draw:shadow-offset-y="-0.051cm" draw:shadow-color="#6a99d0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1.976cm" fo:min-width="3.895cm" fo:padding-top="0.15cm" fo:padding-bottom="0.15cm" fo:padding-left="0.275cm" fo:padding-right="0.275cm" draw:shadow="hidden" draw:shadow-offset-x="0.051cm" draw:shadow-offset-y="-0.051cm" draw:shadow-color="#6a99d0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1.976cm" fo:min-width="3.95cm" fo:padding-top="0.15cm" fo:padding-bottom="0.15cm" fo:padding-left="0.275cm" fo:padding-right="0.275cm" draw:shadow="hidden" draw:shadow-offset-x="0.051cm" draw:shadow-offset-y="-0.051cm" draw:shadow-color="#6a99d0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1.976cm" fo:min-width="1.4cm" fo:padding-top="0.15cm" fo:padding-bottom="0.15cm" fo:padding-left="0.275cm" fo:padding-right="0.275cm" draw:shadow="hidden" draw:shadow-offset-x="0.051cm" draw:shadow-offset-y="-0.051cm" draw:shadow-color="#6a99d0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1.976cm" fo:min-width="5.85cm" fo:padding-top="0.15cm" fo:padding-bottom="0.15cm" fo:padding-left="0.275cm" fo:padding-right="0.275cm" draw:shadow="hidden" draw:shadow-offset-x="0.051cm" draw:shadow-offset-y="-0.051cm" draw:shadow-color="#6a99d0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left" draw:textarea-vertical-align="middle" draw:auto-grow-height="false" fo:min-height="1.976cm" fo:min-width="4.63cm" fo:padding-top="0.15cm" fo:padding-bottom="0.15cm" fo:padding-left="0.275cm" fo:padding-right="0.275cm" draw:shadow="hidden" draw:shadow-offset-x="0.051cm" draw:shadow-offset-y="-0.051cm" draw:shadow-color="#6a99d0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1.62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5cm" fo:min-width="0.996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5cm" fo:min-width="1.201cm" loext:decorative="false"/>
      <style:paragraph-properties style:writing-mode="lr-tb"/>
    </style:style>
    <style:style style:name="gr11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925cm" fo:min-width="0.982cm" loext:decorative="false"/>
    </style:style>
    <style:style style:name="gr12" style:family="graphic">
      <style:graphic-properties loext:decorative="false"/>
    </style:style>
    <style:style style:name="gr13" style:family="graphic" style:parent-style-name="standard">
      <style:graphic-properties svg:stroke-width="0.051cm" svg:stroke-color="#000000" draw:marker-start="Arrow" draw:marker-start-width="0.229cm" draw:marker-end="Arrow" draw:marker-end-width="0.229cm" draw:textarea-vertical-align="middle" fo:padding-top="0.15cm" fo:padding-bottom="0.15cm" fo:padding-left="0.275cm" fo:padding-right="0.275cm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423cm" fo:min-width="1.118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423cm" fo:min-width="1.09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423cm" fo:min-width="0.913cm" loext:decorative="false"/>
      <style:paragraph-properties style:writing-mode="lr-tb"/>
    </style:style>
    <style:style style:name="gr17" style:family="graphic" style:parent-style-name="objectwithoutfill">
      <style:graphic-properties draw:stroke="dash" draw:stroke-dash="Long_20_Dot_20__28_Rounded_29_" svg:stroke-width="0.051cm" draw:marker-start-width="0.279cm" draw:marker-end-width="0.279cm" svg:stroke-linecap="round" draw:fill="none" draw:textarea-vertical-align="middle" fo:padding-top="0.15cm" fo:padding-bottom="0.15cm" fo:padding-left="0.275cm" fo:padding-right="0.275cm" loext:decorative="false"/>
    </style:style>
    <style:style style:name="gr18" style:family="graphic" style:parent-style-name="standard">
      <style:graphic-properties svg:stroke-width="0.051cm" svg:stroke-color="#000000" draw:marker-start="Arrow" draw:marker-start-width="0.229cm" draw:marker-end="Arrow" draw:marker-end-width="0.229cm" draw:fill="solid" draw:fill-color="#000000" draw:textarea-vertical-align="middle" fo:padding-top="0.15cm" fo:padding-bottom="0.15cm" fo:padding-left="0.275cm" fo:padding-right="0.275cm" loext:decorative="false"/>
      <style:paragraph-properties style:writing-mode="lr-tb"/>
    </style:style>
    <style:style style:name="gr19" style:family="graphic">
      <style:graphic-properties style:protect="size" loext:decorative="fals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1cm" fo:min-width="11.587cm" loext:decorative="false"/>
      <style:paragraph-properties style:writing-mode="lr-tb"/>
    </style:style>
    <style:style style:name="gr22" style:family="graphic">
      <style:graphic-properties style:writing-mode="lr-tb" loext:decorative="false"/>
    </style:style>
    <style:style style:name="gr23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1.605cm" fo:min-width="1.99cm" fo:padding-top="0.15cm" fo:padding-bottom="0.15cm" fo:padding-left="0.275cm" fo:padding-right="0.275cm" loext:decorative="false"/>
    </style:style>
    <style:style style:name="gr24" style:family="graphic" style:parent-style-name="objectwithoutfill">
      <style:graphic-properties svg:stroke-width="0.102cm" svg:stroke-color="#ffffff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25" style:family="graphic" style:parent-style-name="objectwithoutfill">
      <style:graphic-properties svg:stroke-width="0.203cm" svg:stroke-color="#ffffff" draw:marker-start-width="0.508cm" draw:marker-end-width="0.508cm" draw:fill="solid" draw:fill-color="#ffffff" draw:textarea-vertical-align="middle" fo:padding-top="0.226cm" fo:padding-bottom="0.226cm" fo:padding-left="0.351cm" fo:padding-right="0.351cm" loext:decorative="false"/>
    </style:style>
    <style:style style:name="gr26" style:family="graphic" style:parent-style-name="objectwithoutfill">
      <style:graphic-properties svg:stroke-width="0.203cm" svg:stroke-color="#ffffff" draw:marker-start-width="0.508cm" draw:marker-end-width="0.508cm" draw:fill="none" draw:textarea-vertical-align="middle" fo:padding-top="0.226cm" fo:padding-bottom="0.226cm" fo:padding-left="0.351cm" fo:padding-right="0.351cm" loext:decorative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1cm" fo:min-width="10.896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4cm" fo:min-width="1.718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10.4cm" loext:decorative="false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.068cm" fo:min-width="0.89cm" loext:decorative="false"/>
    </style:style>
    <style:style style:name="gr31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left" draw:textarea-vertical-align="top" draw:auto-grow-height="false" fo:min-height="5.415cm" fo:min-width="7.07cm" fo:padding-top="0.15cm" fo:padding-bottom="0.15cm" fo:padding-left="0.275cm" fo:padding-right="0.275cm" draw:shadow="visible" draw:shadow-offset-x="0.051cm" draw:shadow-offset-y="-0.051cm" draw:shadow-color="#6a99d0" style:writing-mode="lr-tb" loext:decorative="false"/>
      <style:paragraph-properties style:writing-mode="lr-tb"/>
    </style:style>
    <style:style style:name="gr32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left" draw:textarea-vertical-align="top" draw:auto-grow-height="false" fo:min-height="5.301cm" fo:min-width="7.057cm" fo:padding-top="0.15cm" fo:padding-bottom="0.15cm" fo:padding-left="0.275cm" fo:padding-right="0.275cm" draw:shadow="visible" draw:shadow-offset-x="0.051cm" draw:shadow-offset-y="-0.051cm" draw:shadow-color="#6a99d0" style:writing-mode="lr-tb" loext:decorative="false"/>
      <style:paragraph-properties style:writing-mode="lr-tb"/>
    </style:style>
    <style:style style:name="gr33" style:family="graphic" style:parent-style-name="objectwithoutfill">
      <style:graphic-properties svg:stroke-width="0.051cm" svg:stroke-color="#000000" draw:marker-start-width="0.279cm" draw:marker-end="Arrow" draw:marker-end-width="0.229cm" draw:fill="none" draw:textarea-vertical-align="middle" fo:padding-top="0.15cm" fo:padding-bottom="0.15cm" fo:padding-left="0.275cm" fo:padding-right="0.275cm" loext:decorative="false"/>
    </style:style>
    <style:style style:name="gr34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1.551cm" fo:min-width="5.626cm" loext:decorative="false"/>
      <style:paragraph-properties style:writing-mode="lr-tb"/>
    </style:style>
    <style:style style:name="gr35" style:family="graphic" style:parent-style-name="objectwithoutfill">
      <style:graphic-properties draw:stroke="dash" draw:stroke-dash="Long_20_Dot_20__28_Rounded_29_" svg:stroke-width="0.051cm" draw:marker-start-width="0.279cm" draw:marker-end="Arrow" draw:marker-end-width="0.229cm" svg:stroke-linecap="round" draw:fill="none" draw:textarea-vertical-align="middle" fo:padding-top="0.15cm" fo:padding-bottom="0.15cm" fo:padding-left="0.275cm" fo:padding-right="0.275cm" loext:decorative="false"/>
    </style:style>
    <style:style style:name="gr36" style:family="graphic" style:parent-style-name="standard">
      <style:graphic-properties draw:textarea-horizontal-align="justify" draw:textarea-vertical-align="middle" draw:auto-grow-height="false" fo:min-height="1.655cm" fo:min-width="2.04cm" style:writing-mode="lr-tb" loext:decorative="false"/>
      <style:paragraph-properties style:writing-mode="lr-tb"/>
    </style:style>
    <style:style style:name="gr37" style:family="graphic" style:parent-style-name="standard">
      <style:graphic-properties svg:stroke-width="0.051cm" svg:stroke-color="#000000" draw:marker-start="" draw:marker-start-width="0.279cm" draw:marker-end="Arrow" draw:marker-end-width="0.279cm" draw:textarea-horizontal-align="center" draw:textarea-vertical-align="bottom" fo:padding-top="0.15cm" fo:padding-bottom="0.15cm" fo:padding-left="0.275cm" fo:padding-right="0.275cm" loext:decorative="false"/>
      <style:paragraph-properties style:writing-mode="lr-tb"/>
    </style:style>
    <style:style style:name="gr38" style:family="graphic" style:parent-style-name="standard">
      <style:graphic-properties svg:stroke-width="0.051cm" svg:stroke-color="#000000" draw:marker-start="" draw:marker-start-width="0.279cm" draw:marker-end="Arrow" draw:marker-end-width="0.279cm" draw:textarea-horizontal-align="left" draw:textarea-vertical-align="bottom" fo:padding-top="0.15cm" fo:padding-bottom="0.15cm" fo:padding-left="0.275cm" fo:padding-right="0.275cm" loext:decorative="false"/>
      <style:paragraph-properties style:writing-mode="lr-tb"/>
    </style:style>
    <style:style style:name="gr39" style:family="graphic" style:parent-style-name="standard">
      <style:graphic-properties draw:stroke="solid" svg:stroke-width="0.159cm" svg:stroke-color="#5983b0" svg:stroke-opacity="100%" draw:stroke-linejoin="miter" svg:stroke-linecap="butt" draw:fill="solid" draw:fill-color="#bdd7e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0" style:family="graphic" style:parent-style-name="standard">
      <style:graphic-properties draw:stroke="solid" svg:stroke-width="0.079cm" svg:stroke-color="#5983b0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1" style:family="graphic" style:parent-style-name="standard">
      <style:graphic-properties draw:stroke="solid" svg:stroke-width="0.035cm" svg:stroke-color="#000000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2" style:family="graphic" style:parent-style-name="standard">
      <style:graphic-properties draw:stroke="solid" svg:stroke-width="0.035cm" svg:stroke-color="#000000" draw:marker-start="a366" draw:marker-end="a367" svg:stroke-opacity="100%" draw:stroke-linejoin="miter" svg:stroke-linecap="butt" draw:fill="none" fo:padding-top="0.142cm" fo:padding-bottom="0.142cm" fo:padding-left="0.267cm" fo:padding-right="0.267cm" loext:decorative="false"/>
    </style:style>
    <style:style style:name="gr43" style:family="graphic" style:parent-style-name="standard">
      <style:graphic-properties draw:stroke="solid" svg:stroke-width="0.035cm" svg:stroke-color="#000000" draw:marker-start="a369" draw:marker-end="a370" svg:stroke-opacity="100%" draw:stroke-linejoin="miter" svg:stroke-linecap="butt" draw:fill="none" fo:padding-top="0.142cm" fo:padding-bottom="0.142cm" fo:padding-left="0.267cm" fo:padding-right="0.267cm" loext:decorative="false"/>
    </style:style>
    <style:style style:name="gr44" style:family="graphic" style:parent-style-name="standard">
      <style:graphic-properties draw:stroke="solid" svg:stroke-width="0.035cm" svg:stroke-color="#000000" draw:marker-start="a372" draw:marker-end="a373" svg:stroke-opacity="100%" draw:stroke-linejoin="miter" svg:stroke-linecap="butt" draw:fill="none" fo:padding-top="0.142cm" fo:padding-bottom="0.142cm" fo:padding-left="0.267cm" fo:padding-right="0.267cm" loext:decorative="false"/>
    </style:style>
    <style:style style:name="gr45" style:family="graphic" style:parent-style-name="standard">
      <style:graphic-properties draw:stroke="solid" svg:stroke-width="0.035cm" svg:stroke-color="#000000" draw:marker-start="a384" draw:marker-end="a385" svg:stroke-opacity="100%" draw:stroke-linejoin="miter" svg:stroke-linecap="butt" draw:fill="none" fo:padding-top="0.142cm" fo:padding-bottom="0.142cm" fo:padding-left="0.267cm" fo:padding-right="0.267cm" loext:decorative="false"/>
    </style:style>
    <style:style style:name="gr46" style:family="graphic" style:parent-style-name="standard">
      <style:graphic-properties draw:stroke="solid" svg:stroke-width="0.079cm" svg:stroke-color="#5983b0" svg:stroke-opacity="100%" draw:stroke-linejoin="miter" svg:stroke-linecap="butt" draw:fill="solid" draw:fill-color="#ffffff" draw:opacity="100%" draw:textarea-horizontal-align="center" draw:textarea-vertical-align="top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7" style:family="graphic" style:parent-style-name="standard">
      <style:graphic-properties draw:stroke="solid" svg:stroke-width="0.035cm" svg:stroke-color="#000000" draw:marker-start="a413" draw:marker-end="a414" svg:stroke-opacity="100%" draw:stroke-linejoin="miter" svg:stroke-linecap="butt" draw:fill="none" fo:padding-top="0.142cm" fo:padding-bottom="0.142cm" fo:padding-left="0.267cm" fo:padding-right="0.267cm" loext:decorative="false"/>
    </style:style>
    <style:style style:name="gr48" style:family="graphic" style:parent-style-name="standard">
      <style:graphic-properties draw:stroke="solid" svg:stroke-width="0.035cm" svg:stroke-color="#000000" draw:marker-start="a416" draw:marker-end="a417" svg:stroke-opacity="100%" draw:stroke-linejoin="miter" svg:stroke-linecap="butt" draw:fill="none" fo:padding-top="0.142cm" fo:padding-bottom="0.142cm" fo:padding-left="0.267cm" fo:padding-right="0.267cm" loext:decorative="false"/>
    </style:style>
    <style:style style:name="gr49" style:family="graphic" style:parent-style-name="standard">
      <style:graphic-properties draw:stroke="solid" svg:stroke-width="0.035cm" svg:stroke-color="#000000" draw:marker-start="a419" draw:marker-end="a420" svg:stroke-opacity="100%" draw:stroke-linejoin="miter" svg:stroke-linecap="butt" draw:fill="none" fo:padding-top="0.142cm" fo:padding-bottom="0.142cm" fo:padding-left="0.267cm" fo:padding-right="0.267cm" loext:decorative="false"/>
    </style:style>
    <style:style style:name="gr50" style:family="graphic" style:parent-style-name="standard">
      <style:graphic-properties draw:stroke="solid" svg:stroke-width="0.035cm" svg:stroke-color="#000000" draw:marker-start="a422" draw:marker-end="a423" svg:stroke-opacity="100%" draw:stroke-linejoin="miter" svg:stroke-linecap="butt" draw:fill="none" fo:padding-top="0.142cm" fo:padding-bottom="0.142cm" fo:padding-left="0.267cm" fo:padding-right="0.267cm" loext:decorative="false"/>
    </style:style>
    <style:style style:name="gr51" style:family="graphic" style:parent-style-name="standard">
      <style:graphic-properties draw:stroke="solid" svg:stroke-width="0.035cm" svg:stroke-color="#000000" draw:marker-start="a425" draw:marker-end="a426" svg:stroke-opacity="100%" draw:stroke-linejoin="miter" svg:stroke-linecap="butt" draw:fill="none" fo:padding-top="0.142cm" fo:padding-bottom="0.142cm" fo:padding-left="0.267cm" fo:padding-right="0.267cm" loext:decorative="false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0.78cm" fo:padding-top="0.127cm" fo:padding-bottom="0.127cm" fo:padding-left="0.254cm" fo:padding-right="0.254cm" fo:wrap-option="no-wrap" loext:decorative="false"/>
      <style:paragraph-properties style:writing-mode="lr-tb"/>
    </style:style>
    <style:style style:name="gr53" style:family="graphic" style:parent-style-name="standard">
      <style:graphic-properties draw:stroke="solid" svg:stroke-width="0.035cm" svg:stroke-color="#000000" draw:marker-start="a434" draw:marker-end="a435" svg:stroke-opacity="100%" draw:stroke-linejoin="miter" svg:stroke-linecap="butt" draw:fill="none" fo:padding-top="0.142cm" fo:padding-bottom="0.142cm" fo:padding-left="0.267cm" fo:padding-right="0.267cm" loext:decorative="false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0.753cm" fo:padding-top="0.127cm" fo:padding-bottom="0.127cm" fo:padding-left="0.254cm" fo:padding-right="0.254cm" fo:wrap-option="no-wrap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1.158cm" fo:padding-top="0.127cm" fo:padding-bottom="0.127cm" fo:padding-left="0.254cm" fo:padding-right="0.254cm" fo:wrap-option="no-wrap" loext:decorative="false"/>
      <style:paragraph-properties style:writing-mode="lr-tb"/>
    </style:style>
    <style:style style:name="gr56" style:family="graphic" style:parent-style-name="standard">
      <style:graphic-properties draw:stroke="none" draw:fill="solid" draw:fill-color="#d0cec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7" style:family="graphic" style:parent-style-name="standard">
      <style:graphic-properties draw:stroke="solid" svg:stroke-width="0.035cm" svg:stroke-color="#000000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8" style:family="graphic" style:parent-style-name="standard">
      <style:graphic-properties svg:stroke-width="0.051cm" svg:stroke-color="#6a99d0" draw:marker-start-width="0.279cm" draw:marker-end-width="0.279cm" draw:fill="solid" draw:fill-color="#bdd7ee" draw:textarea-horizontal-align="center" draw:textarea-vertical-align="top" draw:auto-grow-height="false" fo:min-height="5.415cm" fo:min-width="22.31cm" fo:padding-top="0.15cm" fo:padding-bottom="0.15cm" fo:padding-left="0.275cm" fo:padding-right="0.275cm" draw:shadow="visible" draw:shadow-offset-x="0.051cm" draw:shadow-offset-y="-0.051cm" draw:shadow-color="#6a99d0" style:writing-mode="lr-tb" loext:decorative="false"/>
      <style:paragraph-properties style:writing-mode="lr-tb"/>
    </style:style>
    <style:style style:name="gr59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2.875cm" fo:min-width="1.99cm" fo:padding-top="0.15cm" fo:padding-bottom="0.15cm" fo:padding-left="0.275cm" fo:padding-right="0.275cm" style:writing-mode="lr-tb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1.655cm" fo:min-width="0cm" loext:decorative="false"/>
      <style:paragraph-properties style:writing-mode="lr-tb"/>
    </style:style>
    <style:style style:name="gr61" style:family="graphic" style:parent-style-name="objectwithoutfill">
      <style:graphic-properties svg:stroke-width="0.102cm" svg:stroke-color="#000000" draw:marker-start-width="0.356cm" draw:marker-end="Arrow" draw:marker-end-width="0.305cm" draw:fill="none" draw:textarea-vertical-align="middle" fo:padding-top="0.176cm" fo:padding-bottom="0.176cm" fo:padding-left="0.301cm" fo:padding-right="0.301cm" loext:decorative="false"/>
    </style:style>
    <style:style style:name="gr62" style:family="graphic" style:parent-style-name="objectwithoutfill">
      <style:graphic-properties draw:stroke="dash" draw:stroke-dash="Dot_20__28_Rounded_29_" svg:stroke-width="0.102cm" svg:stroke-color="#000000" draw:marker-start-width="0.356cm" draw:marker-end="" draw:marker-end-width="0.305cm" svg:stroke-linecap="round" draw:fill="none" draw:textarea-vertical-align="middle" fo:padding-top="0.176cm" fo:padding-bottom="0.176cm" fo:padding-left="0.301cm" fo:padding-right="0.301cm" loext:decorative="false"/>
    </style:style>
    <style:style style:name="gr63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1.551cm" fo:min-width="1.683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1cm" fo:min-width="1.683cm" loext:decorative="false"/>
      <style:paragraph-properties style:writing-mode="lr-tb"/>
    </style:style>
    <style:style style:name="gr65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1.45cm" fo:min-width="28.025cm" fo:padding-top="0.15cm" fo:padding-bottom="0.15cm" fo:padding-left="0.275cm" fo:padding-right="0.275cm" draw:shadow="visible" draw:shadow-offset-x="0.051cm" draw:shadow-offset-y="-0.051cm" draw:shadow-color="#6a99d0" loext:decorative="false"/>
    </style:style>
    <style:style style:name="gr66" style:family="graphic" style:parent-style-name="standard">
      <style:graphic-properties svg:stroke-width="0.051cm" svg:stroke-color="#6a99d0" draw:marker-start-width="0.279cm" draw:marker-end-width="0.279cm" draw:fill="solid" draw:fill-color="#bdd7ee" draw:textarea-horizontal-align="justify" draw:textarea-vertical-align="middle" draw:auto-grow-height="false" fo:min-height="1.45cm" fo:min-width="5.27cm" fo:padding-top="0.15cm" fo:padding-bottom="0.15cm" fo:padding-left="0.275cm" fo:padding-right="0.275cm" draw:shadow="hidden" draw:shadow-offset-x="0.051cm" draw:shadow-offset-y="-0.051cm" draw:shadow-color="#6a99d0" style:writing-mode="lr-tb" loext:decorative="false"/>
      <style:paragraph-properties style:writing-mode="lr-tb"/>
    </style:style>
    <style:style style:name="gr67" style:family="graphic" style:parent-style-name="objectwithoutfill">
      <style:graphic-properties svg:stroke-width="0.152cm" svg:stroke-color="#ffffff" draw:marker-start-width="0.432cm" draw:marker-end-width="0.432cm" svg:stroke-linecap="round" draw:fill="none" draw:fill-color="#ffffff" draw:textarea-vertical-align="middle" fo:padding-top="0.201cm" fo:padding-bottom="0.201cm" fo:padding-left="0.326cm" fo:padding-right="0.326cm" draw:shadow="hidden" draw:shadow-offset-x="0.051cm" draw:shadow-offset-y="-0.051cm" draw:shadow-color="#6a99d0" loext:shadow-blur="0cm" loext:decorative="false"/>
    </style:style>
    <style:style style:name="gr68" style:family="graphic" style:parent-style-name="standard">
      <style:graphic-properties draw:fill="solid" draw:fill-color="#ffffff" draw:textarea-horizontal-align="justify" draw:textarea-vertical-align="middle" draw:auto-grow-height="false" fo:min-height="1.5cm" fo:min-width="1.405cm" style:writing-mode="lr-tb" loext:decorative="false"/>
      <style:paragraph-properties style:writing-mode="lr-tb"/>
    </style:style>
    <style:style style:name="gr69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70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5.124cm" fo:min-width="0cm" fo:padding-top="0.15cm" fo:padding-bottom="0.15cm" fo:padding-left="0.275cm" fo:padding-right="0.275cm" fo:wrap-option="wrap" loext:decorative="false"/>
    </style:style>
    <style:style style:name="gr71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10.459cm" fo:min-width="0cm" fo:padding-top="0.15cm" fo:padding-bottom="0.15cm" fo:padding-left="0.275cm" fo:padding-right="0.275cm" fo:wrap-option="wrap" loext:decorative="false"/>
    </style:style>
    <style:style style:name="gr72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5.105cm" fo:min-width="0cm" fo:padding-top="0.15cm" fo:padding-bottom="0.15cm" fo:padding-left="0.275cm" fo:padding-right="0.275cm" fo:wrap-option="wrap" loext:decorative="false"/>
    </style:style>
    <style:style style:name="gr7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551cm" fo:min-width="1.889cm" loext:decorative="false"/>
      <style:paragraph-properties style:writing-mode="lr-tb"/>
    </style:style>
    <style:style style:name="gr74" style:family="graphic" style:parent-style-name="objectwithoutfill">
      <style:graphic-properties svg:stroke-width="0.102cm" svg:stroke-color="#000000" draw:marker-start-width="0.356cm" draw:marker-end-width="0.356cm" draw:fill="none" draw:textarea-vertical-align="middle" fo:padding-top="0.175cm" fo:padding-bottom="0.175cm" fo:padding-left="0.3cm" fo:padding-right="0.3cm" loext:decorative="false"/>
    </style:style>
    <style:style style:name="gr75" style:family="graphic" style:parent-style-name="standard">
      <style:graphic-properties draw:fill="solid" draw:fill-color="#bdd7ee" draw:textarea-horizontal-align="justify" draw:textarea-vertical-align="middle" draw:auto-grow-height="false" fo:min-height="1.546cm" fo:min-width="1.296cm" draw:shadow="visible" draw:shadow-offset-x="0.203cm" draw:shadow-offset-y="0.203cm" draw:shadow-color="#5983b0" loext:decorative="false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77" style:family="graphic" style:parent-style-name="standard">
      <style:graphic-properties svg:stroke-width="0.051cm" draw:marker-start="Arrow" draw:marker-start-width="0.229cm" draw:marker-end="Arrow" draw:marker-end-width="0.229cm" draw:textarea-vertical-align="middle" fo:padding-top="0.15cm" fo:padding-bottom="0.15cm" fo:padding-left="0.275cm" fo:padding-right="0.275cm" loext:decorative="false"/>
    </style:style>
    <style:style style:name="gr78" style:family="graphic" style:parent-style-name="standard">
      <style:graphic-properties draw:stroke="dash" draw:stroke-dash="Long_20_Dot" svg:stroke-width="0.051cm" draw:marker-start-width="0.279cm" draw:marker-end-width="0.279cm" draw:textarea-vertical-align="middle" fo:padding-top="0.15cm" fo:padding-bottom="0.15cm" fo:padding-left="0.275cm" fo:padding-right="0.275cm" loext:decorative="false"/>
    </style:style>
    <style:style style:name="pr1" style:family="presentation" style:parent-style-name="Master1-Layout2-obj-Title-and-Content-notes">
      <style:graphic-properties draw:fill-color="#ffffff" draw:auto-grow-height="false" fo:min-height="12.573cm" loext:decorative="false"/>
      <style:paragraph-properties style:writing-mode="lr-tb"/>
    </style:style>
    <style:style style:name="pr2" style:family="presentation" style:parent-style-name="Master1-Layout1-title-Title-Slide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ffffff"/>
      <style:paragraph-properties fo:text-align="center" style:writing-mode="lr-tb"/>
      <style:text-properties style:font-name="Calibri1" fo:font-size="20pt" style:font-size-asian="20pt" style:font-size-complex="20pt"/>
    </style:style>
    <style:style style:name="P3" style:family="paragraph">
      <style:paragraph-properties fo:text-align="center"/>
      <style:text-properties style:font-name="Calibri1" fo:font-size="20pt" style:font-size-asian="20pt" style:font-size-complex="20pt"/>
    </style:style>
    <style:style style:name="P4" style:family="paragraph">
      <style:paragraph-properties fo:text-align="start"/>
      <style:text-properties style:font-name="Calibri1" fo:font-size="20pt" style:font-size-asian="20pt" style:font-size-complex="20pt"/>
    </style:style>
    <style:style style:name="P5" style:family="paragraph">
      <loext:graphic-properties draw:fill="solid" draw:fill-color="#ffffff"/>
      <style:paragraph-properties fo:text-align="start" style:writing-mode="lr-tb"/>
      <style:text-properties style:font-name="Calibri1" fo:font-size="20pt" style:font-size-asian="20pt" style:font-size-complex="20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000000"/>
      <style:paragraph-properties fo:text-align="center"/>
      <style:text-properties fo:color="#000000" loext:opacity="100%" style:font-name="Calibri1" fo:font-size="18pt"/>
    </style:style>
    <style:style style:name="P11" style:family="paragraph">
      <style:paragraph-properties fo:line-height="90%" fo:text-align="center"/>
    </style:style>
    <style:style style:name="P12" style:family="paragraph">
      <loext:graphic-properties draw:fill-color="#ffffff"/>
    </style:style>
    <style:style style:name="P13" style:family="paragraph">
      <loext:graphic-properties draw:fill="none" draw:fill-color="#ffffff"/>
      <style:text-properties style:font-name="Calibri1"/>
    </style:style>
    <style:style style:name="P14" style:family="paragraph">
      <loext:graphic-properties draw:fill="none" draw:fill-color="#ffffff"/>
      <style:text-properties style:font-name="Calibri1" fo:font-size="24pt" style:font-size-asian="24pt" style:font-size-complex="24pt"/>
    </style:style>
    <style:style style:name="P15" style:family="paragraph">
      <style:paragraph-properties fo:text-align="end"/>
    </style:style>
    <style:style style:name="P16" style:family="paragraph">
      <loext:graphic-properties draw:fill="none" draw:fill-color="#ffffff"/>
      <style:paragraph-properties fo:text-align="end"/>
      <style:text-properties style:font-name="Calibri1" fo:font-size="18pt"/>
    </style:style>
    <style:style style:name="P17" style:family="paragraph">
      <style:paragraph-properties fo:text-align="center"/>
      <style:text-properties fo:color="#ffffff" loext:opacity="100%" style:font-name="Calibri1" fo:font-weight="bold" style:font-weight-asian="bold" style:font-weight-complex="bold"/>
    </style:style>
    <style:style style:name="P18" style:family="paragraph">
      <style:paragraph-properties fo:text-align="center" style:writing-mode="lr-tb"/>
      <style:text-properties fo:color="#ffffff" loext:opacity="100%" style:font-name="Calibri1" fo:font-weight="bold" style:font-weight-asian="bold" style:font-weight-complex="bold"/>
    </style:style>
    <style:style style:name="P19" style:family="paragraph">
      <style:paragraph-properties fo:line-height="80%" fo:text-align="center"/>
    </style:style>
    <style:style style:name="P20" style:family="paragraph">
      <style:paragraph-properties fo:line-height="80%" fo:text-align="start"/>
    </style:style>
    <style:style style:name="P21" style:family="paragraph">
      <style:paragraph-properties fo:line-height="80%" fo:text-align="center"/>
      <style:text-properties style:font-name="Calibri1"/>
    </style:style>
    <style:style style:name="P22" style:family="paragraph">
      <style:paragraph-properties fo:line-height="80%" fo:text-align="start"/>
      <style:text-properties style:font-name="Calibri1"/>
    </style:style>
    <style:style style:name="P23" style:family="paragraph">
      <loext:graphic-properties draw:fill="solid" draw:fill-color="#bdd7ee" draw:opacity="100%"/>
      <style:paragraph-properties style:writing-mode="lr-tb" style:font-independent-line-spacing="true"/>
    </style:style>
    <style:style style:name="P24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P25" style:family="paragraph">
      <loext:graphic-properties draw:fill="solid" draw:fill-color="#ffffff" draw:opacity="100%"/>
      <style:paragraph-properties fo:margin-left="0cm" fo:margin-right="0cm" fo:margin-top="0cm" fo:margin-bottom="0cm" fo:line-height="90%" fo:text-align="center" fo:text-indent="0cm" style:punctuation-wrap="hanging" loext:tab-stop-distance="0cm" style:writing-mode="lr-tb" style:font-independent-line-spacing="true">
        <style:tab-stops/>
      </style:paragraph-properties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</style:style>
    <style:style style:name="P27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28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/>
      </style:paragraph-properties>
    </style:style>
    <style:style style:name="P29" style:family="paragraph">
      <loext:graphic-properties draw:fill="none"/>
    </style:style>
    <style:style style:name="P30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31" style:family="paragraph">
      <loext:graphic-properties draw:fill="none"/>
      <style:paragraph-properties style:font-independent-line-spacing="true"/>
    </style:style>
    <style:style style:name="P32" style:family="paragraph">
      <loext:graphic-properties draw:fill="solid" draw:fill-color="#d0cece" draw:opacity="100%"/>
      <style:paragraph-properties style:writing-mode="lr-tb" style:font-independent-line-spacing="true"/>
    </style:style>
    <style:style style:name="P33" style:family="paragraph">
      <loext:graphic-properties draw:fill="none"/>
      <style:paragraph-properties style:writing-mode="lr-tb" style:font-independent-line-spacing="true"/>
    </style:style>
    <style:style style:name="P34" style:family="paragraph">
      <style:paragraph-properties fo:text-align="center"/>
      <style:text-properties style:font-name="Calibri1" fo:font-size="18pt" style:font-size-asian="18pt" style:font-size-complex="18pt"/>
    </style:style>
    <style:style style:name="P35" style:family="paragraph">
      <loext:graphic-properties draw:fill="solid" draw:fill-color="#bdd7ee"/>
      <style:paragraph-properties fo:text-align="center" style:writing-mode="lr-tb"/>
      <style:text-properties style:font-name="Calibri1" fo:font-size="18pt" style:font-size-asian="18pt" style:font-size-complex="18pt"/>
    </style:style>
    <style:style style:name="P36" style:family="paragraph">
      <style:paragraph-properties fo:text-align="center"/>
      <style:text-properties style:font-name="Calibri1" fo:font-size="16pt" style:font-size-asian="16pt" style:font-size-complex="16pt"/>
    </style:style>
    <style:style style:name="P37" style:family="paragraph">
      <loext:graphic-properties draw:fill="solid" draw:fill-color="#ffffff"/>
      <style:paragraph-properties fo:text-align="center" style:writing-mode="lr-tb"/>
      <style:text-properties style:font-name="Calibri1" fo:font-size="16pt" style:font-size-asian="16pt" style:font-size-complex="16pt"/>
    </style:style>
    <style:style style:name="P38" style:family="paragraph">
      <loext:graphic-properties draw:fill="none" draw:fill-color="#ffffff"/>
      <style:paragraph-properties fo:text-align="end"/>
      <style:text-properties style:font-name="Calibri1" fo:font-size="14pt" style:font-size-asian="14pt" style:font-size-complex="14pt"/>
    </style:style>
    <style:style style:name="P39" style:family="paragraph">
      <loext:graphic-properties draw:fill="none" draw:fill-color="#ffffff"/>
      <style:paragraph-properties fo:text-align="end"/>
      <style:text-properties style:font-name="Calibri1"/>
    </style:style>
    <style:style style:name="P40" style:family="paragraph">
      <style:paragraph-properties fo:text-align="start"/>
    </style:style>
    <style:style style:name="P41" style:family="paragraph">
      <loext:graphic-properties draw:fill="solid" draw:fill-color="#bdd7ee"/>
      <style:paragraph-properties fo:text-align="center" style:writing-mode="lr-tb"/>
      <style:text-properties style:font-name="Calibri1" fo:font-size="16pt" style:font-size-asian="16pt" style:font-size-complex="16pt"/>
    </style:style>
    <style:style style:name="P42" style:family="paragraph">
      <loext:graphic-properties draw:fill="none" draw:fill-color="#ffffff"/>
      <style:paragraph-properties fo:text-align="center"/>
      <style:text-properties style:font-name="Calibri1" fo:font-size="14pt" style:font-size-asian="14pt" style:font-size-complex="14pt"/>
    </style:style>
    <style:style style:name="P43" style:family="paragraph">
      <loext:graphic-properties draw:fill="none" draw:fill-color="#ffffff"/>
      <style:paragraph-properties fo:text-align="center"/>
      <style:text-properties style:font-name="Calibri1"/>
    </style:style>
    <style:style style:name="P44" style:family="paragraph">
      <loext:graphic-properties draw:fill="solid" draw:fill-color="#bdd7ee"/>
      <style:paragraph-properties fo:text-align="center"/>
    </style:style>
    <style:style style:name="P45" style:family="paragraph">
      <loext:graphic-properties draw:fill="none" draw:fill-color="#ffffff"/>
      <style:text-properties style:font-name="Calibri1" fo:font-size="16pt" style:font-size-asian="16pt" style:font-size-complex="16pt"/>
    </style:style>
    <style:style style:name="P46" style:family="paragraph">
      <style:text-properties fo:font-size="18pt" style:font-size-asian="18pt" style:font-size-complex="18pt"/>
    </style:style>
    <style:style style:name="P47" style:family="paragraph">
      <loext:graphic-properties draw:fill="none" draw:fill-color="#ffffff"/>
      <style:text-properties style:font-name="Calibri1" fo:font-size="18pt" style:font-size-asian="18pt" style:font-size-complex="18pt"/>
    </style:style>
    <style:style style:name="P48" style:family="paragraph">
      <style:text-properties style:font-name="Calibri1"/>
    </style:style>
    <style:style style:name="T1" style:family="text">
      <style:text-properties style:font-name="Calibri1" fo:font-size="20pt" style:font-size-asian="20pt" style:font-size-complex="20pt"/>
    </style:style>
    <style:style style:name="T2" style:family="text">
      <style:text-properties fo:font-size="18pt"/>
    </style:style>
    <style:style style:name="T3" style:family="text">
      <style:text-properties style:text-position="super 58%" style:font-name="Calibri1" fo:font-size="18pt"/>
    </style:style>
    <style:style style:name="T4" style:family="text">
      <style:text-properties style:text-position="0% 100%" style:font-name="Calibri1" fo:font-size="18pt"/>
    </style:style>
    <style:style style:name="T5" style:family="text">
      <style:text-properties style:text-position="super 58%" fo:font-size="18pt"/>
    </style:style>
    <style:style style:name="T6" style:family="text">
      <style:text-properties style:text-position="super 58%"/>
    </style:style>
    <style:style style:name="T7" style:family="text">
      <style:text-properties fo:color="#000000" loext:opacity="100%" style:font-name="Calibri1" fo:font-size="18pt"/>
    </style:style>
    <style:style style:name="T8" style:family="text">
      <style:text-properties fo:color="#000000" loext:opacity="100%" style:font-name="Calibri1" fo:font-size="6pt" style:font-size-asian="6pt" style:font-size-complex="6pt"/>
    </style:style>
    <style:style style:name="T9" style:family="text">
      <style:text-properties style:font-name="Calibri1"/>
    </style:style>
    <style:style style:name="T10" style:family="text">
      <style:text-properties style:font-name="Calibri1" fo:font-size="24pt" style:font-size-asian="24pt" style:font-size-complex="24pt"/>
    </style:style>
    <style:style style:name="T11" style:family="text">
      <style:text-properties style:font-name="Calibri1" fo:font-size="18pt"/>
    </style:style>
    <style:style style:name="T12" style:family="text">
      <style:text-properties fo:color="#ffffff" loext:opacity="100%" style:font-name="Calibri1" fo:font-weight="bold" style:font-weight-asian="bold" style:font-weight-complex="bold"/>
    </style:style>
    <style:style style:name="T13" style:family="text">
      <style:text-properties style:font-name="Calibri1" fo:font-size="16pt" fo:font-style="italic" style:font-size-asian="16pt" style:font-style-asian="italic" style:font-size-complex="16pt" style:font-style-complex="italic"/>
    </style:style>
    <style:style style:name="T14" style:family="text">
      <style:text-properties style:font-name="Calibri1" fo:font-size="6pt" style:font-size-asian="6pt" style:font-size-complex="6pt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style:font-name="Calibri1" fo:font-size="18pt" style:font-size-asian="18pt" style:font-size-complex="18pt"/>
    </style:style>
    <style:style style:name="T18" style:family="text">
      <style:text-properties style:font-name="Calibri1" fo:font-size="16pt" style:font-size-asian="16pt" style:font-size-complex="16pt"/>
    </style:style>
    <style:style style:name="T19" style:family="text">
      <style:text-properties style:font-name="Calibri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2-obj-Title-and-Content" presentation:presentation-page-layout-name="AL1T18">
        <draw:custom-shape draw:style-name="gr1" draw:text-style-name="P1" draw:layer="layout" svg:width="32.38cm" svg:height="2.33cm" svg:x="1.24cm" svg:y="2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2.276cm" svg:x="1.24cm" svg:y="2.8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2.276cm" svg:x="6.34cm" svg:y="2.804cm">
          <text:p text:style-name="P3"><text:span text:style-name="T1">Radi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2.276cm" svg:x="11.34cm" svg:y="2.804cm">
          <text:p text:style-name="P3"><text:span text:style-name="T1">Microwav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445cm" svg:height="2.276cm" svg:x="15.84cm" svg:y="2.804cm">
          <text:p text:style-name="P3"><text:span text:style-name="T1">Infrared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5cm" svg:height="2.276cm" svg:x="11.34cm" svg:y="2.804cm">
          <text:p text:style-name="P3"><text:span text:style-name="T1">Microwav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95cm" svg:height="2.276cm" svg:x="20.24cm" svg:y="2.804cm">
          <text:p text:style-name="P3"><text:span text:style-name="T1">UV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4cm" svg:height="2.276cm" svg:x="22.14cm" svg:y="2.804cm">
          <text:p text:style-name="P3"><text:span text:style-name="T1">X-Ray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18cm" svg:height="2.276cm" svg:x="28.54cm" svg:y="2.804cm">
          <text:p text:style-name="P4"><text:span text:style-name="T1">Gamma Ray</text:span>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2.124cm" svg:height="1.026cm" svg:x="1.235cm" svg:y="1.515cm">
          <draw:text-box>
            <text:p><text:span text:style-name="T2">10</text:span><text:span text:style-name="T3">0 </text:span><text:span text:style-name="T4">Hz</text:span></text:p>
          </draw:text-box>
        </draw:frame>
        <draw:frame draw:style-name="gr9" draw:text-style-name="P6" draw:layer="layout" svg:width="1.496cm" svg:height="1.025cm" svg:x="5.835cm" svg:y="1.515cm">
          <draw:text-box>
            <text:p><text:span text:style-name="T2">10</text:span><text:span text:style-name="T5">4</text:span><text:span text:style-name="T3"> </text:span></text:p>
          </draw:text-box>
        </draw:frame>
        <draw:frame draw:style-name="gr9" draw:text-style-name="P6" draw:layer="layout" svg:width="1.496cm" svg:height="1.025cm" svg:x="11.035cm" svg:y="1.516cm">
          <draw:text-box>
            <text:p><text:span text:style-name="T2">10</text:span><text:span text:style-name="T5">8</text:span><text:span text:style-name="T3"> </text:span></text:p>
          </draw:text-box>
        </draw:frame>
        <draw:frame draw:style-name="gr10" draw:text-style-name="P6" draw:layer="layout" svg:width="1.701cm" svg:height="1.025cm" svg:x="16.035cm" svg:y="1.517cm">
          <draw:text-box>
            <text:p><text:span text:style-name="T2">10</text:span><text:span text:style-name="T5">12</text:span><text:span text:style-name="T3"> </text:span></text:p>
          </draw:text-box>
        </draw:frame>
        <draw:frame draw:style-name="gr10" draw:text-style-name="P6" draw:layer="layout" svg:width="1.701cm" svg:height="1.025cm" svg:x="20.936cm" svg:y="1.518cm">
          <draw:text-box>
            <text:p><text:span text:style-name="T2">10</text:span><text:span text:style-name="T5">16</text:span><text:span text:style-name="T3"> </text:span></text:p>
          </draw:text-box>
        </draw:frame>
        <draw:frame draw:style-name="gr10" draw:text-style-name="P6" draw:layer="layout" svg:width="1.701cm" svg:height="1.025cm" svg:x="25.937cm" svg:y="1.519cm">
          <draw:text-box>
            <text:p><text:span text:style-name="T2">10</text:span><text:span text:style-name="T5">20</text:span><text:span text:style-name="T3"> </text:span></text:p>
          </draw:text-box>
        </draw:frame>
        <draw:frame draw:style-name="gr10" draw:text-style-name="P6" draw:layer="layout" svg:width="1.701cm" svg:height="1.025cm" svg:x="31.038cm" svg:y="1.52cm">
          <draw:text-box>
            <text:p><text:span text:style-name="T2">10</text:span><text:span text:style-name="T5">24</text:span><text:span text:style-name="T3"> </text:span></text:p>
          </draw:text-box>
        </draw:frame>
        <draw:custom-shape draw:style-name="gr11" draw:text-style-name="P1" draw:layer="layout" svg:width="1.482cm" svg:height="3.175cm" svg:x="32.285cm" svg:y="2.34cm">
          <text:p/>
          <draw:enhanced-geometry svg:viewBox="0 0 21600 21600" draw:type="rectangle" draw:enhanced-path="M 0 0 L 21600 0 21600 21600 0 21600 0 0 Z N"/>
        </draw:custom-shape>
        <draw:g draw:style-name="gr12">
          <draw:line draw:style-name="gr13" draw:text-style-name="P7" draw:layer="layout" svg:x1="0.735cm" svg:y1="8.42cm" svg:x2="33.755cm" svg:y2="8.42cm">
            <text:p/>
          </draw:line>
          <draw:frame draw:style-name="gr14" draw:text-style-name="P8" draw:layer="layout" svg:width="1.618cm" svg:height="1.673cm" svg:x="16.597cm" svg:y="7.15cm">
            <draw:text-box>
              <text:p text:style-name="P7">10<text:span text:style-name="T6">10</text:span></text:p>
              <text:p text:style-name="P7">|</text:p>
            </draw:text-box>
          </draw:frame>
          <draw:frame draw:style-name="gr15" draw:text-style-name="P8" draw:layer="layout" svg:width="1.59cm" svg:height="1.673cm" svg:x="19.111cm" svg:y="7.151cm">
            <draw:text-box>
              <text:p text:style-name="P7">10<text:span text:style-name="T6">11</text:span></text:p>
              <text:p text:style-name="P7">|</text:p>
            </draw:text-box>
          </draw:frame>
          <draw:frame draw:style-name="gr14" draw:text-style-name="P8" draw:layer="layout" svg:width="1.618cm" svg:height="1.673cm" svg:x="21.597cm" svg:y="7.152cm">
            <draw:text-box>
              <text:p text:style-name="P7">10<text:span text:style-name="T6">12</text:span></text:p>
              <text:p text:style-name="P7">|</text:p>
            </draw:text-box>
          </draw:frame>
          <draw:frame draw:style-name="gr14" draw:text-style-name="P8" draw:layer="layout" svg:width="1.618cm" svg:height="1.673cm" svg:x="24.197cm" svg:y="7.153cm">
            <draw:text-box>
              <text:p text:style-name="P7">10<text:span text:style-name="T6">13</text:span></text:p>
              <text:p text:style-name="P7">|</text:p>
            </draw:text-box>
          </draw:frame>
          <draw:frame draw:style-name="gr14" draw:text-style-name="P8" draw:layer="layout" svg:width="1.618cm" svg:height="1.673cm" svg:x="26.697cm" svg:y="7.154cm">
            <draw:text-box>
              <text:p text:style-name="P7">10<text:span text:style-name="T6">14</text:span></text:p>
              <text:p text:style-name="P7">|</text:p>
            </draw:text-box>
          </draw:frame>
          <draw:frame draw:style-name="gr14" draw:text-style-name="P8" draw:layer="layout" svg:width="1.618cm" svg:height="1.673cm" svg:x="29.297cm" svg:y="7.155cm">
            <draw:text-box>
              <text:p text:style-name="P7">10<text:span text:style-name="T6">15</text:span></text:p>
              <text:p text:style-name="P7">|</text:p>
            </draw:text-box>
          </draw:frame>
          <draw:frame draw:style-name="gr14" draw:text-style-name="P8" draw:layer="layout" svg:width="1.618cm" svg:height="1.673cm" svg:x="26.697cm" svg:y="7.155cm">
            <draw:text-box>
              <text:p text:style-name="P7">10<text:span text:style-name="T6">14</text:span></text:p>
              <text:p text:style-name="P7">|</text:p>
            </draw:text-box>
          </draw:frame>
          <draw:frame draw:style-name="gr14" draw:text-style-name="P8" draw:layer="layout" svg:width="1.618cm" svg:height="1.673cm" svg:x="31.797cm" svg:y="7.156cm">
            <draw:text-box>
              <text:p text:style-name="P7">10<text:span text:style-name="T6">16</text:span></text:p>
              <text:p text:style-name="P7">|</text:p>
            </draw:text-box>
          </draw:frame>
          <draw:frame draw:style-name="gr16" draw:text-style-name="P8" draw:layer="layout" svg:width="1.413cm" svg:height="1.673cm" svg:x="14.099cm" svg:y="7.151cm">
            <draw:text-box>
              <text:p text:style-name="P7">10<text:span text:style-name="T6">9</text:span></text:p>
              <text:p text:style-name="P7">|</text:p>
            </draw:text-box>
          </draw:frame>
          <draw:frame draw:style-name="gr16" draw:text-style-name="P8" draw:layer="layout" svg:width="1.413cm" svg:height="1.673cm" svg:x="11.6cm" svg:y="7.152cm">
            <draw:text-box>
              <text:p text:style-name="P7">10<text:span text:style-name="T6">8</text:span></text:p>
              <text:p text:style-name="P7">|</text:p>
            </draw:text-box>
          </draw:frame>
          <draw:frame draw:style-name="gr16" draw:text-style-name="P8" draw:layer="layout" svg:width="1.413cm" svg:height="1.673cm" svg:x="9.101cm" svg:y="7.153cm">
            <draw:text-box>
              <text:p text:style-name="P7">10<text:span text:style-name="T6">7</text:span></text:p>
              <text:p text:style-name="P7">|</text:p>
            </draw:text-box>
          </draw:frame>
          <draw:frame draw:style-name="gr16" draw:text-style-name="P8" draw:layer="layout" svg:width="1.413cm" svg:height="1.673cm" svg:x="11.601cm" svg:y="7.153cm">
            <draw:text-box>
              <text:p text:style-name="P7">10<text:span text:style-name="T6">8</text:span></text:p>
              <text:p text:style-name="P7">|</text:p>
            </draw:text-box>
          </draw:frame>
          <draw:frame draw:style-name="gr16" draw:text-style-name="P8" draw:layer="layout" svg:width="1.413cm" svg:height="1.673cm" svg:x="6.502cm" svg:y="7.154cm">
            <draw:text-box>
              <text:p text:style-name="P7">10<text:span text:style-name="T6">6</text:span></text:p>
              <text:p text:style-name="P7">|</text:p>
            </draw:text-box>
          </draw:frame>
          <draw:frame draw:style-name="gr16" draw:text-style-name="P8" draw:layer="layout" svg:width="1.413cm" svg:height="1.673cm" svg:x="4.003cm" svg:y="7.155cm">
            <draw:text-box>
              <text:p text:style-name="P7">10<text:span text:style-name="T6">5</text:span></text:p>
              <text:p text:style-name="P7">|</text:p>
            </draw:text-box>
          </draw:frame>
          <draw:frame draw:style-name="gr16" draw:text-style-name="P8" draw:layer="layout" svg:width="1.413cm" svg:height="1.673cm" svg:x="1.404cm" svg:y="7.156cm">
            <draw:text-box>
              <text:p text:style-name="P7">10<text:span text:style-name="T6">4</text:span></text:p>
              <text:p text:style-name="P7">|</text:p>
            </draw:text-box>
          </draw:frame>
        </draw:g>
        <draw:line draw:style-name="gr17" draw:text-style-name="P9" draw:layer="layout" svg:x1="6.32cm" svg:y1="5.08cm" svg:x2="2.54cm" svg:y2="6.985cm">
          <text:p/>
        </draw:line>
        <draw:line draw:style-name="gr17" draw:text-style-name="P9" draw:layer="layout" svg:x1="22.14cm" svg:y1="5.08cm" svg:x2="32.385cm" svg:y2="6.985cm">
          <text:p/>
        </draw:line>
        <draw:line draw:style-name="gr18" draw:text-style-name="P10" draw:layer="layout" svg:x1="13.67cm" svg:y1="9.825cm" svg:x2="18.415cm" svg:y2="9.825cm">
          <text:p text:style-name="P7"><text:span text:style-name="T7">Satellite</text:span></text:p>
          <text:p text:style-name="P7"><text:span text:style-name="T7"/></text:p>
        </draw:line>
        <draw:line draw:style-name="gr18" draw:text-style-name="P10" draw:layer="layout" svg:x1="4.445cm" svg:y1="10.46cm" svg:x2="13.816cm" svg:y2="10.482cm">
          <text:p text:style-name="P7"><text:span text:style-name="T7">Coax</text:span></text:p>
          <text:p text:style-name="P7"><text:span text:style-name="T7"/></text:p>
        </draw:line>
        <draw:line draw:style-name="gr18" draw:text-style-name="P10" draw:layer="layout" svg:x1="27.405cm" svg:y1="9.582cm" svg:x2="30.116cm" svg:y2="9.582cm">
          <text:p text:style-name="P7"><text:span text:style-name="T7"/></text:p>
          <text:p text:style-name="P11"><text:span text:style-name="T7">Fiber</text:span></text:p>
          <text:p text:style-name="P11"><text:span text:style-name="T8"/></text:p>
          <text:p text:style-name="P11"><text:span text:style-name="T7">Optics</text:span></text:p>
          <text:p text:style-name="P7"><text:span text:style-name="T7"/></text:p>
        </draw:line>
        <draw:line draw:style-name="gr18" draw:text-style-name="P10" draw:layer="layout" svg:x1="15.171cm" svg:y1="10.982cm" svg:x2="19.916cm" svg:y2="10.982cm">
          <text:p text:style-name="P7"><text:span text:style-name="T7">Microwave</text:span></text:p>
          <text:p text:style-name="P7"><text:span text:style-name="T7"/></text:p>
        </draw:line>
        <draw:line draw:style-name="gr18" draw:text-style-name="P10" draw:layer="layout" svg:x1="12.294cm" svg:y1="12.565cm" svg:x2="15.875cm" svg:y2="12.565cm">
          <text:p text:style-name="P7"><text:span text:style-name="T7"/></text:p>
          <text:p text:style-name="P11"><text:span text:style-name="T7">Mobile</text:span></text:p>
          <text:p text:style-name="P11"><text:span text:style-name="T8"/></text:p>
          <text:p text:style-name="P11"><text:span text:style-name="T7">Cellular</text:span></text:p>
          <text:p text:style-name="P7"><text:span text:style-name="T7"/></text:p>
        </draw:line>
        <draw:line draw:style-name="gr18" draw:text-style-name="P10" draw:layer="layout" svg:x1="6.255cm" svg:y1="11.541cm" svg:x2="7.82cm" svg:y2="11.541cm">
          <text:p text:style-name="P7"><text:span text:style-name="T7">AM</text:span></text:p>
          <text:p text:style-name="P7"><text:span text:style-name="T7"/></text:p>
        </draw:line>
        <draw:line draw:style-name="gr18" draw:text-style-name="P10" draw:layer="layout" svg:x1="11.456cm" svg:y1="11.541cm" svg:x2="13.021cm" svg:y2="11.541cm">
          <text:p text:style-name="P7"><text:span text:style-name="T7">FM</text:span></text:p>
          <text:p text:style-name="P7"><text:span text:style-name="T7"/></text:p>
        </draw:line>
        <presentation:notes draw:style-name="dp2">
          <draw:page-thumbnail draw:style-name="gr19" draw:layer="layout" svg:width="0.001cm" svg:height="0.002cm" svg:x="0.004cm" svg:y="0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aster1-Layout2-obj-Title-and-Content" presentation:presentation-page-layout-name="AL1T18">
        <draw:g draw:style-name="gr12">
          <draw:frame draw:style-name="gr20" draw:text-style-name="P9" draw:layer="layout" svg:width="3.58cm" svg:height="2.32cm" svg:x="8.37cm" svg:y="11.94cm">
            <draw:image xlink:href="Pictures/10000001000004B0000004B0B10EE12D.png" xlink:type="simple" xlink:show="embed" xlink:actuate="onLoad" draw:mime-type="image/png">
              <text:p/>
            </draw:image>
          </draw:frame>
          <draw:frame draw:style-name="gr20" draw:text-style-name="P9" draw:layer="layout" svg:width="3.58cm" svg:height="2.32cm" svg:x="11.66cm" svg:y="11.94cm">
            <draw:image xlink:href="Pictures/10000001000004B0000004B0B10EE12D.png" xlink:type="simple" xlink:show="embed" xlink:actuate="onLoad" draw:mime-type="image/png">
              <text:p/>
            </draw:image>
          </draw:frame>
          <draw:frame draw:style-name="gr20" draw:text-style-name="P9" draw:layer="layout" svg:width="3.58cm" svg:height="2.32cm" svg:x="5.08cm" svg:y="11.94cm">
            <draw:image xlink:href="Pictures/10000001000004B0000004B0B10EE12D.png" xlink:type="simple" xlink:show="embed" xlink:actuate="onLoad" draw:mime-type="image/png">
              <text:p/>
            </draw:image>
          </draw:frame>
        </draw:g>
        <draw:frame draw:style-name="gr21" draw:text-style-name="P13" draw:layer="layout" svg:width="12.087cm" svg:height="1.801cm" svg:x="16.365cm" svg:y="12.2cm">
          <draw:text-box>
            <text:p><text:span text:style-name="T9">Analog signal transmitted over some physical</text:span></text:p>
            <text:p><text:span text:style-name="T9">medium. Modeled by a sine wave.</text:span></text:p>
          </draw:text-box>
        </draw:frame>
        <draw:g draw:style-name="gr22">
          <draw:custom-shape draw:style-name="gr23" draw:text-style-name="P1" draw:layer="layout" svg:width="2.54cm" svg:height="1.905cm" svg:x="5.14cm" svg:y="7.62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" draw:layer="layout" svg:width="2.54cm" svg:height="1.905cm" svg:x="7.64cm" svg:y="7.62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" draw:layer="layout" svg:width="2.54cm" svg:height="1.905cm" svg:x="10.14cm" svg:y="7.62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" draw:layer="layout" svg:width="2.54cm" svg:height="1.905cm" svg:x="12.64cm" svg:y="7.62cm">
            <text:p/>
            <draw:enhanced-geometry svg:viewBox="0 0 21600 21600" draw:type="rectangle" draw:enhanced-path="M 0 0 L 21600 0 21600 21600 0 21600 0 0 Z N"/>
          </draw:custom-shape>
          <draw:line draw:style-name="gr24" draw:text-style-name="P9" draw:layer="layout" svg:x1="5.14cm" svg:y1="9.525cm" svg:x2="7.64cm" svg:y2="9.525cm">
            <text:p/>
          </draw:line>
          <draw:line draw:style-name="gr25" draw:text-style-name="P1" draw:layer="layout" svg:x1="7.64cm" svg:y1="7.65cm" svg:x2="10.14cm" svg:y2="7.65cm">
            <text:p/>
          </draw:line>
          <draw:line draw:style-name="gr26" draw:text-style-name="P9" draw:layer="layout" svg:x1="12.64cm" svg:y1="7.65cm" svg:x2="15.14cm" svg:y2="7.65cm">
            <text:p/>
          </draw:line>
          <draw:line draw:style-name="gr25" draw:text-style-name="P1" draw:layer="layout" svg:x1="10.14cm" svg:y1="9.525cm" svg:x2="12.64cm" svg:y2="9.525cm">
            <text:p/>
          </draw:line>
        </draw:g>
        <draw:frame draw:style-name="gr27" draw:text-style-name="P13" draw:layer="layout" svg:width="11.396cm" svg:height="1.801cm" svg:x="16.365cm" svg:y="7.672cm">
          <draw:text-box>
            <text:p><text:span text:style-name="T9">Digital signal representing a discrete set of</text:span></text:p>
            <text:p><text:span text:style-name="T9">symbols. Modulated onto analog signal.</text:span></text:p>
          </draw:text-box>
        </draw:frame>
        <draw:frame draw:style-name="gr28" draw:text-style-name="P14" draw:layer="layout" svg:width="2.218cm" svg:height="1.284cm" svg:x="9.051cm" svg:y="3.798cm">
          <draw:text-box>
            <text:p><text:span text:style-name="T10">1010</text:span></text:p>
          </draw:text-box>
        </draw:frame>
        <draw:frame draw:style-name="gr29" draw:text-style-name="P13" draw:layer="layout" svg:width="10.9cm" svg:height="1.026cm" svg:x="16.366cm" svg:y="3.927cm">
          <draw:text-box>
            <text:p><text:span text:style-name="T9">Binary Data. Encoded in digital symbols. </text:span></text:p>
          </draw:text-box>
        </draw:frame>
        <draw:custom-shape draw:style-name="gr30" draw:text-style-name="P7" draw:layer="layout" svg:width="1.587cm" svg:height="0.635cm" draw:transform="rotate (1.58353723033446) translate (9.853cm 6.98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30" draw:text-style-name="P7" draw:layer="layout" svg:width="1.587cm" svg:height="0.635cm" draw:transform="rotate (1.58353723033446) translate (9.853cm 11.88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presentation:notes draw:style-name="dp2">
          <draw:page-thumbnail draw:style-name="gr19" draw:layer="layout" svg:width="0.001cm" svg:height="0.001cm" svg:x="0cm" svg:y="2.123cm" draw:page-number="2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aster1-Layout2-obj-Title-and-Content" presentation:presentation-page-layout-name="AL1T18">
        <draw:custom-shape draw:style-name="gr31" draw:text-style-name="P2" draw:layer="layout" svg:width="7.62cm" svg:height="5.715cm" svg:x="12.7cm" svg:y="1.905cm">
          <text:p text:style-name="P4"><text:span text:style-name="T1">Control Plane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7.607cm" svg:height="5.601cm" svg:x="12.7cm" svg:y="10.16cm">
          <text:p text:style-name="P4"><text:span text:style-name="T1">Data Plane</text:span></text:p>
          <draw:enhanced-geometry svg:viewBox="0 0 21600 21600" draw:type="rectangle" draw:enhanced-path="M 0 0 L 21600 0 21600 21600 0 21600 0 0 Z N"/>
        </draw:custom-shape>
        <draw:line draw:style-name="gr33" draw:text-style-name="P9" draw:layer="layout" svg:x1="18.415cm" svg:y1="6.315cm" svg:x2="18.415cm" svg:y2="12.661cm">
          <text:p/>
        </draw:line>
        <draw:frame draw:style-name="gr34" draw:text-style-name="P16" draw:layer="layout" svg:width="6.126cm" svg:height="1.801cm" svg:x="9.899cm" svg:y="8.024cm">
          <draw:text-box>
            <text:p text:style-name="P15"><text:span text:style-name="T11">Interface for installing</text:span></text:p>
            <text:p text:style-name="P15"><text:span text:style-name="T11">forwarding rules</text:span></text:p>
          </draw:text-box>
        </draw:frame>
        <draw:line draw:style-name="gr35" draw:text-style-name="P9" draw:layer="layout" svg:x1="16.193cm" svg:y1="8.894cm" svg:x2="18.415cm" svg:y2="8.894cm">
          <text:p/>
        </draw:line>
        <draw:custom-shape draw:style-name="gr36" draw:text-style-name="P18" draw:layer="layout" svg:width="2.54cm" svg:height="1.905cm" svg:x="17.145cm" svg:y="4.445cm">
          <text:p text:style-name="P17"><text:span text:style-name="T12">RIB</text:span></text:p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2.54cm" svg:height="1.905cm" svg:x="17.145cm" svg:y="12.661cm">
          <text:p text:style-name="P17"><text:span text:style-name="T12">FIB</text:span></text:p>
          <draw:enhanced-geometry svg:viewBox="0 0 21600 21600" draw:type="rectangle" draw:enhanced-path="M 0 0 L 21600 0 21600 21600 0 21600 0 0 Z N"/>
        </draw:custom-shape>
        <draw:circle draw:style-name="gr37" draw:text-style-name="P21" draw:layer="layout" svg:width="2.54cm" svg:height="2.54cm" svg:x="13.335cm" svg:y="3.81cm" draw:kind="arc" draw:start-angle="26.69" draw:end-angle="278.26">
          <text:p text:style-name="P19"><text:span text:style-name="T9"><text:s text:c="10"/></text:span><text:span text:style-name="T13">Routing</text:span></text:p>
          <text:p text:style-name="P20"><text:span text:style-name="T13"><text:s text:c="10"/>Algorithm</text:span></text:p>
          <text:p text:style-name="P20"><text:span text:style-name="T14"/></text:p>
        </draw:circle>
        <draw:circle draw:style-name="gr38" draw:text-style-name="P22" draw:layer="layout" svg:width="2.54cm" svg:height="2.54cm" svg:x="13.335cm" svg:y="12.026cm" draw:kind="arc" draw:start-angle="26.69" draw:end-angle="278.26">
          <text:p text:style-name="P20"><text:span text:style-name="T9"><text:s text:c="2"/></text:span><text:span text:style-name="T13">Forwarding</text:span></text:p>
          <text:p text:style-name="P20"><text:span text:style-name="T13"><text:s text:c="7"/>Logic</text:span></text:p>
          <text:p text:style-name="P20"><text:span text:style-name="T14"/></text:p>
        </draw:circle>
        <presentation:notes draw:style-name="dp2">
          <draw:page-thumbnail draw:style-name="gr19" draw:layer="layout" svg:width="0.001cm" svg:height="0.002cm" svg:x="0.004cm" svg:y="0cm" draw:page-number="3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3" draw:master-page-name="Master1-Layout1-title-Title-Slide" presentation:presentation-page-layout-name="AL2T33">
        <draw:custom-shape draw:name="Rectangle 3" draw:style-name="gr39" draw:text-style-name="P23" draw:layer="layout" svg:width="15.604cm" svg:height="13.851cm" svg:x="2.374cm" svg:y="2.897cm">
          <text:p/>
          <draw:enhanced-geometry svg:viewBox="0 0 21600 21600" draw:type="non-primitive" draw:enhanced-path="M 0 0 L 21600 0 21600 21600 0 21600 Z N"/>
        </draw:custom-shape>
        <draw:custom-shape draw:name="Rectangle 5" draw:style-name="gr40" draw:text-style-name="P25" draw:layer="layout" svg:width="10.736cm" svg:height="3.551cm" svg:x="4.754cm" svg:y="4.051cm">
          <text:p text:style-name="P24"><text:span text:style-name="T15">CPU</text:span></text:p>
          <draw:enhanced-geometry svg:viewBox="0 0 21600 21600" draw:type="non-primitive" draw:enhanced-path="M 0 0 L 21600 0 21600 21600 0 21600 Z N"/>
        </draw:custom-shape>
        <draw:custom-shape draw:name="Left-Right Arrow 13" draw:style-name="gr41" draw:text-style-name="P27" draw:layer="layout" svg:width="12.418cm" svg:height="1.548cm" svg:x="3.754cm" svg:y="11.588cm">
          <text:p text:style-name="P26"><text:span text:style-name="T16">PCIe</text:span></text:p>
          <draw:enhanced-geometry svg:viewBox="0 0 21600 21600" draw:path-stretchpoint-x="21600" draw:path-stretchpoint-y="21600" draw:text-areas="?f30 ?f25 ?f31 ?f26" draw:glue-points="?f27 ?f7 ?f21 ?f25 ?f24 ?f7 ?f24 ?f13 ?f21 ?f26 ?f27 ?f13" draw:type="non-primitive" draw:modifiers="0 0" draw:enhanced-path="M ?f7 ?f20 L ?f24 ?f7 ?f24 ?f25 ?f27 ?f25 ?f27 ?f7 ?f12 ?f20 ?f27 ?f13 ?f27 ?f26 ?f24 ?f26 ?f24 ?f1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70506"/>
            <draw:equation draw:name="f9" draw:formula="50000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4 / 2"/>
            <draw:equation draw:name="f17" draw:formula="?f15 / 2"/>
            <draw:equation draw:name="f18" draw:formula="min(?f15, ?f14)"/>
            <draw:equation draw:name="f19" draw:formula="?f14 * ?f8"/>
            <draw:equation draw:name="f20" draw:formula="?f7 + ?f16"/>
            <draw:equation draw:name="f21" draw:formula="?f7 + ?f17"/>
            <draw:equation draw:name="f22" draw:formula="?f18 * ?f9"/>
            <draw:equation draw:name="f23" draw:formula="?f19 / 200000"/>
            <draw:equation draw:name="f24" draw:formula="?f22 / 100000"/>
            <draw:equation draw:name="f25" draw:formula="?f20 - ?f23"/>
            <draw:equation draw:name="f26" draw:formula="?f20 + ?f23"/>
            <draw:equation draw:name="f27" draw:formula="?f12 - ?f24"/>
            <draw:equation draw:name="f28" draw:formula="?f25 * ?f24"/>
            <draw:equation draw:name="f29" draw:formula="?f28 / ?f16"/>
            <draw:equation draw:name="f30" draw:formula="?f24 - ?f29"/>
            <draw:equation draw:name="f31" draw:formula="?f27 + ?f29"/>
          </draw:enhanced-geometry>
        </draw:custom-shape>
        <draw:custom-shape draw:name="Rectangle 6" draw:style-name="gr40" draw:text-style-name="P28" draw:layer="layout" svg:width="2.781cm" svg:height="2.289cm" svg:x="3.754cm" svg:y="13.718cm">
          <text:p text:style-name="P26"><text:span text:style-name="T16">NIC 1</text:span></text:p>
          <draw:enhanced-geometry svg:viewBox="0 0 21600 21600" draw:type="non-primitive" draw:enhanced-path="M 0 0 L 21600 0 21600 21600 0 21600 Z N"/>
        </draw:custom-shape>
        <draw:custom-shape draw:name="Rectangle 27" draw:style-name="gr40" draw:text-style-name="P28" draw:layer="layout" svg:width="10.831cm" svg:height="2.498cm" svg:x="4.659cm" svg:y="8.438cm">
          <text:p text:style-name="P26"><text:span text:style-name="T16">Main Memory (DRAM)</text:span></text:p>
          <draw:enhanced-geometry svg:viewBox="0 0 21600 21600" draw:type="non-primitive" draw:enhanced-path="M 0 0 L 21600 0 21600 21600 0 21600 Z N"/>
        </draw:custom-shape>
        <draw:custom-shape draw:name="Up-Down Arrow 2" draw:style-name="gr41" draw:text-style-name="P27" draw:layer="layout" svg:width="0.516cm" svg:height="0.754cm" svg:x="4.886cm" svg:y="12.921cm">
          <text:p/>
          <draw:enhanced-geometry svg:viewBox="0 0 21600 21600" draw:path-stretchpoint-x="21600" draw:path-stretchpoint-y="21600" draw:text-areas="?f24 ?f29 ?f25 ?f30" draw:glue-points="?f7 ?f23 ?f24 ?f19 ?f7 ?f26 ?f11 ?f26 ?f25 ?f19 ?f11 ?f23" draw:type="non-primitive" draw:modifiers="0 0" draw:enhanced-path="M ?f7 ?f23 L ?f20 ?f7 ?f11 ?f23 ?f25 ?f23 ?f25 ?f26 ?f11 ?f26 ?f20 ?f12 ?f7 ?f26 ?f24 ?f26 ?f24 ?f2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4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20 - ?f22"/>
            <draw:equation draw:name="f25" draw:formula="?f20 + ?f22"/>
            <draw:equation draw:name="f26" draw:formula="?f12 - ?f23"/>
            <draw:equation draw:name="f27" draw:formula="?f24 * ?f23"/>
            <draw:equation draw:name="f28" draw:formula="?f27 / ?f16"/>
            <draw:equation draw:name="f29" draw:formula="?f23 - ?f28"/>
            <draw:equation draw:name="f30" draw:formula="?f26 + ?f28"/>
          </draw:enhanced-geometry>
        </draw:custom-shape>
        <draw:custom-shape draw:name="Up-Down Arrow 25" draw:style-name="gr41" draw:text-style-name="P27" draw:layer="layout" svg:width="0.516cm" svg:height="0.754cm" svg:x="11.372cm" svg:y="12.921cm">
          <text:p/>
          <draw:enhanced-geometry svg:viewBox="0 0 21600 21600" draw:path-stretchpoint-x="21600" draw:path-stretchpoint-y="21600" draw:text-areas="?f24 ?f29 ?f25 ?f30" draw:glue-points="?f7 ?f23 ?f24 ?f19 ?f7 ?f26 ?f11 ?f26 ?f25 ?f19 ?f11 ?f23" draw:type="non-primitive" draw:modifiers="0 0" draw:enhanced-path="M ?f7 ?f23 L ?f20 ?f7 ?f11 ?f23 ?f25 ?f23 ?f25 ?f26 ?f11 ?f26 ?f20 ?f12 ?f7 ?f26 ?f24 ?f26 ?f24 ?f2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4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20 - ?f22"/>
            <draw:equation draw:name="f25" draw:formula="?f20 + ?f22"/>
            <draw:equation draw:name="f26" draw:formula="?f12 - ?f23"/>
            <draw:equation draw:name="f27" draw:formula="?f24 * ?f23"/>
            <draw:equation draw:name="f28" draw:formula="?f27 / ?f16"/>
            <draw:equation draw:name="f29" draw:formula="?f23 - ?f28"/>
            <draw:equation draw:name="f30" draw:formula="?f26 + ?f28"/>
          </draw:enhanced-geometry>
        </draw:custom-shape>
        <draw:custom-shape draw:name="Up-Down Arrow 28" draw:style-name="gr41" draw:text-style-name="P27" draw:layer="layout" svg:width="0.516cm" svg:height="0.754cm" svg:x="14.523cm" svg:y="12.921cm">
          <text:p/>
          <draw:enhanced-geometry svg:viewBox="0 0 21600 21600" draw:path-stretchpoint-x="21600" draw:path-stretchpoint-y="21600" draw:text-areas="?f24 ?f29 ?f25 ?f30" draw:glue-points="?f7 ?f23 ?f24 ?f19 ?f7 ?f26 ?f11 ?f26 ?f25 ?f19 ?f11 ?f23" draw:type="non-primitive" draw:modifiers="0 0" draw:enhanced-path="M ?f7 ?f23 L ?f20 ?f7 ?f11 ?f23 ?f25 ?f23 ?f25 ?f26 ?f11 ?f26 ?f20 ?f12 ?f7 ?f26 ?f24 ?f26 ?f24 ?f2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4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20 - ?f22"/>
            <draw:equation draw:name="f25" draw:formula="?f20 + ?f22"/>
            <draw:equation draw:name="f26" draw:formula="?f12 - ?f23"/>
            <draw:equation draw:name="f27" draw:formula="?f24 * ?f23"/>
            <draw:equation draw:name="f28" draw:formula="?f27 / ?f16"/>
            <draw:equation draw:name="f29" draw:formula="?f23 - ?f28"/>
            <draw:equation draw:name="f30" draw:formula="?f26 + ?f28"/>
          </draw:enhanced-geometry>
        </draw:custom-shape>
        <draw:custom-shape draw:name="Up-Down Arrow 29" draw:style-name="gr41" draw:text-style-name="P27" draw:layer="layout" svg:width="0.516cm" svg:height="0.754cm" svg:x="9.817cm" svg:y="11.006cm">
          <text:p/>
          <draw:enhanced-geometry svg:viewBox="0 0 21600 21600" draw:path-stretchpoint-x="21600" draw:path-stretchpoint-y="21600" draw:text-areas="?f24 ?f29 ?f25 ?f30" draw:glue-points="?f7 ?f23 ?f24 ?f19 ?f7 ?f26 ?f11 ?f26 ?f25 ?f19 ?f11 ?f23" draw:type="non-primitive" draw:modifiers="0 0" draw:enhanced-path="M ?f7 ?f23 L ?f20 ?f7 ?f11 ?f23 ?f25 ?f23 ?f25 ?f26 ?f11 ?f26 ?f20 ?f12 ?f7 ?f26 ?f24 ?f26 ?f24 ?f2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4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20 - ?f22"/>
            <draw:equation draw:name="f25" draw:formula="?f20 + ?f22"/>
            <draw:equation draw:name="f26" draw:formula="?f12 - ?f23"/>
            <draw:equation draw:name="f27" draw:formula="?f24 * ?f23"/>
            <draw:equation draw:name="f28" draw:formula="?f27 / ?f16"/>
            <draw:equation draw:name="f29" draw:formula="?f23 - ?f28"/>
            <draw:equation draw:name="f30" draw:formula="?f26 + ?f28"/>
          </draw:enhanced-geometry>
        </draw:custom-shape>
        <draw:custom-shape draw:name="Up-Down Arrow 30" draw:style-name="gr41" draw:text-style-name="P27" draw:layer="layout" svg:width="0.516cm" svg:height="0.754cm" svg:x="9.817cm" svg:y="7.665cm">
          <text:p/>
          <draw:enhanced-geometry svg:viewBox="0 0 21600 21600" draw:path-stretchpoint-x="21600" draw:path-stretchpoint-y="21600" draw:text-areas="?f24 ?f29 ?f25 ?f30" draw:glue-points="?f7 ?f23 ?f24 ?f19 ?f7 ?f26 ?f11 ?f26 ?f25 ?f19 ?f11 ?f23" draw:type="non-primitive" draw:modifiers="0 0" draw:enhanced-path="M ?f7 ?f23 L ?f20 ?f7 ?f11 ?f23 ?f25 ?f23 ?f25 ?f26 ?f11 ?f26 ?f20 ?f12 ?f7 ?f26 ?f24 ?f26 ?f24 ?f2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4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20 - ?f22"/>
            <draw:equation draw:name="f25" draw:formula="?f20 + ?f22"/>
            <draw:equation draw:name="f26" draw:formula="?f12 - ?f23"/>
            <draw:equation draw:name="f27" draw:formula="?f24 * ?f23"/>
            <draw:equation draw:name="f28" draw:formula="?f27 / ?f16"/>
            <draw:equation draw:name="f29" draw:formula="?f23 - ?f28"/>
            <draw:equation draw:name="f30" draw:formula="?f26 + ?f28"/>
          </draw:enhanced-geometry>
        </draw:custom-shape>
        <draw:connector draw:name="Straight Arrow Connector 31" draw:style-name="gr42" draw:text-style-name="P29" draw:layer="layout" draw:type="line" svg:x1="5.144cm" svg:y1="16.007cm" svg:x2="5.144cm" svg:y2="17.274cm" svg:d="M5144 16007v1267" svg:viewBox="0 0 1 1268">
          <text:p/>
        </draw:connector>
        <draw:connector draw:name="Straight Arrow Connector 32" draw:style-name="gr43" draw:text-style-name="P29" draw:layer="layout" draw:type="line" svg:x1="8.295cm" svg:y1="16.007cm" svg:x2="8.295cm" svg:y2="17.274cm" svg:d="M8295 16007v1267" svg:viewBox="0 0 1 1268">
          <text:p/>
        </draw:connector>
        <draw:connector draw:name="Straight Arrow Connector 33" draw:style-name="gr44" draw:text-style-name="P29" draw:layer="layout" draw:type="line" svg:x1="14.781cm" svg:y1="16.007cm" svg:x2="14.781cm" svg:y2="17.274cm" svg:d="M14781 16007v1267" svg:viewBox="0 0 1 1268">
          <text:p/>
        </draw:connector>
        <draw:custom-shape draw:name="Rectangle 16" draw:style-name="gr40" draw:text-style-name="P28" draw:layer="layout" svg:width="2.781cm" svg:height="2.289cm" svg:x="6.984cm" svg:y="13.718cm">
          <text:p text:style-name="P26"><text:span text:style-name="T16">NIC 2</text:span></text:p>
          <draw:enhanced-geometry svg:viewBox="0 0 21600 21600" draw:type="non-primitive" draw:enhanced-path="M 0 0 L 21600 0 21600 21600 0 21600 Z N"/>
        </draw:custom-shape>
        <draw:custom-shape draw:name="Rectangle 17" draw:style-name="gr40" draw:text-style-name="P28" draw:layer="layout" svg:width="2.781cm" svg:height="2.289cm" svg:x="10.24cm" svg:y="13.718cm">
          <text:p text:style-name="P26"><text:span text:style-name="T16">NIC 3</text:span></text:p>
          <draw:enhanced-geometry svg:viewBox="0 0 21600 21600" draw:type="non-primitive" draw:enhanced-path="M 0 0 L 21600 0 21600 21600 0 21600 Z N"/>
        </draw:custom-shape>
        <draw:custom-shape draw:name="Rectangle 18" draw:style-name="gr40" draw:text-style-name="P28" draw:layer="layout" svg:width="2.781cm" svg:height="2.289cm" svg:x="13.39cm" svg:y="13.718cm">
          <text:p text:style-name="P26"><text:span text:style-name="T16">NIC 4</text:span></text:p>
          <draw:enhanced-geometry svg:viewBox="0 0 21600 21600" draw:type="non-primitive" draw:enhanced-path="M 0 0 L 21600 0 21600 21600 0 21600 Z N"/>
        </draw:custom-shape>
        <draw:connector draw:name="Straight Arrow Connector 19" draw:style-name="gr45" draw:text-style-name="P29" draw:layer="layout" draw:type="line" svg:x1="11.63cm" svg:y1="16.007cm" svg:x2="11.63cm" svg:y2="17.274cm" svg:d="M11630 16007v1267" svg:viewBox="0 0 1 1268">
          <text:p/>
        </draw:connector>
        <draw:custom-shape draw:name="Up-Down Arrow 22" draw:style-name="gr41" draw:text-style-name="P27" draw:layer="layout" svg:width="0.516cm" svg:height="0.754cm" svg:x="8.116cm" svg:y="12.921cm">
          <text:p/>
          <draw:enhanced-geometry svg:viewBox="0 0 21600 21600" draw:path-stretchpoint-x="21600" draw:path-stretchpoint-y="21600" draw:text-areas="?f24 ?f29 ?f25 ?f30" draw:glue-points="?f7 ?f23 ?f24 ?f19 ?f7 ?f26 ?f11 ?f26 ?f25 ?f19 ?f11 ?f23" draw:type="non-primitive" draw:modifiers="0 0" draw:enhanced-path="M ?f7 ?f23 L ?f20 ?f7 ?f11 ?f23 ?f25 ?f23 ?f25 ?f26 ?f11 ?f26 ?f20 ?f12 ?f7 ?f26 ?f24 ?f26 ?f24 ?f2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4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20 - ?f22"/>
            <draw:equation draw:name="f25" draw:formula="?f20 + ?f22"/>
            <draw:equation draw:name="f26" draw:formula="?f12 - ?f23"/>
            <draw:equation draw:name="f27" draw:formula="?f24 * ?f23"/>
            <draw:equation draw:name="f28" draw:formula="?f27 / ?f16"/>
            <draw:equation draw:name="f29" draw:formula="?f23 - ?f28"/>
            <draw:equation draw:name="f30" draw:formula="?f26 + ?f28"/>
          </draw:enhanced-geometry>
        </draw:custom-shape>
        <presentation:notes draw:style-name="dp2">
          <draw:page-thumbnail draw:style-name="gr19" draw:layer="layout" svg:width="18.624cm" svg:height="10.476cm" svg:x="1.482cm" svg:y="2.123cm" draw:page-number="4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" draw:style-name="dp3" draw:master-page-name="Master1-Layout1-title-Title-Slide" presentation:presentation-page-layout-name="AL2T33">
        <draw:custom-shape draw:name="Rectangle 3" draw:style-name="gr39" draw:text-style-name="P23" draw:layer="layout" svg:width="22.153cm" svg:height="13.851cm" svg:x="2.374cm" svg:y="2.818cm">
          <text:p/>
          <draw:enhanced-geometry svg:viewBox="0 0 21600 21600" draw:type="non-primitive" draw:enhanced-path="M 0 0 L 21600 0 21600 21600 0 21600 Z N"/>
        </draw:custom-shape>
        <draw:custom-shape draw:name="Rectangle 4" draw:style-name="gr40" draw:text-style-name="P28" draw:layer="layout" svg:width="4.683cm" svg:height="3.612cm" svg:x="18.534cm" svg:y="5.814cm">
          <text:p text:style-name="P26"><text:span text:style-name="T15">CPU</text:span></text:p>
          <text:p text:style-name="P26"><text:span text:style-name="T15">(Control)</text:span></text:p>
          <draw:enhanced-geometry svg:viewBox="0 0 21600 21600" draw:type="non-primitive" draw:enhanced-path="M 0 0 L 21600 0 21600 21600 0 21600 Z N"/>
        </draw:custom-shape>
        <draw:custom-shape draw:name="Rectangle 5" draw:style-name="gr46" draw:text-style-name="P25" draw:layer="layout" svg:width="11.642cm" svg:height="7.779cm" svg:x="3.754cm" svg:y="3.691cm">
          <text:p text:style-name="P24"><text:span text:style-name="T15">Network Processing Unit</text:span></text:p>
          <draw:enhanced-geometry svg:viewBox="0 0 21600 21600" draw:type="non-primitive" draw:enhanced-path="M 0 0 L 21600 0 21600 21600 0 21600 Z N"/>
        </draw:custom-shape>
        <draw:custom-shape draw:name="Left-Right Arrow 13" draw:style-name="gr41" draw:text-style-name="P27" draw:layer="layout" svg:width="3.139cm" svg:height="0.635cm" svg:x="15.395cm" svg:y="7.302cm">
          <text:p/>
          <draw:enhanced-geometry svg:viewBox="0 0 21600 21600" draw:path-stretchpoint-x="21600" draw:path-stretchpoint-y="21600" draw:text-areas="?f29 ?f24 ?f30 ?f25" draw:glue-points="?f26 ?f7 ?f20 ?f24 ?f23 ?f7 ?f23 ?f12 ?f20 ?f25 ?f26 ?f12" draw:type="non-primitive" draw:modifiers="0 0" draw:enhanced-path="M ?f7 ?f19 L ?f23 ?f7 ?f23 ?f24 ?f26 ?f24 ?f26 ?f7 ?f11 ?f19 ?f26 ?f12 ?f26 ?f25 ?f23 ?f25 ?f23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draw:name="Rectangle 19" draw:style-name="gr41" draw:text-style-name="P27" draw:layer="layout" svg:width="10.831cm" svg:height="1.567cm" svg:x="4.176cm" svg:y="5.556cm">
          <text:p text:style-name="P26"><text:span text:style-name="T16">TCAM (Patterns to Match)</text:span></text:p>
          <draw:enhanced-geometry svg:viewBox="0 0 21600 21600" draw:type="non-primitive" draw:enhanced-path="M 0 0 L 21600 0 21600 21600 0 21600 Z N"/>
        </draw:custom-shape>
        <draw:custom-shape draw:name="Rectangle 6" draw:style-name="gr40" draw:text-style-name="P28" draw:layer="layout" svg:width="11.642cm" svg:height="2.289cm" svg:x="3.754cm" svg:y="13.788cm">
          <text:p text:style-name="P26"><text:span text:style-name="T16">48x40G SFP+</text:span></text:p>
          <text:p text:style-name="P26"><text:span text:style-name="T16">(Ports 1~48)</text:span></text:p>
          <draw:enhanced-geometry svg:viewBox="0 0 21600 21600" draw:type="non-primitive" draw:enhanced-path="M 0 0 L 21600 0 21600 21600 0 21600 Z N"/>
        </draw:custom-shape>
        <draw:connector draw:name="Straight Arrow Connector 8" draw:style-name="gr47" draw:text-style-name="P29" draw:layer="layout" draw:type="line" svg:x1="4.465cm" svg:y1="16.063cm" svg:x2="4.465cm" svg:y2="17.33cm" svg:d="M4465 16063v1267" svg:viewBox="0 0 1 1268">
          <text:p/>
        </draw:connector>
        <draw:connector draw:name="Straight Arrow Connector 9" draw:style-name="gr48" draw:text-style-name="P29" draw:layer="layout" draw:type="line" svg:x1="5.126cm" svg:y1="16.063cm" svg:x2="5.126cm" svg:y2="17.33cm" svg:d="M5126 16063v1267" svg:viewBox="0 0 1 1268">
          <text:p/>
        </draw:connector>
        <draw:connector draw:name="Straight Arrow Connector 10" draw:style-name="gr49" draw:text-style-name="P29" draw:layer="layout" draw:type="line" svg:x1="5.788cm" svg:y1="16.063cm" svg:x2="5.788cm" svg:y2="17.33cm" svg:d="M5788 16063v1267" svg:viewBox="0 0 1 1268">
          <text:p/>
        </draw:connector>
        <draw:connector draw:name="Straight Arrow Connector 11" draw:style-name="gr50" draw:text-style-name="P29" draw:layer="layout" draw:type="line" svg:x1="6.41cm" svg:y1="16.063cm" svg:x2="6.41cm" svg:y2="17.33cm" svg:d="M6410 16063v1267" svg:viewBox="0 0 1 1268">
          <text:p/>
        </draw:connector>
        <draw:connector draw:name="Straight Arrow Connector 12" draw:style-name="gr51" draw:text-style-name="P29" draw:layer="layout" draw:type="line" svg:x1="14.651cm" svg:y1="16.063cm" svg:x2="14.651cm" svg:y2="17.33cm" svg:d="M14651 16063v1267" svg:viewBox="0 0 1 1268">
          <text:p/>
        </draw:connector>
        <draw:custom-shape draw:name="Up-Down Arrow 14" draw:style-name="gr41" draw:text-style-name="P27" draw:layer="layout" svg:width="1.001cm" svg:height="2.318cm" svg:x="9.074cm" svg:y="11.47cm">
          <text:p/>
          <draw:enhanced-geometry svg:viewBox="0 0 21600 21600" draw:path-stretchpoint-x="21600" draw:path-stretchpoint-y="21600" draw:text-areas="?f24 ?f29 ?f25 ?f30" draw:glue-points="?f7 ?f23 ?f24 ?f19 ?f7 ?f26 ?f11 ?f26 ?f25 ?f19 ?f11 ?f23" draw:type="non-primitive" draw:modifiers="0 0" draw:enhanced-path="M ?f7 ?f23 L ?f20 ?f7 ?f11 ?f23 ?f25 ?f23 ?f25 ?f26 ?f11 ?f26 ?f20 ?f12 ?f7 ?f26 ?f24 ?f26 ?f24 ?f2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4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20 - ?f22"/>
            <draw:equation draw:name="f25" draw:formula="?f20 + ?f22"/>
            <draw:equation draw:name="f26" draw:formula="?f12 - ?f23"/>
            <draw:equation draw:name="f27" draw:formula="?f24 * ?f23"/>
            <draw:equation draw:name="f28" draw:formula="?f27 / ?f16"/>
            <draw:equation draw:name="f29" draw:formula="?f23 - ?f28"/>
            <draw:equation draw:name="f30" draw:formula="?f26 + ?f28"/>
          </draw:enhanced-geometry>
        </draw:custom-shape>
        <draw:frame draw:name="TextBox 15" draw:style-name="gr52" draw:text-style-name="P31" draw:layer="layout" svg:width="1.288cm" svg:height="1.026cm" svg:x="9.455cm" svg:y="16.417cm">
          <draw:text-box>
            <text:p text:style-name="P30"><text:span text:style-name="T16">. . .</text:span></text:p>
          </draw:text-box>
        </draw:frame>
        <draw:connector draw:name="Straight Arrow Connector 16" draw:style-name="gr53" draw:text-style-name="P29" draw:layer="layout" draw:type="line" svg:x1="14.082cm" svg:y1="16.063cm" svg:x2="14.082cm" svg:y2="17.33cm" svg:d="M14082 16063v1267" svg:viewBox="0 0 1 1268">
          <text:p/>
        </draw:connector>
        <draw:frame draw:name="TextBox 20" draw:style-name="gr54" draw:text-style-name="P31" draw:layer="layout" svg:width="1.261cm" svg:height="1.026cm" svg:x="9.773cm" svg:y="12.129cm">
          <draw:text-box>
            <text:p text:style-name="P30"><text:span text:style-name="T16">SFI</text:span></text:p>
          </draw:text-box>
        </draw:frame>
        <draw:frame draw:name="TextBox 22" draw:style-name="gr55" draw:text-style-name="P31" draw:layer="layout" svg:width="1.666cm" svg:height="1.026cm" svg:x="16.171cm" svg:y="7.814cm">
          <draw:text-box>
            <text:p text:style-name="P30"><text:span text:style-name="T16">PCIe</text:span></text:p>
          </draw:text-box>
        </draw:frame>
        <draw:custom-shape draw:name="Rectangle 27" draw:style-name="gr41" draw:text-style-name="P27" draw:layer="layout" svg:width="10.884cm" svg:height="1.574cm" svg:x="4.123cm" svg:y="9.605cm">
          <text:p text:style-name="P26"><text:span text:style-name="T16">SRAM (Packet Buffers)</text:span></text:p>
          <draw:enhanced-geometry svg:viewBox="0 0 21600 21600" draw:type="non-primitive" draw:enhanced-path="M 0 0 L 21600 0 21600 21600 0 21600 Z N"/>
        </draw:custom-shape>
        <draw:custom-shape draw:name="Rectangle 17" draw:style-name="gr56" draw:text-style-name="P32" draw:layer="layout" svg:width="0.661cm" svg:height="1.611cm" svg:x="4.624cm" svg:y="7.522cm">
          <text:p/>
          <draw:enhanced-geometry svg:viewBox="0 0 21600 21600" draw:type="non-primitive" draw:enhanced-path="M 0 0 L 21600 0 21600 21600 0 21600 Z N"/>
        </draw:custom-shape>
        <draw:custom-shape draw:name="Rectangle 34" draw:style-name="gr56" draw:text-style-name="P32" draw:layer="layout" svg:width="0.661cm" svg:height="1.611cm" svg:x="5.755cm" svg:y="7.522cm">
          <text:p/>
          <draw:enhanced-geometry svg:viewBox="0 0 21600 21600" draw:type="non-primitive" draw:enhanced-path="M 0 0 L 21600 0 21600 21600 0 21600 Z N"/>
        </draw:custom-shape>
        <draw:custom-shape draw:name="Rectangle 35" draw:style-name="gr56" draw:text-style-name="P32" draw:layer="layout" svg:width="0.661cm" svg:height="1.611cm" svg:x="6.907cm" svg:y="7.522cm">
          <text:p/>
          <draw:enhanced-geometry svg:viewBox="0 0 21600 21600" draw:type="non-primitive" draw:enhanced-path="M 0 0 L 21600 0 21600 21600 0 21600 Z N"/>
        </draw:custom-shape>
        <draw:custom-shape draw:name="Rectangle 36" draw:style-name="gr56" draw:text-style-name="P32" draw:layer="layout" svg:width="0.661cm" svg:height="1.611cm" svg:x="8.058cm" svg:y="7.522cm">
          <text:p/>
          <draw:enhanced-geometry svg:viewBox="0 0 21600 21600" draw:type="non-primitive" draw:enhanced-path="M 0 0 L 21600 0 21600 21600 0 21600 Z N"/>
        </draw:custom-shape>
        <draw:custom-shape draw:name="Rectangle 37" draw:style-name="gr56" draw:text-style-name="P32" draw:layer="layout" svg:width="0.661cm" svg:height="1.611cm" svg:x="9.19cm" svg:y="7.522cm">
          <text:p/>
          <draw:enhanced-geometry svg:viewBox="0 0 21600 21600" draw:type="non-primitive" draw:enhanced-path="M 0 0 L 21600 0 21600 21600 0 21600 Z N"/>
        </draw:custom-shape>
        <draw:custom-shape draw:name="Rectangle 38" draw:style-name="gr56" draw:text-style-name="P32" draw:layer="layout" svg:width="0.661cm" svg:height="1.611cm" svg:x="10.324cm" svg:y="7.522cm">
          <text:p/>
          <draw:enhanced-geometry svg:viewBox="0 0 21600 21600" draw:type="non-primitive" draw:enhanced-path="M 0 0 L 21600 0 21600 21600 0 21600 Z N"/>
        </draw:custom-shape>
        <draw:custom-shape draw:name="Rectangle 39" draw:style-name="gr56" draw:text-style-name="P32" draw:layer="layout" svg:width="0.661cm" svg:height="1.611cm" svg:x="11.51cm" svg:y="7.522cm">
          <text:p/>
          <draw:enhanced-geometry svg:viewBox="0 0 21600 21600" draw:type="non-primitive" draw:enhanced-path="M 0 0 L 21600 0 21600 21600 0 21600 Z N"/>
        </draw:custom-shape>
        <draw:custom-shape draw:name="Rectangle 40" draw:style-name="gr56" draw:text-style-name="P32" draw:layer="layout" svg:width="0.661cm" svg:height="1.611cm" svg:x="12.644cm" svg:y="7.522cm">
          <text:p/>
          <draw:enhanced-geometry svg:viewBox="0 0 21600 21600" draw:type="non-primitive" draw:enhanced-path="M 0 0 L 21600 0 21600 21600 0 21600 Z N"/>
        </draw:custom-shape>
        <draw:custom-shape draw:name="Rectangle 41" draw:style-name="gr56" draw:text-style-name="P32" draw:layer="layout" svg:width="0.661cm" svg:height="1.611cm" svg:x="13.751cm" svg:y="7.522cm">
          <text:p/>
          <draw:enhanced-geometry svg:viewBox="0 0 21600 21600" draw:type="non-primitive" draw:enhanced-path="M 0 0 L 21600 0 21600 21600 0 21600 Z N"/>
        </draw:custom-shape>
        <draw:custom-shape draw:name="Rectangle 26" draw:style-name="gr57" draw:text-style-name="P33" draw:layer="layout" svg:width="10.831cm" svg:height="2.123cm" svg:x="4.176cm" svg:y="7.302cm">
          <text:p text:style-name="P26"><text:span text:style-name="T16">Forwarding Pipeline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9" draw:layer="layout" svg:width="18.624cm" svg:height="10.476cm" svg:x="1.482cm" svg:y="2.123cm" draw:page-number="5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ster1-Layout2-obj-Title-and-Content">
        <draw:custom-shape draw:style-name="gr58" draw:text-style-name="P35" draw:layer="layout" svg:width="22.86cm" svg:height="5.715cm" svg:x="5.08cm" svg:y="1.905cm">
          <text:p text:style-name="P34"><text:span text:style-name="T17">OpenFlow Pipeline</text:span></text:p>
          <draw:enhanced-geometry svg:viewBox="0 0 21600 21600" draw:type="rectangle" draw:enhanced-path="M 0 0 L 21600 0 21600 21600 0 21600 0 0 Z N"/>
        </draw:custom-shape>
        <draw:custom-shape draw:style-name="gr59" draw:text-style-name="P37" draw:layer="layout" svg:width="2.54cm" svg:height="3.175cm" svg:x="6.985cm" svg:y="3.175cm">
          <text:p text:style-name="P36"><text:span text:style-name="T18">Table</text:span></text:p>
          <text:p text:style-name="P36"><text:span text:style-name="T18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7" draw:layer="layout" svg:width="2.54cm" svg:height="3.175cm" svg:x="11.385cm" svg:y="3.175cm">
          <text:p text:style-name="P36"><text:span text:style-name="T18">Table</text:span></text:p>
          <text:p text:style-name="P36"><text:span text:style-name="T18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7" draw:layer="layout" svg:width="2.54cm" svg:height="3.175cm" svg:x="19.185cm" svg:y="3.175cm">
          <text:p text:style-name="P36"><text:span text:style-name="T18">Table</text:span></text:p>
          <text:p text:style-name="P36"><text:span text:style-name="T18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7" draw:layer="layout" svg:width="2.54cm" svg:height="3.175cm" svg:x="23.585cm" svg:y="3.175cm">
          <text:p text:style-name="P36"><text:span text:style-name="T18">Execute</text:span></text:p>
          <text:p text:style-name="P36"><text:span text:style-name="T18">Action</text:span></text:p>
          <text:p text:style-name="P36"><text:span text:style-name="T18">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38" draw:layer="layout" svg:width="1.921cm" svg:height="1.905cm" svg:x="5.08cm" svg:y="4.78cm">
          <draw:text-box>
            <text:p text:style-name="P15"><text:span text:style-name="T19">Action</text:span></text:p>
            <text:p text:style-name="P15"><text:span text:style-name="T19">Set = {}</text:span></text:p>
          </draw:text-box>
        </draw:frame>
        <draw:line draw:style-name="gr61" draw:text-style-name="P9" draw:layer="layout" svg:x1="3.81cm" svg:y1="4.78cm" svg:x2="6.985cm" svg:y2="4.78cm">
          <text:p/>
        </draw:line>
        <draw:line draw:style-name="gr61" draw:text-style-name="P9" draw:layer="layout" svg:x1="9.525cm" svg:y1="4.78cm" svg:x2="11.386cm" svg:y2="4.78cm">
          <text:p/>
        </draw:line>
        <draw:frame draw:style-name="gr60" draw:text-style-name="P38" draw:layer="layout" svg:width="1.921cm" svg:height="1.905cm" svg:x="9.481cm" svg:y="4.781cm">
          <draw:text-box>
            <text:p text:style-name="P15"><text:span text:style-name="T19">Action</text:span></text:p>
            <text:p text:style-name="P15"><text:span text:style-name="T19">Set </text:span></text:p>
          </draw:text-box>
        </draw:frame>
        <draw:line draw:style-name="gr61" draw:text-style-name="P9" draw:layer="layout" svg:x1="13.926cm" svg:y1="4.78cm" svg:x2="15.787cm" svg:y2="4.78cm">
          <text:p/>
        </draw:line>
        <draw:line draw:style-name="gr61" draw:text-style-name="P9" draw:layer="layout" svg:x1="17.327cm" svg:y1="4.78cm" svg:x2="19.188cm" svg:y2="4.78cm">
          <text:p/>
        </draw:line>
        <draw:line draw:style-name="gr61" draw:text-style-name="P9" draw:layer="layout" svg:x1="21.728cm" svg:y1="4.78cm" svg:x2="23.589cm" svg:y2="4.78cm">
          <text:p/>
        </draw:line>
        <draw:line draw:style-name="gr62" draw:text-style-name="P9" draw:layer="layout" svg:x1="15.828cm" svg:y1="4.78cm" svg:x2="17.327cm" svg:y2="4.78cm">
          <text:p/>
        </draw:line>
        <draw:line draw:style-name="gr61" draw:text-style-name="P9" draw:layer="layout" svg:x1="26.111cm" svg:y1="4.78cm" svg:x2="29.286cm" svg:y2="4.78cm">
          <text:p/>
        </draw:line>
        <draw:frame draw:style-name="gr60" draw:text-style-name="P38" draw:layer="layout" svg:width="1.921cm" svg:height="1.905cm" svg:x="21.682cm" svg:y="4.782cm">
          <draw:text-box>
            <text:p text:style-name="P15"><text:span text:style-name="T19">Action</text:span></text:p>
            <text:p text:style-name="P15"><text:span text:style-name="T19">Set </text:span></text:p>
          </draw:text-box>
        </draw:frame>
        <draw:frame draw:style-name="gr63" draw:text-style-name="P39" draw:layer="layout" svg:width="2.183cm" svg:height="1.801cm" svg:x="2.64cm" svg:y="2.979cm">
          <draw:text-box>
            <text:p text:style-name="P15"><text:span text:style-name="T9">Packet</text:span></text:p>
            <text:p text:style-name="P15"><text:span text:style-name="T9">In</text:span></text:p>
          </draw:text-box>
        </draw:frame>
        <draw:frame draw:style-name="gr64" draw:text-style-name="P39" draw:layer="layout" svg:width="2.183cm" svg:height="1.801cm" svg:x="28.241cm" svg:y="2.98cm">
          <draw:text-box>
            <text:p text:style-name="P15"><text:span text:style-name="T9">Packet</text:span></text:p>
            <text:p text:style-name="P40"><text:span text:style-name="T9">Out</text:span></text:p>
          </draw:text-box>
        </draw:frame>
        <draw:frame draw:style-name="gr60" draw:text-style-name="P38" draw:layer="layout" svg:width="1.921cm" svg:height="1.905cm" svg:x="17.382cm" svg:y="4.782cm">
          <draw:text-box>
            <text:p text:style-name="P15"><text:span text:style-name="T19">Action</text:span></text:p>
            <text:p text:style-name="P15"><text:span text:style-name="T19">Set </text:span></text:p>
          </draw:text-box>
        </draw:frame>
        <presentation:notes draw:style-name="dp2">
          <draw:page-thumbnail draw:style-name="gr19" draw:layer="layout" svg:width="0.001cm" svg:height="0.001cm" svg:x="0cm" svg:y="2.123cm" draw:page-number="6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aster1-Layout2-obj-Title-and-Content">
        <draw:custom-shape draw:style-name="gr65" draw:text-style-name="P1" draw:layer="layout" svg:width="28.575cm" svg:height="1.75cm" svg:x="2.54cm" svg:y="6.07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41" draw:layer="layout" svg:width="5.82cm" svg:height="1.75cm" svg:x="25.295cm" svg:y="6.07cm">
          <text:p text:style-name="P36"><text:span text:style-name="T18">Paylo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2">
          <draw:line draw:style-name="gr67" draw:text-style-name="P42" draw:layer="layout" svg:x1="29.997cm" svg:y1="5.845cm" svg:x2="29.703cm" svg:y2="6.924cm">
            <text:p/>
          </draw:line>
          <draw:line draw:style-name="gr67" draw:text-style-name="P42" draw:layer="layout" svg:x1="29.997cm" svg:y1="6.941cm" svg:x2="29.703cm" svg:y2="8.02cm">
            <text:p/>
          </draw:line>
          <draw:line draw:style-name="gr67" draw:text-style-name="P42" draw:layer="layout" svg:x1="29.997cm" svg:y1="6.924cm" svg:x2="29.703cm" svg:y2="6.924cm">
            <text:p/>
          </draw:line>
        </draw:g>
        <draw:custom-shape draw:style-name="gr68" draw:text-style-name="P37" draw:layer="layout" svg:width="1.905cm" svg:height="1.75cm" svg:x="4.445cm" svg:y="6.07cm">
          <text:p text:style-name="P36"><text:span text:style-name="T18">Dst</text:span></text:p>
          <text:p text:style-name="P36"><text:span text:style-name="T18">Addr</text:span></text:p>
          <draw:enhanced-geometry svg:viewBox="0 0 21600 21600" draw:type="rectangle" draw:enhanced-path="M 0 0 L 21600 0 21600 21600 0 21600 0 0 Z N"/>
        </draw:custom-shape>
        <draw:custom-shape draw:style-name="gr68" draw:text-style-name="P37" draw:layer="layout" svg:width="1.905cm" svg:height="1.75cm" svg:x="2.54cm" svg:y="6.07cm">
          <text:p text:style-name="P36"><text:span text:style-name="T18">Src</text:span></text:p>
          <text:p text:style-name="P36"><text:span text:style-name="T18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37" draw:layer="layout" svg:width="1.905cm" svg:height="1.75cm" svg:x="6.35cm" svg:y="6.07cm">
          <text:p text:style-name="P36"><text:span text:style-name="T18">Type</text:span></text:p>
          <draw:enhanced-geometry svg:viewBox="0 0 21600 21600" draw:type="rectangle" draw:enhanced-path="M 0 0 L 21600 0 21600 21600 0 21600 0 0 Z N"/>
        </draw:custom-shape>
        <draw:custom-shape draw:style-name="gr68" draw:text-style-name="P37" draw:layer="layout" svg:width="1.905cm" svg:height="1.75cm" svg:x="8.255cm" svg:y="6.07cm">
          <text:p text:style-name="P36"><text:span text:style-name="T18">...</text:span></text:p>
          <draw:enhanced-geometry svg:viewBox="0 0 21600 21600" draw:type="rectangle" draw:enhanced-path="M 0 0 L 21600 0 21600 21600 0 21600 0 0 Z N"/>
        </draw:custom-shape>
        <draw:custom-shape draw:style-name="gr68" draw:text-style-name="P37" draw:layer="layout" svg:width="1.905cm" svg:height="1.75cm" svg:x="10.16cm" svg:y="6.07cm">
          <text:p text:style-name="P36"><text:span text:style-name="T18">Proto</text:span></text:p>
          <draw:enhanced-geometry svg:viewBox="0 0 21600 21600" draw:type="rectangle" draw:enhanced-path="M 0 0 L 21600 0 21600 21600 0 21600 0 0 Z N"/>
        </draw:custom-shape>
        <draw:custom-shape draw:style-name="gr68" draw:text-style-name="P37" draw:layer="layout" svg:width="1.905cm" svg:height="1.75cm" svg:x="15.875cm" svg:y="6.07cm">
          <text:p text:style-name="P36"><text:span text:style-name="T18">Dst</text:span></text:p>
          <text:p text:style-name="P36"><text:span text:style-name="T18">Addr</text:span></text:p>
          <draw:enhanced-geometry svg:viewBox="0 0 21600 21600" draw:type="rectangle" draw:enhanced-path="M 0 0 L 21600 0 21600 21600 0 21600 0 0 Z N"/>
        </draw:custom-shape>
        <draw:custom-shape draw:style-name="gr68" draw:text-style-name="P37" draw:layer="layout" svg:width="1.905cm" svg:height="1.75cm" svg:x="21.59cm" svg:y="6.07cm">
          <text:p text:style-name="P36"><text:span text:style-name="T18">Dst</text:span></text:p>
          <text:p text:style-name="P36"><text:span text:style-name="T18">Port</text:span></text:p>
          <draw:enhanced-geometry svg:viewBox="0 0 21600 21600" draw:type="rectangle" draw:enhanced-path="M 0 0 L 21600 0 21600 21600 0 21600 0 0 Z N"/>
        </draw:custom-shape>
        <draw:custom-shape draw:style-name="gr68" draw:text-style-name="P37" draw:layer="layout" svg:width="1.905cm" svg:height="1.75cm" svg:x="13.97cm" svg:y="6.07cm">
          <text:p text:style-name="P36"><text:span text:style-name="T18">Src</text:span></text:p>
          <text:p text:style-name="P36"><text:span text:style-name="T18">Addr</text:span></text:p>
          <draw:enhanced-geometry svg:viewBox="0 0 21600 21600" draw:type="rectangle" draw:enhanced-path="M 0 0 L 21600 0 21600 21600 0 21600 0 0 Z N"/>
        </draw:custom-shape>
        <draw:custom-shape draw:style-name="gr68" draw:text-style-name="P37" draw:layer="layout" svg:width="1.905cm" svg:height="1.75cm" svg:x="19.685cm" svg:y="6.07cm">
          <text:p text:style-name="P36"><text:span text:style-name="T18">Src</text:span></text:p>
          <text:p text:style-name="P36"><text:span text:style-name="T18">Port</text:span></text:p>
          <draw:enhanced-geometry svg:viewBox="0 0 21600 21600" draw:type="rectangle" draw:enhanced-path="M 0 0 L 21600 0 21600 21600 0 21600 0 0 Z N"/>
        </draw:custom-shape>
        <draw:custom-shape draw:style-name="gr68" draw:text-style-name="P37" draw:layer="layout" svg:width="1.905cm" svg:height="1.75cm" svg:x="12.065cm" svg:y="6.07cm">
          <text:p text:style-name="P36"><text:span text:style-name="T18">...</text:span></text:p>
          <draw:enhanced-geometry svg:viewBox="0 0 21600 21600" draw:type="rectangle" draw:enhanced-path="M 0 0 L 21600 0 21600 21600 0 21600 0 0 Z N"/>
        </draw:custom-shape>
        <draw:custom-shape draw:style-name="gr68" draw:text-style-name="P37" draw:layer="layout" svg:width="1.905cm" svg:height="1.75cm" svg:x="23.495cm" svg:y="6.07cm">
          <text:p text:style-name="P36"><text:span text:style-name="T18">...</text:span></text:p>
          <draw:enhanced-geometry svg:viewBox="0 0 21600 21600" draw:type="rectangle" draw:enhanced-path="M 0 0 L 21600 0 21600 21600 0 21600 0 0 Z N"/>
        </draw:custom-shape>
        <draw:custom-shape draw:style-name="gr68" draw:text-style-name="P37" draw:layer="layout" svg:width="1.905cm" svg:height="1.75cm" svg:x="17.78cm" svg:y="6.07cm">
          <text:p text:style-name="P36"><text:span text:style-name="T18">...</text:span></text:p>
          <draw:enhanced-geometry svg:viewBox="0 0 21600 21600" draw:type="rectangle" draw:enhanced-path="M 0 0 L 21600 0 21600 21600 0 21600 0 0 Z N"/>
        </draw:custom-shape>
        <draw:line draw:style-name="gr69" draw:text-style-name="P9" draw:layer="layout" svg:x1="8.25cm" svg:y1="6.07cm" svg:x2="8.25cm" svg:y2="7.82cm">
          <text:p/>
        </draw:line>
        <draw:line draw:style-name="gr69" draw:text-style-name="P9" draw:layer="layout" svg:x1="19.65cm" svg:y1="6.07cm" svg:x2="19.65cm" svg:y2="7.82cm">
          <text:p/>
        </draw:line>
        <draw:custom-shape draw:style-name="gr70" draw:text-style-name="P9" draw:layer="layout" svg:width="0.635cm" svg:height="5.722cm" draw:transform="rotate (1.57236712312169) translate (2.534cm 5.80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right $1" draw:handle-position-x="right" draw:handle-position-y="$1"/>
          </draw:enhanced-geometry>
        </draw:custom-shape>
        <draw:custom-shape draw:style-name="gr71" draw:text-style-name="P9" draw:layer="layout" svg:width="0.635cm" svg:height="11.351cm" draw:transform="rotate (1.57236712312169) translate (8.335cm 5.83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right $1" draw:handle-position-x="right" draw:handle-position-y="$1"/>
          </draw:enhanced-geometry>
        </draw:custom-shape>
        <draw:custom-shape draw:style-name="gr72" draw:text-style-name="P9" draw:layer="layout" svg:width="0.635cm" svg:height="5.701cm" draw:transform="rotate (1.57236712312169) translate (19.686cm 5.85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right $1" draw:handle-position-x="right" draw:handle-position-y="$1"/>
          </draw:enhanced-geometry>
        </draw:custom-shape>
        <draw:frame draw:style-name="gr73" draw:text-style-name="P43" draw:layer="layout" svg:width="2.389cm" svg:height="1.801cm" svg:x="4.2cm" svg:y="3.175cm">
          <draw:text-box>
            <text:p text:style-name="P7"><text:span text:style-name="T9">ETH</text:span></text:p>
            <text:p text:style-name="P7"><text:span text:style-name="T9">Header</text:span></text:p>
          </draw:text-box>
        </draw:frame>
        <draw:frame draw:style-name="gr73" draw:text-style-name="P43" draw:layer="layout" svg:width="2.389cm" svg:height="1.801cm" svg:x="12.801cm" svg:y="3.176cm">
          <draw:text-box>
            <text:p text:style-name="P7"><text:span text:style-name="T9">IP</text:span></text:p>
            <text:p text:style-name="P7"><text:span text:style-name="T9">Header</text:span></text:p>
          </draw:text-box>
        </draw:frame>
        <draw:frame draw:style-name="gr73" draw:text-style-name="P43" draw:layer="layout" svg:width="2.389cm" svg:height="1.801cm" svg:x="21.302cm" svg:y="3.177cm">
          <draw:text-box>
            <text:p text:style-name="P7"><text:span text:style-name="T9">UDP</text:span></text:p>
            <text:p text:style-name="P7"><text:span text:style-name="T9">Header</text:span></text:p>
          </draw:text-box>
        </draw:frame>
        <presentation:notes draw:style-name="dp2">
          <draw:page-thumbnail draw:style-name="gr19" draw:layer="layout" svg:width="0.001cm" svg:height="0.001cm" svg:x="0cm" svg:y="2.123cm" draw:page-number="7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aster1-Layout2-obj-Title-and-Content">
        <draw:frame draw:style-name="gr20" draw:text-style-name="P9" draw:layer="layout" svg:width="3.122cm" svg:height="1.385cm" svg:x="24.765cm" svg:y="4.445cm">
          <draw:image xlink:href="Pictures/10000001000001370000008A3032A3C2.png" xlink:type="simple" xlink:show="embed" xlink:actuate="onLoad" draw:mime-type="image/png">
            <text:p/>
          </draw:image>
        </draw:frame>
        <draw:frame draw:style-name="gr20" draw:text-style-name="P9" draw:layer="layout" svg:width="3.122cm" svg:height="1.385cm" svg:x="5.133cm" svg:y="4.445cm">
          <draw:image xlink:href="Pictures/10000001000001370000008A3032A3C2.png" xlink:type="simple" xlink:show="embed" xlink:actuate="onLoad" draw:mime-type="image/png">
            <text:p/>
          </draw:image>
        </draw:frame>
        <draw:line draw:style-name="gr74" draw:text-style-name="P9" draw:layer="layout" svg:x1="8.255cm" svg:y1="8.255cm" svg:x2="6.35cm" svg:y2="5.715cm">
          <text:p/>
        </draw:line>
        <draw:line draw:style-name="gr74" draw:text-style-name="P9" draw:layer="layout" svg:x1="22.86cm" svg:y1="8.89cm" svg:x2="10.16cm" svg:y2="8.89cm">
          <text:p/>
        </draw:line>
        <draw:custom-shape draw:style-name="gr75" draw:text-style-name="P44" draw:layer="layout" svg:width="2.54cm" svg:height="2.54cm" svg:x="7.62cm" svg:y="7.385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position-x="$0" draw:handle-position-y="top" draw:handle-range-x-minimum="0" draw:handle-range-x-maximum="10800"/>
          </draw:enhanced-geometry>
        </draw:custom-shape>
        <draw:custom-shape draw:style-name="gr75" draw:text-style-name="P44" draw:layer="layout" svg:width="2.54cm" svg:height="2.54cm" svg:x="15.24cm" svg:y="7.385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position-x="$0" draw:handle-position-y="top" draw:handle-range-x-minimum="0" draw:handle-range-x-maximum="10800"/>
          </draw:enhanced-geometry>
        </draw:custom-shape>
        <draw:line draw:style-name="gr74" draw:text-style-name="P9" draw:layer="layout" svg:x1="24.765cm" svg:y1="8.155cm" svg:x2="26.035cm" svg:y2="5.73cm">
          <text:p/>
        </draw:line>
        <draw:custom-shape draw:style-name="gr75" draw:text-style-name="P44" draw:layer="layout" svg:width="2.54cm" svg:height="2.54cm" svg:x="22.86cm" svg:y="7.385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position-x="$0" draw:handle-position-y="top" draw:handle-range-x-minimum="0" draw:handle-range-x-maximum="10800"/>
          </draw:enhanced-geometry>
        </draw:custom-shape>
        <draw:frame draw:style-name="gr76" draw:text-style-name="P45" draw:layer="layout" svg:width="2.322cm" svg:height="0.941cm" svg:x="7.838cm" svg:y="8.289cm">
          <draw:text-box>
            <text:p><text:span text:style-name="T18">ROADM</text:span></text:p>
          </draw:text-box>
        </draw:frame>
        <draw:frame draw:style-name="gr76" draw:text-style-name="P45" draw:layer="layout" svg:width="2.322cm" svg:height="0.941cm" svg:x="15.438cm" svg:y="8.29cm">
          <draw:text-box>
            <text:p><text:span text:style-name="T18">ROADM</text:span></text:p>
          </draw:text-box>
        </draw:frame>
        <draw:frame draw:style-name="gr76" draw:text-style-name="P45" draw:layer="layout" svg:width="2.322cm" svg:height="0.941cm" svg:x="23.038cm" svg:y="8.291cm">
          <draw:text-box>
            <text:p><text:span text:style-name="T18">ROADM</text:span></text:p>
          </draw:text-box>
        </draw:frame>
        <draw:line draw:style-name="gr77" draw:text-style-name="P7" draw:layer="layout" svg:x1="6.485cm" svg:y1="3.175cm" svg:x2="6.485cm" svg:y2="4.48cm">
          <text:p/>
        </draw:line>
        <draw:frame draw:style-name="gr76" draw:text-style-name="P47" draw:layer="layout" svg:width="2.431cm" svg:height="1.026cm" svg:x="5.408cm" svg:y="2.234cm">
          <draw:text-box>
            <text:p text:style-name="P46"><text:span text:style-name="T17">Packets</text:span></text:p>
          </draw:text-box>
        </draw:frame>
        <draw:line draw:style-name="gr77" draw:text-style-name="P7" draw:layer="layout" svg:x1="26.285cm" svg:y1="3.175cm" svg:x2="26.285cm" svg:y2="4.48cm">
          <text:p/>
        </draw:line>
        <draw:frame draw:style-name="gr76" draw:text-style-name="P47" draw:layer="layout" svg:width="2.431cm" svg:height="1.026cm" svg:x="25.208cm" svg:y="2.234cm">
          <draw:text-box>
            <text:p text:style-name="P46"><text:span text:style-name="T17">Packets</text:span></text:p>
          </draw:text-box>
        </draw:frame>
        <draw:ellipse draw:style-name="gr78" draw:text-style-name="P7" draw:layer="layout" svg:width="19.053cm" svg:height="2.54cm" draw:transform="rotate (-3.14141812066459) translate (25.703cm 6.983cm)" draw:kind="arc" draw:start-angle="357.91" draw:end-angle="178.59">
          <text:p/>
        </draw:ellipse>
        <draw:frame draw:style-name="gr76" draw:text-style-name="P13" draw:layer="layout" svg:width="7.149cm" svg:height="1.026cm" svg:x="12.377cm" svg:y="5.715cm">
          <draw:text-box>
            <text:p text:style-name="P48"><text:span text:style-name="T9">End-to-End Optical Circuit</text:span></text:p>
          </draw:text-box>
        </draw:frame>
        <presentation:notes draw:style-name="dp2">
          <draw:page-thumbnail draw:style-name="gr19" draw:layer="layout" svg:width="0.001cm" svg:height="0.001cm" svg:x="0cm" svg:y="2.123cm" draw:page-number="8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Calibri" svg:font-family="Calibri"/>
    <style:font-face style:name="Calibri Light" svg:font-family="'Calibri Light'"/>
    <style:font-face style:name="Calibri1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366" svg:viewBox="0 0 20 30" svg:d="M10 0l-10 30h20z"/>
    <draw:marker draw:name="a367" svg:viewBox="0 0 20 30" svg:d="M10 0l-10 30h20z"/>
    <draw:marker draw:name="a369" svg:viewBox="0 0 20 30" svg:d="M10 0l-10 30h20z"/>
    <draw:marker draw:name="a370" svg:viewBox="0 0 20 30" svg:d="M10 0l-10 30h20z"/>
    <draw:marker draw:name="a372" svg:viewBox="0 0 20 30" svg:d="M10 0l-10 30h20z"/>
    <draw:marker draw:name="a373" svg:viewBox="0 0 20 30" svg:d="M10 0l-10 30h20z"/>
    <draw:marker draw:name="a384" svg:viewBox="0 0 20 30" svg:d="M10 0l-10 30h20z"/>
    <draw:marker draw:name="a385" svg:viewBox="0 0 20 30" svg:d="M10 0l-10 30h20z"/>
    <draw:marker draw:name="a413" svg:viewBox="0 0 20 30" svg:d="M10 0l-10 30h20z"/>
    <draw:marker draw:name="a414" svg:viewBox="0 0 20 30" svg:d="M10 0l-10 30h20z"/>
    <draw:marker draw:name="a416" svg:viewBox="0 0 20 30" svg:d="M10 0l-10 30h20z"/>
    <draw:marker draw:name="a417" svg:viewBox="0 0 20 30" svg:d="M10 0l-10 30h20z"/>
    <draw:marker draw:name="a419" svg:viewBox="0 0 20 30" svg:d="M10 0l-10 30h20z"/>
    <draw:marker draw:name="a420" svg:viewBox="0 0 20 30" svg:d="M10 0l-10 30h20z"/>
    <draw:marker draw:name="a422" svg:viewBox="0 0 20 30" svg:d="M10 0l-10 30h20z"/>
    <draw:marker draw:name="a423" svg:viewBox="0 0 20 30" svg:d="M10 0l-10 30h20z"/>
    <draw:marker draw:name="a425" svg:viewBox="0 0 20 30" svg:d="M10 0l-10 30h20z"/>
    <draw:marker draw:name="a426" svg:viewBox="0 0 20 30" svg:d="M10 0l-10 30h20z"/>
    <draw:marker draw:name="a434" svg:viewBox="0 0 20 30" svg:d="M10 0l-10 30h20z"/>
    <draw:marker draw:name="a435" svg:viewBox="0 0 20 30" svg:d="M10 0l-10 30h20z"/>
    <draw:stroke-dash draw:name="Dot_20__28_Rounded_29_" draw:display-name="Dot (Rounded)" draw:style="round" draw:dots1="1" draw:dots1-length="1%" draw:distance="199%"/>
    <draw:stroke-dash draw:name="Long_20_Dot" draw:display-name="Long Dot" draw:style="rect" draw:dots1="1" draw:dots1-length="100%" draw:distance="300%"/>
    <draw:stroke-dash draw:name="Long_20_Dot_20__28_Rounded_29_" draw:display-name="Long Dot (Rounded)" draw:style="round" draw:dots1="1" draw:dots1-length="1%" draw:distance="399%"/>
    <style:default-style style:family="graphic">
      <style:graphic-properties draw:stroke="solid" svg:stroke-width="0.053cm" svg:stroke-color="#042433" draw:stroke-linejoin="miter" svg:stroke-linecap="butt" draw:fill-color="#156082" fo:wrap-option="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2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Master1-Office-Them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 loext:decorative="false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P6" style:family="paragraph">
      <loext:graphic-properties draw:fill="none"/>
      <style:paragraph-properties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Office-Them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Placeholder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6-01-26">1/26/26</text:date></text:span></text:p>
        </draw:text-box>
      </draw:frame>
      <draw:frame draw:name="Footer Placehold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Office-Theme-title" draw:layer="backgroundobjects" svg:width="18.624cm" svg:height="10.476cm" svg:x="1.482cm" svg:y="2.123cm" presentation:class="page"/>
        <draw:frame presentation:style-name="Master1-Office-Them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7" draw:text-style-name="MP6" draw:layer="backgroundobjects" svg:width="25.4cm" svg:height="6.632cm" svg:x="4.233cm" svg:y="3.118cm" presentation:class="title">
        <draw:text-box>
          <text:p text:style-name="MP14"><text:span text:style-name="MT8">Click to edit Master title style</text:span></text:p>
        </draw:text-box>
      </draw:frame>
      <draw:frame draw:name="Subtitle 2" presentation:style-name="Mpr8" draw:text-style-name="MP6" draw:layer="backgroundobjects" svg:width="25.4cm" svg:height="4.599cm" svg:x="4.233cm" svg:y="10.006cm" presentation:class="subtitle">
        <draw:text-box>
          <text:p text:style-name="MP15"><text:span text:style-name="MT4">Click to edit Master subtitle style</text:span></text:p>
        </draw:text-box>
      </draw:frame>
      <draw:frame draw:name="Date Placeholder 3" presentation:style-name="Mpr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6-01-26">1/26/26</text:date></text:span></text:p>
        </draw:text-box>
      </draw:frame>
      <draw:frame draw:name="Footer Placeholder 4" presentation:style-name="Mpr1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.001cm" svg:height="0.001cm" svg:x="0cm" svg:y="2.123cm" presentation:class="page"/>
        <draw:frame presentation:style-name="Master1-Layout1-title-Title-Slid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3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4" draw:text-style-name="MP6" draw:layer="backgroundobjects" svg:width="29.21cm" svg:height="12.087cm" svg:x="2.328cm" svg:y="5.071cm" presentation:class="title">
        <draw:text-box>
          <text:list text:style-name="ML4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6-01-26">1/26/26</text:date></text:span></text:p>
        </draw:text-box>
      </draw:frame>
      <draw:frame draw:name="Footer Placeholder 4" presentation:style-name="Mpr1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itle-and-Content-title" draw:layer="backgroundobjects" svg:width="0.001cm" svg:height="0.001cm" svg:x="0cm" svg:y="2.123cm" presentation:class="page"/>
        <draw:frame presentation:style-name="Master1-Layout2-obj-Title-and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9" draw:text-style-name="MP6" draw:layer="backgroundobjects" svg:width="29.21cm" svg:height="7.924cm" svg:x="2.311cm" svg:y="4.749cm" presentation:class="title">
        <draw:text-box>
          <text:p text:style-name="MP5"><text:span text:style-name="MT8">Click to edit Master title style</text:span></text:p>
        </draw:text-box>
      </draw:frame>
      <draw:frame draw:name="Text Placeholder 2" presentation:style-name="Mpr20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16"><text:span text:style-name="MT9">Click to edit Master text styles</text:span></text:p>
            </text:list-item>
          </text:list>
        </draw:text-box>
      </draw:frame>
      <draw:frame draw:name="Date Placeholder 3" presentation:style-name="Mpr2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6-01-26">1/26/26</text:date></text:span></text:p>
        </draw:text-box>
      </draw:frame>
      <draw:frame draw:name="Footer Placeholder 4" presentation:style-name="Mpr2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.001cm" svg:height="0.001cm" svg:x="0cm" svg:y="2.123cm" presentation:class="page"/>
        <draw:frame presentation:style-name="Master1-Layout3-secHead-Section-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25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6" draw:text-style-name="MP6" draw:layer="backgroundobjects" svg:width="14.393cm" svg:height="12.087cm" svg:x="2.328cm" svg:y="5.071cm" presentation:class="title">
        <draw:text-box>
          <text:list text:style-name="ML4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6" draw:layer="backgroundobjects" svg:width="14.393cm" svg:height="12.087cm" svg:x="17.145cm" svg:y="5.071cm" presentation:class="title">
        <draw:text-box>
          <text:list text:style-name="ML4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6-01-26">1/26/26</text:date></text:span></text:p>
        </draw:text-box>
      </draw:frame>
      <draw:frame draw:name="Footer Placeholder 5" presentation:style-name="Mpr2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2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.001cm" svg:height="0.001cm" svg:x="0cm" svg:y="2.123cm" presentation:class="page"/>
        <draw:frame presentation:style-name="Master1-Layout4-twoObj-Two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1" draw:text-style-name="MP6" draw:layer="backgroundobjects" svg:width="29.21cm" svg:height="3.682cm" svg:x="2.333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2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16"><text:span text:style-name="MT10">Click to edit Master text styles</text:span></text:p>
            </text:list-item>
          </text:list>
        </draw:text-box>
      </draw:frame>
      <draw:frame draw:name="Content Placeholder 3" presentation:style-name="Mpr33" draw:text-style-name="MP6" draw:layer="backgroundobjects" svg:width="14.327cm" svg:height="10.235cm" svg:x="2.333cm" svg:y="6.959cm" presentation:class="title">
        <draw:text-box>
          <text:list text:style-name="ML4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2" draw:text-style-name="MP6" draw:layer="backgroundobjects" svg:width="14.398cm" svg:height="2.289cm" svg:x="17.145cm" svg:y="4.67cm" presentation:class="outline">
        <draw:text-box>
          <text:list text:style-name="ML5">
            <text:list-item>
              <text:p text:style-name="MP16"><text:span text:style-name="MT10">Click to edit Master text styles</text:span></text:p>
            </text:list-item>
          </text:list>
        </draw:text-box>
      </draw:frame>
      <draw:frame draw:name="Content Placeholder 5" presentation:style-name="Mpr33" draw:text-style-name="MP6" draw:layer="backgroundobjects" svg:width="14.398cm" svg:height="10.235cm" svg:x="17.145cm" svg:y="6.959cm" presentation:class="title">
        <draw:text-box>
          <text:list text:style-name="ML4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6-01-26">1/26/26</text:date></text:span></text:p>
        </draw:text-box>
      </draw:frame>
      <draw:frame draw:name="Footer Placeholder 7" presentation:style-name="Mpr3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.001cm" svg:height="0.001cm" svg:x="0cm" svg:y="2.123cm" presentation:class="page"/>
        <draw:frame presentation:style-name="Master1-Layout5-twoTxTwoObj-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8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6-01-26">1/26/26</text:date></text:span></text:p>
        </draw:text-box>
      </draw:frame>
      <draw:frame draw:name="Footer Placeholder 3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.001cm" svg:height="0.001cm" svg:x="0cm" svg:y="2.123cm" presentation:class="page"/>
        <draw:frame presentation:style-name="Master1-Layout6-titleOnly-Title-Only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Date Placeholder 1" presentation:style-name="Mpr4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6-01-26">1/26/26</text:date></text:span></text:p>
        </draw:text-box>
      </draw:frame>
      <draw:frame draw:name="Footer Placeholder 2" presentation:style-name="Mpr4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4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9cm" svg:height="3.18cm" svg:x="1.693cm" svg:y="0.76cm" presentation:class="title" presentation:placeholder="true">
        <draw:text-box/>
      </draw:frame>
      <draw:frame presentation:style-name="Master1-Layout7-blank-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7-blank-Blank-title" draw:layer="backgroundobjects" svg:width="0.001cm" svg:height="0.001cm" svg:x="0cm" svg:y="2.123cm" presentation:class="page"/>
        <draw:frame presentation:style-name="Master1-Layout7-blank-Blank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47" draw:text-style-name="MP6" draw:layer="backgroundobjects" svg:width="10.923cm" svg:height="4.445cm" svg:x="2.333cm" svg:y="1.27cm" presentation:class="titl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48" draw:text-style-name="MP6" draw:layer="backgroundobjects" svg:width="17.145cm" svg:height="13.538cm" svg:x="14.398cm" svg:y="2.743cm" presentation:class="title">
        <draw:text-box>
          <text:list text:style-name="ML4">
            <text:list-item>
              <text:p text:style-name="MP7"><text:span text:style-name="MT1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9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Click to edit Master text styles</text:span></text:p>
            </text:list-item>
          </text:list>
        </draw:text-box>
      </draw:frame>
      <draw:frame draw:name="Date Placeholder 4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6-01-26">1/26/26</text:date></text:span></text:p>
        </draw:text-box>
      </draw:frame>
      <draw:frame draw:name="Footer Placeholder 5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.001cm" svg:height="0.001cm" svg:x="0cm" svg:y="2.123cm" presentation:class="page"/>
        <draw:frame presentation:style-name="Master1-Layout8-objTx-Content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54" draw:text-style-name="MP6" draw:layer="backgroundobjects" svg:width="10.923cm" svg:height="4.445cm" svg:x="2.333cm" svg:y="1.27cm" presentation:class="title">
        <draw:text-box>
          <text:p text:style-name="MP5"><text:span text:style-name="MT11">Click to edit Master title style</text:span></text:p>
        </draw:text-box>
      </draw:frame>
      <draw:frame draw:name="Picture Placeholder 2" presentation:style-name="Mpr55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56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Click to edit Master text styles</text:span></text:p>
            </text:list-item>
          </text:list>
        </draw:text-box>
      </draw:frame>
      <draw:frame draw:name="Date Placeholder 4" presentation:style-name="Mpr5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6-01-26">1/26/26</text:date></text:span></text:p>
        </draw:text-box>
      </draw:frame>
      <draw:frame draw:name="Footer Placeholder 5" presentation:style-name="Mpr5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.001cm" svg:height="0.001cm" svg:x="0cm" svg:y="2.123cm" presentation:class="page"/>
        <draw:frame presentation:style-name="Master1-Layout9-picTx-Picture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61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6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6-01-26">1/26/26</text:date></text:span></text:p>
        </draw:text-box>
      </draw:frame>
      <draw:frame draw:name="Footer Placeholder 4" presentation:style-name="Mpr6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.001cm" svg:height="0.001cm" svg:x="0cm" svg:y="2.123cm" presentation:class="page"/>
        <draw:frame presentation:style-name="Master1-Layout10-vertTx-Title-and-Vertical-Text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Vertical Title 1" presentation:style-name="Mpr67" draw:text-style-name="MP6" draw:layer="backgroundobjects" svg:width="7.302cm" svg:height="16.144cm" svg:x="24.236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68" draw:text-style-name="MP6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6-01-26">1/26/26</text:date></text:span></text:p>
        </draw:text-box>
      </draw:frame>
      <draw:frame draw:name="Footer Placeholder 4" presentation:style-name="Mpr7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.001cm" svg:height="0.001cm" svg:x="0cm" svg:y="2.123cm" presentation:class="page"/>
        <draw:frame presentation:style-name="Master1-Layout11-vertTitleAndTx-Vertical-Title-and-Text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4.3$MacOSX_AARCH64 LibreOffice_project/33e196637044ead23f5c3226cde09b47731f7e27</meta:generator>
    <dc:title>PowerPoint Presentation</dc:title>
    <meta:initial-creator>Microsoft Office User</meta:initial-creator>
    <meta:creation-date>2018-11-06T15:34:59Z</meta:creation-date>
    <dc:date>2026-01-26T13:38:35.726306000</dc:date>
    <meta:editing-cycles>47</meta:editing-cycles>
    <meta:editing-duration>P1DT1H25M27S</meta:editing-duration>
    <meta:print-date>2026-01-09T15:48:17.863329000</meta:print-date>
    <meta:printed-by>PDF files</meta:printed-by>
    <meta:document-statistic meta:object-count="342"/>
  </office:meta>
</office:document-meta>
</file>