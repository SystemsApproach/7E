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6a99d0" draw:marker-start="" draw:marker-start-width="0.381cm" draw:marker-end="Arrow_20_short" draw:marker-end-width="0.381cm" draw:fill="solid" draw:fill-color="#ffffff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0.993cm" fo:min-width="1.406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-width="0.279cm" draw:marker-end="Arrow_20_short" draw:marker-end-width="0.356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svg:stroke-color="#000000" draw:marker-start="Arrow_20_short" draw:marker-start-width="0.356cm" draw:marker-end="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style:font-name="Calibri" fo:font-size="16pt" style:font-size-asian="16pt" style:font-size-complex="16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Calibri" fo:font-size="16pt" style:font-size-asian="16pt" style:font-size-complex="16pt"/>
    </style:style>
    <style:style style:name="P4" style:family="paragraph">
      <style:paragraph-properties fo:line-height="80%" fo:text-align="center"/>
      <style:text-properties style:font-name="Calibri" fo:font-size="16pt" style:font-size-asian="16pt" style:font-size-complex="16pt"/>
    </style:style>
    <style:style style:name="P5" style:family="paragraph">
      <loext:graphic-properties draw:fill="solid" draw:fill-color="#ffffff"/>
      <style:paragraph-properties fo:line-height="80%" fo:text-align="center" style:writing-mode="lr-tb"/>
      <style:text-properties style:font-name="Calibri" fo:font-size="16pt" style:font-size-asian="16pt" style:font-size-complex="16pt"/>
    </style:style>
    <style:style style:name="P6" style:family="paragraph">
      <style:text-properties style:font-name="Calibri" fo:font-size="14pt" style:font-size-asian="14pt" style:font-size-complex="14pt"/>
    </style:style>
    <style:style style:name="P7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Calibri" fo:font-size="16pt" style:font-size-asian="16pt" style:font-size-complex="16pt"/>
    </style:style>
    <style:style style:name="P10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P11" style:family="paragraph">
      <style:paragraph-properties fo:margin-top="0.42cm" fo:margin-bottom="0.35cm"/>
      <style:text-properties fo:font-size="14pt" style:font-size-asian="14pt" style:font-size-complex="14pt"/>
    </style:style>
    <style:style style:name="P12" style:family="paragraph">
      <loext:graphic-properties draw:fill-color="#ffffff"/>
    </style:style>
    <style:style style:name="T1" style:family="text">
      <style:text-properties style:font-name="Calibri" fo:font-size="16pt" style:font-size-asian="16pt" style:font-size-complex="16pt"/>
    </style:style>
    <style:style style:name="T2" style:family="text">
      <style:text-properties style:font-name="Calibri"/>
    </style:style>
    <style:style style:name="T3" style:family="text">
      <style:text-properties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9.292cm" svg:y1="10.663cm" svg:x2="9.292cm" svg:y2="12.963cm">
          <text:p/>
        </draw:line>
        <draw:line draw:style-name="gr1" draw:text-style-name="P1" draw:layer="layout" svg:x1="9.292cm" svg:y1="7.529cm" svg:x2="9.292cm" svg:y2="9.829cm">
          <text:p/>
        </draw:line>
        <draw:line draw:style-name="gr1" draw:text-style-name="P1" draw:layer="layout" svg:x1="9.292cm" svg:y1="4.425cm" svg:x2="9.292cm" svg:y2="6.725cm">
          <text:p/>
        </draw:line>
        <draw:custom-shape draw:style-name="gr2" draw:text-style-name="P3" draw:layer="layout" svg:width="1.956cm" svg:height="1.293cm" svg:x="8.314cm" svg:y="12.963cm">
          <text:p text:style-name="P2"><text:span text:style-name="T1">ET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56cm" svg:height="1.293cm" svg:x="8.314cm" svg:y="9.829cm">
          <text:p text:style-name="P2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56cm" svg:height="1.293cm" svg:x="8.314cm" svg:y="6.725cm">
          <text:p text:style-name="P2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56cm" svg:height="1.293cm" svg:x="2.422cm" svg:y="3.47cm">
          <text:p text:style-name="P2"><text:span text:style-name="T2">DN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956cm" svg:height="1.293cm" svg:x="8.314cm" svg:y="3.52cm">
          <text:p text:style-name="P4"><text:span text:style-name="T2">Mail</text:span></text:p>
          <text:p text:style-name="P4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56cm" svg:height="1.293cm" svg:x="2.422cm" svg:y="9.826cm">
          <text:p text:style-name="P2"><text:span text:style-name="T1">ARP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92cm" svg:y1="2.388cm" svg:x2="9.292cm" svg:y2="3.52cm">
          <text:p/>
        </draw:line>
        <draw:frame draw:style-name="gr3" draw:text-style-name="P7" draw:layer="layout" svg:width="5.089cm" svg:height="0.852cm" svg:x="6.709cm" svg:y="1.483cm">
          <draw:text-box>
            <text:p text:style-name="P6"><text:span text:style-name="T3">bob@cs.princeton.edu</text:span></text:p>
          </draw:text-box>
        </draw:frame>
        <draw:line draw:style-name="gr4" draw:text-style-name="P8" draw:layer="layout" svg:x1="8.339cm" svg:y1="3.819cm" svg:x2="4.403cm" svg:y2="3.819cm">
          <text:p/>
        </draw:line>
        <draw:line draw:style-name="gr5" draw:text-style-name="P8" draw:layer="layout" svg:x1="8.339cm" svg:y1="4.419cm" svg:x2="4.403cm" svg:y2="4.419cm">
          <text:p/>
        </draw:line>
        <draw:frame draw:style-name="gr3" draw:text-style-name="P10" draw:layer="layout" svg:width="3.865cm" svg:height="0.852cm" svg:x="4.439cm" svg:y="2.968cm">
          <draw:text-box>
            <text:p text:style-name="P9"><text:span text:style-name="T3">cs.princeton.edu</text:span></text:p>
          </draw:text-box>
        </draw:frame>
        <draw:frame draw:style-name="gr3" draw:text-style-name="P10" draw:layer="layout" svg:width="3.638cm" svg:height="0.852cm" svg:x="4.552cm" svg:y="4.368cm">
          <draw:text-box>
            <text:p text:style-name="P9"><text:span text:style-name="T3">128.112.155.72</text:span></text:p>
          </draw:text-box>
        </draw:frame>
        <draw:frame draw:style-name="gr3" draw:text-style-name="P10" draw:layer="layout" svg:width="3.638cm" svg:height="0.852cm" svg:x="9.301cm" svg:y="5.268cm">
          <draw:text-box>
            <text:p text:style-name="P9"><text:span text:style-name="T3">128.112.155.72</text:span></text:p>
          </draw:text-box>
        </draw:frame>
        <draw:frame draw:style-name="gr3" draw:text-style-name="P10" draw:layer="layout" svg:width="3.638cm" svg:height="0.852cm" svg:x="9.301cm" svg:y="8.368cm">
          <draw:text-box>
            <text:p text:style-name="P9"><text:span text:style-name="T3">128.112.155.72</text:span></text:p>
          </draw:text-box>
        </draw:frame>
        <draw:line draw:style-name="gr4" draw:text-style-name="P8" draw:layer="layout" svg:x1="8.322cm" svg:y1="10.119cm" svg:x2="4.386cm" svg:y2="10.119cm">
          <text:p/>
        </draw:line>
        <draw:line draw:style-name="gr5" draw:text-style-name="P8" draw:layer="layout" svg:x1="8.322cm" svg:y1="10.719cm" svg:x2="4.386cm" svg:y2="10.719cm">
          <text:p/>
        </draw:line>
        <draw:frame draw:style-name="gr3" draw:text-style-name="P10" draw:layer="layout" svg:width="3.638cm" svg:height="0.852cm" svg:x="4.535cm" svg:y="9.268cm">
          <draw:text-box>
            <text:p text:style-name="P9"><text:span text:style-name="T3">128.112.155.72</text:span></text:p>
          </draw:text-box>
        </draw:frame>
        <draw:frame draw:style-name="gr3" draw:text-style-name="P7" draw:layer="layout" svg:width="4.105cm" svg:height="0.852cm" svg:x="4.302cm" svg:y="10.768cm">
          <draw:text-box>
            <text:p text:style-name="P11"><text:span text:style-name="T3">40:4d:7f:b5:72:b0</text:span></text:p>
          </draw:text-box>
        </draw:frame>
        <draw:frame draw:style-name="gr3" draw:text-style-name="P7" draw:layer="layout" svg:width="4.105cm" svg:height="0.852cm" svg:x="9.303cm" svg:y="11.468cm">
          <draw:text-box>
            <text:p text:style-name="P11"><text:span text:style-name="T3">40:4d:7f:b5:72:b0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5:00:22.541555000</meta:creation-date>
    <dc:date>2026-04-27T14:22:23.388462000</dc:date>
    <meta:editing-duration>P4DT21H32M51S</meta:editing-duration>
    <meta:editing-cycles>34</meta:editing-cycles>
    <meta:generator>LibreOffice/25.2.4.3$MacOSX_AARCH64 LibreOffice_project/33e196637044ead23f5c3226cde09b47731f7e27</meta:generator>
    <meta:print-date>2026-01-12T16:44:25.569030000</meta:print-date>
    <meta:printed-by>PDF files</meta:printed-by>
    <meta:document-statistic meta:object-count="45"/>
  </office:meta>
</office:document-meta>
</file>