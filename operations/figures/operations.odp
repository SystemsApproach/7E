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0B2000000B275B3C804.png" manifest:media-type="image/png"/>
  <manifest:file-entry manifest:full-path="Pictures/1000110400000DE200000DE28B6D5E81.svg" manifest:media-type="image/svg+xml"/>
  <manifest:file-entry manifest:full-path="Pictures/100000010000053D000003B1B3F0749D.png" manifest:media-type="image/png"/>
  <manifest:file-entry manifest:full-path="Pictures/10004B2B000068C4000049D48AB69D38.pdf" manifest:media-type="application/pdf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ptos" svg:font-family="Aptos"/>
    <style:font-face style:name="Calibri" svg:font-family="Calibri" style:font-family-generic="swiss" style:font-pitch="variable"/>
    <style:font-face style:name="Calibri1" svg:font-family="Calibri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SysDot" svg:stroke-width="0.053cm" svg:stroke-color="#5b9bd5" draw:marker-end="a745" svg:stroke-opacity="100%" draw:stroke-linejoin="miter" svg:stroke-linecap="butt" draw:fill="none" fo:padding-top="0.151cm" fo:padding-bottom="0.151cm" fo:padding-left="0.276cm" fo:padding-right="0.276cm" loext:decorative="false"/>
    </style:style>
    <style:style style:name="gr2" style:family="graphic" style:parent-style-name="standard">
      <style:graphic-properties draw:stroke="dash" draw:stroke-dash="SysDot" svg:stroke-width="0.053cm" svg:stroke-color="#5b9bd5" draw:marker-end="a756" svg:stroke-opacity="100%" draw:stroke-linejoin="miter" svg:stroke-linecap="butt" draw:fill="none" fo:padding-top="0.151cm" fo:padding-bottom="0.151cm" fo:padding-left="0.276cm" fo:padding-right="0.276cm" loext:decorative="false"/>
    </style:style>
    <style:style style:name="gr3" style:family="graphic" style:parent-style-name="standard">
      <style:graphic-properties draw:stroke="dash" draw:stroke-dash="SysDot" svg:stroke-width="0.053cm" svg:stroke-color="#5b9bd5" draw:marker-end="a762" svg:stroke-opacity="100%" draw:stroke-linejoin="miter" svg:stroke-linecap="butt" draw:fill="none" fo:padding-top="0.151cm" fo:padding-bottom="0.151cm" fo:padding-left="0.276cm" fo:padding-right="0.276cm" loext:decorative="false"/>
    </style:style>
    <style:style style:name="gr4" style:family="graphic" style:parent-style-name="standard">
      <style:graphic-properties draw:stroke="solid" svg:stroke-width="0.159cm" svg:stroke-color="#5b9bd5" svg:stroke-opacity="100%" draw:stroke-linejoin="miter" svg:stroke-linecap="butt" draw:fill="solid" draw:fill-color="#deebf7" draw:opacity="100%" draw:textarea-horizontal-align="center" draw:textarea-vertical-align="middle" draw:auto-grow-height="false" draw:auto-grow-width="false" fo:min-height="2.581cm" fo:min-width="15.295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svg:stroke-width="0.079cm" svg:stroke-color="#5b9bd5" svg:stroke-opacity="100%" draw:stroke-linejoin="miter" svg:stroke-linecap="butt" draw:fill="none" fo:padding-top="0.164cm" fo:padding-bottom="0.164cm" fo:padding-left="0.289cm" fo:padding-right="0.289cm" loext:decorative="false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draw:stroke="none" draw:fill="gradient" draw:fill-gradient-name="a854" draw:textarea-horizontal-align="center" draw:textarea-vertical-align="middle" draw:auto-grow-height="false" draw:auto-grow-width="false" fo:min-height="0.118cm" fo:min-width="1.641cm" fo:padding-top="0.127cm" fo:padding-bottom="0.127cm" fo:padding-left="0.254cm" fo:padding-right="0.254cm" fo:wrap-option="wrap" draw:shadow="visible" draw:shadow-offset-x="0.075cm" draw:shadow-offset-y="0.075cm" draw:shadow-color="#000000" draw:shadow-opacity="40%" style:writing-mode="lr-tb" loext:decorative="false"/>
      <style:paragraph-properties style:writing-mode="lr-tb"/>
    </style:style>
    <style:style style:name="gr8" style:family="graphic">
      <style:graphic-properties loext:decorative="false"/>
    </style:style>
    <style:style style:name="gr9" style:family="graphic" style:parent-style-name="standard">
      <style:graphic-properties draw:stroke="solid" svg:stroke-width="0.106cm" svg:stroke-color="#ffffff" draw:marker-end="a862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10" style:family="graphic" style:parent-style-name="standard">
      <style:graphic-properties draw:stroke="solid" svg:stroke-width="0.106cm" svg:stroke-color="#ffffff" draw:marker-end="a864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11" style:family="graphic" style:parent-style-name="standard">
      <style:graphic-properties draw:stroke="solid" svg:stroke-width="0.106cm" svg:stroke-color="#ffffff" draw:marker-end="a858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12" style:family="graphic" style:parent-style-name="standard">
      <style:graphic-properties draw:stroke="solid" svg:stroke-width="0.106cm" svg:stroke-color="#ffffff" draw:marker-end="a860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13" style:family="graphic" style:parent-style-name="standard">
      <style:graphic-properties draw:stroke="solid" svg:stroke-width="0.106cm" svg:stroke-color="#ffffff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14" style:family="graphic" style:parent-style-name="standard">
      <style:graphic-properties draw:stroke="none" draw:fill="gradient" draw:fill-gradient-name="a840" draw:textarea-horizontal-align="center" draw:textarea-vertical-align="middle" draw:auto-grow-height="false" draw:auto-grow-width="false" fo:min-height="0.101cm" fo:min-width="1.673cm" fo:padding-top="0.127cm" fo:padding-bottom="0.127cm" fo:padding-left="0.254cm" fo:padding-right="0.254cm" fo:wrap-option="wrap" draw:shadow="visible" draw:shadow-offset-x="0.075cm" draw:shadow-offset-y="0.075cm" draw:shadow-color="#000000" draw:shadow-opacity="40%" style:writing-mode="lr-tb" loext:decorative="false"/>
      <style:paragraph-properties style:writing-mode="lr-tb"/>
    </style:style>
    <style:style style:name="gr15" style:family="graphic" style:parent-style-name="standard">
      <style:graphic-properties draw:stroke="solid" svg:stroke-width="0.106cm" svg:stroke-color="#ffffff" draw:marker-end="a848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16" style:family="graphic" style:parent-style-name="standard">
      <style:graphic-properties draw:stroke="solid" svg:stroke-width="0.106cm" svg:stroke-color="#ffffff" draw:marker-end="a850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17" style:family="graphic" style:parent-style-name="standard">
      <style:graphic-properties draw:stroke="solid" svg:stroke-width="0.106cm" svg:stroke-color="#ffffff" draw:marker-end="a844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18" style:family="graphic" style:parent-style-name="standard">
      <style:graphic-properties draw:stroke="solid" svg:stroke-width="0.106cm" svg:stroke-color="#ffffff" draw:marker-end="a846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19" style:family="graphic" style:parent-style-name="standard">
      <style:graphic-properties draw:stroke="none" draw:fill="gradient" draw:fill-gradient-name="a826" draw:textarea-horizontal-align="center" draw:textarea-vertical-align="middle" draw:auto-grow-height="false" draw:auto-grow-width="false" fo:min-height="0.111cm" fo:min-width="1.654cm" fo:padding-top="0.127cm" fo:padding-bottom="0.127cm" fo:padding-left="0.254cm" fo:padding-right="0.254cm" fo:wrap-option="wrap" draw:shadow="visible" draw:shadow-offset-x="0.075cm" draw:shadow-offset-y="0.075cm" draw:shadow-color="#000000" draw:shadow-opacity="40%" style:writing-mode="lr-tb" loext:decorative="false"/>
      <style:paragraph-properties style:writing-mode="lr-tb"/>
    </style:style>
    <style:style style:name="gr20" style:family="graphic" style:parent-style-name="standard">
      <style:graphic-properties draw:stroke="solid" svg:stroke-width="0.106cm" svg:stroke-color="#ffffff" draw:marker-end="a834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21" style:family="graphic" style:parent-style-name="standard">
      <style:graphic-properties draw:stroke="solid" svg:stroke-width="0.106cm" svg:stroke-color="#ffffff" draw:marker-end="a836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22" style:family="graphic" style:parent-style-name="standard">
      <style:graphic-properties draw:stroke="solid" svg:stroke-width="0.106cm" svg:stroke-color="#ffffff" draw:marker-end="a830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23" style:family="graphic" style:parent-style-name="standard">
      <style:graphic-properties draw:stroke="solid" svg:stroke-width="0.106cm" svg:stroke-color="#ffffff" draw:marker-end="a832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24" style:family="graphic" style:parent-style-name="standard">
      <style:graphic-properties draw:stroke="none" draw:fill="gradient" draw:fill-gradient-name="a812" draw:textarea-horizontal-align="center" draw:textarea-vertical-align="middle" draw:auto-grow-height="false" draw:auto-grow-width="false" fo:min-height="0.118cm" fo:min-width="1.641cm" fo:padding-top="0.127cm" fo:padding-bottom="0.127cm" fo:padding-left="0.254cm" fo:padding-right="0.254cm" fo:wrap-option="wrap" draw:shadow="visible" draw:shadow-offset-x="0.075cm" draw:shadow-offset-y="0.075cm" draw:shadow-color="#000000" draw:shadow-opacity="40%" style:writing-mode="lr-tb" loext:decorative="false"/>
      <style:paragraph-properties style:writing-mode="lr-tb"/>
    </style:style>
    <style:style style:name="gr25" style:family="graphic" style:parent-style-name="standard">
      <style:graphic-properties draw:stroke="solid" svg:stroke-width="0.106cm" svg:stroke-color="#ffffff" draw:marker-end="a820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26" style:family="graphic" style:parent-style-name="standard">
      <style:graphic-properties draw:stroke="solid" svg:stroke-width="0.106cm" svg:stroke-color="#ffffff" draw:marker-end="a822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27" style:family="graphic" style:parent-style-name="standard">
      <style:graphic-properties draw:stroke="solid" svg:stroke-width="0.106cm" svg:stroke-color="#ffffff" draw:marker-end="a816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28" style:family="graphic" style:parent-style-name="standard">
      <style:graphic-properties draw:stroke="solid" svg:stroke-width="0.106cm" svg:stroke-color="#ffffff" draw:marker-end="a818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29" style:family="graphic" style:parent-style-name="standard">
      <style:graphic-properties draw:stroke="none" draw:fill="gradient" draw:fill-gradient-name="a798" draw:textarea-horizontal-align="center" draw:textarea-vertical-align="middle" draw:auto-grow-height="false" draw:auto-grow-width="false" fo:min-height="0.084cm" fo:min-width="1.705cm" fo:padding-top="0.127cm" fo:padding-bottom="0.127cm" fo:padding-left="0.254cm" fo:padding-right="0.254cm" fo:wrap-option="wrap" draw:shadow="visible" draw:shadow-offset-x="0.075cm" draw:shadow-offset-y="0.075cm" draw:shadow-color="#000000" draw:shadow-opacity="40%" style:writing-mode="lr-tb" loext:decorative="false"/>
      <style:paragraph-properties style:writing-mode="lr-tb"/>
    </style:style>
    <style:style style:name="gr30" style:family="graphic" style:parent-style-name="standard">
      <style:graphic-properties draw:stroke="solid" svg:stroke-width="0.106cm" svg:stroke-color="#ffffff" draw:marker-end="a806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31" style:family="graphic" style:parent-style-name="standard">
      <style:graphic-properties draw:stroke="solid" svg:stroke-width="0.106cm" svg:stroke-color="#ffffff" draw:marker-end="a808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32" style:family="graphic" style:parent-style-name="standard">
      <style:graphic-properties draw:stroke="solid" svg:stroke-width="0.106cm" svg:stroke-color="#ffffff" draw:marker-end="a802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33" style:family="graphic" style:parent-style-name="standard">
      <style:graphic-properties draw:stroke="solid" svg:stroke-width="0.106cm" svg:stroke-color="#ffffff" draw:marker-end="a804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5" style:family="graphic" style:parent-style-name="standard">
      <style:graphic-properties draw:textarea-horizontal-align="justify" draw:textarea-vertical-align="middle" draw:auto-grow-height="false" fo:min-height="1.225cm" fo:min-width="0cm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7" style:family="graphic" style:parent-style-name="standard">
      <style:graphic-properties draw:stroke="dash" draw:stroke-dash="SysDot" svg:stroke-width="0.053cm" svg:stroke-color="#5b9bd5" draw:marker-start="Arrow_20_short" draw:marker-start-width="0.254cm" draw:marker-end="Arrow_20_short" draw:marker-end-width="0.254cm" svg:stroke-opacity="100%" draw:stroke-linejoin="miter" svg:stroke-linecap="butt" draw:fill="none" fo:padding-top="0.151cm" fo:padding-bottom="0.151cm" fo:padding-left="0.276cm" fo:padding-right="0.276cm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cm" fo:min-width="0cm" loext:decorative="false"/>
      <style:paragraph-properties style:writing-mode="lr-tb"/>
    </style:style>
    <style:style style:name="gr39" style:family="graphic">
      <style:graphic-properties style:protect="size" loext:decorative="false"/>
    </style:style>
    <style:style style:name="gr40" style:family="graphic" style:parent-style-name="standard">
      <style:graphic-properties draw:stroke="solid" svg:stroke-width="0.035cm" svg:stroke-color="#156082" svg:stroke-opacity="100%" draw:stroke-linejoin="miter" svg:stroke-linecap="butt" draw:fill="solid" draw:fill-color="#5b9bd5" draw:textarea-horizontal-align="center" draw:textarea-vertical-align="middle" draw:auto-grow-height="false" draw:auto-grow-width="false" fo:min-height="0.553cm" fo:min-width="4.521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gr42" style:family="graphic" style:parent-style-name="standard">
      <style:graphic-properties draw:stroke="solid" svg:stroke-width="0.035cm" svg:stroke-color="#0e2841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1.325cm" fo:min-width="4.635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43" style:family="graphic" style:parent-style-name="standard">
      <style:graphic-properties draw:stroke="solid" svg:stroke-width="0.051cm" svg:stroke-color="#5b9bd5" draw:marker-start-width="0.229cm" draw:marker-end-width="0.229cm" svg:stroke-opacity="100%" draw:stroke-linejoin="miter" svg:stroke-linecap="butt" draw:fill="solid" draw:fill-color="#deebf7" draw:opacity="100%" draw:textarea-horizontal-align="center" draw:textarea-vertical-align="middle" draw:auto-grow-height="false" draw:auto-grow-width="false" fo:min-height="1.325cm" fo:min-width="4.83cm" fo:padding-top="0.262cm" fo:padding-bottom="0.262cm" fo:padding-left="0.262cm" fo:padding-right="0.262cm" fo:wrap-option="wrap" style:writing-mode="lr-tb" loext:decorative="false"/>
      <style:paragraph-properties style:writing-mode="lr-tb"/>
    </style:style>
    <style:style style:name="gr44" style:family="graphic" style:parent-style-name="standard">
      <style:graphic-properties draw:stroke="solid" svg:stroke-width="0.026cm" svg:stroke-color="#000000" draw:marker-end="a418" svg:stroke-opacity="100%" draw:stroke-linejoin="round" svg:stroke-linecap="butt" draw:fill="none" fo:padding-top="0.138cm" fo:padding-bottom="0.138cm" fo:padding-left="0.263cm" fo:padding-right="0.263cm" loext:decorative="false"/>
    </style:style>
    <style:style style:name="gr45" style:family="graphic" style:parent-style-name="standard">
      <style:graphic-properties draw:stroke="solid" svg:stroke-width="0.026cm" svg:stroke-color="#0e2841" draw:marker-end="a420" svg:stroke-opacity="100%" draw:stroke-linejoin="round" svg:stroke-linecap="butt" draw:fill="none" fo:padding-top="0.138cm" fo:padding-bottom="0.138cm" fo:padding-left="0.263cm" fo:padding-right="0.263cm" loext:decorative="false"/>
    </style:style>
    <style:style style:name="gr46" style:family="graphic" style:parent-style-name="standard">
      <style:graphic-properties draw:stroke="solid" svg:stroke-width="0.026cm" svg:stroke-color="#000000" draw:marker-end="a422" svg:stroke-opacity="100%" draw:stroke-linejoin="round" svg:stroke-linecap="butt" draw:fill="none" fo:padding-top="0.138cm" fo:padding-bottom="0.138cm" fo:padding-left="0.263cm" fo:padding-right="0.263cm" loext:decorative="false"/>
    </style:style>
    <style:style style:name="gr47" style:family="graphic" style:parent-style-name="standard">
      <style:graphic-properties draw:stroke="solid" svg:stroke-width="0.026cm" svg:stroke-color="#0e2841" draw:marker-end="a424" svg:stroke-opacity="100%" draw:stroke-linejoin="round" svg:stroke-linecap="butt" draw:fill="none" fo:padding-top="0.138cm" fo:padding-bottom="0.138cm" fo:padding-left="0.263cm" fo:padding-right="0.263cm" loext:decorative="false"/>
    </style:style>
    <style:style style:name="gr48" style:family="graphic" style:parent-style-name="standard">
      <style:graphic-properties draw:stroke="solid" svg:stroke-width="0.026cm" svg:stroke-color="#0e2841" draw:marker-end="a426" svg:stroke-opacity="100%" draw:stroke-linejoin="round" svg:stroke-linecap="butt" draw:fill="none" fo:padding-top="0.138cm" fo:padding-bottom="0.138cm" fo:padding-left="0.263cm" fo:padding-right="0.263cm" loext:decorative="false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false" draw:auto-grow-width="false" fo:padding-top="0.095cm" fo:padding-bottom="0.095cm" fo:padding-left="0.19cm" fo:padding-right="0.19cm" fo:wrap-option="wrap" loext:decorative="false"/>
      <style:paragraph-properties style:writing-mode="lr-tb"/>
    </style:style>
    <style:style style:name="gr51" style:family="graphic" style:parent-style-name="standard">
      <style:graphic-properties draw:stroke="none" svg:stroke-color="#073763" draw:fill="solid" draw:fill-color="#5b9bd5" draw:opacity="100%" draw:textarea-horizontal-align="left" draw:textarea-vertical-align="middle" draw:auto-grow-height="false" draw:auto-grow-width="false" fo:min-height="2.442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52" style:family="graphic">
      <style:graphic-properties draw:stroke="none" draw:fill="none" style:mirror="non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3" style:family="paragraph">
      <loext:graphic-properties draw:fill="solid" draw:fill-color="#deebf7" draw:opacity="100%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</style:style>
    <style:style style:name="P4" style:family="paragraph">
      <loext:graphic-properties draw:fill="gradient" draw:fill-gradient-name="a854"/>
      <style:paragraph-properties style:writing-mode="lr-tb" style:font-independent-line-spacing="true"/>
    </style:style>
    <style:style style:name="P5" style:family="paragraph">
      <loext:graphic-properties draw:fill="gradient" draw:fill-gradient-name="a840"/>
      <style:paragraph-properties style:writing-mode="lr-tb" style:font-independent-line-spacing="true"/>
    </style:style>
    <style:style style:name="P6" style:family="paragraph">
      <loext:graphic-properties draw:fill="gradient" draw:fill-gradient-name="a826"/>
      <style:paragraph-properties style:writing-mode="lr-tb" style:font-independent-line-spacing="true"/>
    </style:style>
    <style:style style:name="P7" style:family="paragraph">
      <loext:graphic-properties draw:fill="gradient" draw:fill-gradient-name="a812"/>
      <style:paragraph-properties style:writing-mode="lr-tb" style:font-independent-line-spacing="true"/>
    </style:style>
    <style:style style:name="P8" style:family="paragraph">
      <loext:graphic-properties draw:fill="gradient" draw:fill-gradient-name="a798"/>
      <style:paragraph-properties style:writing-mode="lr-tb" style:font-independent-line-spacing="tru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text-properties style:font-name="Calibri"/>
    </style:style>
    <style:style style:name="P12" style:family="paragraph">
      <loext:graphic-properties draw:fill="none" draw:fill-color="#ffffff"/>
      <style:text-properties style:font-name="Calibri"/>
    </style:style>
    <style:style style:name="P13" style:family="paragraph">
      <style:text-properties style:font-name="Calibri" fo:font-style="italic" style:font-style-asian="italic" style:font-style-complex="italic"/>
    </style:style>
    <style:style style:name="P14" style:family="paragraph">
      <loext:graphic-properties draw:fill="none" draw:fill-color="#ffffff"/>
      <style:text-properties style:font-name="Calibri" fo:font-style="italic" style:font-style-asian="italic" style:font-style-complex="italic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style:font-name="Calibri" fo:font-size="16pt" style:font-size-asian="16pt" style:font-size-complex="16pt"/>
    </style:style>
    <style:style style:name="P17" style:family="paragraph">
      <loext:graphic-properties draw:fill-color="#ffffff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  <style:text-properties fo:color="#ffffff" loext:opacity="100%" style:font-name="Calibri"/>
    </style:style>
    <style:style style:name="P19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color="#ffffff" loext:opacity="100%" style:font-name="Calibri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21" style:family="paragraph">
      <loext:graphic-properties draw:fill="none"/>
      <style:paragraph-properties style:font-independent-line-spacing="true"/>
    </style:style>
    <style:style style:name="P22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  <style:text-properties style:font-name="Calibri"/>
    </style:style>
    <style:style style:name="P24" style:family="paragraph">
      <loext:graphic-properties draw:fill="solid" draw:fill-color="#deebf7" draw:opacity="100%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style:font-name="Calibri"/>
    </style:style>
    <style:style style:name="P25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26" style:family="paragraph">
      <loext:graphic-properties draw:fill="solid" draw:fill-color="#5b9bd5" draw:opacity="100%"/>
      <style:paragraph-properties style:writing-mode="lr-tb" style:font-independent-line-spacing="tru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style:font-name="Calibri"/>
    </style:style>
    <style:style style:name="T3" style:family="text">
      <style:text-properties style:font-name="Calibri" fo:font-style="italic" style:font-style-asian="italic" style:font-style-complex="italic"/>
    </style:style>
    <style:style style:name="T4" style:family="text">
      <style:text-properties style:font-name="Calibri" fo:font-size="16pt" style:font-size-asian="16pt" style:font-size-complex="16pt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fo:font-family="Arial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Ari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onsolas" style:font-size-asian="18pt" style:font-style-asian="normal" style:font-weight-asian="bold" style:font-name-complex="Consolas" style:font-size-complex="18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6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onnector draw:name="Straight Arrow Connector 7" draw:style-name="gr1" draw:text-style-name="P1" draw:layer="layout" draw:type="line" svg:x1="6.607cm" svg:y1="7.117cm" svg:x2="6.586cm" svg:y2="11.039cm" svg:d="M6607 7117l-21 3922" svg:viewBox="0 0 22 3923">
          <text:p/>
        </draw:connector>
        <draw:connector draw:name="Straight Arrow Connector 16" draw:style-name="gr2" draw:text-style-name="P1" draw:layer="layout" draw:type="line" svg:x1="14.773cm" svg:y1="7.008cm" svg:x2="14.752cm" svg:y2="10.93cm" svg:d="M14773 7008l-21 3922" svg:viewBox="0 0 22 3923">
          <text:p/>
        </draw:connector>
        <draw:connector draw:name="Straight Arrow Connector 18" draw:style-name="gr3" draw:text-style-name="P1" draw:layer="layout" draw:type="line" svg:x1="11.215cm" svg:y1="4.809cm" svg:x2="11.193cm" svg:y2="8.731cm" svg:d="M11215 4809l-22 3922" svg:viewBox="0 0 23 3923">
          <text:p/>
        </draw:connector>
        <draw:custom-shape draw:name="Rectangle 49" draw:style-name="gr4" draw:text-style-name="P3" draw:layer="layout" svg:width="15.803cm" svg:height="2.835cm" svg:x="5.013cm" svg:y="4.745cm">
          <text:p text:style-name="P2"><text:span text:style-name="T1">Network Management System</text:span></text:p>
          <draw:enhanced-geometry svg:viewBox="0 0 21600 21600" draw:type="non-primitive" draw:enhanced-path="M 0 0 L 21600 0 21600 21600 0 21600 Z N"/>
        </draw:custom-shape>
        <draw:connector draw:name="Straight Connector 46" draw:style-name="gr5" draw:text-style-name="P1" draw:layer="layout" draw:type="line" svg:x1="14.686cm" svg:y1="11.707cm" svg:x2="11.423cm" svg:y2="13.297cm" svg:d="M14686 11707l-3263 1590" svg:viewBox="0 0 3264 1591">
          <text:p/>
        </draw:connector>
        <draw:connector draw:name="Straight Connector 47" draw:style-name="gr5" draw:text-style-name="P1" draw:layer="layout" draw:type="line" svg:x1="10.242cm" svg:y1="9.64cm" svg:x2="7.403cm" svg:y2="11.092cm" svg:d="M10242 9640l-2839 1452" svg:viewBox="0 0 2840 1453">
          <text:p/>
        </draw:connector>
        <draw:connector draw:name="Straight Connector 48" draw:style-name="gr5" draw:text-style-name="P1" draw:layer="layout" draw:type="line" svg:x1="13.773cm" svg:y1="11.098cm" svg:x2="11.422cm" svg:y2="9.547cm" svg:d="M13773 11098l-2351-1551" svg:viewBox="0 0 2352 1552">
          <text:p/>
        </draw:connector>
        <draw:g draw:name="Group 54" draw:style-name="gr6">
          <draw:custom-shape draw:name="Cube 55" draw:style-name="gr7" draw:text-style-name="P4" draw:layer="layout" svg:width="2.875cm" svg:height="1.097cm" svg:x="9.754cm" svg:y="8.757cm">
            <text:p/>
            <draw:enhanced-geometry svg:viewBox="0 0 21600 21600" draw:path-stretchpoint-x="21600" draw:path-stretchpoint-y="21600" draw:text-areas="?f0 ?f8 ?f12 ?f3" draw:glue-points="?f14 ?f2 ?f13 ?f8 ?f0 ?f11 ?f13 ?f3 ?f12 ?f11 ?f1 ?f10" draw:type="non-primitive" draw:modifiers="66185" draw:enhanced-path="S M ?f0 ?f8 L ?f12 ?f8 ?f12 ?f3 ?f0 ?f3 Z N S M ?f12 ?f8 L ?f1 ?f2 ?f1 ?f9 ?f12 ?f3 Z N S M ?f0 ?f8 L ?f8 ?f2 ?f1 ?f2 ?f12 ?f8 Z N F M ?f0 ?f8 L ?f8 ?f2 ?f1 ?f2 ?f1 ?f9 ?f12 ?f3 ?f0 ?f3 Z M ?f0 ?f8 L ?f12 ?f8 ?f1 ?f2 M ?f12 ?f8 L ?f12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$0"/>
              <draw:equation draw:name="f8" draw:formula="?f6 * ?f7 / 100000"/>
              <draw:equation draw:name="f9" draw:formula="?f3 - ?f8"/>
              <draw:equation draw:name="f10" draw:formula="?f9 / 2"/>
              <draw:equation draw:name="f11" draw:formula="(?f8 + ?f3) / 2"/>
              <draw:equation draw:name="f12" draw:formula="?f1 - ?f8"/>
              <draw:equation draw:name="f13" draw:formula="?f12 / 2"/>
              <draw:equation draw:name="f14" draw:formula="(?f8 + ?f1) / 2"/>
            </draw:enhanced-geometry>
          </draw:custom-shape>
          <draw:g draw:name="Group 56" draw:style-name="gr6">
            <draw:g draw:name="Group 57" draw:style-name="gr8">
              <draw:connector draw:name="Straight Arrow Connector 63" draw:style-name="gr9" draw:text-style-name="P1" draw:layer="layout" draw:type="line" svg:x1="11.365cm" svg:y1="8.916cm" svg:x2="12.35cm" svg:y2="8.916cm" svg:d="M11365 8916h985" svg:viewBox="0 0 986 1">
                <text:p/>
              </draw:connector>
              <draw:connector draw:name="Straight Arrow Connector 64" draw:style-name="gr10" draw:text-style-name="P1" draw:layer="layout" draw:type="line" svg:x1="11.365cm" svg:y1="9.265cm" svg:x2="11.984cm" svg:y2="9.265cm" svg:d="M11365 9265h619" svg:viewBox="0 0 620 1">
                <text:p/>
              </draw:connector>
            </draw:g>
            <draw:g draw:name="Group 58" draw:style-name="gr8">
              <draw:connector draw:name="Straight Arrow Connector 61" draw:style-name="gr11" draw:text-style-name="P1" draw:layer="layout" draw:type="line" svg:x1="11.018cm" svg:y1="8.922cm" svg:x2="10.415cm" svg:y2="8.922cm" svg:d="M11018 8922h-603" svg:viewBox="0 0 604 1">
                <text:p/>
              </draw:connector>
              <draw:connector draw:name="Straight Arrow Connector 62" draw:style-name="gr12" draw:text-style-name="P1" draw:layer="layout" draw:type="line" svg:x1="11.018cm" svg:y1="9.265cm" svg:x2="10.048cm" svg:y2="9.265cm" svg:d="M11018 9265h-970" svg:viewBox="0 0 971 1">
                <text:p/>
              </draw:connector>
            </draw:g>
            <draw:connector draw:name="Straight Connector 59" draw:style-name="gr13" draw:text-style-name="P1" draw:layer="layout" draw:type="line" svg:x1="10.998cm" svg:y1="9.272cm" svg:x2="11.385cm" svg:y2="8.91cm" svg:d="M10998 9272l387-362" svg:viewBox="0 0 388 363">
              <text:p/>
            </draw:connector>
            <draw:connector draw:name="Straight Connector 60" draw:style-name="gr13" draw:text-style-name="P1" draw:layer="layout" draw:type="line" svg:x1="11.385cm" svg:y1="9.272cm" svg:x2="10.998cm" svg:y2="8.91cm" svg:d="M11385 9272l-387-362" svg:viewBox="0 0 388 363">
              <text:p/>
            </draw:connector>
          </draw:g>
        </draw:g>
        <draw:connector draw:name="Straight Connector 65" draw:style-name="gr5" draw:text-style-name="P1" draw:layer="layout" draw:type="line" svg:x1="9.749cm" svg:y1="13.115cm" svg:x2="7.593cm" svg:y2="11.453cm" svg:d="M9749 13115l-2156-1662" svg:viewBox="0 0 2157 1663">
          <text:p/>
        </draw:connector>
        <draw:connector draw:name="Straight Connector 66" draw:style-name="gr5" draw:text-style-name="P1" draw:layer="layout" draw:type="line" svg:x1="18.421cm" svg:y1="9.663cm" svg:x2="15.51cm" svg:y2="11.092cm" svg:d="M18421 9663l-2911 1429" svg:viewBox="0 0 2912 1430">
          <text:p/>
        </draw:connector>
        <draw:g draw:name="Group 67" draw:style-name="gr6">
          <draw:custom-shape draw:name="Cube 68" draw:style-name="gr14" draw:text-style-name="P5" draw:layer="layout" svg:width="2.875cm" svg:height="1.048cm" svg:x="13.267cm" svg:y="10.946cm">
            <text:p/>
            <draw:enhanced-geometry svg:viewBox="0 0 21600 21600" draw:path-stretchpoint-x="21600" draw:path-stretchpoint-y="21600" draw:text-areas="?f0 ?f8 ?f12 ?f3" draw:glue-points="?f14 ?f2 ?f13 ?f8 ?f0 ?f11 ?f13 ?f3 ?f12 ?f11 ?f1 ?f10" draw:type="non-primitive" draw:modifiers="66185" draw:enhanced-path="S M ?f0 ?f8 L ?f12 ?f8 ?f12 ?f3 ?f0 ?f3 Z N S M ?f12 ?f8 L ?f1 ?f2 ?f1 ?f9 ?f12 ?f3 Z N S M ?f0 ?f8 L ?f8 ?f2 ?f1 ?f2 ?f12 ?f8 Z N F M ?f0 ?f8 L ?f8 ?f2 ?f1 ?f2 ?f1 ?f9 ?f12 ?f3 ?f0 ?f3 Z M ?f0 ?f8 L ?f12 ?f8 ?f1 ?f2 M ?f12 ?f8 L ?f12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$0"/>
              <draw:equation draw:name="f8" draw:formula="?f6 * ?f7 / 100000"/>
              <draw:equation draw:name="f9" draw:formula="?f3 - ?f8"/>
              <draw:equation draw:name="f10" draw:formula="?f9 / 2"/>
              <draw:equation draw:name="f11" draw:formula="(?f8 + ?f3) / 2"/>
              <draw:equation draw:name="f12" draw:formula="?f1 - ?f8"/>
              <draw:equation draw:name="f13" draw:formula="?f12 / 2"/>
              <draw:equation draw:name="f14" draw:formula="(?f8 + ?f1) / 2"/>
            </draw:enhanced-geometry>
          </draw:custom-shape>
          <draw:g draw:name="Group 69" draw:style-name="gr6">
            <draw:g draw:name="Group 70" draw:style-name="gr8">
              <draw:connector draw:name="Straight Arrow Connector 76" draw:style-name="gr15" draw:text-style-name="P1" draw:layer="layout" draw:type="line" svg:x1="14.879cm" svg:y1="11.106cm" svg:x2="15.865cm" svg:y2="11.106cm" svg:d="M14879 11106h986" svg:viewBox="0 0 987 1">
                <text:p/>
              </draw:connector>
              <draw:connector draw:name="Straight Arrow Connector 77" draw:style-name="gr16" draw:text-style-name="P1" draw:layer="layout" draw:type="line" svg:x1="14.879cm" svg:y1="11.455cm" svg:x2="15.498cm" svg:y2="11.455cm" svg:d="M14879 11455h619" svg:viewBox="0 0 620 1">
                <text:p/>
              </draw:connector>
            </draw:g>
            <draw:g draw:name="Group 71" draw:style-name="gr8">
              <draw:connector draw:name="Straight Arrow Connector 74" draw:style-name="gr17" draw:text-style-name="P1" draw:layer="layout" draw:type="line" svg:x1="14.531cm" svg:y1="11.112cm" svg:x2="13.93cm" svg:y2="11.112cm" svg:d="M14531 11112h-601" svg:viewBox="0 0 602 1">
                <text:p/>
              </draw:connector>
              <draw:connector draw:name="Straight Arrow Connector 75" draw:style-name="gr18" draw:text-style-name="P1" draw:layer="layout" draw:type="line" svg:x1="14.531cm" svg:y1="11.455cm" svg:x2="13.563cm" svg:y2="11.455cm" svg:d="M14531 11455h-968" svg:viewBox="0 0 969 1">
                <text:p/>
              </draw:connector>
            </draw:g>
            <draw:connector draw:name="Straight Connector 72" draw:style-name="gr13" draw:text-style-name="P1" draw:layer="layout" draw:type="line" svg:x1="14.512cm" svg:y1="11.461cm" svg:x2="14.899cm" svg:y2="11.1cm" svg:d="M14512 11461l387-361" svg:viewBox="0 0 388 362">
              <text:p/>
            </draw:connector>
            <draw:connector draw:name="Straight Connector 73" draw:style-name="gr13" draw:text-style-name="P1" draw:layer="layout" draw:type="line" svg:x1="14.899cm" svg:y1="11.461cm" svg:x2="14.512cm" svg:y2="11.1cm" svg:d="M14899 11461l-387-361" svg:viewBox="0 0 388 362">
              <text:p/>
            </draw:connector>
          </draw:g>
        </draw:g>
        <draw:g draw:name="Group 78" draw:style-name="gr6">
          <draw:custom-shape draw:name="Cube 79" draw:style-name="gr19" draw:text-style-name="P6" draw:layer="layout" svg:width="2.875cm" svg:height="1.077cm" svg:x="17.61cm" svg:y="8.826cm">
            <text:p/>
            <draw:enhanced-geometry svg:viewBox="0 0 21600 21600" draw:path-stretchpoint-x="21600" draw:path-stretchpoint-y="21600" draw:text-areas="?f0 ?f8 ?f12 ?f3" draw:glue-points="?f14 ?f2 ?f13 ?f8 ?f0 ?f11 ?f13 ?f3 ?f12 ?f11 ?f1 ?f10" draw:type="non-primitive" draw:modifiers="66185" draw:enhanced-path="S M ?f0 ?f8 L ?f12 ?f8 ?f12 ?f3 ?f0 ?f3 Z N S M ?f12 ?f8 L ?f1 ?f2 ?f1 ?f9 ?f12 ?f3 Z N S M ?f0 ?f8 L ?f8 ?f2 ?f1 ?f2 ?f12 ?f8 Z N F M ?f0 ?f8 L ?f8 ?f2 ?f1 ?f2 ?f1 ?f9 ?f12 ?f3 ?f0 ?f3 Z M ?f0 ?f8 L ?f12 ?f8 ?f1 ?f2 M ?f12 ?f8 L ?f12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$0"/>
              <draw:equation draw:name="f8" draw:formula="?f6 * ?f7 / 100000"/>
              <draw:equation draw:name="f9" draw:formula="?f3 - ?f8"/>
              <draw:equation draw:name="f10" draw:formula="?f9 / 2"/>
              <draw:equation draw:name="f11" draw:formula="(?f8 + ?f3) / 2"/>
              <draw:equation draw:name="f12" draw:formula="?f1 - ?f8"/>
              <draw:equation draw:name="f13" draw:formula="?f12 / 2"/>
              <draw:equation draw:name="f14" draw:formula="(?f8 + ?f1) / 2"/>
            </draw:enhanced-geometry>
          </draw:custom-shape>
          <draw:g draw:name="Group 80" draw:style-name="gr6">
            <draw:g draw:name="Group 81" draw:style-name="gr8">
              <draw:connector draw:name="Straight Arrow Connector 87" draw:style-name="gr20" draw:text-style-name="P1" draw:layer="layout" draw:type="line" svg:x1="19.221cm" svg:y1="8.986cm" svg:x2="20.207cm" svg:y2="8.986cm" svg:d="M19221 8986h986" svg:viewBox="0 0 987 1">
                <text:p/>
              </draw:connector>
              <draw:connector draw:name="Straight Arrow Connector 88" draw:style-name="gr21" draw:text-style-name="P1" draw:layer="layout" draw:type="line" svg:x1="19.221cm" svg:y1="9.335cm" svg:x2="19.84cm" svg:y2="9.335cm" svg:d="M19221 9335h619" svg:viewBox="0 0 620 1">
                <text:p/>
              </draw:connector>
            </draw:g>
            <draw:g draw:name="Group 82" draw:style-name="gr8">
              <draw:connector draw:name="Straight Arrow Connector 85" draw:style-name="gr22" draw:text-style-name="P1" draw:layer="layout" draw:type="line" svg:x1="18.874cm" svg:y1="8.992cm" svg:x2="18.272cm" svg:y2="8.992cm" svg:d="M18874 8992h-602" svg:viewBox="0 0 603 1">
                <text:p/>
              </draw:connector>
              <draw:connector draw:name="Straight Arrow Connector 86" draw:style-name="gr23" draw:text-style-name="P1" draw:layer="layout" draw:type="line" svg:x1="18.874cm" svg:y1="9.335cm" svg:x2="17.905cm" svg:y2="9.335cm" svg:d="M18874 9335h-969" svg:viewBox="0 0 970 1">
                <text:p/>
              </draw:connector>
            </draw:g>
            <draw:connector draw:name="Straight Connector 83" draw:style-name="gr13" draw:text-style-name="P1" draw:layer="layout" draw:type="line" svg:x1="18.854cm" svg:y1="9.341cm" svg:x2="19.241cm" svg:y2="8.98cm" svg:d="M18854 9341l387-361" svg:viewBox="0 0 388 362">
              <text:p/>
            </draw:connector>
            <draw:connector draw:name="Straight Connector 84" draw:style-name="gr13" draw:text-style-name="P1" draw:layer="layout" draw:type="line" svg:x1="19.241cm" svg:y1="9.341cm" svg:x2="18.854cm" svg:y2="8.98cm" svg:d="M19241 9341l-387-361" svg:viewBox="0 0 388 362">
              <text:p/>
            </draw:connector>
          </draw:g>
        </draw:g>
        <draw:g draw:name="Group 89" draw:style-name="gr6">
          <draw:custom-shape draw:name="Cube 90" draw:style-name="gr24" draw:text-style-name="P7" draw:layer="layout" svg:width="2.875cm" svg:height="1.097cm" svg:x="8.895cm" svg:y="13.115cm">
            <text:p/>
            <draw:enhanced-geometry svg:viewBox="0 0 21600 21600" draw:path-stretchpoint-x="21600" draw:path-stretchpoint-y="21600" draw:text-areas="?f0 ?f8 ?f12 ?f3" draw:glue-points="?f14 ?f2 ?f13 ?f8 ?f0 ?f11 ?f13 ?f3 ?f12 ?f11 ?f1 ?f10" draw:type="non-primitive" draw:modifiers="66185" draw:enhanced-path="S M ?f0 ?f8 L ?f12 ?f8 ?f12 ?f3 ?f0 ?f3 Z N S M ?f12 ?f8 L ?f1 ?f2 ?f1 ?f9 ?f12 ?f3 Z N S M ?f0 ?f8 L ?f8 ?f2 ?f1 ?f2 ?f12 ?f8 Z N F M ?f0 ?f8 L ?f8 ?f2 ?f1 ?f2 ?f1 ?f9 ?f12 ?f3 ?f0 ?f3 Z M ?f0 ?f8 L ?f12 ?f8 ?f1 ?f2 M ?f12 ?f8 L ?f12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$0"/>
              <draw:equation draw:name="f8" draw:formula="?f6 * ?f7 / 100000"/>
              <draw:equation draw:name="f9" draw:formula="?f3 - ?f8"/>
              <draw:equation draw:name="f10" draw:formula="?f9 / 2"/>
              <draw:equation draw:name="f11" draw:formula="(?f8 + ?f3) / 2"/>
              <draw:equation draw:name="f12" draw:formula="?f1 - ?f8"/>
              <draw:equation draw:name="f13" draw:formula="?f12 / 2"/>
              <draw:equation draw:name="f14" draw:formula="(?f8 + ?f1) / 2"/>
            </draw:enhanced-geometry>
          </draw:custom-shape>
          <draw:g draw:name="Group 91" draw:style-name="gr6">
            <draw:g draw:name="Group 92" draw:style-name="gr8">
              <draw:connector draw:name="Straight Arrow Connector 98" draw:style-name="gr25" draw:text-style-name="P1" draw:layer="layout" draw:type="line" svg:x1="10.506cm" svg:y1="13.274cm" svg:x2="11.491cm" svg:y2="13.274cm" svg:d="M10506 13274h985" svg:viewBox="0 0 986 1">
                <text:p/>
              </draw:connector>
              <draw:connector draw:name="Straight Arrow Connector 99" draw:style-name="gr26" draw:text-style-name="P1" draw:layer="layout" draw:type="line" svg:x1="10.506cm" svg:y1="13.623cm" svg:x2="11.125cm" svg:y2="13.623cm" svg:d="M10506 13623h619" svg:viewBox="0 0 620 1">
                <text:p/>
              </draw:connector>
            </draw:g>
            <draw:g draw:name="Group 93" draw:style-name="gr8">
              <draw:connector draw:name="Straight Arrow Connector 96" draw:style-name="gr27" draw:text-style-name="P1" draw:layer="layout" draw:type="line" svg:x1="10.159cm" svg:y1="13.28cm" svg:x2="9.556cm" svg:y2="13.28cm" svg:d="M10159 13280h-603" svg:viewBox="0 0 604 1">
                <text:p/>
              </draw:connector>
              <draw:connector draw:name="Straight Arrow Connector 97" draw:style-name="gr28" draw:text-style-name="P1" draw:layer="layout" draw:type="line" svg:x1="10.159cm" svg:y1="13.623cm" svg:x2="9.189cm" svg:y2="13.623cm" svg:d="M10159 13623h-970" svg:viewBox="0 0 971 1">
                <text:p/>
              </draw:connector>
            </draw:g>
            <draw:connector draw:name="Straight Connector 94" draw:style-name="gr13" draw:text-style-name="P1" draw:layer="layout" draw:type="line" svg:x1="10.139cm" svg:y1="13.63cm" svg:x2="10.526cm" svg:y2="13.268cm" svg:d="M10139 13630l387-362" svg:viewBox="0 0 388 363">
              <text:p/>
            </draw:connector>
            <draw:connector draw:name="Straight Connector 95" draw:style-name="gr13" draw:text-style-name="P1" draw:layer="layout" draw:type="line" svg:x1="10.526cm" svg:y1="13.63cm" svg:x2="10.139cm" svg:y2="13.268cm" svg:d="M10526 13630l-387-362" svg:viewBox="0 0 388 363">
              <text:p/>
            </draw:connector>
          </draw:g>
        </draw:g>
        <draw:g draw:name="Group 100" draw:style-name="gr6">
          <draw:custom-shape draw:name="Cube 101" draw:style-name="gr29" draw:text-style-name="P8" draw:layer="layout" svg:width="2.874cm" svg:height="0.998cm" svg:x="5.123cm" svg:y="11.058cm">
            <text:p/>
            <draw:enhanced-geometry svg:viewBox="0 0 21600 21600" draw:path-stretchpoint-x="21600" draw:path-stretchpoint-y="21600" draw:text-areas="?f0 ?f8 ?f12 ?f3" draw:glue-points="?f14 ?f2 ?f13 ?f8 ?f0 ?f11 ?f13 ?f3 ?f12 ?f11 ?f1 ?f10" draw:type="non-primitive" draw:modifiers="66185" draw:enhanced-path="S M ?f0 ?f8 L ?f12 ?f8 ?f12 ?f3 ?f0 ?f3 Z N S M ?f12 ?f8 L ?f1 ?f2 ?f1 ?f9 ?f12 ?f3 Z N S M ?f0 ?f8 L ?f8 ?f2 ?f1 ?f2 ?f12 ?f8 Z N F M ?f0 ?f8 L ?f8 ?f2 ?f1 ?f2 ?f1 ?f9 ?f12 ?f3 ?f0 ?f3 Z M ?f0 ?f8 L ?f12 ?f8 ?f1 ?f2 M ?f12 ?f8 L ?f12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$0"/>
              <draw:equation draw:name="f8" draw:formula="?f6 * ?f7 / 100000"/>
              <draw:equation draw:name="f9" draw:formula="?f3 - ?f8"/>
              <draw:equation draw:name="f10" draw:formula="?f9 / 2"/>
              <draw:equation draw:name="f11" draw:formula="(?f8 + ?f3) / 2"/>
              <draw:equation draw:name="f12" draw:formula="?f1 - ?f8"/>
              <draw:equation draw:name="f13" draw:formula="?f12 / 2"/>
              <draw:equation draw:name="f14" draw:formula="(?f8 + ?f1) / 2"/>
            </draw:enhanced-geometry>
          </draw:custom-shape>
          <draw:g draw:name="Group 102" draw:style-name="gr6">
            <draw:g draw:name="Group 103" draw:style-name="gr8">
              <draw:connector draw:name="Straight Arrow Connector 109" draw:style-name="gr30" draw:text-style-name="P1" draw:layer="layout" draw:type="line" svg:x1="6.734cm" svg:y1="11.218cm" svg:x2="7.72cm" svg:y2="11.218cm" svg:d="M6734 11218h986" svg:viewBox="0 0 987 1">
                <text:p/>
              </draw:connector>
              <draw:connector draw:name="Straight Arrow Connector 110" draw:style-name="gr31" draw:text-style-name="P1" draw:layer="layout" draw:type="line" svg:x1="6.734cm" svg:y1="11.568cm" svg:x2="7.353cm" svg:y2="11.568cm" svg:d="M6734 11568h619" svg:viewBox="0 0 620 1">
                <text:p/>
              </draw:connector>
            </draw:g>
            <draw:g draw:name="Group 104" draw:style-name="gr8">
              <draw:connector draw:name="Straight Arrow Connector 107" draw:style-name="gr32" draw:text-style-name="P1" draw:layer="layout" draw:type="line" svg:x1="6.386cm" svg:y1="11.225cm" svg:x2="5.785cm" svg:y2="11.225cm" svg:d="M6386 11225h-601" svg:viewBox="0 0 602 1">
                <text:p/>
              </draw:connector>
              <draw:connector draw:name="Straight Arrow Connector 108" draw:style-name="gr33" draw:text-style-name="P1" draw:layer="layout" draw:type="line" svg:x1="6.386cm" svg:y1="11.568cm" svg:x2="5.418cm" svg:y2="11.568cm" svg:d="M6386 11568h-968" svg:viewBox="0 0 969 1">
                <text:p/>
              </draw:connector>
            </draw:g>
            <draw:connector draw:name="Straight Connector 105" draw:style-name="gr13" draw:text-style-name="P1" draw:layer="layout" draw:type="line" svg:x1="6.367cm" svg:y1="11.574cm" svg:x2="6.754cm" svg:y2="11.213cm" svg:d="M6367 11574l387-361" svg:viewBox="0 0 388 362">
              <text:p/>
            </draw:connector>
            <draw:connector draw:name="Straight Connector 106" draw:style-name="gr13" draw:text-style-name="P1" draw:layer="layout" draw:type="line" svg:x1="6.754cm" svg:y1="11.574cm" svg:x2="6.367cm" svg:y2="11.213cm" svg:d="M6754 11574l-387-361" svg:viewBox="0 0 388 362">
              <text:p/>
            </draw:connector>
          </draw:g>
        </draw:g>
        <draw:frame draw:style-name="gr34" draw:text-style-name="P9" draw:layer="layout" svg:width="2.388cm" svg:height="1.682cm" svg:x="11.72cm" svg:y="1.222cm">
          <draw:image xlink:href="Pictures/10004B2B000068C4000049D48AB69D38.pdf" xlink:type="simple" xlink:show="embed" xlink:actuate="onLoad" draw:mime-type="application/pdf">
            <text:p/>
          </draw:image>
          <draw:image xlink:href="Pictures/100000010000053D000003B1B3F0749D.png" xlink:type="simple" xlink:show="embed" xlink:actuate="onLoad" draw:mime-type="image/png"/>
        </draw:frame>
        <draw:custom-shape draw:style-name="gr35" draw:text-style-name="P10" draw:layer="layout" svg:width="0.571cm" svg:height="1.841cm" svg:x="12.629cm" svg:y="2.90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position-x="$0" draw:handle-position-y="$1" draw:handle-range-x-minimum="0" draw:handle-range-x-maximum="10800" draw:handle-range-y-minimum="0" draw:handle-range-y-maximum="10800"/>
          </draw:enhanced-geometry>
        </draw:custom-shape>
        <draw:frame draw:style-name="gr36" draw:text-style-name="P12" draw:layer="layout" svg:width="5.213cm" svg:height="1.026cm" svg:x="13.908cm" svg:y="1.222cm">
          <draw:text-box>
            <text:p text:style-name="P11"><text:span text:style-name="T2">Network Operator</text:span></text:p>
          </draw:text-box>
        </draw:frame>
        <draw:frame draw:style-name="gr36" draw:text-style-name="P14" draw:layer="layout" svg:width="4.068cm" svg:height="1.026cm" svg:x="13.009cm" svg:y="3.246cm">
          <draw:text-box>
            <text:p text:style-name="P13"><text:span text:style-name="T3">Intents, Alerts</text:span></text:p>
          </draw:text-box>
        </draw:frame>
        <draw:connector draw:name="Straight Arrow Connector 1" draw:style-name="gr37" draw:text-style-name="P1" draw:layer="layout" draw:type="line" svg:x1="19.406cm" svg:y1="7.587cm" svg:x2="19.421cm" svg:y2="8.821cm" svg:d="M19406 7587l15 1234" svg:viewBox="0 0 16 1235">
          <text:p/>
        </draw:connector>
        <draw:frame draw:style-name="gr38" draw:text-style-name="P16" draw:layer="layout" svg:width="5.128cm" svg:height="1.631cm" svg:x="19.321cm" svg:y="7.78cm">
          <draw:text-box>
            <text:p text:style-name="P15"><text:span text:style-name="T4">Push, Pull Telemetry</text:span></text:p>
            <text:p text:style-name="P15"><text:span text:style-name="T4">Data</text:span></text:p>
          </draw:text-box>
        </draw:frame>
        <draw:frame draw:style-name="gr38" draw:text-style-name="P16" draw:layer="layout" svg:width="3.733cm" svg:height="2.321cm" svg:x="2.962cm" svg:y="8.081cm">
          <draw:text-box>
            <text:p text:style-name="P15"><text:span text:style-name="T4">Get, Set </text:span></text:p>
            <text:p text:style-name="P15"><text:span text:style-name="T4">Configuration </text:span></text:p>
            <text:p text:style-name="P15"><text:span text:style-name="T4">Variables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name="Google Shape;1274;p132" draw:style-name="gr40" draw:text-style-name="P19" xml:id="id4" draw:id="id4" draw:layer="layout" svg:width="5.143cm" svg:height="1.175cm" svg:x="18.772cm" svg:y="11.873cm">
          <text:p text:style-name="P18"><text:span text:style-name="T5">gNMI Server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name="Google Shape;1275;p132" draw:style-name="gr40" draw:text-style-name="P19" xml:id="id3" draw:id="id3" draw:layer="layout" svg:width="5.143cm" svg:height="1.175cm" svg:x="18.772cm" svg:y="7.376cm">
          <text:p text:style-name="P18"><text:span text:style-name="T5">gNMI Client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name="Google Shape;1277;p132" draw:style-name="gr41" draw:text-style-name="P21" draw:layer="layout" svg:width="4.828cm" svg:height="1.613cm" svg:x="6.699cm" svg:y="5.914cm">
          <draw:text-box>
            <text:p text:style-name="P20"><text:span text:style-name="T6"><text:s/></text:span><text:span text:style-name="T7">YANG</text:span><text:span text:style-name="T8"> Compiler</text:span></text:p>
            <text:p text:style-name="P2"><text:span text:style-name="T9">(e.g. ygot)</text:span></text:p>
          </draw:text-box>
        </draw:frame>
        <draw:custom-shape draw:name="Google Shape;1272;p132" draw:style-name="gr42" draw:text-style-name="P22" xml:id="id1" draw:id="id1" draw:layer="layout" svg:width="5.143cm" svg:height="1.833cm" svg:x="1.4cm" svg:y="4.385cm">
          <text:p text:style-name="P2"><text:span text:style-name="T10">model.yang</text:span></text:p>
          <draw:enhanced-geometry svg:viewBox="0 0 21600 21600" draw:type="non-primitive" draw:enhanced-path="M 0 0 L 21600 0 21600 21600 0 21600 Z N"/>
        </draw:custom-shape>
        <draw:custom-shape draw:name="Google Shape;1278;p132" draw:style-name="gr43" draw:text-style-name="P24" xml:id="id2" draw:id="id2" draw:layer="layout" svg:width="5.338cm" svg:height="1.833cm" svg:x="11.842cm" svg:y="4.385cm">
          <text:p text:style-name="P23"><text:span text:style-name="T11">model.go, model.cc, <text:s/>model.java. ...</text:span></text:p>
          <draw:enhanced-geometry svg:viewBox="0 0 21600 21600" draw:type="non-primitive" draw:enhanced-path="M 0 0 L 21600 0 21600 21600 0 21600 Z N"/>
        </draw:custom-shape>
        <draw:connector draw:name="Google Shape;1279;p132" draw:style-name="gr44" draw:text-style-name="P1" draw:layer="layout" draw:type="line" svg:x1="6.543cm" svg:y1="5.301cm" svg:x2="8.196cm" svg:y2="5.302cm" draw:start-shape="id1" draw:start-glue-point="1" svg:d="M6543 5301l1653 1" svg:viewBox="0 0 1654 2">
          <text:p/>
        </draw:connector>
        <draw:connector draw:name="Google Shape;1280;p132" draw:style-name="gr45" draw:text-style-name="P1" draw:layer="layout" draw:type="line" svg:x1="9.839cm" svg:y1="5.302cm" svg:x2="11.842cm" svg:y2="5.301cm" draw:end-shape="id2" draw:end-glue-point="3" svg:d="M9839 5302l2003-1" svg:viewBox="0 0 2004 2">
          <text:p/>
        </draw:connector>
        <draw:connector draw:name="Google Shape;1281;p132" draw:style-name="gr46" draw:text-style-name="P1" draw:layer="layout" draw:type="line" svg:x1="14.511cm" svg:y1="6.218cm" svg:x2="14.551cm" svg:y2="9.22cm" draw:start-shape="id2" draw:start-glue-point="2" svg:d="M14511 6218l40 3002" svg:viewBox="0 0 41 3003">
          <text:p/>
        </draw:connector>
        <draw:connector draw:name="Google Shape;1283;p132" draw:style-name="gr47" draw:text-style-name="P1" draw:layer="layout" svg:x1="15.372cm" svg:y1="10.137cm" svg:x2="18.772cm" svg:y2="7.963cm" draw:end-shape="id3" draw:end-glue-point="3" svg:d="M15372 10137h1441v-2174h1959" svg:viewBox="0 0 3401 2175">
          <text:p/>
        </draw:connector>
        <draw:connector draw:name="Google Shape;1284;p132" draw:style-name="gr48" draw:text-style-name="P1" draw:layer="layout" svg:x1="15.372cm" svg:y1="10.137cm" svg:x2="18.772cm" svg:y2="12.46cm" draw:end-shape="id4" draw:end-glue-point="3" svg:d="M15372 10137h1441v2323h1959" svg:viewBox="0 0 3401 2324">
          <text:p/>
        </draw:connector>
        <draw:frame draw:name="Google Shape;1286;p132" draw:style-name="gr49" draw:text-style-name="P21" draw:layer="layout" svg:width="5.835cm" svg:height="2.509cm" svg:x="7.947cm" svg:y="8.705cm">
          <draw:text-box>
            <text:p text:style-name="P25"><text:span text:style-name="T7">Language-Specific</text:span></text:p>
            <text:p text:style-name="P25"><text:span text:style-name="T7">Compiler</text:span></text:p>
            <text:p text:style-name="P25"><text:span text:style-name="T9">(e.g. go, gcc, javac)</text:span></text:p>
          </draw:text-box>
        </draw:frame>
        <draw:frame draw:name="Google Shape;1287;p132" draw:style-name="gr50" draw:text-style-name="P21" draw:layer="layout" svg:width="5.175cm" svg:height="1.727cm" svg:x="21.582cm" svg:y="9.381cm">
          <draw:text-box>
            <text:p text:style-name="P20"><text:span text:style-name="T12">Model-Independent</text:span></text:p>
            <text:p text:style-name="P20"><text:span text:style-name="T12">Runtime API</text:span></text:p>
            <text:p text:style-name="P20"><text:span text:style-name="T13"/></text:p>
          </draw:text-box>
        </draw:frame>
        <draw:custom-shape draw:name="Google Shape;1288;p132" draw:style-name="gr51" draw:text-style-name="P26" draw:layer="layout" svg:width="0.744cm" svg:height="3.322cm" svg:x="20.971cm" svg:y="8.551cm">
          <text:p/>
          <draw:enhanced-geometry svg:viewBox="0 0 21600 21600" draw:path-stretchpoint-x="21600" draw:path-stretchpoint-y="21600" draw:text-areas="?f16 ?f19 ?f17 ?f20" draw:glue-points="?f0 ?f13 ?f16 ?f6 ?f0 ?f14 ?f1 ?f14 ?f17 ?f6 ?f1 ?f13" draw:type="non-primitive" draw:modifiers="50000 50000" draw:enhanced-path="M ?f0 ?f13 L ?f9 ?f2 ?f1 ?f13 ?f17 ?f13 ?f17 ?f14 ?f1 ?f14 ?f9 ?f3 ?f0 ?f14 ?f16 ?f14 ?f16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3 - ?f13"/>
            <draw:equation draw:name="f15" draw:formula="?f7 * ?f11 / 200000"/>
            <draw:equation draw:name="f16" draw:formula="?f9 - ?f15"/>
            <draw:equation draw:name="f17" draw:formula="?f9 + ?f15"/>
            <draw:equation draw:name="f18" draw:formula="?f16 * ?f13 / ?f8"/>
            <draw:equation draw:name="f19" draw:formula="?f13 - ?f18"/>
            <draw:equation draw:name="f20" draw:formula="?f14 + ?f18"/>
          </draw:enhanced-geometry>
        </draw:custom-shape>
        <draw:frame draw:name="Graphic 16" draw:style-name="gr52" draw:text-style-name="P1" draw:layer="layout" svg:width="1.484cm" svg:height="1.447cm" svg:x="13.789cm" svg:y="9.408cm">
          <draw:image xlink:href="Pictures/1000110400000DE200000DE28B6D5E81.svg" xlink:type="simple" xlink:show="embed" xlink:actuate="onLoad" draw:mime-type="image/svg+xml">
            <text:p/>
          </draw:image>
          <draw:image xlink:href="Pictures/10000001000000B2000000B275B3C804.png" xlink:type="simple" xlink:show="embed" xlink:actuate="onLoad" draw:mime-type="image/png"/>
        </draw:frame>
        <draw:frame draw:name="Graphic 17" draw:style-name="gr52" draw:text-style-name="P1" draw:layer="layout" svg:width="1.484cm" svg:height="1.447cm" svg:x="8.329cm" svg:y="4.579cm">
          <draw:image xlink:href="Pictures/1000110400000DE200000DE28B6D5E81.svg" xlink:type="simple" xlink:show="embed" xlink:actuate="onLoad" draw:mime-type="image/svg+xml">
            <text:p/>
          </draw:image>
          <draw:image xlink:href="Pictures/10000001000000B2000000B275B3C804.png" xlink:type="simple" xlink:show="embed" xlink:actuate="onLoad" draw:mime-type="image/png"/>
        </draw:frame>
        <presentation:notes draw:style-name="dp2">
          <draw:page-thumbnail draw:style-name="gr39" draw:layer="layout" svg:width="18.624cm" svg:height="10.476cm" svg:x="1.482cm" svg:y="2.123cm" draw:page-number="2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ptos" svg:font-family="Aptos"/>
    <style:font-face style:name="Calibri" svg:font-family="Calibri" style:font-family-generic="swiss" style:font-pitch="variable"/>
    <style:font-face style:name="Calibri1" svg:font-family="Calibri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a385" draw:style="linear" draw:start-color="#9cafbf" draw:end-color="#8fa3b4" draw:start-intensity="100%" draw:end-intensity="100%" draw:angle="0deg" draw:border="0%">
      <loext:gradient-stop svg:offset="0" loext:color-type="rgb" loext:color-value="#9cafbf"/>
      <loext:gradient-stop svg:offset="1" loext:color-type="rgb" loext:color-value="#8fa3b4"/>
    </draw:gradient>
    <draw:gradient draw:name="a391" draw:style="linear" draw:start-color="#9cafbf" draw:end-color="#8fa3b4" draw:start-intensity="100%" draw:end-intensity="100%" draw:angle="0deg" draw:border="0%">
      <loext:gradient-stop svg:offset="0" loext:color-type="rgb" loext:color-value="#9cafbf"/>
      <loext:gradient-stop svg:offset="1" loext:color-type="rgb" loext:color-value="#8fa3b4"/>
    </draw:gradient>
    <draw:gradient draw:name="a798" draw:style="radial" draw:cx="50%" draw:cy="50%" draw:start-color="#4382ba" draw:end-color="#2c5981" draw:start-intensity="100%" draw:end-intensity="100%" draw:border="0%">
      <loext:gradient-stop svg:offset="0" loext:color-type="rgb" loext:color-value="#4382ba"/>
      <loext:gradient-stop svg:offset="1" loext:color-type="rgb" loext:color-value="#2c5981"/>
    </draw:gradient>
    <draw:gradient draw:name="a812" draw:style="radial" draw:cx="50%" draw:cy="50%" draw:start-color="#4382ba" draw:end-color="#2c5981" draw:start-intensity="100%" draw:end-intensity="100%" draw:border="0%">
      <loext:gradient-stop svg:offset="0" loext:color-type="rgb" loext:color-value="#4382ba"/>
      <loext:gradient-stop svg:offset="1" loext:color-type="rgb" loext:color-value="#2c5981"/>
    </draw:gradient>
    <draw:gradient draw:name="a826" draw:style="radial" draw:cx="50%" draw:cy="50%" draw:start-color="#4382ba" draw:end-color="#2c5981" draw:start-intensity="100%" draw:end-intensity="100%" draw:border="0%">
      <loext:gradient-stop svg:offset="0" loext:color-type="rgb" loext:color-value="#4382ba"/>
      <loext:gradient-stop svg:offset="1" loext:color-type="rgb" loext:color-value="#2c5981"/>
    </draw:gradient>
    <draw:gradient draw:name="a840" draw:style="radial" draw:cx="50%" draw:cy="50%" draw:start-color="#4382ba" draw:end-color="#2c5981" draw:start-intensity="100%" draw:end-intensity="100%" draw:border="0%">
      <loext:gradient-stop svg:offset="0" loext:color-type="rgb" loext:color-value="#4382ba"/>
      <loext:gradient-stop svg:offset="1" loext:color-type="rgb" loext:color-value="#2c5981"/>
    </draw:gradient>
    <draw:gradient draw:name="a854" draw:style="radial" draw:cx="50%" draw:cy="50%" draw:start-color="#4382ba" draw:end-color="#2c5981" draw:start-intensity="100%" draw:end-intensity="100%" draw:border="0%">
      <loext:gradient-stop svg:offset="0" loext:color-type="rgb" loext:color-value="#4382ba"/>
      <loext:gradient-stop svg:offset="1" loext:color-type="rgb" loext:color-value="#2c5981"/>
    </draw:gradient>
    <draw:marker draw:name="Arrow" svg:viewBox="0 0 20 30" svg:d="M10 0l-10 30h20z"/>
    <draw:marker draw:name="Arrow_20_short" draw:display-name="Arrow short" svg:viewBox="0 7 20 13" svg:d="M0 20l10-13 10 13z"/>
    <draw:marker draw:name="Arrowheads_20_15" draw:display-name="Arrowheads 15" svg:viewBox="0 0 20 13" svg:d="M0 13l10-13 10 13z"/>
    <draw:marker draw:name="a418" svg:viewBox="0 0 20 30" svg:d="M10 0l-10 30h20z"/>
    <draw:marker draw:name="a420" svg:viewBox="0 0 20 30" svg:d="M10 0l-10 30h20z"/>
    <draw:marker draw:name="a422" svg:viewBox="0 0 20 30" svg:d="M10 0l-10 30h20z"/>
    <draw:marker draw:name="a424" svg:viewBox="0 0 20 30" svg:d="M10 0l-10 30h20z"/>
    <draw:marker draw:name="a426" svg:viewBox="0 0 20 30" svg:d="M10 0l-10 30h20z"/>
    <draw:marker draw:name="a745" svg:viewBox="0 0 20 30" svg:d="M10 0l-10 30h20z"/>
    <draw:marker draw:name="a756" svg:viewBox="0 0 20 30" svg:d="M10 0l-10 30h20z"/>
    <draw:marker draw:name="a762" svg:viewBox="0 0 20 30" svg:d="M10 0l-10 30h20z"/>
    <draw:marker draw:name="a802" svg:viewBox="0 0 20 30" svg:d="M10 0l-10 30h20z"/>
    <draw:marker draw:name="a804" svg:viewBox="0 0 20 30" svg:d="M10 0l-10 30h20z"/>
    <draw:marker draw:name="a806" svg:viewBox="0 0 20 30" svg:d="M10 0l-10 30h20z"/>
    <draw:marker draw:name="a808" svg:viewBox="0 0 20 30" svg:d="M10 0l-10 30h20z"/>
    <draw:marker draw:name="a816" svg:viewBox="0 0 20 30" svg:d="M10 0l-10 30h20z"/>
    <draw:marker draw:name="a818" svg:viewBox="0 0 20 30" svg:d="M10 0l-10 30h20z"/>
    <draw:marker draw:name="a820" svg:viewBox="0 0 20 30" svg:d="M10 0l-10 30h20z"/>
    <draw:marker draw:name="a822" svg:viewBox="0 0 20 30" svg:d="M10 0l-10 30h20z"/>
    <draw:marker draw:name="a830" svg:viewBox="0 0 20 30" svg:d="M10 0l-10 30h20z"/>
    <draw:marker draw:name="a832" svg:viewBox="0 0 20 30" svg:d="M10 0l-10 30h20z"/>
    <draw:marker draw:name="a834" svg:viewBox="0 0 20 30" svg:d="M10 0l-10 30h20z"/>
    <draw:marker draw:name="a836" svg:viewBox="0 0 20 30" svg:d="M10 0l-10 30h20z"/>
    <draw:marker draw:name="a844" svg:viewBox="0 0 20 30" svg:d="M10 0l-10 30h20z"/>
    <draw:marker draw:name="a846" svg:viewBox="0 0 20 30" svg:d="M10 0l-10 30h20z"/>
    <draw:marker draw:name="a848" svg:viewBox="0 0 20 30" svg:d="M10 0l-10 30h20z"/>
    <draw:marker draw:name="a850" svg:viewBox="0 0 20 30" svg:d="M10 0l-10 30h20z"/>
    <draw:marker draw:name="a858" svg:viewBox="0 0 20 30" svg:d="M10 0l-10 30h20z"/>
    <draw:marker draw:name="a860" svg:viewBox="0 0 20 30" svg:d="M10 0l-10 30h20z"/>
    <draw:marker draw:name="a862" svg:viewBox="0 0 20 30" svg:d="M10 0l-10 30h20z"/>
    <draw:marker draw:name="a864" svg:viewBox="0 0 20 30" svg:d="M10 0l-10 30h20z"/>
    <draw:stroke-dash draw:name="SysDot" draw:style="rect" draw:dots1="1" draw:dots1-length="0.035cm" draw:distance="0.035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5T15:00:22.541555000</meta:creation-date>
    <dc:date>2026-05-28T15:23:25.427547000</dc:date>
    <meta:editing-duration>P5DT37M12S</meta:editing-duration>
    <meta:editing-cycles>45</meta:editing-cycles>
    <meta:generator>LibreOffice/25.2.4.3$MacOSX_AARCH64 LibreOffice_project/33e196637044ead23f5c3226cde09b47731f7e27</meta:generator>
    <meta:print-date>2026-01-12T16:44:25.569030000</meta:print-date>
    <meta:printed-by>PDF files</meta:printed-by>
    <meta:document-statistic meta:object-count="111"/>
  </office:meta>
</office:document-meta>
</file>