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50200000416F884A48F.jpg" manifest:media-type="image/jpeg"/>
  <manifest:file-entry manifest:full-path="Pictures/100000010000010000000100BCB6DC64.png" manifest:media-type="image/png"/>
  <manifest:file-entry manifest:full-path="Pictures/10000001000000B2000000B275B3C804.png" manifest:media-type="image/png"/>
  <manifest:file-entry manifest:full-path="Pictures/1000101300000DE200000DE2733E843D.svg" manifest:media-type="image/svg+xml"/>
  <manifest:file-entry manifest:full-path="Pictures/1000110400000DE200000DE28B6D5E81.svg" manifest:media-type="image/svg+xml"/>
  <manifest:file-entry manifest:full-path="Pictures/100000010000053D000003B1B3F0749D.png" manifest:media-type="image/png"/>
  <manifest:file-entry manifest:full-path="Pictures/10000001000000B2000000B2B1BFBF0A.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2"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3"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4"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5"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6" style:family="graphic">
      <style:graphic-properties style:writing-mode="lr-tb" loext:decorative="false"/>
    </style:style>
    <style:style style:name="gr7"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10"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11"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12"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14"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5"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16"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17"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18"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19"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0"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21"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22"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23"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24"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26"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27"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28"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29"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30"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31"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32"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33"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textarea-horizontal-align="justify" draw:textarea-vertical-align="middle" draw:auto-grow-height="false" fo:min-height="1.225cm" fo:min-width="0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776cm" fo:min-width="4.71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76cm" fo:min-width="3.568cm" loext:decorative="false"/>
      <style:paragraph-properties style:writing-mode="lr-tb"/>
    </style:style>
    <style:style style:name="gr38" style:family="graphic" style:parent-style-name="standard">
      <style:graphic-properties draw:stroke="dash" draw:stroke-dash="SysDot" svg:stroke-width="0.053cm" svg:stroke-color="#5b9bd5" draw:marker-start="Arrow_20_short" draw:marker-start-width="0.254cm" draw:marker-end="Arrow_20_short" draw:marker-end-width="0.254cm" svg:stroke-opacity="100%" draw:stroke-linejoin="miter" svg:stroke-linecap="butt" draw:fill="non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right" draw:auto-grow-height="true" draw:auto-grow-width="true" fo:min-height="1.381cm" fo:min-width="4.628cm" loext:decorative="false"/>
      <style:paragraph-properties style:writing-mode="lr-tb"/>
    </style:style>
    <style:style style:name="gr40" style:family="graphic" style:parent-style-name="standard">
      <style:graphic-properties draw:stroke="none" svg:stroke-color="#000000" draw:fill="none" draw:fill-color="#ffffff" draw:textarea-horizontal-align="right" draw:auto-grow-height="true" draw:auto-grow-width="true" fo:min-height="2.071cm" fo:min-width="3.233cm" loext:decorative="false"/>
      <style:paragraph-properties style:writing-mode="lr-tb"/>
    </style:style>
    <style:style style:name="gr41" style:family="graphic">
      <style:graphic-properties style:protect="size" loext:decorative="false"/>
    </style:style>
    <style:style style:name="gr4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2.703cm" fo:min-width="7.754cm" fo:padding-top="0.15cm" fo:padding-bottom="0.15cm" fo:padding-left="0.275cm" fo:padding-right="0.275cm" loext:decorative="false"/>
    </style:style>
    <style:style style:name="gr43" style:family="graphic" style:parent-style-name="standard">
      <style:graphic-properties draw:stroke="solid" svg:stroke-width="0.035cm" svg:stroke-color="#156082" svg:stroke-opacity="100%" draw:stroke-linejoin="miter" svg:stroke-linecap="butt" draw:fill="solid" draw:fill-color="#5b9bd5" draw:textarea-horizontal-align="center" draw:textarea-vertical-align="middle" draw:auto-grow-height="false" draw:auto-grow-width="false" fo:min-height="0.553cm" fo:min-width="4.521cm" fo:padding-top="0.254cm" fo:padding-bottom="0.254cm" fo:padding-left="0.254cm" fo:padding-right="0.254cm" fo:wrap-option="wrap" style:writing-mode="lr-tb" loext:decorative="false"/>
      <style:paragraph-properties style:writing-mode="lr-tb"/>
    </style:style>
    <style:style style:name="gr44" style:family="graphic" style:parent-style-name="standard">
      <style:graphic-properties draw:stroke="none" draw:fill="none" draw:textarea-horizontal-align="left" draw:textarea-vertical-align="middle" draw:auto-grow-height="false" draw:auto-grow-width="false" fo:padding-top="0.254cm" fo:padding-bottom="0.254cm" fo:padding-left="0.254cm" fo:padding-right="0.254cm" fo:wrap-option="wrap" loext:decorative="false"/>
      <style:paragraph-properties style:writing-mode="lr-tb"/>
    </style:style>
    <style:style style:name="gr45" style:family="graphic" style:parent-style-name="standard">
      <style:graphic-properties draw:stroke="solid" svg:stroke-width="0.035cm" svg:stroke-color="#0e2841" svg:stroke-opacity="100%" draw:stroke-linejoin="miter" svg:stroke-linecap="butt" draw:fill="solid" draw:fill-color="#ffffff" draw:opacity="100%" draw:textarea-horizontal-align="center" draw:textarea-vertical-align="middle" draw:auto-grow-height="false" draw:auto-grow-width="false" fo:min-height="1.325cm" fo:min-width="4.635cm" fo:padding-top="0.254cm" fo:padding-bottom="0.254cm" fo:padding-left="0.254cm" fo:padding-right="0.254cm" fo:wrap-option="wrap" style:writing-mode="lr-tb" loext:decorative="false"/>
      <style:paragraph-properties style:writing-mode="lr-tb"/>
    </style:style>
    <style:style style:name="gr46" style:family="graphic" style:parent-style-name="standard">
      <style:graphic-properties draw:stroke="solid" svg:stroke-width="0.051cm" svg:stroke-color="#5b9bd5" draw:marker-start-width="0.229cm" draw:marker-end-width="0.229cm" svg:stroke-opacity="100%" draw:stroke-linejoin="miter" svg:stroke-linecap="butt" draw:fill="solid" draw:fill-color="#deebf7" draw:opacity="100%" draw:textarea-horizontal-align="center" draw:textarea-vertical-align="middle" draw:auto-grow-height="false" draw:auto-grow-width="false" fo:min-height="1.325cm" fo:min-width="4.83cm" fo:padding-top="0.262cm" fo:padding-bottom="0.262cm" fo:padding-left="0.262cm" fo:padding-right="0.262cm" fo:wrap-option="wrap" style:writing-mode="lr-tb" loext:decorative="false"/>
      <style:paragraph-properties style:writing-mode="lr-tb"/>
    </style:style>
    <style:style style:name="gr47" style:family="graphic" style:parent-style-name="standard">
      <style:graphic-properties draw:stroke="solid" svg:stroke-width="0.026cm" svg:stroke-color="#000000" draw:marker-end="a418" svg:stroke-opacity="100%" draw:stroke-linejoin="round" svg:stroke-linecap="butt" draw:fill="none" fo:padding-top="0.138cm" fo:padding-bottom="0.138cm" fo:padding-left="0.263cm" fo:padding-right="0.263cm" loext:decorative="false"/>
    </style:style>
    <style:style style:name="gr48" style:family="graphic" style:parent-style-name="standard">
      <style:graphic-properties draw:stroke="solid" svg:stroke-width="0.026cm" svg:stroke-color="#0e2841" draw:marker-end="a420" svg:stroke-opacity="100%" draw:stroke-linejoin="round" svg:stroke-linecap="butt" draw:fill="none" fo:padding-top="0.138cm" fo:padding-bottom="0.138cm" fo:padding-left="0.263cm" fo:padding-right="0.263cm" loext:decorative="false"/>
    </style:style>
    <style:style style:name="gr49" style:family="graphic" style:parent-style-name="standard">
      <style:graphic-properties draw:stroke="solid" svg:stroke-width="0.026cm" svg:stroke-color="#000000" draw:marker-end="a422" svg:stroke-opacity="100%" draw:stroke-linejoin="round" svg:stroke-linecap="butt" draw:fill="none" fo:padding-top="0.138cm" fo:padding-bottom="0.138cm" fo:padding-left="0.263cm" fo:padding-right="0.263cm" loext:decorative="false"/>
    </style:style>
    <style:style style:name="gr50" style:family="graphic" style:parent-style-name="standard">
      <style:graphic-properties draw:stroke="solid" svg:stroke-width="0.026cm" svg:stroke-color="#0e2841" draw:marker-end="a424" svg:stroke-opacity="100%" draw:stroke-linejoin="round" svg:stroke-linecap="butt" draw:fill="none" fo:padding-top="0.138cm" fo:padding-bottom="0.138cm" fo:padding-left="0.263cm" fo:padding-right="0.263cm" loext:decorative="false"/>
    </style:style>
    <style:style style:name="gr51" style:family="graphic" style:parent-style-name="standard">
      <style:graphic-properties draw:stroke="solid" svg:stroke-width="0.026cm" svg:stroke-color="#0e2841" draw:marker-end="a426" svg:stroke-opacity="100%" draw:stroke-linejoin="round" svg:stroke-linecap="butt" draw:fill="none" fo:padding-top="0.138cm" fo:padding-bottom="0.138cm" fo:padding-left="0.263cm" fo:padding-right="0.263cm" loext:decorative="false"/>
    </style:style>
    <style:style style:name="gr52" style:family="graphic" style:parent-style-name="standard">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false" draw:auto-grow-width="false" fo:padding-top="0.095cm" fo:padding-bottom="0.095cm" fo:padding-left="0.19cm" fo:padding-right="0.19cm" fo:wrap-option="wrap" loext:decorative="false"/>
      <style:paragraph-properties style:writing-mode="lr-tb"/>
    </style:style>
    <style:style style:name="gr54" style:family="graphic" style:parent-style-name="standard">
      <style:graphic-properties draw:stroke="none" svg:stroke-color="#073763" draw:fill="solid" draw:fill-color="#5b9bd5" draw:opacity="100%" draw:textarea-horizontal-align="left" draw:textarea-vertical-align="middle" draw:auto-grow-height="false" draw:auto-grow-width="false" fo:min-height="2.442cm" fo:min-width="0cm" fo:padding-top="0.254cm" fo:padding-bottom="0.254cm" fo:padding-left="0.254cm" fo:padding-right="0.254cm" fo:wrap-option="wrap" style:writing-mode="lr-tb" loext:decorative="false"/>
      <style:paragraph-properties style:writing-mode="lr-tb"/>
    </style:style>
    <style:style style:name="gr55" style:family="graphic" style:parent-style-name="Object_20_with_20_no_20_fill_20_and_20_no_20_line">
      <style:graphic-properties draw:stroke="none" draw:fill="none" style:mirror="none" loext:decorative="false"/>
    </style:style>
    <style:style style:name="gr56" style:family="graphic" style:parent-style-name="standard">
      <style:graphic-properties draw:stroke="none" svg:stroke-color="#000000" draw:fill="none" draw:fill-color="#ffffff" draw:textarea-horizontal-align="right" draw:auto-grow-height="true" draw:auto-grow-width="true" fo:min-height="1.203cm" fo:min-width="4.549cm" loext:decorative="false"/>
      <style:paragraph-properties style:writing-mode="lr-tb"/>
    </style:style>
    <style:style style:name="gr57" style:family="graphic" style:parent-style-name="standard">
      <style:graphic-properties draw:stroke="none" svg:stroke-color="#000000" draw:fill="none" draw:fill-color="#ffffff" draw:textarea-horizontal-align="right" draw:auto-grow-height="true" draw:auto-grow-width="true" fo:min-height="1.203cm" fo:min-width="3.559cm" loext:decorative="false"/>
      <style:paragraph-properties style:writing-mode="lr-tb"/>
    </style:style>
    <style:style style:name="gr58" style:family="graphic" style:parent-style-name="standard">
      <style:graphic-properties draw:textarea-horizontal-align="justify" draw:textarea-vertical-align="middle" draw:auto-grow-height="false" fo:min-height="0.98cm" fo:min-width="2.358cm" style:writing-mode="lr-tb"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76cm" fo:min-width="3.019cm" loext:decorative="false"/>
      <style:paragraph-properties style:writing-mode="lr-tb"/>
    </style:style>
    <style:style style:name="gr60" style:family="graphic" style:parent-style-name="objectwithoutfill">
      <style:graphic-properties svg:stroke-width="0.051cm" draw:marker-start-width="0.279cm" draw:marker-end="Arrowheads_20_1" draw:marker-end-width="0.381cm" draw:fill="none" draw:textarea-vertical-align="middle" fo:padding-top="0.15cm" fo:padding-bottom="0.15cm" fo:padding-left="0.275cm" fo:padding-right="0.275cm" loext:decorative="false"/>
    </style:style>
    <style:style style:name="gr61" style:family="graphic" style:parent-style-name="objectwithoutfill">
      <style:graphic-properties svg:stroke-width="0.051cm" draw:marker-start-width="0.279cm" draw:marker-end="Arrowheads_20_2" draw:marker-end-width="0.381cm" draw:fill="none" draw:textarea-vertical-align="middle" fo:padding-top="0.15cm" fo:padding-bottom="0.15cm" fo:padding-left="0.275cm" fo:padding-right="0.275cm" loext:decorative="false"/>
    </style:style>
    <style:style style:name="gr6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687cm" fo:min-width="7.055cm" fo:padding-top="0.15cm" fo:padding-bottom="0.15cm" fo:padding-left="0.275cm" fo:padding-right="0.275cm" style:writing-mode="lr-tb" loext:decorative="false"/>
      <style:paragraph-properties style:writing-mode="lr-tb"/>
    </style:style>
    <style:style style:name="gr63" style:family="graphic" style:parent-style-name="objectwithoutfill">
      <style:graphic-properties svg:stroke-width="0.051cm" draw:marker-start-width="0.279cm" draw:marker-end="Arrowheads_20_3" draw:marker-end-width="0.381cm" draw:fill="none" draw:textarea-vertical-align="middle" fo:padding-top="0.15cm" fo:padding-bottom="0.15cm" fo:padding-left="0.275cm" fo:padding-right="0.275cm" loext:decorative="false"/>
    </style:style>
    <style:style style:name="gr64" style:family="graphic" style:parent-style-name="objectwithoutfill">
      <style:graphic-properties svg:stroke-width="0.051cm" draw:marker-start-width="0.279cm" draw:marker-end="Arrowheads_20_4" draw:marker-end-width="0.381cm" draw:fill="none" draw:textarea-vertical-align="middle" fo:padding-top="0.15cm" fo:padding-bottom="0.15cm" fo:padding-left="0.275cm" fo:padding-right="0.275cm" loext:decorative="false"/>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6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7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73" style:family="graphic" style:parent-style-name="standard">
      <style:graphic-properties draw:stroke="none" svg:stroke-color="#000000" draw:fill="none" draw:fill-color="#ffffff" draw:textarea-horizontal-align="center" draw:auto-grow-height="true" draw:auto-grow-width="true" fo:min-height="1.381cm" fo:min-width="2.705cm" loext:decorative="false"/>
      <style:paragraph-properties style:writing-mode="lr-tb"/>
    </style:style>
    <style:style style:name="gr74"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75" style:family="graphic">
      <style:graphic-properties draw:stroke="none" draw:fill="none" style:mirror="none" loext:decorative="false"/>
    </style:style>
    <style:style style:name="gr76"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77" style:family="graphic" style:parent-style-name="standard">
      <style:graphic-properties draw:stroke="solid" svg:stroke-width="0.026cm" svg:stroke-color="#44546a" svg:stroke-opacity="100%" draw:stroke-linejoin="round" svg:stroke-linecap="butt" draw:fill="none" fo:padding-top="0.138cm" fo:padding-bottom="0.138cm" fo:padding-left="0.263cm" fo:padding-right="0.263cm" loext:decorative="false"/>
    </style:style>
    <style:style style:name="gr78" style:family="graphic" style:parent-style-name="standard">
      <style:graphic-properties draw:stroke="solid" svg:stroke-width="0.079cm" svg:stroke-color="#2e75b6" svg:stroke-opacity="100%" draw:stroke-linejoin="round" svg:stroke-linecap="butt" draw:fill="none" fo:padding-top="0.164cm" fo:padding-bottom="0.164cm" fo:padding-left="0.289cm" fo:padding-right="0.289cm" loext:decorative="false"/>
    </style:style>
    <style:style style:name="gr79" style:family="graphic" style:parent-style-name="standard">
      <style:graphic-properties draw:stroke="none" draw:fill="none" draw:textarea-horizontal-align="center" draw:textarea-vertical-align="top" draw:auto-grow-height="false" draw:auto-grow-width="false" fo:padding-top="0.254cm" fo:padding-bottom="0.254cm" fo:padding-left="0.254cm" fo:padding-right="0.254cm" fo:wrap-option="wrap" loext:decorative="false"/>
      <style:paragraph-properties style:writing-mode="lr-tb"/>
    </style:style>
    <style:style style:name="gr80" style:family="graphic" style:parent-style-name="standard">
      <style:graphic-properties draw:stroke="solid" svg:stroke-width="0.026cm" svg:stroke-color="#2e75b6" svg:stroke-opacity="100%" draw:fill="solid" draw:fill-color="#2e75b6" draw:opacity="100%" draw:textarea-horizontal-align="left" draw:textarea-vertical-align="middle" draw:auto-grow-height="false" draw:auto-grow-width="false" fo:min-height="0cm" fo:min-width="0.642cm" fo:padding-top="0.254cm" fo:padding-bottom="0.254cm" fo:padding-left="0.254cm" fo:padding-right="0.254cm" fo:wrap-option="wrap" draw:shadow="visible" draw:shadow-offset-x="0cm" draw:shadow-offset-y="0.053cm" draw:shadow-color="#000000" draw:shadow-opacity="63%" style:writing-mode="lr-tb" loext:decorative="false"/>
      <style:paragraph-properties style:writing-mode="lr-tb"/>
    </style:style>
    <style:style style:name="gr81"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079cm" fo:min-width="6.932cm" fo:padding-top="0.254cm" fo:padding-bottom="0.254cm" fo:padding-left="0.254cm" fo:padding-right="0.254cm" fo:wrap-option="wrap" style:writing-mode="lr-tb" loext:decorative="false"/>
      <style:paragraph-properties style:writing-mode="lr-tb"/>
    </style:style>
    <style:style style:name="gr82" style:family="graphic" style:parent-style-name="standard">
      <style:graphic-properties draw:stroke="solid" svg:stroke-width="0.035cm" svg:stroke-color="#000000" draw:marker-end="a768" svg:stroke-opacity="100%" draw:stroke-linejoin="miter" svg:stroke-linecap="butt" draw:fill="none" fo:padding-top="0.142cm" fo:padding-bottom="0.142cm" fo:padding-left="0.267cm" fo:padding-right="0.267cm" loext:decorative="false"/>
    </style:style>
    <style:style style:name="gr83" style:family="graphic">
      <style:graphic-properties draw:stroke="none" draw:fill="none" fo:clip="rect(0cm, 0cm, 0cm, 0cm)" draw:image-opacity="100%" style:mirror="none" loext:decorative="false"/>
    </style:style>
    <style:style style:name="gr84" style:family="graphic" style:parent-style-name="standard">
      <style:graphic-properties draw:stroke="dash" draw:stroke-dash="Dash" svg:stroke-width="0.026cm" svg:stroke-color="#44546a" svg:stroke-opacity="100%" draw:stroke-linejoin="round" svg:stroke-linecap="butt" draw:fill="none" draw:textarea-horizontal-align="left" draw:textarea-vertical-align="middle" draw:auto-grow-height="false" draw:auto-grow-width="false" fo:min-height="2.221cm" fo:min-width="6.007cm" fo:padding-top="0.254cm" fo:padding-bottom="0.254cm" fo:padding-left="0.254cm" fo:padding-right="0.254cm" fo:wrap-option="wrap" style:writing-mode="lr-tb" loext:decorative="false"/>
      <style:paragraph-properties style:writing-mode="lr-tb"/>
    </style:style>
    <style:style style:name="gr85" style:family="graphic">
      <style:graphic-properties draw:stroke="solid" svg:stroke-width="0.053cm" svg:stroke-color="#44546a" svg:stroke-opacity="100%" draw:stroke-linejoin="round" svg:stroke-linecap="butt" draw:fill="none" fo:clip="rect(0cm, 0.201cm, 8.591cm, 0cm)" draw:image-opacity="100%" style:mirror="none" loext:decorative="false"/>
    </style:style>
    <style:style style:name="gr86" style:family="graphic" style:parent-style-name="standard">
      <style:graphic-properties draw:stroke="solid" svg:stroke-width="0.026cm" svg:stroke-color="#9dc3e6" svg:stroke-opacity="100%" draw:fill="solid" draw:fill-color="#deebf7" draw:opacity="100%" draw:textarea-horizontal-align="left" draw:textarea-vertical-align="middle" draw:auto-grow-height="false" draw:auto-grow-width="false" fo:min-height="0cm" fo:min-width="0.789cm" fo:padding-top="0.254cm" fo:padding-bottom="0.254cm" fo:padding-left="0.254cm" fo:padding-right="0.254cm" fo:wrap-option="wrap" draw:shadow="visible" draw:shadow-offset-x="0cm" draw:shadow-offset-y="0.053cm" draw:shadow-color="#000000" draw:shadow-opacity="63%" style:writing-mode="lr-tb" loext:decorative="false"/>
      <style:paragraph-properties style:writing-mode="lr-tb"/>
    </style:style>
    <style:style style:name="gr8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081cm" fo:min-width="5.397cm" fo:padding-top="0.254cm" fo:padding-bottom="0.254cm" fo:padding-left="0.254cm" fo:padding-right="0.254cm" fo:wrap-option="wrap" style:writing-mode="lr-tb" loext:decorative="false"/>
      <style:paragraph-properties style:writing-mode="lr-tb"/>
    </style:style>
    <style:style style:name="gr88" style:family="graphic" style:parent-style-name="standard">
      <style:graphic-properties draw:stroke="solid" svg:stroke-width="0.035cm" svg:stroke-color="#000000" draw:marker-end="a781" svg:stroke-opacity="100%" draw:stroke-linejoin="miter" svg:stroke-linecap="butt" draw:fill="none" fo:padding-top="0.142cm" fo:padding-bottom="0.142cm" fo:padding-left="0.267cm" fo:padding-right="0.267cm" loext:decorative="false"/>
    </style:style>
    <style:style style:name="gr89" style:family="graphic" style:parent-style-name="standard">
      <style:graphic-properties draw:stroke="solid" svg:stroke-width="0.018cm" svg:stroke-color="#5b9bd5" svg:stroke-opacity="100%" draw:stroke-linejoin="miter" svg:stroke-linecap="butt" draw:fill="gradient" draw:fill-gradient-name="a916"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0" style:family="graphic" style:parent-style-name="standard">
      <style:graphic-properties draw:stroke="solid" svg:stroke-width="0.018cm" svg:stroke-color="#9dc3e6" svg:stroke-opacity="100%" draw:stroke-linejoin="miter" svg:stroke-linecap="butt" draw:fill="solid" draw:fill-color="#deebf7" draw:opacity="100%" draw:textarea-horizontal-align="center" draw:textarea-vertical-align="middle" draw:auto-grow-height="false" draw:auto-grow-width="false" fo:min-height="0.481cm" fo:min-width="2.721cm" fo:padding-top="0.127cm" fo:padding-bottom="0.127cm" fo:padding-left="0.254cm" fo:padding-right="0.254cm" fo:wrap-option="wrap" style:writing-mode="lr-tb" loext:decorative="false"/>
      <style:paragraph-properties style:writing-mode="lr-tb"/>
    </style:style>
    <style:style style:name="gr91" style:family="graphic" style:parent-style-name="standard">
      <style:graphic-properties draw:stroke="solid" svg:stroke-width="0.018cm" svg:stroke-color="#767171" svg:stroke-opacity="100%" draw:stroke-linejoin="miter" svg:stroke-linecap="butt" draw:fill="solid" draw:fill-color="#d9d9d9" draw:opacity="100%" draw:textarea-horizontal-align="center" draw:textarea-vertical-align="middle" draw:auto-grow-height="false" draw:auto-grow-width="false" fo:min-height="0.688cm" fo:min-width="2.721cm" fo:padding-top="0.127cm" fo:padding-bottom="0.127cm" fo:padding-left="0.254cm" fo:padding-right="0.254cm" fo:wrap-option="wrap" style:writing-mode="lr-tb" loext:decorative="false"/>
      <style:paragraph-properties style:writing-mode="lr-tb"/>
    </style:style>
    <style:style style:name="gr92" style:family="graphic" style:parent-style-name="standard">
      <style:graphic-properties draw:stroke="solid" svg:stroke-width="0.018cm" svg:stroke-color="#5b9bd5" svg:stroke-opacity="100%" draw:stroke-linejoin="miter" svg:stroke-linecap="butt" draw:fill="gradient" draw:fill-gradient-name="a909"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3" style:family="graphic" style:parent-style-name="standard">
      <style:graphic-properties draw:stroke="solid" svg:stroke-width="0.018cm" svg:stroke-color="#5b9bd5" svg:stroke-opacity="100%" draw:stroke-linejoin="miter" svg:stroke-linecap="butt" draw:fill="gradient" draw:fill-gradient-name="a902"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4" style:family="graphic" style:parent-style-name="standard">
      <style:graphic-properties draw:stroke="solid" svg:stroke-width="0.018cm" svg:stroke-color="#5b9bd5" svg:stroke-opacity="100%" draw:stroke-linejoin="miter" svg:stroke-linecap="butt" draw:fill="gradient" draw:fill-gradient-name="a889"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5" style:family="graphic" style:parent-style-name="standard">
      <style:graphic-properties draw:stroke="none" draw:fill="gradient" draw:fill-gradient-name="a858"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6" style:family="graphic" style:parent-style-name="standard">
      <style:graphic-properties draw:stroke="solid" svg:stroke-width="0.106cm" svg:stroke-color="#ffffff" draw:marker-end="a866"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ffffff" draw:marker-end="a868"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none" draw:fill="gradient" draw:fill-gradient-name="a844"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9" style:family="graphic" style:parent-style-name="standard">
      <style:graphic-properties draw:stroke="solid" svg:stroke-width="0.106cm" svg:stroke-color="#ffffff" draw:marker-end="a852" svg:stroke-opacity="100%" draw:stroke-linejoin="miter" svg:stroke-linecap="butt" draw:fill="none" fo:padding-top="0.178cm" fo:padding-bottom="0.178cm" fo:padding-left="0.303cm" fo:padding-right="0.303cm" loext:decorative="false"/>
    </style:style>
    <style:style style:name="gr100" style:family="graphic" style:parent-style-name="standard">
      <style:graphic-properties draw:stroke="solid" svg:stroke-width="0.106cm" svg:stroke-color="#ffffff" draw:marker-end="a854" svg:stroke-opacity="100%" draw:stroke-linejoin="miter" svg:stroke-linecap="butt" draw:fill="none" fo:padding-top="0.178cm" fo:padding-bottom="0.178cm" fo:padding-left="0.303cm" fo:padding-right="0.303cm" loext:decorative="false"/>
    </style:style>
    <style:style style:name="gr101" style:family="graphic" style:parent-style-name="standard">
      <style:graphic-properties draw:stroke="none" draw:fill="gradient" draw:fill-gradient-name="a830"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2" style:family="graphic" style:parent-style-name="standard">
      <style:graphic-properties draw:stroke="solid" svg:stroke-width="0.106cm" svg:stroke-color="#ffffff" draw:marker-end="a838" svg:stroke-opacity="100%" draw:stroke-linejoin="miter" svg:stroke-linecap="butt" draw:fill="none" fo:padding-top="0.178cm" fo:padding-bottom="0.178cm" fo:padding-left="0.303cm" fo:padding-right="0.303cm" loext:decorative="false"/>
    </style:style>
    <style:style style:name="gr103" style:family="graphic" style:parent-style-name="standard">
      <style:graphic-properties draw:stroke="solid" svg:stroke-width="0.106cm" svg:stroke-color="#ffffff" draw:marker-end="a840" svg:stroke-opacity="100%" draw:stroke-linejoin="miter" svg:stroke-linecap="butt" draw:fill="none" fo:padding-top="0.178cm" fo:padding-bottom="0.178cm" fo:padding-left="0.303cm" fo:padding-right="0.303cm" loext:decorative="false"/>
    </style:style>
    <style:style style:name="gr104" style:family="graphic" style:parent-style-name="standard">
      <style:graphic-properties draw:stroke="none" draw:fill="gradient" draw:fill-gradient-name="a816"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5" style:family="graphic" style:parent-style-name="standard">
      <style:graphic-properties draw:stroke="solid" svg:stroke-width="0.106cm" svg:stroke-color="#ffffff" draw:marker-end="a824" svg:stroke-opacity="100%" draw:stroke-linejoin="miter" svg:stroke-linecap="butt" draw:fill="none" fo:padding-top="0.178cm" fo:padding-bottom="0.178cm" fo:padding-left="0.303cm" fo:padding-right="0.303cm" loext:decorative="false"/>
    </style:style>
    <style:style style:name="gr106" style:family="graphic" style:parent-style-name="standard">
      <style:graphic-properties draw:stroke="solid" svg:stroke-width="0.106cm" svg:stroke-color="#ffffff" draw:marker-end="a826" svg:stroke-opacity="100%" draw:stroke-linejoin="miter" svg:stroke-linecap="butt" draw:fill="none" fo:padding-top="0.178cm" fo:padding-bottom="0.178cm" fo:padding-left="0.303cm" fo:padding-right="0.303cm" loext:decorative="false"/>
    </style:style>
    <style:style style:name="gr107" style:family="graphic" style:parent-style-name="standard">
      <style:graphic-properties draw:stroke="none" draw:fill="gradient" draw:fill-gradient-name="a802"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8" style:family="graphic" style:parent-style-name="standard">
      <style:graphic-properties draw:stroke="solid" svg:stroke-width="0.106cm" svg:stroke-color="#ffffff" draw:marker-end="a810" svg:stroke-opacity="100%" draw:stroke-linejoin="miter" svg:stroke-linecap="butt" draw:fill="none" fo:padding-top="0.178cm" fo:padding-bottom="0.178cm" fo:padding-left="0.303cm" fo:padding-right="0.303cm" loext:decorative="false"/>
    </style:style>
    <style:style style:name="gr109" style:family="graphic" style:parent-style-name="standard">
      <style:graphic-properties draw:stroke="solid" svg:stroke-width="0.106cm" svg:stroke-color="#ffffff" draw:marker-end="a812" svg:stroke-opacity="100%" draw:stroke-linejoin="miter" svg:stroke-linecap="butt" draw:fill="none" fo:padding-top="0.178cm" fo:padding-bottom="0.178cm" fo:padding-left="0.303cm" fo:padding-right="0.303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 style:family="paragraph">
      <loext:graphic-properties draw:fill="gradient" draw:fill-gradient-name="a854"/>
      <style:paragraph-properties style:writing-mode="lr-tb" style:font-independent-line-spacing="true"/>
    </style:style>
    <style:style style:name="P5" style:family="paragraph">
      <loext:graphic-properties draw:fill="gradient" draw:fill-gradient-name="a840"/>
      <style:paragraph-properties style:writing-mode="lr-tb" style:font-independent-line-spacing="true"/>
    </style:style>
    <style:style style:name="P6" style:family="paragraph">
      <loext:graphic-properties draw:fill="gradient" draw:fill-gradient-name="a826"/>
      <style:paragraph-properties style:writing-mode="lr-tb" style:font-independent-line-spacing="true"/>
    </style:style>
    <style:style style:name="P7" style:family="paragraph">
      <loext:graphic-properties draw:fill="gradient" draw:fill-gradient-name="a812"/>
      <style:paragraph-properties style:writing-mode="lr-tb" style:font-independent-line-spacing="true"/>
    </style:style>
    <style:style style:name="P8" style:family="paragraph">
      <loext:graphic-properties draw:fill="gradient" draw:fill-gradient-name="a798"/>
      <style:paragraph-properties style:writing-mode="lr-tb" style:font-independent-line-spacing="tru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text-properties style:font-name="Calibri1"/>
    </style:style>
    <style:style style:name="P12" style:family="paragraph">
      <loext:graphic-properties draw:fill="none" draw:fill-color="#ffffff"/>
      <style:text-properties style:font-name="Calibri1" fo:font-style="italic" style:font-style-asian="italic" style:font-style-complex="italic"/>
    </style:style>
    <style:style style:name="P13" style:family="paragraph">
      <style:paragraph-properties fo:text-align="end"/>
    </style:style>
    <style:style style:name="P14" style:family="paragraph">
      <loext:graphic-properties draw:fill="none" draw:fill-color="#ffffff"/>
      <style:paragraph-properties fo:text-align="end"/>
      <style:text-properties style:font-name="Calibri1" fo:font-size="16pt" style:font-size-asian="16pt" style:font-size-complex="16pt"/>
    </style:style>
    <style:style style:name="P15" style:family="paragraph">
      <loext:graphic-properties draw:fill-color="#ffffff"/>
    </style:style>
    <style:style style:name="P16" style:family="paragraph">
      <loext:graphic-properties draw:fill="solid" draw:fill-color="#ffffff"/>
      <style:paragraph-properties fo:text-align="center"/>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ffffff" loext:opacity="100%" style:font-name="Calibri1"/>
    </style:style>
    <style:style style:name="P18" style:family="paragraph">
      <loext:graphic-properties draw:fill="solid" draw:fill-color="#5b9bd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color="#ffffff" loext:opacity="100%" style:font-name="Calibri1"/>
    </style:style>
    <style:style style:name="P1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0" style:family="paragraph">
      <loext:graphic-properties draw:fill="none"/>
      <style:paragraph-properties style:font-independent-line-spacing="true"/>
    </style:style>
    <style:style style:name="P21"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Calibri1"/>
    </style:style>
    <style:style style:name="P23"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Calibri1"/>
    </style:style>
    <style:style style:name="P2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5" style:family="paragraph">
      <loext:graphic-properties draw:fill="solid" draw:fill-color="#5b9bd5" draw:opacity="100%"/>
      <style:paragraph-properties style:writing-mode="lr-tb" style:font-independent-line-spacing="true"/>
    </style:style>
    <style:style style:name="P26" style:family="paragraph">
      <loext:graphic-properties draw:fill="none" draw:fill-color="#ffffff"/>
      <style:paragraph-properties fo:text-align="end"/>
      <style:text-properties style:font-name="Calibri1" fo:font-size="14pt" style:font-size-asian="14pt" style:font-size-complex="14pt"/>
    </style:style>
    <style:style style:name="P27" style:family="paragraph">
      <style:paragraph-properties fo:line-height="85%" fo:text-align="center"/>
      <style:text-properties fo:color="#ffffff" loext:opacity="100%" style:font-name="Calibri1" fo:font-size="16pt" style:font-size-asian="16pt" style:font-size-complex="16pt"/>
    </style:style>
    <style:style style:name="P28" style:family="paragraph">
      <style:paragraph-properties fo:line-height="85%" fo:text-align="center" style:writing-mode="lr-tb"/>
      <style:text-properties fo:color="#ffffff" loext:opacity="100%" style:font-name="Calibri1" fo:font-size="16pt" style:font-size-asian="16pt" style:font-size-complex="16pt"/>
    </style:style>
    <style:style style:name="P29" style:family="paragraph">
      <style:paragraph-properties fo:text-align="center"/>
      <style:text-properties style:font-name="Calibri1"/>
    </style:style>
    <style:style style:name="P30" style:family="paragraph">
      <loext:graphic-properties draw:fill="solid" draw:fill-color="#ffffff"/>
      <style:paragraph-properties fo:text-align="center" style:writing-mode="lr-tb"/>
      <style:text-properties style:font-name="Calibri1"/>
    </style:style>
    <style:style style:name="P31" style:family="paragraph">
      <loext:graphic-properties draw:fill="none" draw:fill-color="#ffffff"/>
      <style:paragraph-properties fo:text-align="center"/>
      <style:text-properties style:font-name="Calibri1" fo:font-size="16pt" style:font-size-asian="16pt" style:font-size-complex="16pt"/>
    </style:style>
    <style:style style:name="P32" style:family="paragraph">
      <loext:graphic-properties draw:fill="solid" draw:fill-color="#ffffff" draw:opacity="100%"/>
      <style:paragraph-properties style:writing-mode="lr-tb" style:font-independent-line-spacing="true"/>
    </style:style>
    <style:style style:name="P33" style:family="paragraph">
      <loext:graphic-properties draw:fill="solid" draw:fill-color="#2e75b6" draw:opacity="100%"/>
      <style:paragraph-properties style:writing-mode="lr-tb" style:font-independent-line-spacing="true"/>
    </style:style>
    <style:style style:name="P34" style:family="paragraph">
      <loext:graphic-properties draw:fill="none"/>
      <style:paragraph-properties style:writing-mode="lr-tb" style:font-independent-line-spacing="true"/>
    </style:style>
    <style:style style:name="P35" style:family="paragraph">
      <loext:graphic-properties draw:fill="solid" draw:fill-color="#deebf7" draw:opacity="100%"/>
      <style:paragraph-properties style:writing-mode="lr-tb" style:font-independent-line-spacing="true"/>
    </style:style>
    <style:style style:name="P36" style:family="paragraph">
      <loext:graphic-properties draw:fill="gradient" draw:fill-gradient-name="a9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7" style:family="paragraph">
      <loext:graphic-properties draw:fill="solid" draw:fill-color="#d9d9d9"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8" style:family="paragraph">
      <loext:graphic-properties draw:fill="gradient" draw:fill-gradient-name="a90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9" style:family="paragraph">
      <loext:graphic-properties draw:fill="gradient" draw:fill-gradient-name="a90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88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858"/>
      <style:paragraph-properties style:writing-mode="lr-tb" style:font-independent-line-spacing="true"/>
    </style:style>
    <style:style style:name="P42" style:family="paragraph">
      <loext:graphic-properties draw:fill="gradient" draw:fill-gradient-name="a844"/>
      <style:paragraph-properties style:writing-mode="lr-tb" style:font-independent-line-spacing="true"/>
    </style:style>
    <style:style style:name="P43" style:family="paragraph">
      <loext:graphic-properties draw:fill="gradient" draw:fill-gradient-name="a830"/>
      <style:paragraph-properties style:writing-mode="lr-tb" style:font-independent-line-spacing="true"/>
    </style:style>
    <style:style style:name="P44" style:family="paragraph">
      <loext:graphic-properties draw:fill="gradient" draw:fill-gradient-name="a816"/>
      <style:paragraph-properties style:writing-mode="lr-tb" style:font-independent-line-spacing="true"/>
    </style:style>
    <style:style style:name="P45" style:family="paragraph">
      <loext:graphic-properties draw:fill="gradient" draw:fill-gradient-name="a802"/>
      <style:paragraph-properties style:writing-mode="lr-tb" style:font-independent-line-spacing="true"/>
    </style:style>
    <style:style style:name="T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 style:family="text">
      <style:text-properties style:font-name="Calibri1"/>
    </style:style>
    <style:style style:name="T3" style:family="text">
      <style:text-properties style:font-name="Calibri1" fo:font-style="italic" style:font-style-asian="italic" style:font-style-complex="italic"/>
    </style:style>
    <style:style style:name="T4" style:family="text">
      <style:text-properties style:font-name="Calibri1" fo:font-size="16pt" style:font-size-asian="16pt" style:font-size-complex="16pt"/>
    </style:style>
    <style:style style:name="T5"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fo:font-size="14pt" fo:letter-spacing="normal" fo:language="en" fo:country="US" fo:font-style="italic" style:text-underline-style="none" fo:font-weight="normal" style:text-underline-mode="continuous" style:text-overline-mode="continuous" style:text-line-through-mode="continuous" style:letter-kerning="true"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Consolas" fo:font-size="18pt" fo:letter-spacing="normal" fo:language="en" fo:country="US" fo:font-style="normal" style:text-underline-style="none" fo:font-weight="bold" style:text-underline-mode="continuous" style:text-overline-mode="continuous" style:text-line-through-mode="continuous" style:letter-kerning="true" style:font-name-asian="Consolas" style:font-size-asian="18pt" style:font-style-asian="normal" style:font-weight-asian="bold" style:font-name-complex="Consolas"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4" style:family="text">
      <style:text-properties style:font-name="Calibri1" fo:font-size="14pt" style:font-size-asian="14pt" style:font-size-complex="14pt"/>
    </style:style>
    <style:style style:name="T15" style:family="text">
      <style:text-properties fo:color="#ffffff" loext:opacity="100%" style:font-name="Calibri1" fo:font-size="16pt" style:font-size-asian="16pt" style:font-size-complex="16pt"/>
    </style:style>
    <style:style style:name="T16"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6pt" style:font-style-asian="italic" style:font-weight-asian="normal" style:font-name-complex="Arial" style:font-size-complex="16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onnector draw:name="Straight Arrow Connector 7" draw:style-name="gr1" draw:text-style-name="P1" draw:layer="layout" draw:type="line" svg:x1="6.607cm" svg:y1="7.117cm" svg:x2="6.586cm" svg:y2="11.039cm" svg:d="M6607 7117l-21 3922" svg:viewBox="0 0 22 3923">
          <text:p/>
        </draw:connector>
        <draw:connector draw:name="Straight Arrow Connector 16" draw:style-name="gr2" draw:text-style-name="P1" draw:layer="layout" draw:type="line" svg:x1="14.773cm" svg:y1="7.008cm" svg:x2="14.752cm" svg:y2="10.93cm" svg:d="M14773 7008l-21 3922" svg:viewBox="0 0 22 3923">
          <text:p/>
        </draw:connector>
        <draw:connector draw:name="Straight Arrow Connector 18" draw:style-name="gr3" draw:text-style-name="P1" draw:layer="layout" draw:type="line" svg:x1="11.215cm" svg:y1="4.809cm" svg:x2="11.193cm" svg:y2="8.731cm" svg:d="M11215 4809l-22 3922" svg:viewBox="0 0 23 3923">
          <text:p/>
        </draw:connector>
        <draw:custom-shape draw:name="Rectangle 49" draw:style-name="gr4" draw:text-style-name="P3" draw:layer="layout" svg:width="15.803cm" svg:height="2.835cm" svg:x="5.013cm" svg:y="4.745cm">
          <text:p text:style-name="P2"><text:span text:style-name="T1">Network Management System</text:span></text:p>
          <draw:enhanced-geometry svg:viewBox="0 0 21600 21600" draw:type="non-primitive" draw:enhanced-path="M 0 0 L 21600 0 21600 21600 0 21600 Z N"/>
        </draw:custom-shape>
        <draw:connector draw:name="Straight Connector 46" draw:style-name="gr5" draw:text-style-name="P1" draw:layer="layout" draw:type="line" svg:x1="14.686cm" svg:y1="11.707cm" svg:x2="11.423cm" svg:y2="13.297cm" svg:d="M14686 11707l-3263 1590" svg:viewBox="0 0 3264 1591">
          <text:p/>
        </draw:connector>
        <draw:connector draw:name="Straight Connector 47" draw:style-name="gr5" draw:text-style-name="P1" draw:layer="layout" draw:type="line" svg:x1="10.242cm" svg:y1="9.64cm" svg:x2="7.403cm" svg:y2="11.092cm" svg:d="M10242 9640l-2839 1452" svg:viewBox="0 0 2840 1453">
          <text:p/>
        </draw:connector>
        <draw:connector draw:name="Straight Connector 48" draw:style-name="gr5" draw:text-style-name="P1" draw:layer="layout" draw:type="line" svg:x1="13.773cm" svg:y1="11.098cm" svg:x2="11.422cm" svg:y2="9.547cm" svg:d="M13773 11098l-2351-1551" svg:viewBox="0 0 2352 1552">
          <text:p/>
        </draw:connector>
        <draw:g draw:name="Group 54" draw:style-name="gr6">
          <draw:custom-shape draw:name="Cube 55" draw:style-name="gr7" draw:text-style-name="P4" draw:layer="layout" svg:width="2.875cm" svg:height="1.097cm" svg:x="9.754cm" svg:y="8.75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6">
            <draw:g draw:name="Group 57" draw:style-name="gr8">
              <draw:connector draw:name="Straight Arrow Connector 63" draw:style-name="gr9" draw:text-style-name="P1" draw:layer="layout" draw:type="line" svg:x1="11.365cm" svg:y1="8.916cm" svg:x2="12.35cm" svg:y2="8.916cm" svg:d="M11365 8916h985" svg:viewBox="0 0 986 1">
                <text:p/>
              </draw:connector>
              <draw:connector draw:name="Straight Arrow Connector 64" draw:style-name="gr10" draw:text-style-name="P1" draw:layer="layout" draw:type="line" svg:x1="11.365cm" svg:y1="9.265cm" svg:x2="11.984cm" svg:y2="9.265cm" svg:d="M11365 9265h619" svg:viewBox="0 0 620 1">
                <text:p/>
              </draw:connector>
            </draw:g>
            <draw:g draw:name="Group 58" draw:style-name="gr8">
              <draw:connector draw:name="Straight Arrow Connector 61" draw:style-name="gr11" draw:text-style-name="P1" draw:layer="layout" draw:type="line" svg:x1="11.018cm" svg:y1="8.922cm" svg:x2="10.415cm" svg:y2="8.922cm" svg:d="M11018 8922h-603" svg:viewBox="0 0 604 1">
                <text:p/>
              </draw:connector>
              <draw:connector draw:name="Straight Arrow Connector 62" draw:style-name="gr12" draw:text-style-name="P1" draw:layer="layout" draw:type="line" svg:x1="11.018cm" svg:y1="9.265cm" svg:x2="10.048cm" svg:y2="9.265cm" svg:d="M11018 9265h-970" svg:viewBox="0 0 971 1">
                <text:p/>
              </draw:connector>
            </draw:g>
            <draw:connector draw:name="Straight Connector 59" draw:style-name="gr13" draw:text-style-name="P1" draw:layer="layout" draw:type="line" svg:x1="10.998cm" svg:y1="9.272cm" svg:x2="11.385cm" svg:y2="8.91cm" svg:d="M10998 9272l387-362" svg:viewBox="0 0 388 363">
              <text:p/>
            </draw:connector>
            <draw:connector draw:name="Straight Connector 60" draw:style-name="gr13" draw:text-style-name="P1" draw:layer="layout" draw:type="line" svg:x1="11.385cm" svg:y1="9.272cm" svg:x2="10.998cm" svg:y2="8.91cm" svg:d="M11385 9272l-387-362" svg:viewBox="0 0 388 363">
              <text:p/>
            </draw:connector>
          </draw:g>
        </draw:g>
        <draw:connector draw:name="Straight Connector 65" draw:style-name="gr5" draw:text-style-name="P1" draw:layer="layout" draw:type="line" svg:x1="9.749cm" svg:y1="13.115cm" svg:x2="7.593cm" svg:y2="11.453cm" svg:d="M9749 13115l-2156-1662" svg:viewBox="0 0 2157 1663">
          <text:p/>
        </draw:connector>
        <draw:connector draw:name="Straight Connector 66" draw:style-name="gr5" draw:text-style-name="P1" draw:layer="layout" draw:type="line" svg:x1="18.421cm" svg:y1="9.663cm" svg:x2="15.51cm" svg:y2="11.092cm" svg:d="M18421 9663l-2911 1429" svg:viewBox="0 0 2912 1430">
          <text:p/>
        </draw:connector>
        <draw:g draw:name="Group 67" draw:style-name="gr6">
          <draw:custom-shape draw:name="Cube 68" draw:style-name="gr14" draw:text-style-name="P5" draw:layer="layout" svg:width="2.875cm" svg:height="1.048cm" svg:x="13.267cm" svg:y="10.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6">
            <draw:g draw:name="Group 70" draw:style-name="gr8">
              <draw:connector draw:name="Straight Arrow Connector 76" draw:style-name="gr15" draw:text-style-name="P1" draw:layer="layout" draw:type="line" svg:x1="14.879cm" svg:y1="11.106cm" svg:x2="15.865cm" svg:y2="11.106cm" svg:d="M14879 11106h986" svg:viewBox="0 0 987 1">
                <text:p/>
              </draw:connector>
              <draw:connector draw:name="Straight Arrow Connector 77" draw:style-name="gr16" draw:text-style-name="P1" draw:layer="layout" draw:type="line" svg:x1="14.879cm" svg:y1="11.455cm" svg:x2="15.498cm" svg:y2="11.455cm" svg:d="M14879 11455h619" svg:viewBox="0 0 620 1">
                <text:p/>
              </draw:connector>
            </draw:g>
            <draw:g draw:name="Group 71" draw:style-name="gr8">
              <draw:connector draw:name="Straight Arrow Connector 74" draw:style-name="gr17" draw:text-style-name="P1" draw:layer="layout" draw:type="line" svg:x1="14.531cm" svg:y1="11.112cm" svg:x2="13.93cm" svg:y2="11.112cm" svg:d="M14531 11112h-601" svg:viewBox="0 0 602 1">
                <text:p/>
              </draw:connector>
              <draw:connector draw:name="Straight Arrow Connector 75" draw:style-name="gr18" draw:text-style-name="P1" draw:layer="layout" draw:type="line" svg:x1="14.531cm" svg:y1="11.455cm" svg:x2="13.563cm" svg:y2="11.455cm" svg:d="M14531 11455h-968" svg:viewBox="0 0 969 1">
                <text:p/>
              </draw:connector>
            </draw:g>
            <draw:connector draw:name="Straight Connector 72" draw:style-name="gr13" draw:text-style-name="P1" draw:layer="layout" draw:type="line" svg:x1="14.512cm" svg:y1="11.461cm" svg:x2="14.899cm" svg:y2="11.1cm" svg:d="M14512 11461l387-361" svg:viewBox="0 0 388 362">
              <text:p/>
            </draw:connector>
            <draw:connector draw:name="Straight Connector 73" draw:style-name="gr13" draw:text-style-name="P1" draw:layer="layout" draw:type="line" svg:x1="14.899cm" svg:y1="11.461cm" svg:x2="14.512cm" svg:y2="11.1cm" svg:d="M14899 11461l-387-361" svg:viewBox="0 0 388 362">
              <text:p/>
            </draw:connector>
          </draw:g>
        </draw:g>
        <draw:g draw:name="Group 78" draw:style-name="gr6">
          <draw:custom-shape draw:name="Cube 79" draw:style-name="gr19" draw:text-style-name="P6" draw:layer="layout" svg:width="2.875cm" svg:height="1.077cm" svg:x="17.61cm" svg:y="8.8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6">
            <draw:g draw:name="Group 81" draw:style-name="gr8">
              <draw:connector draw:name="Straight Arrow Connector 87" draw:style-name="gr20" draw:text-style-name="P1" draw:layer="layout" draw:type="line" svg:x1="19.221cm" svg:y1="8.986cm" svg:x2="20.207cm" svg:y2="8.986cm" svg:d="M19221 8986h986" svg:viewBox="0 0 987 1">
                <text:p/>
              </draw:connector>
              <draw:connector draw:name="Straight Arrow Connector 88" draw:style-name="gr21" draw:text-style-name="P1" draw:layer="layout" draw:type="line" svg:x1="19.221cm" svg:y1="9.335cm" svg:x2="19.84cm" svg:y2="9.335cm" svg:d="M19221 9335h619" svg:viewBox="0 0 620 1">
                <text:p/>
              </draw:connector>
            </draw:g>
            <draw:g draw:name="Group 82" draw:style-name="gr8">
              <draw:connector draw:name="Straight Arrow Connector 85" draw:style-name="gr22" draw:text-style-name="P1" draw:layer="layout" draw:type="line" svg:x1="18.874cm" svg:y1="8.992cm" svg:x2="18.272cm" svg:y2="8.992cm" svg:d="M18874 8992h-602" svg:viewBox="0 0 603 1">
                <text:p/>
              </draw:connector>
              <draw:connector draw:name="Straight Arrow Connector 86" draw:style-name="gr23" draw:text-style-name="P1" draw:layer="layout" draw:type="line" svg:x1="18.874cm" svg:y1="9.335cm" svg:x2="17.905cm" svg:y2="9.335cm" svg:d="M18874 9335h-969" svg:viewBox="0 0 970 1">
                <text:p/>
              </draw:connector>
            </draw:g>
            <draw:connector draw:name="Straight Connector 83" draw:style-name="gr13" draw:text-style-name="P1" draw:layer="layout" draw:type="line" svg:x1="18.854cm" svg:y1="9.341cm" svg:x2="19.241cm" svg:y2="8.98cm" svg:d="M18854 9341l387-361" svg:viewBox="0 0 388 362">
              <text:p/>
            </draw:connector>
            <draw:connector draw:name="Straight Connector 84" draw:style-name="gr13" draw:text-style-name="P1" draw:layer="layout" draw:type="line" svg:x1="19.241cm" svg:y1="9.341cm" svg:x2="18.854cm" svg:y2="8.98cm" svg:d="M19241 9341l-387-361" svg:viewBox="0 0 388 362">
              <text:p/>
            </draw:connector>
          </draw:g>
        </draw:g>
        <draw:g draw:name="Group 89" draw:style-name="gr6">
          <draw:custom-shape draw:name="Cube 90" draw:style-name="gr24" draw:text-style-name="P7" draw:layer="layout" svg:width="2.875cm" svg:height="1.097cm" svg:x="8.895cm" svg:y="13.115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6">
            <draw:g draw:name="Group 92" draw:style-name="gr8">
              <draw:connector draw:name="Straight Arrow Connector 98" draw:style-name="gr25" draw:text-style-name="P1" draw:layer="layout" draw:type="line" svg:x1="10.506cm" svg:y1="13.274cm" svg:x2="11.491cm" svg:y2="13.274cm" svg:d="M10506 13274h985" svg:viewBox="0 0 986 1">
                <text:p/>
              </draw:connector>
              <draw:connector draw:name="Straight Arrow Connector 99" draw:style-name="gr26" draw:text-style-name="P1" draw:layer="layout" draw:type="line" svg:x1="10.506cm" svg:y1="13.623cm" svg:x2="11.125cm" svg:y2="13.623cm" svg:d="M10506 13623h619" svg:viewBox="0 0 620 1">
                <text:p/>
              </draw:connector>
            </draw:g>
            <draw:g draw:name="Group 93" draw:style-name="gr8">
              <draw:connector draw:name="Straight Arrow Connector 96" draw:style-name="gr27" draw:text-style-name="P1" draw:layer="layout" draw:type="line" svg:x1="10.159cm" svg:y1="13.28cm" svg:x2="9.556cm" svg:y2="13.28cm" svg:d="M10159 13280h-603" svg:viewBox="0 0 604 1">
                <text:p/>
              </draw:connector>
              <draw:connector draw:name="Straight Arrow Connector 97" draw:style-name="gr28" draw:text-style-name="P1" draw:layer="layout" draw:type="line" svg:x1="10.159cm" svg:y1="13.623cm" svg:x2="9.189cm" svg:y2="13.623cm" svg:d="M10159 13623h-970" svg:viewBox="0 0 971 1">
                <text:p/>
              </draw:connector>
            </draw:g>
            <draw:connector draw:name="Straight Connector 94" draw:style-name="gr13" draw:text-style-name="P1" draw:layer="layout" draw:type="line" svg:x1="10.139cm" svg:y1="13.63cm" svg:x2="10.526cm" svg:y2="13.268cm" svg:d="M10139 13630l387-362" svg:viewBox="0 0 388 363">
              <text:p/>
            </draw:connector>
            <draw:connector draw:name="Straight Connector 95" draw:style-name="gr13" draw:text-style-name="P1" draw:layer="layout" draw:type="line" svg:x1="10.526cm" svg:y1="13.63cm" svg:x2="10.139cm" svg:y2="13.268cm" svg:d="M10526 13630l-387-362" svg:viewBox="0 0 388 363">
              <text:p/>
            </draw:connector>
          </draw:g>
        </draw:g>
        <draw:g draw:name="Group 100" draw:style-name="gr6">
          <draw:custom-shape draw:name="Cube 101" draw:style-name="gr29" draw:text-style-name="P8" draw:layer="layout" svg:width="2.874cm" svg:height="0.998cm" svg:x="5.123cm" svg:y="11.05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6">
            <draw:g draw:name="Group 103" draw:style-name="gr8">
              <draw:connector draw:name="Straight Arrow Connector 109" draw:style-name="gr30" draw:text-style-name="P1" draw:layer="layout" draw:type="line" svg:x1="6.734cm" svg:y1="11.218cm" svg:x2="7.72cm" svg:y2="11.218cm" svg:d="M6734 11218h986" svg:viewBox="0 0 987 1">
                <text:p/>
              </draw:connector>
              <draw:connector draw:name="Straight Arrow Connector 110" draw:style-name="gr31" draw:text-style-name="P1" draw:layer="layout" draw:type="line" svg:x1="6.734cm" svg:y1="11.568cm" svg:x2="7.353cm" svg:y2="11.568cm" svg:d="M6734 11568h619" svg:viewBox="0 0 620 1">
                <text:p/>
              </draw:connector>
            </draw:g>
            <draw:g draw:name="Group 104" draw:style-name="gr8">
              <draw:connector draw:name="Straight Arrow Connector 107" draw:style-name="gr32" draw:text-style-name="P1" draw:layer="layout" draw:type="line" svg:x1="6.386cm" svg:y1="11.225cm" svg:x2="5.785cm" svg:y2="11.225cm" svg:d="M6386 11225h-601" svg:viewBox="0 0 602 1">
                <text:p/>
              </draw:connector>
              <draw:connector draw:name="Straight Arrow Connector 108" draw:style-name="gr33" draw:text-style-name="P1" draw:layer="layout" draw:type="line" svg:x1="6.386cm" svg:y1="11.568cm" svg:x2="5.418cm" svg:y2="11.568cm" svg:d="M6386 11568h-968" svg:viewBox="0 0 969 1">
                <text:p/>
              </draw:connector>
            </draw:g>
            <draw:connector draw:name="Straight Connector 105" draw:style-name="gr13" draw:text-style-name="P1" draw:layer="layout" draw:type="line" svg:x1="6.367cm" svg:y1="11.574cm" svg:x2="6.754cm" svg:y2="11.213cm" svg:d="M6367 11574l387-361" svg:viewBox="0 0 388 362">
              <text:p/>
            </draw:connector>
            <draw:connector draw:name="Straight Connector 106" draw:style-name="gr13" draw:text-style-name="P1" draw:layer="layout" draw:type="line" svg:x1="6.754cm" svg:y1="11.574cm" svg:x2="6.367cm" svg:y2="11.213cm" svg:d="M6754 11574l-387-361" svg:viewBox="0 0 388 362">
              <text:p/>
            </draw:connector>
          </draw:g>
        </draw:g>
        <draw:frame draw:style-name="gr34" draw:text-style-name="P9" draw:layer="layout" svg:width="2.388cm" svg:height="1.682cm" svg:x="11.72cm" svg:y="1.2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custom-shape draw:style-name="gr35" draw:text-style-name="P10" draw:layer="layout" svg:width="0.571cm" svg:height="1.841cm" svg:x="12.629cm" svg:y="2.9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36" draw:text-style-name="P11" draw:layer="layout" svg:width="5.213cm" svg:height="1.026cm" svg:x="13.908cm" svg:y="1.222cm">
          <draw:text-box>
            <text:p><text:span text:style-name="T2">Network Operator</text:span></text:p>
          </draw:text-box>
        </draw:frame>
        <draw:frame draw:style-name="gr37" draw:text-style-name="P12" draw:layer="layout" svg:width="4.068cm" svg:height="1.026cm" svg:x="13.009cm" svg:y="3.246cm">
          <draw:text-box>
            <text:p><text:span text:style-name="T3">Intents, Alerts</text:span></text:p>
          </draw:text-box>
        </draw:frame>
        <draw:connector draw:name="Straight Arrow Connector 1" draw:style-name="gr38" draw:text-style-name="P1" draw:layer="layout" draw:type="line" svg:x1="19.406cm" svg:y1="7.587cm" svg:x2="19.421cm" svg:y2="8.821cm" svg:d="M19406 7587l15 1234" svg:viewBox="0 0 16 1235">
          <text:p/>
        </draw:connector>
        <draw:frame draw:style-name="gr39" draw:text-style-name="P14" draw:layer="layout" svg:width="5.128cm" svg:height="1.631cm" svg:x="19.321cm" svg:y="7.78cm">
          <draw:text-box>
            <text:p text:style-name="P13"><text:span text:style-name="T4">Push, Pull Telemetry</text:span></text:p>
            <text:p text:style-name="P13"><text:span text:style-name="T4">Data</text:span></text:p>
          </draw:text-box>
        </draw:frame>
        <draw:frame draw:style-name="gr40" draw:text-style-name="P14" draw:layer="layout" svg:width="3.733cm" svg:height="2.321cm" svg:x="2.962cm" svg:y="8.081cm">
          <draw:text-box>
            <text:p text:style-name="P13"><text:span text:style-name="T4">Get, Set </text:span></text:p>
            <text:p text:style-name="P13"><text:span text:style-name="T4">Configuration </text:span></text:p>
            <text:p text:style-name="P13"><text:span text:style-name="T4">Variables</text:span></text:p>
          </draw:text-box>
        </draw:frame>
        <presentation:notes draw:style-name="dp2">
          <draw:page-thumbnail draw:style-name="gr41"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custom-shape draw:style-name="gr42" draw:text-style-name="P16" draw:layer="layout" svg:width="8.254cm" svg:height="2.953cm" svg:x="18.096cm" svg:y="11.336cm">
          <text:p/>
          <draw:enhanced-geometry svg:viewBox="0 0 21600 21600" draw:type="rectangle" draw:enhanced-path="M 0 0 L 21600 0 21600 21600 0 21600 0 0 Z N"/>
        </draw:custom-shape>
        <draw:custom-shape draw:style-name="gr42" draw:text-style-name="P16" draw:layer="layout" svg:width="8.254cm" svg:height="2.953cm" svg:x="18.096cm" svg:y="6.136cm">
          <text:p/>
          <draw:enhanced-geometry svg:viewBox="0 0 21600 21600" draw:type="rectangle" draw:enhanced-path="M 0 0 L 21600 0 21600 21600 0 21600 0 0 Z N"/>
        </draw:custom-shape>
        <draw:custom-shape draw:name="Google Shape;1274;p132" draw:style-name="gr43" draw:text-style-name="P18" xml:id="id4" draw:id="id4" draw:layer="layout" svg:width="5.143cm" svg:height="1.175cm" svg:x="18.772cm" svg:y="11.873cm">
          <text:p text:style-name="P17"><text:span text:style-name="T5">gNMI 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Google Shape;1275;p132" draw:style-name="gr43" draw:text-style-name="P18" xml:id="id3" draw:id="id3" draw:layer="layout" svg:width="5.143cm" svg:height="1.175cm" svg:x="18.772cm" svg:y="7.376cm">
          <text:p text:style-name="P17"><text:span text:style-name="T5">gNMI Clien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277;p132" draw:style-name="gr44" draw:text-style-name="P20" draw:layer="layout" svg:width="4.828cm" svg:height="1.613cm" svg:x="6.699cm" svg:y="5.914cm">
          <draw:text-box>
            <text:p text:style-name="P19"><text:span text:style-name="T6"><text:s/></text:span><text:span text:style-name="T7">YANG</text:span><text:span text:style-name="T8"> Compiler</text:span></text:p>
            <text:p text:style-name="P2"><text:span text:style-name="T9">(e.g. ygot)</text:span></text:p>
          </draw:text-box>
        </draw:frame>
        <draw:custom-shape draw:name="Google Shape;1272;p132" draw:style-name="gr45" draw:text-style-name="P21" xml:id="id1" draw:id="id1" draw:layer="layout" svg:width="5.143cm" svg:height="1.833cm" svg:x="1.4cm" svg:y="4.385cm">
          <text:p text:style-name="P2"><text:span text:style-name="T10">model.yang</text:span></text:p>
          <draw:enhanced-geometry svg:viewBox="0 0 21600 21600" draw:type="non-primitive" draw:enhanced-path="M 0 0 L 21600 0 21600 21600 0 21600 Z N"/>
        </draw:custom-shape>
        <draw:custom-shape draw:name="Google Shape;1278;p132" draw:style-name="gr46" draw:text-style-name="P23" xml:id="id2" draw:id="id2" draw:layer="layout" svg:width="5.338cm" svg:height="1.833cm" svg:x="11.842cm" svg:y="4.385cm">
          <text:p text:style-name="P22"><text:span text:style-name="T11">model.go, model.cc, <text:s/>model.java. ...</text:span></text:p>
          <draw:enhanced-geometry svg:viewBox="0 0 21600 21600" draw:type="non-primitive" draw:enhanced-path="M 0 0 L 21600 0 21600 21600 0 21600 Z N"/>
        </draw:custom-shape>
        <draw:connector draw:name="Google Shape;1279;p132" draw:style-name="gr47" draw:text-style-name="P1" draw:layer="layout" draw:type="line" svg:x1="6.543cm" svg:y1="5.301cm" svg:x2="8.196cm" svg:y2="5.302cm" draw:start-shape="id1" draw:start-glue-point="1" svg:d="M6543 5301l1653 1" svg:viewBox="0 0 1654 2">
          <text:p/>
        </draw:connector>
        <draw:connector draw:name="Google Shape;1280;p132" draw:style-name="gr48" draw:text-style-name="P1" draw:layer="layout" draw:type="line" svg:x1="9.839cm" svg:y1="5.302cm" svg:x2="11.842cm" svg:y2="5.301cm" draw:end-shape="id2" draw:end-glue-point="3" svg:d="M9839 5302l2003-1" svg:viewBox="0 0 2004 2">
          <text:p/>
        </draw:connector>
        <draw:connector draw:name="Google Shape;1281;p132" draw:style-name="gr49" draw:text-style-name="P1" draw:layer="layout" draw:type="line" svg:x1="14.511cm" svg:y1="6.218cm" svg:x2="14.551cm" svg:y2="9.22cm" draw:start-shape="id2" draw:start-glue-point="2" svg:d="M14511 6218l40 3002" svg:viewBox="0 0 41 3003">
          <text:p/>
        </draw:connector>
        <draw:connector draw:name="Google Shape;1283;p132" draw:style-name="gr50" draw:text-style-name="P1" draw:layer="layout" svg:x1="15.372cm" svg:y1="10.137cm" svg:x2="18.772cm" svg:y2="7.963cm" draw:end-shape="id3" draw:end-glue-point="3" svg:d="M15372 10137h1441v-2174h1959" svg:viewBox="0 0 3401 2175">
          <text:p/>
        </draw:connector>
        <draw:connector draw:name="Google Shape;1284;p132" draw:style-name="gr51" draw:text-style-name="P1" draw:layer="layout" svg:x1="15.372cm" svg:y1="10.137cm" svg:x2="18.772cm" svg:y2="12.46cm" draw:end-shape="id4" draw:end-glue-point="3" svg:d="M15372 10137h1441v2323h1959" svg:viewBox="0 0 3401 2324">
          <text:p/>
        </draw:connector>
        <draw:frame draw:name="Google Shape;1286;p132" draw:style-name="gr52" draw:text-style-name="P20" draw:layer="layout" svg:width="5.835cm" svg:height="2.509cm" svg:x="7.947cm" svg:y="8.705cm">
          <draw:text-box>
            <text:p text:style-name="P24"><text:span text:style-name="T7">Language-Specific</text:span></text:p>
            <text:p text:style-name="P24"><text:span text:style-name="T7">Compiler</text:span></text:p>
            <text:p text:style-name="P24"><text:span text:style-name="T9">(e.g. go, gcc, javac)</text:span></text:p>
          </draw:text-box>
        </draw:frame>
        <draw:frame draw:name="Google Shape;1287;p132" draw:style-name="gr53" draw:text-style-name="P20" draw:layer="layout" svg:width="5.175cm" svg:height="1.727cm" svg:x="21.582cm" svg:y="9.381cm">
          <draw:text-box>
            <text:p text:style-name="P19"><text:span text:style-name="T12">Model-Independent</text:span></text:p>
            <text:p text:style-name="P19"><text:span text:style-name="T12">Runtime API</text:span></text:p>
            <text:p text:style-name="P19"><text:span text:style-name="T13"/></text:p>
          </draw:text-box>
        </draw:frame>
        <draw:custom-shape draw:name="Google Shape;1288;p132" draw:style-name="gr54" draw:text-style-name="P25" draw:layer="layout" svg:width="0.744cm" svg:height="3.322cm" svg:x="20.971cm" svg:y="8.55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name="Graphic 16" draw:style-name="gr55" draw:text-style-name="P1" draw:layer="layout" svg:width="1.484cm" svg:height="1.447cm" svg:x="13.789cm" svg:y="9.408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name="Graphic 17" draw:style-name="gr55" draw:text-style-name="P1" draw:layer="layout" svg:width="1.484cm" svg:height="1.447cm" svg:x="8.329cm" svg:y="4.579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style-name="gr56" draw:text-style-name="P26" draw:layer="layout" svg:width="5.049cm" svg:height="1.453cm" svg:x="21.301cm" svg:y="6.136cm">
          <draw:text-box>
            <text:p text:style-name="P13"><text:span text:style-name="T14">Network Management</text:span></text:p>
            <text:p text:style-name="P13"><text:span text:style-name="T14">System</text:span></text:p>
          </draw:text-box>
        </draw:frame>
        <draw:frame draw:style-name="gr57" draw:text-style-name="P26" draw:layer="layout" svg:width="4.059cm" svg:height="1.453cm" svg:x="22.292cm" svg:y="12.837cm">
          <draw:text-box>
            <text:p text:style-name="P13"><text:span text:style-name="T14">Switch</text:span></text:p>
            <text:p text:style-name="P13"><text:span text:style-name="T14">Control Processor</text:span></text:p>
          </draw:text-box>
        </draw:frame>
        <presentation:notes draw:style-name="dp2">
          <draw:page-thumbnail draw:style-name="gr41" draw:layer="layout" svg:width="18.624cm" svg:height="10.476cm" svg:x="1.482cm" svg:y="2.123cm" draw:page-number="2" presentation:class="page"/>
          <draw:frame presentation:style-name="pr1" draw:text-style-name="P1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58" draw:text-style-name="P28" xml:id="id6" draw:id="id6" draw:layer="layout" svg:width="2.857cm" svg:height="1.968cm" svg:x="9.618cm" svg:y="4.917cm">
          <text:p text:style-name="P27"><text:span text:style-name="T15">Inventory</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58" draw:text-style-name="P28" draw:layer="layout" svg:width="2.857cm" svg:height="1.968cm" svg:x="5.237cm" svg:y="7.78cm">
          <text:p text:style-name="P27"><text:span text:style-name="T15">Image</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58" draw:text-style-name="P28" xml:id="id7" draw:id="id7" draw:layer="layout" svg:width="2.857cm" svg:height="1.968cm" svg:x="14.287cm" svg:y="4.917cm">
          <text:p text:style-name="P27"><text:span text:style-name="T15">Config</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34" draw:text-style-name="P9" xml:id="id5" draw:id="id5" draw:layer="layout" svg:width="2.388cm" svg:height="1.682cm" svg:x="12.252cm" svg:y="2.056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59" draw:text-style-name="P11" draw:layer="layout" svg:width="3.519cm" svg:height="1.026cm" svg:x="11.687cm" svg:y="0.754cm">
          <draw:text-box>
            <text:p><text:span text:style-name="T2">Operator</text:span></text:p>
          </draw:text-box>
        </draw:frame>
        <draw:connector draw:style-name="gr60" draw:text-style-name="P9" draw:layer="layout" svg:x1="13.446cm" svg:y1="3.738cm" svg:x2="11.047cm" svg:y2="4.917cm" draw:start-shape="id5" draw:start-glue-point="2" draw:end-shape="id6" draw:end-glue-point="5" svg:d="M13446 3738v589h-2399v590" svg:viewBox="0 0 2400 1180">
          <text:p/>
        </draw:connector>
        <draw:connector draw:style-name="gr61" draw:text-style-name="P9" draw:layer="layout" svg:x1="13.446cm" svg:y1="3.738cm" svg:x2="15.716cm" svg:y2="4.917cm" draw:start-shape="id5" draw:start-glue-point="2" draw:end-shape="id7" draw:end-glue-point="5" svg:d="M13446 3738v589h2270v590" svg:viewBox="0 0 2271 1180">
          <text:p/>
        </draw:connector>
        <draw:custom-shape draw:style-name="gr62" draw:text-style-name="P30" draw:layer="layout" svg:width="7.555cm" svg:height="1.937cm" svg:x="9.619cm" svg:y="7.796cm">
          <text:p text:style-name="P29"><text:span text:style-name="T2">Configuration</text:span></text:p>
          <text:p text:style-name="P29"><text:span text:style-name="T2">Manager</text:span></text:p>
          <draw:enhanced-geometry svg:viewBox="0 0 21600 21600" draw:type="rectangle" draw:enhanced-path="M 0 0 L 21600 0 21600 21600 0 21600 0 0 Z N"/>
        </draw:custom-shape>
        <draw:line draw:style-name="gr63" draw:text-style-name="P9" draw:layer="layout" svg:x1="8.094cm" svg:y1="8.825cm" svg:x2="9.619cm" svg:y2="8.825cm">
          <text:p/>
        </draw:line>
        <draw:line draw:style-name="gr64" draw:text-style-name="P9" draw:layer="layout" svg:x1="11.143cm" svg:y1="6.885cm" svg:x2="11.143cm" svg:y2="7.796cm">
          <text:p/>
        </draw:line>
        <draw:line draw:style-name="gr64" draw:text-style-name="P9" draw:layer="layout" svg:x1="15.743cm" svg:y1="6.873cm" svg:x2="15.743cm" svg:y2="7.784cm">
          <text:p/>
        </draw:line>
        <draw:line draw:style-name="gr63" draw:text-style-name="P9" draw:layer="layout" svg:x1="17.182cm" svg:y1="8.825cm" svg:x2="18.707cm" svg:y2="8.825cm">
          <text:p/>
        </draw:line>
        <draw:g draw:style-name="gr6">
          <draw:custom-shape draw:style-name="gr65" draw:text-style-name="P16" draw:layer="layout" svg:width="7.487cm" svg:height="5.555cm" svg:x="18.671cm" svg:y="6.0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6" draw:layer="layout" svg:width="0.667cm" svg:height="1.053cm" svg:x="24.527cm" svg:y="8.861cm">
            <text:p/>
            <draw:enhanced-geometry svg:viewBox="0 0 21600 21600" draw:type="rectangle" draw:enhanced-path="M 0 0 L 21600 0 21600 21600 0 21600 0 0 Z N"/>
          </draw:custom-shape>
          <draw:custom-shape draw:style-name="gr67" draw:text-style-name="P16" draw:layer="layout" svg:width="0.253cm" svg:height="0.367cm" svg:x="25.641cm" svg:y="8.069cm">
            <text:p/>
            <draw:enhanced-geometry svg:viewBox="0 0 21600 21600" draw:type="rectangle" draw:enhanced-path="M 0 0 L 21600 0 21600 21600 0 21600 0 0 Z N"/>
          </draw:custom-shape>
          <draw:custom-shape draw:style-name="gr68" draw:text-style-name="P16" draw:layer="layout" svg:width="0.292cm" svg:height="0.712cm" svg:x="25.058cm" svg:y="6.809cm">
            <text:p/>
            <draw:enhanced-geometry svg:viewBox="0 0 21600 21600" draw:type="rectangle" draw:enhanced-path="M 0 0 L 21600 0 21600 21600 0 21600 0 0 Z N"/>
          </draw:custom-shape>
          <draw:custom-shape draw:style-name="gr69" draw:text-style-name="P16" draw:layer="layout" svg:width="0.667cm" svg:height="0.712cm" svg:x="23.571cm" svg:y="6.394cm">
            <text:p/>
            <draw:enhanced-geometry svg:viewBox="0 0 21600 21600" draw:type="rectangle" draw:enhanced-path="M 0 0 L 21600 0 21600 21600 0 21600 0 0 Z N"/>
          </draw:custom-shape>
          <draw:custom-shape draw:style-name="gr70" draw:text-style-name="P16" draw:layer="layout" svg:width="0.667cm" svg:height="0.338cm" svg:x="20.85cm" svg:y="6.768cm">
            <text:p/>
            <draw:enhanced-geometry svg:viewBox="0 0 21600 21600" draw:type="rectangle" draw:enhanced-path="M 0 0 L 21600 0 21600 21600 0 21600 0 0 Z N"/>
          </draw:custom-shape>
          <draw:custom-shape draw:style-name="gr71" draw:text-style-name="P16" draw:layer="layout" svg:width="0.425cm" svg:height="0.339cm" svg:x="19.333cm" svg:y="7.955cm">
            <text:p/>
            <draw:enhanced-geometry svg:viewBox="0 0 21600 21600" draw:type="rectangle" draw:enhanced-path="M 0 0 L 21600 0 21600 21600 0 21600 0 0 Z N"/>
          </draw:custom-shape>
          <draw:custom-shape draw:style-name="gr71" draw:text-style-name="P16" draw:layer="layout" svg:width="0.425cm" svg:height="0.339cm" svg:x="19.079cm" svg:y="9.191cm">
            <text:p/>
            <draw:enhanced-geometry svg:viewBox="0 0 21600 21600" draw:type="rectangle" draw:enhanced-path="M 0 0 L 21600 0 21600 21600 0 21600 0 0 Z N"/>
          </draw:custom-shape>
          <draw:custom-shape draw:style-name="gr71" draw:text-style-name="P16" draw:layer="layout" svg:width="0.425cm" svg:height="0.339cm" svg:x="21.278cm" svg:y="10.714cm">
            <text:p/>
            <draw:enhanced-geometry svg:viewBox="0 0 21600 21600" draw:type="rectangle" draw:enhanced-path="M 0 0 L 21600 0 21600 21600 0 21600 0 0 Z N"/>
          </draw:custom-shape>
          <draw:custom-shape draw:style-name="gr71" draw:text-style-name="P16" draw:layer="layout" svg:width="0.227cm" svg:height="0.339cm" svg:x="19.727cm" svg:y="10.282cm">
            <text:p/>
            <draw:enhanced-geometry svg:viewBox="0 0 21600 21600" draw:type="rectangle" draw:enhanced-path="M 0 0 L 21600 0 21600 21600 0 21600 0 0 Z N"/>
          </draw:custom-shape>
          <draw:custom-shape draw:style-name="gr67" draw:text-style-name="P16" draw:layer="layout" svg:width="0.253cm" svg:height="0.367cm" svg:x="22.429cm" svg:y="6.502cm">
            <text:p/>
            <draw:enhanced-geometry svg:viewBox="0 0 21600 21600" draw:type="rectangle" draw:enhanced-path="M 0 0 L 21600 0 21600 21600 0 21600 0 0 Z N"/>
          </draw:custom-shape>
          <draw:custom-shape draw:style-name="gr72" draw:text-style-name="P16" draw:layer="layout" svg:width="0.667cm" svg:height="0.571cm" svg:x="23.205cm" svg:y="10.198cm">
            <text:p/>
            <draw:enhanced-geometry svg:viewBox="0 0 21600 21600" draw:type="rectangle" draw:enhanced-path="M 0 0 L 21600 0 21600 21600 0 21600 0 0 Z N"/>
          </draw:custom-shape>
        </draw:g>
        <draw:frame draw:style-name="gr73" draw:text-style-name="P31" draw:layer="layout" svg:width="3.205cm" svg:height="1.631cm" svg:x="20.988cm" svg:y="7.937cm">
          <draw:text-box>
            <text:p text:style-name="P10"><text:span text:style-name="T4">Operational</text:span></text:p>
            <text:p text:style-name="P10"><text:span text:style-name="T4">Network</text:span></text:p>
          </draw:text-box>
        </draw:frame>
        <presentation:notes draw:style-name="dp2">
          <draw:page-thumbnail draw:style-name="gr41" draw:layer="layout" svg:width="18.624cm" svg:height="10.476cm" svg:x="1.482cm" svg:y="2.123cm" draw:page-number="3" presentation:class="page"/>
          <draw:frame presentation:style-name="pr1" draw:text-style-name="P1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g draw:name="Group 8" draw:style-name="gr6">
          <draw:custom-shape draw:name="Rounded Rectangle 1" draw:style-name="gr74" draw:text-style-name="P25" draw:layer="layout" svg:width="1.653cm" svg:height="2.809cm" svg:x="2.698cm" svg:y="5.424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1" draw:style-name="gr75" draw:text-style-name="P1" draw:layer="layout" svg:width="3.889cm" svg:height="3.324cm" svg:x="2.605cm" svg:y="5.14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1" draw:style-name="gr76" draw:text-style-name="P32" draw:layer="layout" svg:width="1.863cm" svg:height="2.904cm" svg:x="4.605cm" svg:y="5.56cm">
            <text:p/>
            <draw:enhanced-geometry svg:viewBox="0 0 21600 21600" draw:type="non-primitive" draw:enhanced-path="M 0 0 L 21600 0 21600 21600 0 21600 Z N"/>
          </draw:custom-shape>
        </draw:g>
        <draw:connector draw:name="Google Shape;680;p45" draw:style-name="gr77" draw:text-style-name="P1" draw:layer="layout" draw:type="line" svg:x1="10.165cm" svg:y1="7.792cm" svg:x2="15.429cm" svg:y2="7.792cm" svg:d="M10165 7792h5264" svg:viewBox="0 0 5265 1">
          <text:p/>
        </draw:connector>
        <draw:connector draw:name="Google Shape;681;p45" draw:style-name="gr77" draw:text-style-name="P1" draw:layer="layout" draw:type="line" svg:x1="10.165cm" svg:y1="7.792cm" svg:x2="14.373cm" svg:y2="10.312cm" svg:d="M10165 7792l4208 2520" svg:viewBox="0 0 4209 2521">
          <text:p/>
        </draw:connector>
        <draw:connector draw:name="Google Shape;682;p45" draw:style-name="gr78" draw:text-style-name="P1" draw:layer="layout" draw:type="line" svg:x1="18.777cm" svg:y1="7.761cm" svg:x2="15.212cm" svg:y2="5.223cm" svg:d="M18777 7761l-3565-2538" svg:viewBox="0 0 3566 2539">
          <text:p/>
        </draw:connector>
        <draw:connector draw:name="Google Shape;683;p45" draw:style-name="gr77" draw:text-style-name="P1" draw:layer="layout" draw:type="line" svg:x1="18.777cm" svg:y1="7.761cm" svg:x2="14.683cm" svg:y2="7.792cm" svg:d="M18777 7761l-4094 31" svg:viewBox="0 0 4095 32">
          <text:p/>
        </draw:connector>
        <draw:connector draw:name="Google Shape;684;p45" draw:style-name="gr77" draw:text-style-name="P1" draw:layer="layout" draw:type="line" svg:x1="18.777cm" svg:y1="7.761cm" svg:x2="15.473cm" svg:y2="10.312cm" svg:d="M18777 7761l-3304 2551" svg:viewBox="0 0 3305 2552">
          <text:p/>
        </draw:connector>
        <draw:connector draw:name="Google Shape;689;p45" draw:style-name="gr78" draw:text-style-name="P1" draw:layer="layout" draw:type="line" svg:x1="10.165cm" svg:y1="7.792cm" svg:x2="13.841cm" svg:y2="5.181cm" svg:d="M10165 7792l3676-2611" svg:viewBox="0 0 3677 2612">
          <text:p/>
        </draw:connector>
        <draw:connector draw:name="Google Shape;694;p45" draw:style-name="gr78" draw:text-style-name="P1" draw:layer="layout" draw:type="line" svg:x1="4.556cm" svg:y1="7.795cm" svg:x2="8.832cm" svg:y2="7.792cm" svg:d="M4556 7795l4276-3" svg:viewBox="0 0 4277 4">
          <text:p/>
        </draw:connector>
        <draw:frame draw:name="Google Shape;699;p45" draw:style-name="gr79" draw:text-style-name="P20" draw:layer="layout" svg:width="1.524cm" svg:height="0.854cm" svg:x="8.38cm" svg:y="8.001cm">
          <draw:text-box>
            <text:p text:style-name="P2"><text:span text:style-name="T16">S1</text:span></text:p>
          </draw:text-box>
        </draw:frame>
        <draw:custom-shape draw:name="Google Shape;716;p45" draw:style-name="gr80" draw:text-style-name="P33" draw:layer="layout" svg:width="1.224cm" svg:height="0.299cm" svg:x="5.597cm" svg:y="7.995cm">
          <text:p/>
          <draw:enhanced-geometry svg:viewBox="0 0 21600 21600" draw:text-areas="0 ?f0 ?f5 ?f2" draw:glue-points="?f1 0 ?f1 21600" draw:type="non-primitive" draw:modifiers="1896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Google Shape;717;p45" draw:style-name="gr80" draw:text-style-name="P33" draw:layer="layout" svg:width="1.224cm" svg:height="0.299cm" svg:x="22.099cm" svg:y="7.921cm">
          <text:p/>
          <draw:enhanced-geometry svg:viewBox="0 0 21600 21600" draw:text-areas="0 ?f0 ?f5 ?f2" draw:glue-points="?f1 0 ?f1 21600" draw:type="non-primitive" draw:modifiers="1896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Google Shape;718;p45" draw:style-name="gr81" draw:text-style-name="P21" xml:id="id8" draw:id="id8" draw:layer="layout" svg:width="7.61cm" svg:height="1.757cm" svg:x="2.63cm" svg:y="1.592cm">
          <text:p text:style-name="P2"><text:span text:style-name="T17">Add Switch ID, arrival time, departure, queue delay, etc</text:span><text:span text:style-name="T18">.</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Google Shape;719;p45" draw:style-name="gr82" draw:text-style-name="P1" draw:layer="layout" draw:type="line" svg:x1="6.435cm" svg:y1="3.349cm" svg:x2="9.142cm" svg:y2="6.962cm" draw:start-shape="id8" draw:start-glue-point="2" svg:d="M6435 3349l2707 3613" svg:viewBox="0 0 2708 3614">
          <text:p/>
        </draw:connector>
        <draw:g draw:name="Group 115" draw:style-name="gr6">
          <draw:frame draw:name="Google Shape;668;p45" draw:style-name="gr83" draw:text-style-name="P1" draw:layer="layout" svg:width="1.578cm" svg:height="1.74cm" svg:x="19.638cm" svg:y="12.352cm">
            <draw:image xlink:href="Pictures/100000010000010000000100BCB6DC64.png" xlink:type="simple" xlink:show="embed" xlink:actuate="onLoad" draw:mime-type="image/png">
              <text:p/>
            </draw:image>
            <svg:desc>Image result for database icon</svg:desc>
          </draw:frame>
          <draw:custom-shape draw:name="Google Shape;669;p45" draw:style-name="gr84" draw:text-style-name="P34" draw:layer="layout" svg:width="6.809cm" svg:height="3.023cm" svg:x="19.055cm" svg:y="11.7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720;p45" draw:style-name="gr85" draw:text-style-name="P1" draw:layer="layout" svg:width="3.936cm" svg:height="2.558cm" svg:x="21.616cm" svg:y="11.977cm">
            <draw:image xlink:href="Pictures/100000000000050200000416F884A48F.jpg" xlink:type="simple" xlink:show="embed" xlink:actuate="onLoad" draw:mime-type="image/jpeg">
              <text:p/>
            </draw:image>
          </draw:frame>
        </draw:g>
        <draw:custom-shape draw:name="Google Shape;721;p45" draw:style-name="gr86" draw:text-style-name="P35" draw:layer="layout" svg:width="1.371cm" svg:height="0.299cm" draw:transform="rotate (-1.5707963267949) translate (21.834cm 9.512cm)">
          <text:p/>
          <draw:enhanced-geometry svg:viewBox="0 0 21600 21600" draw:text-areas="0 ?f0 ?f5 ?f2" draw:glue-points="?f1 0 ?f1 21600" draw:type="non-primitive" draw:modifiers="192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name="Google Shape;722;p45" draw:style-name="gr52" draw:text-style-name="P20" draw:layer="layout" svg:width="4.408cm" svg:height="1.696cm" svg:x="14.625cm" svg:y="12.461cm">
          <draw:text-box>
            <text:p text:style-name="P24"><text:span text:style-name="T17">Log, analyze, replay, visualize</text:span></text:p>
          </draw:text-box>
        </draw:frame>
        <draw:custom-shape draw:name="Google Shape;724;p45" draw:style-name="gr87" draw:text-style-name="P21" xml:id="id9" draw:id="id9" draw:layer="layout" svg:width="6.077cm" svg:height="1.761cm" svg:x="19.8cm" svg:y="1.588cm">
          <text:p text:style-name="P2"><text:span text:style-name="T17">Generate report with switch metadata</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Google Shape;725;p45" draw:style-name="gr88" draw:text-style-name="P1" draw:layer="layout" draw:type="line" svg:x1="22.838cm" svg:y1="3.349cm" svg:x2="19.8cm" svg:y2="6.931cm" draw:start-shape="id9" draw:start-glue-point="2" svg:d="M22838 3349l-3038 3582" svg:viewBox="0 0 3039 3583">
          <text:p/>
        </draw:connector>
        <draw:g draw:name="Group 14" draw:style-name="gr6">
          <draw:custom-shape draw:name="Rectangle 83" draw:style-name="gr89" draw:text-style-name="P36" draw:layer="layout" svg:width="3.229cm" svg:height="0.744cm" svg:x="9.316cm" svg:y="4.115cm">
            <text:p text:style-name="P2"><text:span text:style-name="T19">Header</text:span></text:p>
            <draw:enhanced-geometry svg:viewBox="0 0 21600 21600" draw:type="non-primitive" draw:enhanced-path="M 0 0 L 21600 0 21600 21600 0 21600 Z N"/>
          </draw:custom-shape>
          <draw:custom-shape draw:name="Rectangle 84" draw:style-name="gr90" draw:text-style-name="P3" draw:layer="layout" svg:width="3.229cm" svg:height="0.735cm" svg:x="9.316cm" svg:y="4.855cm">
            <text:p text:style-name="P2"><text:span text:style-name="T20">Metadata S1</text:span></text:p>
            <draw:enhanced-geometry svg:viewBox="0 0 21600 21600" draw:type="non-primitive" draw:enhanced-path="M 0 0 L 21600 0 21600 21600 0 21600 Z N"/>
          </draw:custom-shape>
          <draw:custom-shape draw:name="Rectangle 85" draw:style-name="gr91" draw:text-style-name="P37" draw:layer="layout" svg:width="3.229cm" svg:height="0.942cm" svg:x="9.316cm" svg:y="5.606cm">
            <text:p text:style-name="P2"><text:span text:style-name="T19">Payload</text:span></text:p>
            <draw:enhanced-geometry svg:viewBox="0 0 21600 21600" draw:type="non-primitive" draw:enhanced-path="M 0 0 L 21600 0 21600 21600 0 21600 Z N"/>
          </draw:custom-shape>
        </draw:g>
        <draw:g draw:name="Group 16" draw:style-name="gr6">
          <draw:custom-shape draw:name="Rectangle 89" draw:style-name="gr92" draw:text-style-name="P38" draw:layer="layout" svg:width="3.229cm" svg:height="0.744cm" svg:x="4.635cm" svg:y="5.963cm">
            <text:p text:style-name="P2"><text:span text:style-name="T19">Header</text:span></text:p>
            <draw:enhanced-geometry svg:viewBox="0 0 21600 21600" draw:type="non-primitive" draw:enhanced-path="M 0 0 L 21600 0 21600 21600 0 21600 Z N"/>
          </draw:custom-shape>
          <draw:custom-shape draw:name="Rectangle 91" draw:style-name="gr91" draw:text-style-name="P37" draw:layer="layout" svg:width="3.229cm" svg:height="0.942cm" svg:x="4.635cm" svg:y="6.673cm">
            <text:p text:style-name="P2"><text:span text:style-name="T19">Payload</text:span></text:p>
            <draw:enhanced-geometry svg:viewBox="0 0 21600 21600" draw:type="non-primitive" draw:enhanced-path="M 0 0 L 21600 0 21600 21600 0 21600 Z N"/>
          </draw:custom-shape>
        </draw:g>
        <draw:g draw:name="Group 113" draw:style-name="gr6">
          <draw:custom-shape draw:name="Rectangle 92" draw:style-name="gr93" draw:text-style-name="P39" draw:layer="layout" svg:width="3.229cm" svg:height="0.744cm" svg:x="21.009cm" svg:y="5.886cm">
            <text:p text:style-name="P2"><text:span text:style-name="T19">Header</text:span></text:p>
            <draw:enhanced-geometry svg:viewBox="0 0 21600 21600" draw:type="non-primitive" draw:enhanced-path="M 0 0 L 21600 0 21600 21600 0 21600 Z N"/>
          </draw:custom-shape>
          <draw:custom-shape draw:name="Rectangle 93" draw:style-name="gr91" draw:text-style-name="P37" draw:layer="layout" svg:width="3.229cm" svg:height="0.942cm" svg:x="21.009cm" svg:y="6.596cm">
            <text:p text:style-name="P2"><text:span text:style-name="T19">Payload</text:span></text:p>
            <draw:enhanced-geometry svg:viewBox="0 0 21600 21600" draw:type="non-primitive" draw:enhanced-path="M 0 0 L 21600 0 21600 21600 0 21600 Z N"/>
          </draw:custom-shape>
        </draw:g>
        <draw:g draw:name="Group 19" draw:style-name="gr6">
          <draw:custom-shape draw:name="Rectangle 86" draw:style-name="gr94" draw:text-style-name="P40" draw:layer="layout" svg:width="3.229cm" svg:height="0.744cm" svg:x="16.367cm" svg:y="3.431cm">
            <text:p text:style-name="P2"><text:span text:style-name="T19">Header</text:span></text:p>
            <draw:enhanced-geometry svg:viewBox="0 0 21600 21600" draw:type="non-primitive" draw:enhanced-path="M 0 0 L 21600 0 21600 21600 0 21600 Z N"/>
          </draw:custom-shape>
          <draw:custom-shape draw:name="Rectangle 87" draw:style-name="gr90" draw:text-style-name="P3" draw:layer="layout" svg:width="3.229cm" svg:height="0.735cm" svg:x="16.367cm" svg:y="4.135cm">
            <text:p text:style-name="P2"><text:span text:style-name="T20">Metadata S1</text:span></text:p>
            <draw:enhanced-geometry svg:viewBox="0 0 21600 21600" draw:type="non-primitive" draw:enhanced-path="M 0 0 L 21600 0 21600 21600 0 21600 Z N"/>
          </draw:custom-shape>
          <draw:custom-shape draw:name="Rectangle 88" draw:style-name="gr91" draw:text-style-name="P37" draw:layer="layout" svg:width="3.229cm" svg:height="0.942cm" svg:x="16.367cm" svg:y="5.612cm">
            <text:p text:style-name="P2"><text:span text:style-name="T19">Payload</text:span></text:p>
            <draw:enhanced-geometry svg:viewBox="0 0 21600 21600" draw:type="non-primitive" draw:enhanced-path="M 0 0 L 21600 0 21600 21600 0 21600 Z N"/>
          </draw:custom-shape>
          <draw:custom-shape draw:name="Rectangle 94" draw:style-name="gr90" draw:text-style-name="P3" draw:layer="layout" svg:width="3.229cm" svg:height="0.735cm" svg:x="16.367cm" svg:y="4.867cm">
            <text:p text:style-name="P2"><text:span text:style-name="T20">Metadata S2</text:span></text:p>
            <draw:enhanced-geometry svg:viewBox="0 0 21600 21600" draw:type="non-primitive" draw:enhanced-path="M 0 0 L 21600 0 21600 21600 0 21600 Z N"/>
          </draw:custom-shape>
        </draw:g>
        <draw:g draw:name="Group 114" draw:style-name="gr6">
          <draw:custom-shape draw:name="Rectangle 96" draw:style-name="gr90" draw:text-style-name="P3" draw:layer="layout" svg:width="3.229cm" svg:height="0.735cm" svg:x="18.157cm" svg:y="9.151cm">
            <text:p text:style-name="P2"><text:span text:style-name="T20">Metadata S1</text:span></text:p>
            <draw:enhanced-geometry svg:viewBox="0 0 21600 21600" draw:type="non-primitive" draw:enhanced-path="M 0 0 L 21600 0 21600 21600 0 21600 Z N"/>
          </draw:custom-shape>
          <draw:custom-shape draw:name="Rectangle 98" draw:style-name="gr90" draw:text-style-name="P3" draw:layer="layout" svg:width="3.229cm" svg:height="0.735cm" svg:x="18.157cm" svg:y="9.882cm">
            <text:p text:style-name="P2"><text:span text:style-name="T20">Metadata S2</text:span></text:p>
            <draw:enhanced-geometry svg:viewBox="0 0 21600 21600" draw:type="non-primitive" draw:enhanced-path="M 0 0 L 21600 0 21600 21600 0 21600 Z N"/>
          </draw:custom-shape>
          <draw:custom-shape draw:name="Rectangle 99" draw:style-name="gr90" draw:text-style-name="P3" draw:layer="layout" svg:width="3.229cm" svg:height="0.735cm" svg:x="18.157cm" svg:y="10.617cm">
            <text:p text:style-name="P2"><text:span text:style-name="T20">Metadata S5</text:span></text:p>
            <draw:enhanced-geometry svg:viewBox="0 0 21600 21600" draw:type="non-primitive" draw:enhanced-path="M 0 0 L 21600 0 21600 21600 0 21600 Z N"/>
          </draw:custom-shape>
        </draw:g>
        <draw:connector draw:name="Google Shape;694;p 1" draw:style-name="gr78" draw:text-style-name="P1" draw:layer="layout" draw:type="line" svg:x1="20.427cm" svg:y1="7.712cm" svg:x2="24.387cm" svg:y2="7.732cm" svg:d="M20427 7712l3960 20" svg:viewBox="0 0 3961 21">
          <text:p/>
        </draw:connector>
        <draw:frame draw:name="Google Shape;699;p 1" draw:style-name="gr79" draw:text-style-name="P20" draw:layer="layout" svg:width="1.524cm" svg:height="0.854cm" svg:x="13.782cm" svg:y="5.693cm">
          <draw:text-box>
            <text:p text:style-name="P2"><text:span text:style-name="T16">S2</text:span></text:p>
          </draw:text-box>
        </draw:frame>
        <draw:frame draw:name="Google Shape;699;p 2" draw:style-name="gr79" draw:text-style-name="P20" draw:layer="layout" svg:width="1.524cm" svg:height="0.854cm" svg:x="13.782cm" svg:y="8.021cm">
          <draw:text-box>
            <text:p text:style-name="P2"><text:span text:style-name="T16">S3</text:span></text:p>
          </draw:text-box>
        </draw:frame>
        <draw:frame draw:name="Google Shape;699;p 3" draw:style-name="gr79" draw:text-style-name="P20" draw:layer="layout" svg:width="1.524cm" svg:height="0.854cm" svg:x="13.782cm" svg:y="10.682cm">
          <draw:text-box>
            <text:p text:style-name="P2"><text:span text:style-name="T16">S4</text:span></text:p>
          </draw:text-box>
        </draw:frame>
        <draw:frame draw:name="Google Shape;699;p 4" draw:style-name="gr79" draw:text-style-name="P20" draw:layer="layout" svg:width="1.524cm" svg:height="0.854cm" svg:x="18.834cm" svg:y="7.81cm">
          <draw:text-box>
            <text:p text:style-name="P2"><text:span text:style-name="T16">S5</text:span></text:p>
          </draw:text-box>
        </draw:frame>
        <draw:g draw:name="Group 1" draw:style-name="gr6">
          <draw:custom-shape draw:name="Rounded Rectangle 71" draw:style-name="gr74" draw:text-style-name="P25" draw:layer="layout" svg:width="1.653cm" svg:height="2.809cm" svg:x="24.553cm" svg:y="6.35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9" draw:style-name="gr75" draw:text-style-name="P1" draw:layer="layout" svg:width="3.889cm" svg:height="3.324cm" svg:x="24.46cm" svg:y="6.06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82" draw:style-name="gr76" draw:text-style-name="P32" draw:layer="layout" svg:width="1.863cm" svg:height="2.904cm" svg:x="26.46cm" svg:y="6.488cm">
            <text:p/>
            <draw:enhanced-geometry svg:viewBox="0 0 21600 21600" draw:type="non-primitive" draw:enhanced-path="M 0 0 L 21600 0 21600 21600 0 21600 Z N"/>
          </draw:custom-shape>
        </draw:g>
        <draw:g draw:name="Group 2" draw:style-name="gr6">
          <draw:custom-shape draw:name="Cube 2" draw:style-name="gr95" draw:text-style-name="P41" draw:layer="layout" svg:width="2.543cm" svg:height="1.106cm" svg:x="13.273cm" svg:y="9.80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3" draw:style-name="gr6">
            <draw:g draw:name="Group 4" draw:style-name="gr8">
              <draw:connector draw:name="Straight Arrow Connector 11" draw:style-name="gr96" draw:text-style-name="P1" draw:layer="layout" draw:type="line" svg:x1="14.698cm" svg:y1="9.969cm" svg:x2="15.57cm" svg:y2="9.969cm" svg:d="M14698 9969h872" svg:viewBox="0 0 873 1">
                <text:p/>
              </draw:connector>
              <draw:connector draw:name="Straight Arrow Connector 12" draw:style-name="gr97" draw:text-style-name="P1" draw:layer="layout" draw:type="line" svg:x1="14.698cm" svg:y1="10.32cm" svg:x2="15.245cm" svg:y2="10.32cm" svg:d="M14698 10320h547" svg:viewBox="0 0 548 1">
                <text:p/>
              </draw:connector>
            </draw:g>
            <draw:g draw:name="Group 5" draw:style-name="gr8">
              <draw:connector draw:name="Straight Arrow Connector 9" draw:style-name="gr9" draw:text-style-name="P1" draw:layer="layout" draw:type="line" svg:x1="14.39cm" svg:y1="9.975cm" svg:x2="13.858cm" svg:y2="9.975cm" svg:d="M14390 9975h-532" svg:viewBox="0 0 533 1">
                <text:p/>
              </draw:connector>
              <draw:connector draw:name="Straight Arrow Connector 10" draw:style-name="gr10" draw:text-style-name="P1" draw:layer="layout" draw:type="line" svg:x1="14.39cm" svg:y1="10.32cm" svg:x2="13.534cm" svg:y2="10.32cm" svg:d="M14390 10320h-856" svg:viewBox="0 0 857 1">
                <text:p/>
              </draw:connector>
            </draw:g>
            <draw:connector draw:name="Straight Connector 6" draw:style-name="gr13" draw:text-style-name="P1" draw:layer="layout" draw:type="line" svg:x1="14.373cm" svg:y1="10.327cm" svg:x2="14.715cm" svg:y2="9.962cm" svg:d="M14373 10327l342-365" svg:viewBox="0 0 343 366">
              <text:p/>
            </draw:connector>
            <draw:connector draw:name="Straight Connector 7" draw:style-name="gr13" draw:text-style-name="P1" draw:layer="layout" draw:type="line" svg:x1="14.715cm" svg:y1="10.327cm" svg:x2="14.373cm" svg:y2="9.962cm" svg:d="M14715 10327l-342-365" svg:viewBox="0 0 343 366">
              <text:p/>
            </draw:connector>
          </draw:g>
        </draw:g>
        <draw:g draw:name="Group 17" draw:style-name="gr6">
          <draw:custom-shape draw:name="Cube 18" draw:style-name="gr98" draw:text-style-name="P42" draw:layer="layout" svg:width="2.543cm" svg:height="1.106cm" svg:x="13.273cm" svg:y="7.17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0" draw:style-name="gr6">
            <draw:g draw:name="Group 21" draw:style-name="gr8">
              <draw:connector draw:name="Straight Arrow Connector 27" draw:style-name="gr99" draw:text-style-name="P1" draw:layer="layout" draw:type="line" svg:x1="14.698cm" svg:y1="7.337cm" svg:x2="15.57cm" svg:y2="7.337cm" svg:d="M14698 7337h872" svg:viewBox="0 0 873 1">
                <text:p/>
              </draw:connector>
              <draw:connector draw:name="Straight Arrow Connector 28" draw:style-name="gr100" draw:text-style-name="P1" draw:layer="layout" draw:type="line" svg:x1="14.698cm" svg:y1="7.689cm" svg:x2="15.245cm" svg:y2="7.689cm" svg:d="M14698 7689h547" svg:viewBox="0 0 548 1">
                <text:p/>
              </draw:connector>
            </draw:g>
            <draw:g draw:name="Group 22" draw:style-name="gr8">
              <draw:connector draw:name="Straight Arrow Connector 25" draw:style-name="gr15" draw:text-style-name="P1" draw:layer="layout" draw:type="line" svg:x1="14.39cm" svg:y1="7.343cm" svg:x2="13.858cm" svg:y2="7.343cm" svg:d="M14390 7343h-532" svg:viewBox="0 0 533 1">
                <text:p/>
              </draw:connector>
              <draw:connector draw:name="Straight Arrow Connector 26" draw:style-name="gr16" draw:text-style-name="P1" draw:layer="layout" draw:type="line" svg:x1="14.39cm" svg:y1="7.689cm" svg:x2="13.534cm" svg:y2="7.689cm" svg:d="M14390 7689h-856" svg:viewBox="0 0 857 1">
                <text:p/>
              </draw:connector>
            </draw:g>
            <draw:connector draw:name="Straight Connector 23" draw:style-name="gr13" draw:text-style-name="P1" draw:layer="layout" draw:type="line" svg:x1="14.373cm" svg:y1="7.695cm" svg:x2="14.715cm" svg:y2="7.33cm" svg:d="M14373 7695l342-365" svg:viewBox="0 0 343 366">
              <text:p/>
            </draw:connector>
            <draw:connector draw:name="Straight Connector 24" draw:style-name="gr13" draw:text-style-name="P1" draw:layer="layout" draw:type="line" svg:x1="14.715cm" svg:y1="7.695cm" svg:x2="14.373cm" svg:y2="7.33cm" svg:d="M14715 7695l-342-365" svg:viewBox="0 0 343 366">
              <text:p/>
            </draw:connector>
          </draw:g>
        </draw:g>
        <draw:g draw:name="Group 29" draw:style-name="gr6">
          <draw:custom-shape draw:name="Cube 30" draw:style-name="gr101" draw:text-style-name="P43" draw:layer="layout" svg:width="2.543cm" svg:height="1.106cm" svg:x="13.273cm" svg:y="4.832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31" draw:style-name="gr6">
            <draw:g draw:name="Group 32" draw:style-name="gr8">
              <draw:connector draw:name="Straight Arrow Connector 43" draw:style-name="gr102" draw:text-style-name="P1" draw:layer="layout" draw:type="line" svg:x1="14.698cm" svg:y1="4.993cm" svg:x2="15.57cm" svg:y2="4.993cm" svg:d="M14698 4993h872" svg:viewBox="0 0 873 1">
                <text:p/>
              </draw:connector>
              <draw:connector draw:name="Straight Arrow Connector 44" draw:style-name="gr103" draw:text-style-name="P1" draw:layer="layout" draw:type="line" svg:x1="14.698cm" svg:y1="5.345cm" svg:x2="15.245cm" svg:y2="5.345cm" svg:d="M14698 5345h547" svg:viewBox="0 0 548 1">
                <text:p/>
              </draw:connector>
            </draw:g>
            <draw:g draw:name="Group 33" draw:style-name="gr8">
              <draw:connector draw:name="Straight Arrow Connector 41" draw:style-name="gr20" draw:text-style-name="P1" draw:layer="layout" draw:type="line" svg:x1="14.39cm" svg:y1="5cm" svg:x2="13.858cm" svg:y2="5cm" svg:d="M14390 5000h-532" svg:viewBox="0 0 533 1">
                <text:p/>
              </draw:connector>
              <draw:connector draw:name="Straight Arrow Connector 42" draw:style-name="gr21" draw:text-style-name="P1" draw:layer="layout" draw:type="line" svg:x1="14.39cm" svg:y1="5.345cm" svg:x2="13.534cm" svg:y2="5.345cm" svg:d="M14390 5345h-856" svg:viewBox="0 0 857 1">
                <text:p/>
              </draw:connector>
            </draw:g>
            <draw:connector draw:name="Straight Connector 34" draw:style-name="gr13" draw:text-style-name="P1" draw:layer="layout" draw:type="line" svg:x1="14.373cm" svg:y1="5.351cm" svg:x2="14.715cm" svg:y2="4.987cm" svg:d="M14373 5351l342-364" svg:viewBox="0 0 343 365">
              <text:p/>
            </draw:connector>
            <draw:connector draw:name="Straight Connector 35" draw:style-name="gr13" draw:text-style-name="P1" draw:layer="layout" draw:type="line" svg:x1="14.715cm" svg:y1="5.351cm" svg:x2="14.373cm" svg:y2="4.987cm" svg:d="M14715 5351l-342-364" svg:viewBox="0 0 343 365">
              <text:p/>
            </draw:connector>
          </draw:g>
        </draw:g>
        <draw:g draw:name="Group 46" draw:style-name="gr6">
          <draw:custom-shape draw:name="Cube 47" draw:style-name="gr104" draw:text-style-name="P44" draw:layer="layout" svg:width="2.543cm" svg:height="1.106cm" svg:x="8.065cm" svg:y="7.11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8" draw:style-name="gr6">
            <draw:g draw:name="Group 49" draw:style-name="gr8">
              <draw:connector draw:name="Straight Arrow Connector 60" draw:style-name="gr105" draw:text-style-name="P1" draw:layer="layout" draw:type="line" svg:x1="9.49cm" svg:y1="7.273cm" svg:x2="10.362cm" svg:y2="7.273cm" svg:d="M9490 7273h872" svg:viewBox="0 0 873 1">
                <text:p/>
              </draw:connector>
              <draw:connector draw:name="Straight Arrow Connector 2" draw:style-name="gr106" draw:text-style-name="P1" draw:layer="layout" draw:type="line" svg:x1="9.49cm" svg:y1="7.625cm" svg:x2="10.037cm" svg:y2="7.625cm" svg:d="M9490 7625h547" svg:viewBox="0 0 548 1">
                <text:p/>
              </draw:connector>
            </draw:g>
            <draw:g draw:name="Group 51" draw:style-name="gr8">
              <draw:connector draw:name="Straight Arrow Connector 58" draw:style-name="gr25" draw:text-style-name="P1" draw:layer="layout" draw:type="line" svg:x1="9.182cm" svg:y1="7.28cm" svg:x2="8.65cm" svg:y2="7.28cm" svg:d="M9182 7280h-532" svg:viewBox="0 0 533 1">
                <text:p/>
              </draw:connector>
              <draw:connector draw:name="Straight Arrow Connector 59" draw:style-name="gr26" draw:text-style-name="P1" draw:layer="layout" draw:type="line" svg:x1="9.182cm" svg:y1="7.625cm" svg:x2="8.326cm" svg:y2="7.625cm" svg:d="M9182 7625h-856" svg:viewBox="0 0 857 1">
                <text:p/>
              </draw:connector>
            </draw:g>
            <draw:connector draw:name="Straight Connector 56" draw:style-name="gr13" draw:text-style-name="P1" draw:layer="layout" draw:type="line" svg:x1="9.165cm" svg:y1="7.632cm" svg:x2="9.507cm" svg:y2="7.267cm" svg:d="M9165 7632l342-365" svg:viewBox="0 0 343 366">
              <text:p/>
            </draw:connector>
            <draw:connector draw:name="Straight Connector 57" draw:style-name="gr13" draw:text-style-name="P1" draw:layer="layout" draw:type="line" svg:x1="9.507cm" svg:y1="7.632cm" svg:x2="9.165cm" svg:y2="7.267cm" svg:d="M9507 7632l-342-365" svg:viewBox="0 0 343 366">
              <text:p/>
            </draw:connector>
          </draw:g>
        </draw:g>
        <draw:g draw:name="Group 64" draw:style-name="gr6">
          <draw:custom-shape draw:name="Cube 65" draw:style-name="gr107" draw:text-style-name="P45" draw:layer="layout" svg:width="2.543cm" svg:height="1.106cm" svg:x="18.354cm" svg:y="6.952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6">
            <draw:g draw:name="Group 90" draw:style-name="gr8">
              <draw:connector draw:name="Straight Arrow Connector 103" draw:style-name="gr108" draw:text-style-name="P1" draw:layer="layout" draw:type="line" svg:x1="19.779cm" svg:y1="7.113cm" svg:x2="20.651cm" svg:y2="7.113cm" svg:d="M19779 7113h872" svg:viewBox="0 0 873 1">
                <text:p/>
              </draw:connector>
              <draw:connector draw:name="Straight Arrow Connector 104" draw:style-name="gr109" draw:text-style-name="P1" draw:layer="layout" draw:type="line" svg:x1="19.779cm" svg:y1="7.465cm" svg:x2="20.326cm" svg:y2="7.465cm" svg:d="M19779 7465h547" svg:viewBox="0 0 548 1">
                <text:p/>
              </draw:connector>
            </draw:g>
            <draw:g draw:name="Group 95" draw:style-name="gr8">
              <draw:connector draw:name="Straight Arrow Connector 101" draw:style-name="gr30" draw:text-style-name="P1" draw:layer="layout" draw:type="line" svg:x1="19.472cm" svg:y1="7.119cm" svg:x2="18.939cm" svg:y2="7.119cm" svg:d="M19472 7119h-533" svg:viewBox="0 0 534 1">
                <text:p/>
              </draw:connector>
              <draw:connector draw:name="Straight Arrow Connector 102" draw:style-name="gr31" draw:text-style-name="P1" draw:layer="layout" draw:type="line" svg:x1="19.472cm" svg:y1="7.465cm" svg:x2="18.615cm" svg:y2="7.465cm" svg:d="M19472 7465h-857" svg:viewBox="0 0 858 1">
                <text:p/>
              </draw:connector>
            </draw:g>
            <draw:connector draw:name="Straight Connector 97" draw:style-name="gr13" draw:text-style-name="P1" draw:layer="layout" draw:type="line" svg:x1="19.454cm" svg:y1="7.471cm" svg:x2="19.796cm" svg:y2="7.106cm" svg:d="M19454 7471l342-365" svg:viewBox="0 0 343 366">
              <text:p/>
            </draw:connector>
            <draw:connector draw:name="Straight Connector 100" draw:style-name="gr13" draw:text-style-name="P1" draw:layer="layout" draw:type="line" svg:x1="19.796cm" svg:y1="7.471cm" svg:x2="19.454cm" svg:y2="7.106cm" svg:d="M19796 7471l-342-365" svg:viewBox="0 0 343 366">
              <text:p/>
            </draw:connector>
          </draw:g>
        </draw:g>
        <presentation:notes draw:style-name="dp2">
          <draw:page-thumbnail draw:style-name="gr41" draw:layer="layout" svg:width="18.624cm" svg:height="10.476cm" svg:x="1.482cm" svg:y="2.123cm" draw:page-number="4"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0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3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89"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02"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09"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418" svg:viewBox="0 0 20 30" svg:d="M10 0l-10 30h20z"/>
    <draw:marker draw:name="a420" svg:viewBox="0 0 20 30" svg:d="M10 0l-10 30h20z"/>
    <draw:marker draw:name="a422" svg:viewBox="0 0 20 30" svg:d="M10 0l-10 30h20z"/>
    <draw:marker draw:name="a424" svg:viewBox="0 0 20 30" svg:d="M10 0l-10 30h20z"/>
    <draw:marker draw:name="a426" svg:viewBox="0 0 20 30" svg:d="M10 0l-10 30h20z"/>
    <draw:marker draw:name="a745" svg:viewBox="0 0 20 30" svg:d="M10 0l-10 30h20z"/>
    <draw:marker draw:name="a756" svg:viewBox="0 0 20 30" svg:d="M10 0l-10 30h20z"/>
    <draw:marker draw:name="a762" svg:viewBox="0 0 20 30" svg:d="M10 0l-10 30h20z"/>
    <draw:marker draw:name="a768" svg:viewBox="0 0 20 30" svg:d="M10 0l-10 30h20z"/>
    <draw:marker draw:name="a781"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0" svg:viewBox="0 0 20 30" svg:d="M10 0l-10 30h20z"/>
    <draw:marker draw:name="a812"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24" svg:viewBox="0 0 20 30" svg:d="M10 0l-10 30h20z"/>
    <draw:marker draw:name="a826"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38" svg:viewBox="0 0 20 30" svg:d="M10 0l-10 30h20z"/>
    <draw:marker draw:name="a840"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2" svg:viewBox="0 0 20 30" svg:d="M10 0l-10 30h20z"/>
    <draw:marker draw:name="a854"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marker draw:name="a866" svg:viewBox="0 0 20 30" svg:d="M10 0l-10 30h20z"/>
    <draw:marker draw:name="a868" svg:viewBox="0 0 20 30" svg:d="M10 0l-10 30h20z"/>
    <draw:stroke-dash draw:name="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6-02T15:11:34.231237000</dc:date>
    <meta:editing-duration>P5DT56M33S</meta:editing-duration>
    <meta:editing-cycles>52</meta:editing-cycles>
    <meta:generator>LibreOffice/25.2.4.3$MacOSX_AARCH64 LibreOffice_project/33e196637044ead23f5c3226cde09b47731f7e27</meta:generator>
    <meta:print-date>2026-01-12T16:44:25.569030000</meta:print-date>
    <meta:printed-by>PDF files</meta:printed-by>
    <meta:document-statistic meta:object-count="252"/>
  </office:meta>
</office:document-meta>
</file>