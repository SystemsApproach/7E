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4B0000004B0250C3613.png" manifest:media-type="image/png"/>
  <manifest:file-entry manifest:full-path="Pictures/10000001000004B0000004B065953AC9.png" manifest:media-type="image/png"/>
  <manifest:file-entry manifest:full-path="Pictures/10000001000004B0000004B02D8E20B8.png" manifest:media-type="image/png"/>
  <manifest:file-entry manifest:full-path="Pictures/10000001000001370000008A3032A3C2.png" manifest:media-type="image/png"/>
  <manifest:file-entry manifest:full-path="Pictures/100000010000047400000324E1A3B353.png" manifest:media-type="image/png"/>
  <manifest:file-entry manifest:full-path="Pictures/10000001000004B0000004B0923FE4BE.png" manifest:media-type="image/png"/>
  <manifest:file-entry manifest:full-path="Pictures/10000001000004B0000004B0D531CF7C.png" manifest:media-type="image/png"/>
  <manifest:file-entry manifest:full-path="Pictures/10004B2B000068BB000049DD8AB69D38.pdf" manifest:media-type="application/pdf"/>
  <manifest:file-entry manifest:full-path="Pictures/100008A0000046A9000046A969C5F579.svg" manifest:media-type="image/svg+xml"/>
  <manifest:file-entry manifest:full-path="Pictures/10000001000004B0000004B07B09B8D8.png" manifest:media-type="image/png"/>
  <manifest:file-entry manifest:full-path="Pictures/1000000100000138000001D4939E222C.png" manifest:media-type="image/png"/>
  <manifest:file-entry manifest:full-path="Pictures/10000001000001F3000001510BDF560F.png" manifest:media-type="image/png"/>
  <manifest:file-entry manifest:full-path="Pictures/1000184A00001CAA00002AFFD75A7ACE.pdf" manifest:media-type="application/pdf"/>
  <manifest:file-entry manifest:full-path="Pictures/10000001000002C3000002C3DF6DA5F5.png" manifest:media-type="image/png"/>
  <manifest:file-entry manifest:full-path="Pictures/10000001000004B0000004B0B6C3AB3D.png" manifest:media-type="image/png"/>
  <manifest:file-entry manifest:full-path="Pictures/1000000100000316000005E6C4157AF2.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svg:stroke-color="#000000" draw:fill="none" draw:fill-color="#ffffff" draw:auto-grow-height="true" draw:auto-grow-width="false" fo:min-height="0.925cm" loext:decorative="false"/>
      <style:paragraph-properties style:writing-mode="lr-tb"/>
    </style:style>
    <style:style style:name="gr3" style:family="graphic" style:parent-style-name="standard">
      <style:graphic-properties draw:stroke="none" svg:stroke-color="#000000" draw:fill="none" draw:fill-color="#ffffff" draw:textarea-horizontal-align="center" draw:auto-grow-height="true" draw:auto-grow-width="false" fo:min-height="1.381cm" loext:decorative="false"/>
      <style:paragraph-properties style:writing-mode="lr-tb"/>
    </style:style>
    <style:style style:name="gr4" style:family="graphic" style:parent-style-name="standard">
      <style:graphic-properties svg:stroke-color="#0070c0" draw:fill="solid" draw:fill-color="#0070c0" draw:textarea-horizontal-align="justify" draw:textarea-vertical-align="middle" draw:auto-grow-height="false" fo:min-height="0.639cm" fo:min-width="0.961cm" loext:decorative="false"/>
    </style:style>
    <style:style style:name="gr5" style:family="graphic" style:parent-style-name="standard">
      <style:graphic-properties svg:stroke-color="#bdd7ee" draw:fill="solid" draw:fill-color="#bdd7ee" draw:textarea-horizontal-align="justify" draw:textarea-vertical-align="middle" draw:auto-grow-height="false" fo:min-height="0.639cm" fo:min-width="0.961cm" loext:decorative="false"/>
    </style:style>
    <style:style style:name="gr6" style:family="graphic" style:parent-style-name="standard">
      <style:graphic-properties svg:stroke-color="#6a99d0" draw:fill="solid" draw:fill-color="#6a99d0" draw:textarea-horizontal-align="justify" draw:textarea-vertical-align="middle" draw:auto-grow-height="false" fo:min-height="0.639cm" fo:min-width="0.961cm" loext:decorative="false"/>
    </style:style>
    <style:style style:name="gr7" style:family="graphic">
      <style:graphic-properties style:protect="size" loext:decorative="false"/>
    </style:style>
    <style:style style:name="gr8" style:family="graphic" style:parent-style-name="Default_20_Drawing_20_Style_5f_1">
      <style:graphic-properties draw:stroke="none" svg:stroke-color="#000000" draw:fill="none" draw:fill-color="#ffffff" draw:textarea-horizontal-align="left" draw:auto-grow-height="true" draw:auto-grow-width="true" fo:min-height="0.602cm" fo:min-width="1.161cm" loext:decorative="false"/>
      <style:paragraph-properties style:writing-mode="lr-tb"/>
    </style:style>
    <style:style style:name="gr9" style:family="graphic" style:parent-style-name="Default_20_Drawing_20_Style_5f_1">
      <style:graphic-properties draw:stroke="none" svg:stroke-color="#000000" draw:fill="none" draw:fill-color="#ffffff" draw:textarea-horizontal-align="center" draw:auto-grow-height="true" draw:auto-grow-width="true" fo:min-height="1.203cm" fo:min-width="2.816cm" loext:decorative="false"/>
      <style:paragraph-properties style:writing-mode="lr-tb"/>
    </style:style>
    <style:style style:name="gr10" style:family="graphic" style:parent-style-name="objectwithoutfill">
      <style:graphic-properties svg:stroke-width="0.051cm" svg:stroke-color="#333333" draw:marker-start-width="0.279cm" draw:marker-end="Arrowheads_20_2" draw:marker-end-width="0.381cm" draw:fill="none" draw:textarea-vertical-align="middle" fo:padding-top="0.151cm" fo:padding-bottom="0.151cm" fo:padding-left="0.276cm" fo:padding-right="0.276cm" loext:decorative="false"/>
    </style:style>
    <style:style style:name="gr11" style:family="graphic" style:parent-style-name="objectwithoutfill">
      <style:graphic-properties svg:stroke-width="0.051cm" svg:stroke-color="#333333" draw:marker-start-width="0.279cm" draw:marker-end="Arrowheads_20_2" draw:marker-end-width="0.381cm" draw:fill="none" draw:textarea-vertical-align="middle" fo:padding-top="0.15cm" fo:padding-bottom="0.15cm" fo:padding-left="0.275cm" fo:padding-right="0.275cm" loext:decorative="false"/>
    </style:style>
    <style:style style:name="gr12" style:family="graphic">
      <style:graphic-properties style:writing-mode="lr-tb" loext:decorative="false"/>
    </style:style>
    <style:style style:name="gr13"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828cm" fo:padding-top="0.125cm" fo:padding-bottom="0.125cm" fo:padding-left="0.25cm" fo:padding-right="0.25cm" fo:wrap-option="wrap" loext:decorative="false">
        <loext:stroke-complex-color loext:theme-type="dark1" loext:color-type="theme"/>
      </style:graphic-properties>
    </style:style>
    <style:style style:name="gr14"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806cm" fo:padding-top="0.125cm" fo:padding-bottom="0.125cm" fo:padding-left="0.25cm" fo:padding-right="0.25cm" fo:wrap-option="wrap" loext:decorative="false">
        <loext:stroke-complex-color loext:theme-type="dark1" loext:color-type="theme"/>
      </style:graphic-properties>
    </style:style>
    <style:style style:name="gr15" style:family="graphic" style:parent-style-name="Default_20_Drawing_20_Style_5f_1">
      <style:graphic-properties draw:stroke="solid" svg:stroke-width="0.018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16" style:family="graphic" style:parent-style-name="Default_20_Drawing_20_Style_5f_1">
      <style:graphic-properties draw:stroke="none" svg:stroke-color="#000000" draw:fill="none" draw:fill-color="#ffffff" draw:textarea-horizontal-align="left" draw:auto-grow-height="true" draw:auto-grow-width="true" fo:min-height="0.602cm" fo:min-width="1.241cm" loext:decorative="false"/>
      <style:paragraph-properties style:writing-mode="lr-tb"/>
    </style:style>
    <style:style style:name="gr17"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774cm" fo:padding-top="0.125cm" fo:padding-bottom="0.125cm" fo:padding-left="0.25cm" fo:padding-right="0.25cm" fo:wrap-option="wrap" loext:decorative="false">
        <loext:stroke-complex-color loext:theme-type="dark1" loext:color-type="theme"/>
      </style:graphic-properties>
    </style:style>
    <style:style style:name="gr18"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752cm" fo:padding-top="0.125cm" fo:padding-bottom="0.125cm" fo:padding-left="0.25cm" fo:padding-right="0.25cm" fo:wrap-option="wrap" loext:decorative="false">
        <loext:stroke-complex-color loext:theme-type="dark1" loext:color-type="theme"/>
      </style:graphic-properties>
    </style:style>
    <style:style style:name="gr19" style:family="graphic" style:parent-style-name="Default_20_Drawing_20_Style_5f_1">
      <style:graphic-properties draw:stroke="none" svg:stroke-color="#000000" draw:fill="none" draw:fill-color="#ffffff" draw:textarea-horizontal-align="left" draw:auto-grow-height="true" draw:auto-grow-width="true" fo:min-height="0.602cm" fo:min-width="1.991cm" loext:decorative="false"/>
      <style:paragraph-properties style:writing-mode="lr-tb"/>
    </style:style>
    <style:style style:name="gr20" style:family="graphic" style:parent-style-name="standard">
      <style:graphic-properties draw:stroke="none" draw:fill="solid" draw:fill-color="#000000" draw:opacity="100%" draw:textarea-horizontal-align="left" draw:textarea-vertical-align="top" draw:auto-grow-height="false" draw:auto-grow-width="false" fo:min-height="2.999cm" fo:min-width="6.444cm" fo:padding-top="0.127cm" fo:padding-bottom="0.127cm" fo:padding-left="0.254cm" fo:padding-right="0.254cm" fo:wrap-option="wrap" style:writing-mode="lr-tb" loext:decorative="false"/>
      <style:paragraph-properties style:writing-mode="lr-tb"/>
    </style:style>
    <style:style style:name="gr21"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3.304cm" fo:min-width="4.341cm" fo:padding-top="0.15cm" fo:padding-bottom="0.15cm" fo:padding-left="0.275cm" fo:padding-right="0.275cm" fo:wrap-option="wrap" draw:shadow="visible" draw:shadow-offset-x="0.102cm" draw:shadow-offset-y="-0.102cm" draw:shadow-color="#6a99d0" loext:decorative="false"/>
    </style:style>
    <style:style style:name="gr22" style:family="graphic" style:parent-style-name="standard">
      <style:graphic-properties svg:stroke-color="#ffffff" draw:fill="solid" draw:fill-color="#ffffff" draw:textarea-horizontal-align="justify" draw:textarea-vertical-align="middle" draw:auto-grow-height="false" fo:min-height="0.803cm" fo:min-width="0.167cm" loext:decorative="false"/>
    </style:style>
    <style:style style:name="gr23" style:family="graphic" style:parent-style-name="standard">
      <style:graphic-properties svg:stroke-color="#ffffff" draw:fill="solid" draw:fill-color="#ffffff" draw:textarea-horizontal-align="justify" draw:textarea-vertical-align="middle" draw:auto-grow-height="false" fo:min-height="0.117cm" fo:min-width="0cm" loext:decorative="false"/>
    </style:style>
    <style:style style:name="gr24" style:family="graphic" style:parent-style-name="standard">
      <style:graphic-properties svg:stroke-color="#ffffff" draw:fill="solid" draw:fill-color="#ffffff" draw:textarea-horizontal-align="justify" draw:textarea-vertical-align="middle" draw:auto-grow-height="false" fo:min-height="0.462cm" fo:min-width="0cm" loext:decorative="false"/>
    </style:style>
    <style:style style:name="gr25" style:family="graphic" style:parent-style-name="standard">
      <style:graphic-properties svg:stroke-color="#ffffff" draw:fill="solid" draw:fill-color="#ffffff" draw:textarea-horizontal-align="justify" draw:textarea-vertical-align="middle" draw:auto-grow-height="false" fo:min-height="0.462cm" fo:min-width="0.167cm" loext:decorative="false"/>
    </style:style>
    <style:style style:name="gr26" style:family="graphic" style:parent-style-name="standard">
      <style:graphic-properties svg:stroke-color="#ffffff" draw:fill="solid" draw:fill-color="#ffffff" draw:textarea-horizontal-align="justify" draw:textarea-vertical-align="middle" draw:auto-grow-height="false" fo:min-height="0.088cm" fo:min-width="0.167cm" loext:decorative="false"/>
    </style:style>
    <style:style style:name="gr27" style:family="graphic" style:parent-style-name="standard">
      <style:graphic-properties svg:stroke-color="#ffffff" draw:fill="solid" draw:fill-color="#ffffff" draw:textarea-horizontal-align="justify" draw:textarea-vertical-align="middle" draw:auto-grow-height="false" fo:min-height="0.089cm" fo:min-width="0cm" loext:decorative="false"/>
    </style:style>
    <style:style style:name="gr28" style:family="graphic" style:parent-style-name="standard">
      <style:graphic-properties svg:stroke-color="#ffffff" draw:fill="solid" draw:fill-color="#ffffff" draw:textarea-horizontal-align="justify" draw:textarea-vertical-align="middle" draw:auto-grow-height="false" fo:min-height="0.321cm" fo:min-width="0.167cm" loext:decorative="false"/>
    </style:style>
    <style:style style:name="gr29" style:family="graphic" style:parent-style-name="standard">
      <style:graphic-properties svg:stroke-color="#ffffff" draw:fill="solid" draw:fill-color="#ffffff" draw:textarea-horizontal-align="justify" draw:textarea-vertical-align="middle" draw:auto-grow-height="false" fo:min-height="2.449cm" fo:min-width="1.356cm" loext:decorative="false"/>
    </style:style>
    <style:style style:name="gr30" style:family="graphic" style:parent-style-name="standard">
      <style:graphic-properties svg:stroke-color="#ffffff" draw:fill="solid" draw:fill-color="#ffffff" draw:textarea-horizontal-align="justify" draw:textarea-vertical-align="middle" draw:auto-grow-height="false" fo:min-height="1.575cm" fo:min-width="0.311cm" loext:decorative="false"/>
    </style:style>
    <style:style style:name="gr31" style:family="graphic" style:parent-style-name="standard">
      <style:graphic-properties svg:stroke-color="#ffffff" draw:fill="solid" draw:fill-color="#ffffff" draw:textarea-horizontal-align="justify" draw:textarea-vertical-align="middle" draw:auto-grow-height="false" fo:min-height="0.617cm" fo:min-width="1.356cm" loext:decorative="false"/>
    </style:style>
    <style:style style:name="gr32" style:family="graphic" style:parent-style-name="standard">
      <style:graphic-properties svg:stroke-color="#ffffff" draw:fill="solid" draw:fill-color="#ffffff" draw:textarea-horizontal-align="justify" draw:textarea-vertical-align="middle" draw:auto-grow-height="false" fo:min-height="0.617cm" fo:min-width="0.683cm" loext:decorative="false"/>
    </style:style>
    <style:style style:name="gr33" style:family="graphic" style:parent-style-name="standard">
      <style:graphic-properties svg:stroke-color="#ffffff" draw:fill="solid" draw:fill-color="#ffffff" draw:textarea-horizontal-align="justify" draw:textarea-vertical-align="middle" draw:auto-grow-height="false" fo:min-height="0.617cm" fo:min-width="0.684cm" loext:decorative="false"/>
    </style:style>
    <style:style style:name="gr34" style:family="graphic" style:parent-style-name="standard">
      <style:graphic-properties svg:stroke-color="#ffffff" draw:fill="solid" draw:fill-color="#ffffff" draw:textarea-horizontal-align="justify" draw:textarea-vertical-align="middle" draw:auto-grow-height="false" fo:min-height="0.619cm" fo:min-width="0.131cm" loext:decorative="false"/>
    </style:style>
    <style:style style:name="gr35" style:family="graphic" style:parent-style-name="standard">
      <style:graphic-properties svg:stroke-color="#ffffff" draw:fill="solid" draw:fill-color="#ffffff" draw:textarea-horizontal-align="justify" draw:textarea-vertical-align="middle" draw:auto-grow-height="false" fo:min-height="0.692cm" fo:min-width="0.202cm" loext:decorative="false"/>
    </style:style>
    <style:style style:name="gr36" style:family="graphic" style:parent-style-name="standard">
      <style:graphic-properties svg:stroke-color="#ffffff" draw:fill="solid" draw:fill-color="#ffffff" draw:textarea-horizontal-align="justify" draw:textarea-vertical-align="middle" draw:auto-grow-height="false" fo:min-height="1.214cm" fo:min-width="1.355cm" loext:decorative="false"/>
    </style:style>
    <style:style style:name="gr37" style:family="graphic" style:parent-style-name="standard">
      <style:graphic-properties svg:stroke-color="#ffffff" draw:fill="solid" draw:fill-color="#ffffff" draw:textarea-horizontal-align="justify" draw:textarea-vertical-align="middle" draw:auto-grow-height="false" fo:min-height="1.78cm" fo:min-width="1.216cm" loext:decorative="false"/>
    </style:style>
    <style:style style:name="gr38" style:family="graphic" style:parent-style-name="standard">
      <style:graphic-properties svg:stroke-color="#ffffff" draw:fill="solid" draw:fill-color="#ffffff" draw:textarea-horizontal-align="justify" draw:textarea-vertical-align="middle" draw:auto-grow-height="false" fo:min-height="0.769cm" fo:min-width="0.151cm" loext:decorative="false"/>
    </style:style>
    <style:style style:name="gr39" style:family="graphic" style:parent-style-name="objectwithoutfill">
      <style:graphic-properties svg:stroke-width="0.051cm" draw:marker-start-width="0.279cm" draw:marker-end-width="0.279cm" draw:fill="none" draw:textarea-vertical-align="middle" fo:padding-top="0.15cm" fo:padding-bottom="0.15cm" fo:padding-left="0.275cm" fo:padding-right="0.275cm" loext:decorative="false"/>
    </style:style>
    <style:style style:name="gr40" style:family="graphic" style:parent-style-name="standard">
      <style:graphic-properties svg:stroke-color="#ffffff" draw:fill="solid" draw:fill-color="#ffffff" draw:textarea-horizontal-align="justify" draw:textarea-vertical-align="middle" draw:auto-grow-height="false" fo:min-height="0.584cm" fo:min-width="1.089cm" loext:decorative="false"/>
    </style:style>
    <style:style style:name="gr41" style:family="graphic" style:parent-style-name="standard">
      <style:graphic-properties svg:stroke-color="#ffffff" draw:fill="solid" draw:fill-color="#ffffff" draw:textarea-horizontal-align="justify" draw:textarea-vertical-align="middle" draw:auto-grow-height="false" fo:min-height="0.584cm" fo:min-width="0.512cm" loext:decorative="false"/>
    </style:style>
    <style:style style:name="gr42" style:family="graphic" style:parent-style-name="standard">
      <style:graphic-properties svg:stroke-color="#ffffff" draw:fill="solid" draw:fill-color="#ffffff" draw:textarea-horizontal-align="justify" draw:textarea-vertical-align="middle" draw:auto-grow-height="false" fo:min-height="0.583cm" fo:min-width="0.512cm" loext:decorative="false"/>
    </style:style>
    <style:style style:name="gr43" style:family="graphic" style:parent-style-name="standard">
      <style:graphic-properties svg:stroke-color="#ffffff" draw:fill="solid" draw:fill-color="#ffffff" draw:textarea-horizontal-align="justify" draw:textarea-vertical-align="middle" draw:auto-grow-height="false" fo:min-height="0.583cm" fo:min-width="0.041cm" loext:decorative="false"/>
    </style:style>
    <style:style style:name="gr44" style:family="graphic" style:parent-style-name="standard">
      <style:graphic-properties svg:stroke-color="#ffffff" draw:fill="solid" draw:fill-color="#ffffff" draw:textarea-horizontal-align="justify" draw:textarea-vertical-align="middle" draw:auto-grow-height="false" fo:min-height="0.653cm" fo:min-width="0.103cm" loext:decorative="false"/>
    </style:style>
    <style:style style:name="gr45" style:family="graphic" style:parent-style-name="objectwithoutfill">
      <style:graphic-properties draw:stroke="solid" draw:stroke-dash="Long_20_Dash" svg:stroke-width="0.051cm" draw:marker-start-width="0.279cm" draw:marker-end-width="0.279cm" draw:fill="none" draw:textarea-vertical-align="middle" fo:padding-top="0.15cm" fo:padding-bottom="0.15cm" fo:padding-left="0.275cm" fo:padding-right="0.275cm" loext:decorative="false"/>
    </style:style>
    <style:style style:name="gr46" style:family="graphic" style:parent-style-name="standard">
      <style:graphic-properties draw:stroke="none" svg:stroke-color="#000000" draw:fill="none" draw:fill-color="#ffffff" draw:textarea-horizontal-align="left" draw:auto-grow-height="true" draw:auto-grow-width="true" fo:min-height="0.602cm" fo:min-width="0.487cm" loext:decorative="false"/>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602cm" fo:min-width="1.324cm" loext:decorative="false"/>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602cm" fo:min-width="1.307cm" loext:decorative="false"/>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0.602cm" fo:min-width="1.302cm" loext:decorative="false"/>
      <style:paragraph-properties style:writing-mode="lr-tb"/>
    </style:style>
    <style:style style:name="gr50" style:family="graphic" style:parent-style-name="objectwithoutfill">
      <style:graphic-properties draw:stroke="dash" draw:stroke-dash="Long_20_Dash" svg:stroke-width="0.051cm" draw:marker-start-width="0.279cm" draw:marker-end-width="0.279cm" draw:fill="none" draw:textarea-vertical-align="middle" fo:padding-top="0.15cm" fo:padding-bottom="0.15cm" fo:padding-left="0.275cm" fo:padding-right="0.275cm" loext:decorative="false"/>
    </style:style>
    <style:style style:name="gr51" style:family="graphic" style:parent-style-name="standard">
      <style:graphic-properties draw:stroke="none" svg:stroke-color="#000000" draw:fill="none" draw:fill-color="#ffffff" draw:textarea-horizontal-align="left" draw:auto-grow-height="true" draw:auto-grow-width="false" fo:min-height="1.203cm" fo:min-width="0.345cm" loext:decorative="false"/>
      <style:paragraph-properties style:writing-mode="lr-tb"/>
    </style:style>
    <style:style style:name="gr52" style:family="graphic" style:parent-style-name="standard">
      <style:graphic-properties svg:stroke-width="0.051cm" svg:stroke-color="#3465a4" draw:marker-start-width="0.279cm" draw:marker-end-width="0.279cm" draw:fill="solid" draw:fill-color="#ffffff" draw:textarea-horizontal-align="justify" draw:textarea-vertical-align="middle" draw:auto-grow-height="false" fo:min-height="0.589cm" fo:min-width="0.339cm" fo:padding-top="0.15cm" fo:padding-bottom="0.15cm" fo:padding-left="0.275cm" fo:padding-right="0.275cm" draw:shadow="visible" draw:shadow-offset-x="0.051cm" draw:shadow-offset-y="-0.051cm" draw:shadow-color="#6a99d0" loext:decorative="false"/>
    </style:style>
    <style:style style:name="gr53" style:family="graphic" style:parent-style-name="standard">
      <style:graphic-properties draw:stroke="none" svg:stroke-color="#000000" draw:fill="none" draw:fill-color="#ffffff" draw:textarea-horizontal-align="left" draw:auto-grow-height="true" draw:auto-grow-width="true" fo:min-height="0.691cm" fo:min-width="0.613cm" loext:decorative="false"/>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691cm" fo:min-width="0.639cm" loext:decorative="false"/>
      <style:paragraph-properties style:writing-mode="lr-tb"/>
    </style:style>
    <style:style style:name="gr55" style:family="graphic" style:parent-style-name="standard">
      <style:graphic-properties draw:stroke="dash" draw:stroke-dash="SysDot" svg:stroke-width="0.053cm" svg:stroke-color="#5b9bd5" draw:marker-end="a745" svg:stroke-opacity="100%" draw:stroke-linejoin="miter" svg:stroke-linecap="butt" draw:fill="none" fo:padding-top="0.151cm" fo:padding-bottom="0.151cm" fo:padding-left="0.276cm" fo:padding-right="0.276cm" loext:decorative="false"/>
    </style:style>
    <style:style style:name="gr56" style:family="graphic" style:parent-style-name="standard">
      <style:graphic-properties draw:stroke="solid" svg:stroke-width="0.159cm" svg:stroke-color="#5b9bd5" svg:stroke-opacity="100%" draw:stroke-linejoin="miter" svg:stroke-linecap="butt" draw:fill="solid" draw:fill-color="#ffffff" draw:opacity="100%" draw:textarea-horizontal-align="center" draw:textarea-vertical-align="middle" draw:auto-grow-height="false" draw:auto-grow-width="false" fo:min-height="1.596cm" fo:min-width="2.465cm" fo:padding-top="0.127cm" fo:padding-bottom="0.127cm" fo:padding-left="0.254cm" fo:padding-right="0.254cm" fo:wrap-option="wrap" style:writing-mode="lr-tb" loext:decorative="false"/>
      <style:paragraph-properties style:writing-mode="lr-tb"/>
    </style:style>
    <style:style style:name="gr57" style:family="graphic" style:parent-style-name="standard">
      <style:graphic-properties draw:stroke="none" draw:fill="none" draw:textarea-horizontal-align="left" draw:textarea-vertical-align="top" draw:auto-grow-height="true" draw:auto-grow-width="true" fo:min-height="0.848cm" fo:min-width="0.857cm" fo:padding-top="0.127cm" fo:padding-bottom="0.127cm" fo:padding-left="0.254cm" fo:padding-right="0.254cm" fo:wrap-option="no-wrap" loext:decorative="false"/>
      <style:paragraph-properties style:writing-mode="lr-tb"/>
    </style:style>
    <style:style style:name="gr58" style:family="graphic" style:parent-style-name="standard">
      <style:graphic-properties draw:stroke="dash" draw:stroke-dash="SysDot" svg:stroke-width="0.053cm" svg:stroke-color="#5b9bd5" draw:marker-end="a756" svg:stroke-opacity="100%" draw:stroke-linejoin="miter" svg:stroke-linecap="butt" draw:fill="none" fo:padding-top="0.151cm" fo:padding-bottom="0.151cm" fo:padding-left="0.276cm" fo:padding-right="0.276cm" loext:decorative="false"/>
    </style:style>
    <style:style style:name="gr59" style:family="graphic" style:parent-style-name="standard">
      <style:graphic-properties draw:stroke="dash" draw:stroke-dash="SysDot" svg:stroke-width="0.053cm" svg:stroke-color="#5b9bd5" draw:marker-end="a759" svg:stroke-opacity="100%" draw:stroke-linejoin="miter" svg:stroke-linecap="butt" draw:fill="none" fo:padding-top="0.151cm" fo:padding-bottom="0.151cm" fo:padding-left="0.276cm" fo:padding-right="0.276cm" loext:decorative="false"/>
    </style:style>
    <style:style style:name="gr60" style:family="graphic" style:parent-style-name="standard">
      <style:graphic-properties draw:stroke="dash" draw:stroke-dash="SysDot" svg:stroke-width="0.053cm" svg:stroke-color="#5b9bd5" draw:marker-end="a762" svg:stroke-opacity="100%" draw:stroke-linejoin="miter" svg:stroke-linecap="butt" draw:fill="none" fo:padding-top="0.151cm" fo:padding-bottom="0.151cm" fo:padding-left="0.276cm" fo:padding-right="0.276cm" loext:decorative="false"/>
    </style:style>
    <style:style style:name="gr61" style:family="graphic" style:parent-style-name="standard">
      <style:graphic-properties draw:stroke="solid" svg:stroke-width="0.026cm" svg:stroke-color="#5b9bd5" svg:stroke-opacity="100%" draw:stroke-linejoin="miter" svg:stroke-linecap="butt" draw:fill="none" fo:padding-top="0.138cm" fo:padding-bottom="0.138cm" fo:padding-left="0.263cm" fo:padding-right="0.263cm" loext:decorative="false"/>
    </style:style>
    <style:style style:name="gr62" style:family="graphic" style:parent-style-name="standard">
      <style:graphic-properties draw:stroke="none" draw:fill="none" draw:textarea-horizontal-align="left" draw:textarea-vertical-align="top" draw:auto-grow-height="true" draw:auto-grow-width="true" fo:min-height="0.763cm" fo:min-width="3.479cm" fo:padding-top="0.127cm" fo:padding-bottom="0.127cm" fo:padding-left="0.254cm" fo:padding-right="0.254cm" fo:wrap-option="no-wrap" loext:decorative="false"/>
      <style:paragraph-properties style:writing-mode="lr-tb"/>
    </style:style>
    <style:style style:name="gr63" style:family="graphic" style:parent-style-name="standard">
      <style:graphic-properties draw:stroke="none" draw:fill="none" draw:textarea-horizontal-align="left" draw:textarea-vertical-align="top" draw:auto-grow-height="true" draw:auto-grow-width="true" fo:min-height="0.763cm" fo:min-width="2.771cm" fo:padding-top="0.127cm" fo:padding-bottom="0.127cm" fo:padding-left="0.254cm" fo:padding-right="0.254cm" fo:wrap-option="no-wrap" loext:decorative="false"/>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0.763cm" fo:min-width="2.758cm" fo:padding-top="0.127cm" fo:padding-bottom="0.127cm" fo:padding-left="0.254cm" fo:padding-right="0.254cm" fo:wrap-option="no-wrap" loext:decorative="false"/>
      <style:paragraph-properties style:writing-mode="lr-tb"/>
    </style:style>
    <style:style style:name="gr65" style:family="graphic" style:parent-style-name="standard">
      <style:graphic-properties draw:stroke="solid" svg:stroke-width="0.159cm" svg:stroke-color="#5b9bd5" svg:stroke-opacity="100%" draw:stroke-linejoin="miter" svg:stroke-linecap="butt" draw:fill="solid" draw:fill-color="#ffffff" draw:opacity="100%" draw:textarea-horizontal-align="center" draw:textarea-vertical-align="middle" draw:auto-grow-height="false" draw:auto-grow-width="false" fo:min-height="1.596cm" fo:min-width="2.466cm" fo:padding-top="0.127cm" fo:padding-bottom="0.127cm" fo:padding-left="0.254cm" fo:padding-right="0.254cm" fo:wrap-option="wrap" style:writing-mode="lr-tb" loext:decorative="false"/>
      <style:paragraph-properties style:writing-mode="lr-tb"/>
    </style:style>
    <style:style style:name="gr66" style:family="graphic" style:parent-style-name="standard">
      <style:graphic-properties draw:stroke="solid" svg:stroke-width="0.159cm" svg:stroke-color="#5b9bd5" svg:stroke-opacity="100%" draw:stroke-linejoin="miter" svg:stroke-linecap="butt" draw:fill="solid" draw:fill-color="#deebf7" draw:opacity="100%" draw:textarea-horizontal-align="center" draw:textarea-vertical-align="middle" draw:auto-grow-height="false" draw:auto-grow-width="false" fo:min-height="2.581cm" fo:min-width="15.295cm" fo:padding-top="0.127cm" fo:padding-bottom="0.127cm" fo:padding-left="0.254cm" fo:padding-right="0.254cm" fo:wrap-option="wrap" style:writing-mode="lr-tb" loext:decorative="false"/>
      <style:paragraph-properties style:writing-mode="lr-tb"/>
    </style:style>
    <style:style style:name="gr67" style:family="graphic" style:parent-style-name="standard">
      <style:graphic-properties draw:stroke="solid" svg:stroke-width="0.035cm" svg:stroke-color="#5b9bd5" svg:stroke-opacity="100%" draw:stroke-linejoin="miter" svg:stroke-linecap="butt" draw:fill="solid" draw:fill-color="#5b9bd5" draw:opacity="100%" draw:textarea-horizontal-align="center" draw:textarea-vertical-align="middle" draw:auto-grow-height="false" draw:auto-grow-width="false" fo:min-height="0.19cm" fo:min-width="0cm" fo:padding-top="0.127cm" fo:padding-bottom="0.127cm" fo:padding-left="0.254cm" fo:padding-right="0.254cm" fo:wrap-option="wrap" style:writing-mode="lr-tb" loext:decorative="false"/>
      <style:paragraph-properties style:writing-mode="lr-tb"/>
    </style:style>
    <style:style style:name="gr68" style:family="graphic" style:parent-style-name="standard">
      <style:graphic-properties draw:stroke="solid" svg:stroke-width="0.035cm" svg:stroke-color="#5b9bd5" svg:stroke-opacity="100%" draw:stroke-linejoin="miter" svg:stroke-linecap="butt" draw:fill="solid" draw:fill-color="#5b9bd5" draw:opacity="100%" draw:textarea-horizontal-align="center" draw:textarea-vertical-align="middle" draw:auto-grow-height="false" draw:auto-grow-width="false" fo:min-height="0.191cm" fo:min-width="0cm" fo:padding-top="0.127cm" fo:padding-bottom="0.127cm" fo:padding-left="0.254cm" fo:padding-right="0.254cm" fo:wrap-option="wrap" style:writing-mode="lr-tb" loext:decorative="false"/>
      <style:paragraph-properties style:writing-mode="lr-tb"/>
    </style:style>
    <style:style style:name="gr69" style:family="graphic" style:parent-style-name="standard">
      <style:graphic-properties draw:stroke="solid" svg:stroke-width="0.018cm" svg:stroke-color="#5b9bd5" svg:stroke-opacity="100%" draw:stroke-linejoin="miter" svg:stroke-linecap="butt" draw:fill="none" fo:padding-top="0.134cm" fo:padding-bottom="0.134cm" fo:padding-left="0.259cm" fo:padding-right="0.259cm" loext:decorative="false"/>
    </style:style>
    <style:style style:name="gr70" style:family="graphic" style:parent-style-name="standard">
      <style:graphic-properties draw:stroke="none" draw:fill="none" draw:textarea-horizontal-align="left" draw:textarea-vertical-align="top" draw:auto-grow-height="true" draw:auto-grow-width="true" fo:min-height="1.905cm" fo:min-width="2.032cm" fo:padding-top="0.127cm" fo:padding-bottom="0.127cm" fo:padding-left="0.254cm" fo:padding-right="0.254cm" fo:wrap-option="no-wrap" loext:decorative="false"/>
      <style:paragraph-properties style:writing-mode="lr-tb"/>
    </style:style>
    <style:style style:name="gr71" style:family="graphic" style:parent-style-name="standard">
      <style:graphic-properties draw:stroke="solid" svg:stroke-width="0.079cm" svg:stroke-color="#5b9bd5" svg:stroke-opacity="100%" draw:stroke-linejoin="miter" svg:stroke-linecap="butt" draw:fill="none" fo:padding-top="0.164cm" fo:padding-bottom="0.164cm" fo:padding-left="0.289cm" fo:padding-right="0.289cm" loext:decorative="false"/>
    </style:style>
    <style:style style:name="gr72" style:family="graphic" style:parent-style-name="standard">
      <style:graphic-properties draw:stroke="none" draw:fill="gradient" draw:fill-gradient-name="a854" draw:textarea-horizontal-align="center" draw:textarea-vertical-align="middle" draw:auto-grow-height="false" draw:auto-grow-width="false" fo:min-height="0.118cm" fo:min-width="1.64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73" style:family="graphic">
      <style:graphic-properties loext:decorative="false"/>
    </style:style>
    <style:style style:name="gr74" style:family="graphic" style:parent-style-name="standard">
      <style:graphic-properties draw:stroke="solid" svg:stroke-width="0.106cm" svg:stroke-color="#ffffff" draw:marker-end="a862" svg:stroke-opacity="100%" draw:stroke-linejoin="miter" svg:stroke-linecap="butt" draw:fill="none" fo:padding-top="0.178cm" fo:padding-bottom="0.178cm" fo:padding-left="0.303cm" fo:padding-right="0.303cm" loext:decorative="false"/>
    </style:style>
    <style:style style:name="gr75" style:family="graphic" style:parent-style-name="standard">
      <style:graphic-properties draw:stroke="solid" svg:stroke-width="0.106cm" svg:stroke-color="#ffffff" draw:marker-end="a864" svg:stroke-opacity="100%" draw:stroke-linejoin="miter" svg:stroke-linecap="butt" draw:fill="none" fo:padding-top="0.178cm" fo:padding-bottom="0.178cm" fo:padding-left="0.303cm" fo:padding-right="0.303cm" loext:decorative="false"/>
    </style:style>
    <style:style style:name="gr76" style:family="graphic" style:parent-style-name="standard">
      <style:graphic-properties draw:stroke="solid" svg:stroke-width="0.106cm" svg:stroke-color="#ffffff" draw:marker-end="a858" svg:stroke-opacity="100%" draw:stroke-linejoin="miter" svg:stroke-linecap="butt" draw:fill="none" fo:padding-top="0.178cm" fo:padding-bottom="0.178cm" fo:padding-left="0.303cm" fo:padding-right="0.303cm" loext:decorative="false"/>
    </style:style>
    <style:style style:name="gr77" style:family="graphic" style:parent-style-name="standard">
      <style:graphic-properties draw:stroke="solid" svg:stroke-width="0.106cm" svg:stroke-color="#ffffff" draw:marker-end="a860" svg:stroke-opacity="100%" draw:stroke-linejoin="miter" svg:stroke-linecap="butt" draw:fill="none" fo:padding-top="0.178cm" fo:padding-bottom="0.178cm" fo:padding-left="0.303cm" fo:padding-right="0.303cm" loext:decorative="false"/>
    </style:style>
    <style:style style:name="gr78" style:family="graphic" style:parent-style-name="standard">
      <style:graphic-properties draw:stroke="solid" svg:stroke-width="0.106cm" svg:stroke-color="#ffffff" svg:stroke-opacity="100%" draw:stroke-linejoin="miter" svg:stroke-linecap="butt" draw:fill="none" fo:padding-top="0.178cm" fo:padding-bottom="0.178cm" fo:padding-left="0.303cm" fo:padding-right="0.303cm" loext:decorative="false"/>
    </style:style>
    <style:style style:name="gr79" style:family="graphic" style:parent-style-name="standard">
      <style:graphic-properties draw:stroke="none" draw:fill="gradient" draw:fill-gradient-name="a840" draw:textarea-horizontal-align="center" draw:textarea-vertical-align="middle" draw:auto-grow-height="false" draw:auto-grow-width="false" fo:min-height="0.101cm" fo:min-width="1.673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80" style:family="graphic" style:parent-style-name="standard">
      <style:graphic-properties draw:stroke="solid" svg:stroke-width="0.106cm" svg:stroke-color="#ffffff" draw:marker-end="a848" svg:stroke-opacity="100%" draw:stroke-linejoin="miter" svg:stroke-linecap="butt" draw:fill="none" fo:padding-top="0.178cm" fo:padding-bottom="0.178cm" fo:padding-left="0.303cm" fo:padding-right="0.303cm" loext:decorative="false"/>
    </style:style>
    <style:style style:name="gr81" style:family="graphic" style:parent-style-name="standard">
      <style:graphic-properties draw:stroke="solid" svg:stroke-width="0.106cm" svg:stroke-color="#ffffff" draw:marker-end="a850" svg:stroke-opacity="100%" draw:stroke-linejoin="miter" svg:stroke-linecap="butt" draw:fill="none" fo:padding-top="0.178cm" fo:padding-bottom="0.178cm" fo:padding-left="0.303cm" fo:padding-right="0.303cm" loext:decorative="false"/>
    </style:style>
    <style:style style:name="gr82" style:family="graphic" style:parent-style-name="standard">
      <style:graphic-properties draw:stroke="solid" svg:stroke-width="0.106cm" svg:stroke-color="#ffffff" draw:marker-end="a844" svg:stroke-opacity="100%" draw:stroke-linejoin="miter" svg:stroke-linecap="butt" draw:fill="none" fo:padding-top="0.178cm" fo:padding-bottom="0.178cm" fo:padding-left="0.303cm" fo:padding-right="0.303cm" loext:decorative="false"/>
    </style:style>
    <style:style style:name="gr83" style:family="graphic" style:parent-style-name="standard">
      <style:graphic-properties draw:stroke="solid" svg:stroke-width="0.106cm" svg:stroke-color="#ffffff" draw:marker-end="a846" svg:stroke-opacity="100%" draw:stroke-linejoin="miter" svg:stroke-linecap="butt" draw:fill="none" fo:padding-top="0.178cm" fo:padding-bottom="0.178cm" fo:padding-left="0.303cm" fo:padding-right="0.303cm" loext:decorative="false"/>
    </style:style>
    <style:style style:name="gr84" style:family="graphic" style:parent-style-name="standard">
      <style:graphic-properties draw:stroke="none" draw:fill="gradient" draw:fill-gradient-name="a826" draw:textarea-horizontal-align="center" draw:textarea-vertical-align="middle" draw:auto-grow-height="false" draw:auto-grow-width="false" fo:min-height="0.111cm" fo:min-width="1.654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85" style:family="graphic" style:parent-style-name="standard">
      <style:graphic-properties draw:stroke="solid" svg:stroke-width="0.106cm" svg:stroke-color="#ffffff" draw:marker-end="a834" svg:stroke-opacity="100%" draw:stroke-linejoin="miter" svg:stroke-linecap="butt" draw:fill="none" fo:padding-top="0.178cm" fo:padding-bottom="0.178cm" fo:padding-left="0.303cm" fo:padding-right="0.303cm" loext:decorative="false"/>
    </style:style>
    <style:style style:name="gr86" style:family="graphic" style:parent-style-name="standard">
      <style:graphic-properties draw:stroke="solid" svg:stroke-width="0.106cm" svg:stroke-color="#ffffff" draw:marker-end="a836" svg:stroke-opacity="100%" draw:stroke-linejoin="miter" svg:stroke-linecap="butt" draw:fill="none" fo:padding-top="0.178cm" fo:padding-bottom="0.178cm" fo:padding-left="0.303cm" fo:padding-right="0.303cm" loext:decorative="false"/>
    </style:style>
    <style:style style:name="gr87" style:family="graphic" style:parent-style-name="standard">
      <style:graphic-properties draw:stroke="solid" svg:stroke-width="0.106cm" svg:stroke-color="#ffffff" draw:marker-end="a830" svg:stroke-opacity="100%" draw:stroke-linejoin="miter" svg:stroke-linecap="butt" draw:fill="none" fo:padding-top="0.178cm" fo:padding-bottom="0.178cm" fo:padding-left="0.303cm" fo:padding-right="0.303cm" loext:decorative="false"/>
    </style:style>
    <style:style style:name="gr88" style:family="graphic" style:parent-style-name="standard">
      <style:graphic-properties draw:stroke="solid" svg:stroke-width="0.106cm" svg:stroke-color="#ffffff" draw:marker-end="a832" svg:stroke-opacity="100%" draw:stroke-linejoin="miter" svg:stroke-linecap="butt" draw:fill="none" fo:padding-top="0.178cm" fo:padding-bottom="0.178cm" fo:padding-left="0.303cm" fo:padding-right="0.303cm" loext:decorative="false"/>
    </style:style>
    <style:style style:name="gr89" style:family="graphic" style:parent-style-name="standard">
      <style:graphic-properties draw:stroke="none" draw:fill="gradient" draw:fill-gradient-name="a812" draw:textarea-horizontal-align="center" draw:textarea-vertical-align="middle" draw:auto-grow-height="false" draw:auto-grow-width="false" fo:min-height="0.118cm" fo:min-width="1.64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90" style:family="graphic" style:parent-style-name="standard">
      <style:graphic-properties draw:stroke="solid" svg:stroke-width="0.106cm" svg:stroke-color="#ffffff" draw:marker-end="a820" svg:stroke-opacity="100%" draw:stroke-linejoin="miter" svg:stroke-linecap="butt" draw:fill="none" fo:padding-top="0.178cm" fo:padding-bottom="0.178cm" fo:padding-left="0.303cm" fo:padding-right="0.303cm" loext:decorative="false"/>
    </style:style>
    <style:style style:name="gr91" style:family="graphic" style:parent-style-name="standard">
      <style:graphic-properties draw:stroke="solid" svg:stroke-width="0.106cm" svg:stroke-color="#ffffff" draw:marker-end="a822" svg:stroke-opacity="100%" draw:stroke-linejoin="miter" svg:stroke-linecap="butt" draw:fill="none" fo:padding-top="0.178cm" fo:padding-bottom="0.178cm" fo:padding-left="0.303cm" fo:padding-right="0.303cm" loext:decorative="false"/>
    </style:style>
    <style:style style:name="gr92" style:family="graphic" style:parent-style-name="standard">
      <style:graphic-properties draw:stroke="solid" svg:stroke-width="0.106cm" svg:stroke-color="#ffffff" draw:marker-end="a816" svg:stroke-opacity="100%" draw:stroke-linejoin="miter" svg:stroke-linecap="butt" draw:fill="none" fo:padding-top="0.178cm" fo:padding-bottom="0.178cm" fo:padding-left="0.303cm" fo:padding-right="0.303cm" loext:decorative="false"/>
    </style:style>
    <style:style style:name="gr93" style:family="graphic" style:parent-style-name="standard">
      <style:graphic-properties draw:stroke="solid" svg:stroke-width="0.106cm" svg:stroke-color="#ffffff" draw:marker-end="a818" svg:stroke-opacity="100%" draw:stroke-linejoin="miter" svg:stroke-linecap="butt" draw:fill="none" fo:padding-top="0.178cm" fo:padding-bottom="0.178cm" fo:padding-left="0.303cm" fo:padding-right="0.303cm" loext:decorative="false"/>
    </style:style>
    <style:style style:name="gr94" style:family="graphic" style:parent-style-name="standard">
      <style:graphic-properties draw:stroke="none" draw:fill="gradient" draw:fill-gradient-name="a798" draw:textarea-horizontal-align="center" draw:textarea-vertical-align="middle" draw:auto-grow-height="false" draw:auto-grow-width="false" fo:min-height="0.084cm" fo:min-width="1.705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95" style:family="graphic" style:parent-style-name="standard">
      <style:graphic-properties draw:stroke="solid" svg:stroke-width="0.106cm" svg:stroke-color="#ffffff" draw:marker-end="a806" svg:stroke-opacity="100%" draw:stroke-linejoin="miter" svg:stroke-linecap="butt" draw:fill="none" fo:padding-top="0.178cm" fo:padding-bottom="0.178cm" fo:padding-left="0.303cm" fo:padding-right="0.303cm" loext:decorative="false"/>
    </style:style>
    <style:style style:name="gr96" style:family="graphic" style:parent-style-name="standard">
      <style:graphic-properties draw:stroke="solid" svg:stroke-width="0.106cm" svg:stroke-color="#ffffff" draw:marker-end="a808" svg:stroke-opacity="100%" draw:stroke-linejoin="miter" svg:stroke-linecap="butt" draw:fill="none" fo:padding-top="0.178cm" fo:padding-bottom="0.178cm" fo:padding-left="0.303cm" fo:padding-right="0.303cm" loext:decorative="false"/>
    </style:style>
    <style:style style:name="gr97" style:family="graphic" style:parent-style-name="standard">
      <style:graphic-properties draw:stroke="solid" svg:stroke-width="0.106cm" svg:stroke-color="#ffffff" draw:marker-end="a802" svg:stroke-opacity="100%" draw:stroke-linejoin="miter" svg:stroke-linecap="butt" draw:fill="none" fo:padding-top="0.178cm" fo:padding-bottom="0.178cm" fo:padding-left="0.303cm" fo:padding-right="0.303cm" loext:decorative="false"/>
    </style:style>
    <style:style style:name="gr98" style:family="graphic" style:parent-style-name="standard">
      <style:graphic-properties draw:stroke="solid" svg:stroke-width="0.106cm" svg:stroke-color="#ffffff" draw:marker-end="a804" svg:stroke-opacity="100%" draw:stroke-linejoin="miter" svg:stroke-linecap="butt" draw:fill="none" fo:padding-top="0.178cm" fo:padding-bottom="0.178cm" fo:padding-left="0.303cm" fo:padding-right="0.303cm" loext:decorative="false"/>
    </style:style>
    <style:style style:name="gr99" style:family="graphic" style:parent-style-name="objectwithoutfill">
      <style:graphic-properties svg:stroke-width="0.025cm" svg:stroke-color="#5b9bd5" draw:marker-start-width="0.229cm" draw:marker-end-width="0.229cm" draw:fill="none" draw:textarea-vertical-align="middle" fo:padding-top="0.137cm" fo:padding-bottom="0.137cm" fo:padding-left="0.262cm" fo:padding-right="0.262cm" loext:decorative="false"/>
    </style:style>
    <style:style style:name="gr100" style:family="graphic" style:parent-style-name="standard">
      <style:graphic-properties draw:stroke="solid" svg:stroke-width="0.018cm" svg:stroke-color="#a5a5a5" svg:stroke-opacity="100%" draw:stroke-linejoin="miter" svg:stroke-linecap="butt" draw:fill="gradient" draw:fill-gradient-name="a1084" draw:textarea-horizontal-align="center" draw:textarea-vertical-align="middle" draw:auto-grow-height="false" draw:auto-grow-width="false" fo:min-height="0.857cm" fo:min-width="2.566cm" fo:padding-top="0.127cm" fo:padding-bottom="0.127cm" fo:padding-left="0.254cm" fo:padding-right="0.254cm" fo:wrap-option="wrap" style:writing-mode="lr-tb" loext:decorative="false"/>
      <style:paragraph-properties style:writing-mode="lr-tb"/>
    </style:style>
    <style:style style:name="gr101" style:family="graphic" style:parent-style-name="standard">
      <style:graphic-properties draw:stroke="solid" svg:stroke-width="0.018cm" svg:stroke-color="#a5a5a5" svg:stroke-opacity="100%" draw:stroke-linejoin="miter" svg:stroke-linecap="butt" draw:fill="gradient" draw:fill-gradient-name="a1088" draw:textarea-horizontal-align="center" draw:textarea-vertical-align="middle" draw:auto-grow-height="false" draw:auto-grow-width="false" fo:min-height="0.857cm" fo:min-width="2.566cm" fo:padding-top="0.127cm" fo:padding-bottom="0.127cm" fo:padding-left="0.254cm" fo:padding-right="0.254cm" fo:wrap-option="wrap" style:writing-mode="lr-tb" loext:decorative="false"/>
      <style:paragraph-properties style:writing-mode="lr-tb"/>
    </style:style>
    <style:style style:name="gr102" style:family="graphic" style:parent-style-name="standard">
      <style:graphic-properties draw:stroke="none" draw:fill="none" draw:textarea-horizontal-align="center" draw:textarea-vertical-align="top" draw:auto-grow-height="true" draw:auto-grow-width="true" fo:min-height="1.097cm" fo:min-width="1.902cm" fo:padding-top="0.127cm" fo:padding-bottom="0.127cm" fo:padding-left="0.254cm" fo:padding-right="0.254cm" fo:wrap-option="no-wrap" loext:decorative="false"/>
      <style:paragraph-properties style:writing-mode="lr-tb"/>
    </style:style>
    <style:style style:name="gr103" style:family="graphic" style:parent-style-name="standard">
      <style:graphic-properties draw:stroke="solid" svg:stroke-width="0.018cm" svg:stroke-color="#5b9bd5" svg:stroke-opacity="100%" draw:stroke-linejoin="miter" svg:stroke-linecap="butt" draw:fill="gradient" draw:fill-gradient-name="a1112" draw:textarea-horizontal-align="center" draw:textarea-vertical-align="middle" draw:auto-grow-height="false" draw:auto-grow-width="false" fo:min-height="0.857cm" fo:min-width="2.566cm" fo:padding-top="0.127cm" fo:padding-bottom="0.127cm" fo:padding-left="0.254cm" fo:padding-right="0.254cm" fo:wrap-option="wrap" style:writing-mode="lr-tb" loext:decorative="false"/>
      <style:paragraph-properties style:writing-mode="lr-tb"/>
    </style:style>
    <style:style style:name="gr104" style:family="graphic" style:parent-style-name="standard">
      <style:graphic-properties draw:stroke="solid" svg:stroke-width="0.018cm" svg:stroke-color="#5b9bd5" svg:stroke-opacity="100%" draw:stroke-linejoin="miter" svg:stroke-linecap="butt" draw:fill="gradient" draw:fill-gradient-name="a1116" draw:textarea-horizontal-align="center" draw:textarea-vertical-align="middle" draw:auto-grow-height="false" draw:auto-grow-width="false" fo:min-height="0.857cm" fo:min-width="2.566cm" fo:padding-top="0.127cm" fo:padding-bottom="0.127cm" fo:padding-left="0.254cm" fo:padding-right="0.254cm" fo:wrap-option="wrap" style:writing-mode="lr-tb" loext:decorative="false"/>
      <style:paragraph-properties style:writing-mode="lr-tb"/>
    </style:style>
    <style:style style:name="gr105" style:family="graphic" style:parent-style-name="standard">
      <style:graphic-properties draw:stroke="solid" svg:stroke-width="0.018cm" svg:stroke-color="#5b9bd5" svg:stroke-opacity="100%" draw:stroke-linejoin="miter" svg:stroke-linecap="butt" draw:fill="gradient" draw:fill-gradient-name="a1120" draw:textarea-horizontal-align="center" draw:textarea-vertical-align="middle" draw:auto-grow-height="false" draw:auto-grow-width="false" fo:min-height="0.857cm" fo:min-width="2.566cm" fo:padding-top="0.127cm" fo:padding-bottom="0.127cm" fo:padding-left="0.254cm" fo:padding-right="0.254cm" fo:wrap-option="wrap" style:writing-mode="lr-tb" loext:decorative="false"/>
      <style:paragraph-properties style:writing-mode="lr-tb"/>
    </style:style>
    <style:style style:name="gr106" style:family="graphic" style:parent-style-name="standard">
      <style:graphic-properties draw:stroke="solid" svg:stroke-width="0.018cm" svg:stroke-color="#5b9bd5" svg:stroke-opacity="100%" draw:stroke-linejoin="miter" svg:stroke-linecap="butt" draw:fill="gradient" draw:fill-gradient-name="a1124" draw:textarea-horizontal-align="center" draw:textarea-vertical-align="middle" draw:auto-grow-height="false" draw:auto-grow-width="false" fo:min-height="0.857cm" fo:min-width="2.566cm" fo:padding-top="0.127cm" fo:padding-bottom="0.127cm" fo:padding-left="0.254cm" fo:padding-right="0.254cm" fo:wrap-option="wrap" style:writing-mode="lr-tb" loext:decorative="false"/>
      <style:paragraph-properties style:writing-mode="lr-tb"/>
    </style:style>
    <style:style style:name="gr107" style:family="graphic" style:parent-style-name="standard">
      <style:graphic-properties draw:stroke="solid" svg:stroke-width="0.018cm" svg:stroke-color="#5b9bd5" svg:stroke-opacity="100%" draw:stroke-linejoin="miter" svg:stroke-linecap="butt" draw:fill="gradient" draw:fill-gradient-name="a1128" draw:textarea-horizontal-align="center" draw:textarea-vertical-align="middle" draw:auto-grow-height="false" draw:auto-grow-width="false" fo:min-height="0.857cm" fo:min-width="2.566cm" fo:padding-top="0.127cm" fo:padding-bottom="0.127cm" fo:padding-left="0.254cm" fo:padding-right="0.254cm" fo:wrap-option="wrap" style:writing-mode="lr-tb" loext:decorative="false"/>
      <style:paragraph-properties style:writing-mode="lr-tb"/>
    </style:style>
    <style:style style:name="gr108" style:family="graphic" style:parent-style-name="standard">
      <style:graphic-properties draw:stroke="solid" svg:stroke-width="0.018cm" svg:stroke-color="#5b9bd5" svg:stroke-opacity="100%" draw:stroke-linejoin="miter" svg:stroke-linecap="butt" draw:fill="gradient" draw:fill-gradient-name="a1133" draw:textarea-horizontal-align="center" draw:textarea-vertical-align="middle" draw:auto-grow-height="false" draw:auto-grow-width="false" fo:min-height="0.857cm" fo:min-width="2.566cm" fo:padding-top="0.127cm" fo:padding-bottom="0.127cm" fo:padding-left="0.254cm" fo:padding-right="0.254cm" fo:wrap-option="wrap" style:writing-mode="lr-tb" loext:decorative="false"/>
      <style:paragraph-properties style:writing-mode="lr-tb"/>
    </style:style>
    <style:style style:name="gr109"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0.028cm" fo:min-width="0.179cm" fo:padding-top="0.127cm" fo:padding-bottom="0.127cm" fo:padding-left="0.254cm" fo:padding-right="0.254cm" fo:wrap-option="wrap" style:writing-mode="lr-tb" loext:decorative="false"/>
      <style:paragraph-properties style:writing-mode="lr-tb"/>
    </style:style>
    <style:style style:name="gr110"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0.049cm" fo:min-width="1.618cm" fo:padding-top="0.127cm" fo:padding-bottom="0.127cm" fo:padding-left="0.254cm" fo:padding-right="0.254cm" fo:wrap-option="wrap" style:writing-mode="lr-tb" loext:decorative="false"/>
      <style:paragraph-properties style:writing-mode="lr-tb"/>
    </style:style>
    <style:style style:name="gr111"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0.112cm" fo:min-width="1.317cm" fo:padding-top="0.127cm" fo:padding-bottom="0.127cm" fo:padding-left="0.254cm" fo:padding-right="0.254cm" fo:wrap-option="wrap" style:writing-mode="lr-tb" loext:decorative="false"/>
      <style:paragraph-properties style:writing-mode="lr-tb"/>
    </style:style>
    <style:style style:name="gr112"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0cm" fo:min-width="0.126cm" fo:padding-top="0.127cm" fo:padding-bottom="0.127cm" fo:padding-left="0.254cm" fo:padding-right="0.254cm" fo:wrap-option="wrap" style:writing-mode="lr-tb" loext:decorative="false"/>
      <style:paragraph-properties style:writing-mode="lr-tb"/>
    </style:style>
    <style:style style:name="gr113" style:family="graphic" style:parent-style-name="standard">
      <style:graphic-properties draw:stroke="solid" svg:stroke-width="0.051cm" svg:stroke-color="#000000" draw:marker-start-width="0.229cm" draw:marker-end-width="0.229cm" svg:stroke-opacity="100%" draw:stroke-linejoin="miter" svg:stroke-linecap="butt" draw:fill="none" draw:textarea-horizontal-align="center" draw:textarea-vertical-align="middle" draw:auto-grow-height="false" draw:auto-grow-width="false" fo:min-height="0.003cm" fo:min-width="1.618cm" fo:padding-top="0.135cm" fo:padding-bottom="0.135cm" fo:padding-left="0.262cm" fo:padding-right="0.262cm" fo:wrap-option="wrap" style:writing-mode="lr-tb" loext:decorative="false"/>
      <style:paragraph-properties style:writing-mode="lr-tb"/>
    </style:style>
    <style:style style:name="gr114"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0.222cm" fo:min-width="0cm" fo:padding-top="0.127cm" fo:padding-bottom="0.127cm" fo:padding-left="0.254cm" fo:padding-right="0.254cm" fo:wrap-option="wrap" style:writing-mode="lr-tb" loext:decorative="false"/>
      <style:paragraph-properties style:writing-mode="lr-tb"/>
    </style:style>
    <style:style style:name="gr115" style:family="graphic" style:parent-style-name="standard">
      <style:graphic-properties draw:stroke="none" draw:fill="none" draw:textarea-horizontal-align="center" draw:textarea-vertical-align="top" draw:auto-grow-height="true" draw:auto-grow-width="true" fo:min-height="1.097cm" fo:min-width="1.677cm" fo:padding-top="0.127cm" fo:padding-bottom="0.127cm" fo:padding-left="0.254cm" fo:padding-right="0.254cm" fo:wrap-option="no-wrap" loext:decorative="false"/>
      <style:paragraph-properties style:writing-mode="lr-tb"/>
    </style:style>
    <style:style style:name="gr116" style:family="graphic" style:parent-style-name="standard">
      <style:graphic-properties draw:stroke="solid" svg:stroke-width="0.018cm" svg:stroke-color="#bfbfbf" draw:marker-end="a1164" svg:stroke-opacity="100%" draw:stroke-linejoin="miter" svg:stroke-linecap="butt" draw:fill="none" fo:padding-top="0.134cm" fo:padding-bottom="0.134cm" fo:padding-left="0.259cm" fo:padding-right="0.259cm" loext:decorative="false"/>
    </style:style>
    <style:style style:name="gr117" style:family="graphic" style:parent-style-name="standard">
      <style:graphic-properties draw:stroke="solid" svg:stroke-width="0.018cm" svg:stroke-color="#bfbfbf" draw:marker-end="a1166" svg:stroke-opacity="100%" draw:stroke-linejoin="miter" svg:stroke-linecap="butt" draw:fill="none" fo:padding-top="0.134cm" fo:padding-bottom="0.134cm" fo:padding-left="0.259cm" fo:padding-right="0.259cm" loext:decorative="false"/>
    </style:style>
    <style:style style:name="gr118"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0.007cm" fo:min-width="0.148cm" fo:padding-top="0.127cm" fo:padding-bottom="0.127cm" fo:padding-left="0.254cm" fo:padding-right="0.254cm" fo:wrap-option="wrap" style:writing-mode="lr-tb" loext:decorative="false"/>
      <style:paragraph-properties style:writing-mode="lr-tb"/>
    </style:style>
    <style:style style:name="gr119"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0cm" fo:min-width="0.107cm" fo:padding-top="0.127cm" fo:padding-bottom="0.127cm" fo:padding-left="0.254cm" fo:padding-right="0.254cm" fo:wrap-option="wrap" style:writing-mode="lr-tb" loext:decorative="false"/>
      <style:paragraph-properties style:writing-mode="lr-tb"/>
    </style:style>
    <style:style style:name="gr120"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0cm" fo:min-width="0.114cm" fo:padding-top="0.127cm" fo:padding-bottom="0.127cm" fo:padding-left="0.254cm" fo:padding-right="0.254cm" fo:wrap-option="wrap" style:writing-mode="lr-tb" loext:decorative="false"/>
      <style:paragraph-properties style:writing-mode="lr-tb"/>
    </style:style>
    <style:style style:name="gr121" style:family="graphic" style:parent-style-name="standard">
      <style:graphic-properties draw:stroke="none" draw:fill="none" draw:textarea-horizontal-align="center" draw:textarea-vertical-align="top" draw:auto-grow-height="true" draw:auto-grow-width="true" fo:min-height="1.097cm" fo:min-width="2.926cm" fo:padding-top="0.127cm" fo:padding-bottom="0.127cm" fo:padding-left="0.254cm" fo:padding-right="0.254cm" fo:wrap-option="no-wrap" loext:decorative="false"/>
      <style:paragraph-properties style:writing-mode="lr-tb"/>
    </style:style>
    <style:style style:name="gr122" style:family="graphic" style:parent-style-name="standard">
      <style:graphic-properties draw:stroke="none" draw:fill="none" draw:textarea-horizontal-align="center" draw:textarea-vertical-align="top" draw:auto-grow-height="true" draw:auto-grow-width="true" fo:min-height="0.586cm" fo:min-width="3.251cm" fo:padding-top="0.127cm" fo:padding-bottom="0.127cm" fo:padding-left="0.254cm" fo:padding-right="0.254cm" fo:wrap-option="no-wrap" loext:decorative="false"/>
      <style:paragraph-properties style:writing-mode="lr-tb"/>
    </style:style>
    <style:style style:name="gr123" style:family="graphic" style:parent-style-name="standard">
      <style:graphic-properties draw:stroke="solid" svg:stroke-width="0.018cm" svg:stroke-color="#bfbfbf" draw:marker-end="a1196" svg:stroke-opacity="100%" draw:stroke-linejoin="miter" svg:stroke-linecap="butt" draw:fill="none" fo:padding-top="0.134cm" fo:padding-bottom="0.134cm" fo:padding-left="0.259cm" fo:padding-right="0.259cm" loext:decorative="false"/>
    </style:style>
    <style:style style:name="gr124" style:family="graphic" style:parent-style-name="standard">
      <style:graphic-properties draw:stroke="solid" svg:stroke-width="0.018cm" svg:stroke-color="#bfbfbf" draw:marker-end="a1198" svg:stroke-opacity="100%" draw:stroke-linejoin="miter" svg:stroke-linecap="butt" draw:fill="none" fo:padding-top="0.134cm" fo:padding-bottom="0.134cm" fo:padding-left="0.259cm" fo:padding-right="0.259cm" loext:decorative="false"/>
    </style:style>
    <style:style style:name="gr125" style:family="graphic" style:parent-style-name="standard">
      <style:graphic-properties draw:stroke="none" draw:fill="none" draw:textarea-horizontal-align="center" draw:textarea-vertical-align="top" draw:auto-grow-height="true" draw:auto-grow-width="true" fo:min-height="1.644cm" fo:min-width="2.595cm" fo:padding-top="0.127cm" fo:padding-bottom="0.127cm" fo:padding-left="0.254cm" fo:padding-right="0.254cm" fo:wrap-option="no-wrap" loext:decorative="false"/>
      <style:paragraph-properties style:writing-mode="lr-tb"/>
    </style:style>
    <style:style style:name="gr126" style:family="graphic" style:parent-style-name="standard">
      <style:graphic-properties draw:stroke="solid" svg:stroke-width="0.079cm" svg:stroke-color="#5b9bd5" svg:stroke-opacity="100%" draw:stroke-linejoin="miter" svg:stroke-linecap="butt" draw:fill="solid" draw:fill-color="#deebf7" draw:opacity="100%" draw:textarea-horizontal-align="center" draw:textarea-vertical-align="middle" draw:auto-grow-height="false" draw:auto-grow-width="false" fo:min-height="2.721cm" fo:min-width="4.463cm" fo:padding-top="0.127cm" fo:padding-bottom="0.127cm" fo:padding-left="0.254cm" fo:padding-right="0.254cm" fo:wrap-option="wrap" style:writing-mode="lr-tb" loext:decorative="false"/>
      <style:paragraph-properties style:writing-mode="lr-tb"/>
    </style:style>
    <style:style style:name="gr127" style:family="graphic" style:parent-style-name="standard">
      <style:graphic-properties draw:stroke="solid" svg:stroke-width="0.079cm" svg:stroke-color="#5b9bd5" svg:stroke-opacity="100%" draw:stroke-linejoin="miter" svg:stroke-linecap="butt" draw:fill="solid" draw:fill-color="#ffffff" draw:opacity="100%" draw:textarea-horizontal-align="center" draw:textarea-vertical-align="middle" draw:auto-grow-height="false" draw:auto-grow-width="false" fo:min-height="1.876cm" fo:min-width="3.007cm" fo:padding-top="0.127cm" fo:padding-bottom="0.127cm" fo:padding-left="0.254cm" fo:padding-right="0.254cm" fo:wrap-option="wrap" style:writing-mode="lr-tb" loext:decorative="false"/>
      <style:paragraph-properties style:writing-mode="lr-tb"/>
    </style:style>
    <style:style style:name="gr128" style:family="graphic" style:parent-style-name="standard">
      <style:graphic-properties draw:stroke="none" draw:fill="none" draw:textarea-horizontal-align="center" draw:textarea-vertical-align="top" draw:auto-grow-height="true" draw:auto-grow-width="true" fo:min-height="1.541cm" fo:min-width="1.569cm" fo:padding-top="0.127cm" fo:padding-bottom="0.127cm" fo:padding-left="0.254cm" fo:padding-right="0.254cm" fo:wrap-option="no-wrap" loext:decorative="false"/>
      <style:paragraph-properties style:writing-mode="lr-tb"/>
    </style:style>
    <style:style style:name="gr129" style:family="graphic" style:parent-style-name="standard">
      <style:graphic-properties draw:stroke="none" draw:fill="none" draw:textarea-horizontal-align="center" draw:textarea-vertical-align="top" draw:auto-grow-height="true" draw:auto-grow-width="true" fo:min-height="1.541cm" fo:min-width="1.915cm" fo:padding-top="0.127cm" fo:padding-bottom="0.127cm" fo:padding-left="0.254cm" fo:padding-right="0.254cm" fo:wrap-option="no-wrap" loext:decorative="false"/>
      <style:paragraph-properties style:writing-mode="lr-tb"/>
    </style:style>
    <style:style style:name="gr130" style:family="graphic" style:parent-style-name="standard">
      <style:graphic-properties draw:stroke="dash" draw:stroke-dash="SysDot" svg:stroke-width="0.035cm" svg:stroke-color="#767171" draw:marker-end="a1261" svg:stroke-opacity="100%" draw:stroke-linejoin="miter" svg:stroke-linecap="butt" draw:fill="none" fo:padding-top="0.142cm" fo:padding-bottom="0.142cm" fo:padding-left="0.267cm" fo:padding-right="0.267cm" loext:decorative="false"/>
    </style:style>
    <style:style style:name="gr131" style:family="graphic" style:parent-style-name="standard">
      <style:graphic-properties draw:stroke="none" draw:fill="none" draw:textarea-horizontal-align="left" draw:textarea-vertical-align="top" draw:auto-grow-height="true" draw:auto-grow-width="true" fo:min-height="0.772cm" fo:min-width="0.495cm" fo:padding-top="0.127cm" fo:padding-bottom="0.127cm" fo:padding-left="0.254cm" fo:padding-right="0.254cm" fo:wrap-option="no-wrap" loext:decorative="false"/>
      <style:paragraph-properties style:writing-mode="lr-tb"/>
    </style:style>
    <style:style style:name="gr132" style:family="graphic" style:parent-style-name="standard">
      <style:graphic-properties draw:stroke="dash" draw:stroke-dash="SysDot" svg:stroke-width="0.035cm" svg:stroke-color="#767171" draw:marker-start="a1267" svg:stroke-opacity="100%" draw:stroke-linejoin="miter" svg:stroke-linecap="butt" draw:fill="none" fo:padding-top="0.142cm" fo:padding-bottom="0.142cm" fo:padding-left="0.267cm" fo:padding-right="0.267cm" loext:decorative="false"/>
    </style:style>
    <style:style style:name="gr133" style:family="graphic" style:parent-style-name="standard">
      <style:graphic-properties draw:stroke="dash" draw:stroke-dash="SysDot" svg:stroke-width="0.035cm" svg:stroke-color="#767171" draw:marker-end="a1278" svg:stroke-opacity="100%" draw:stroke-linejoin="miter" svg:stroke-linecap="butt" draw:fill="none" fo:padding-top="0.142cm" fo:padding-bottom="0.142cm" fo:padding-left="0.267cm" fo:padding-right="0.267cm" loext:decorative="false"/>
    </style:style>
    <style:style style:name="gr134" style:family="graphic" style:parent-style-name="standard">
      <style:graphic-properties draw:stroke="dash" draw:stroke-dash="SysDot" svg:stroke-width="0.035cm" svg:stroke-color="#767171" draw:marker-end="a1281" svg:stroke-opacity="100%" draw:stroke-linejoin="miter" svg:stroke-linecap="butt" draw:fill="none" fo:padding-top="0.142cm" fo:padding-bottom="0.142cm" fo:padding-left="0.267cm" fo:padding-right="0.267cm" loext:decorative="false"/>
    </style:style>
    <style:style style:name="gr135" style:family="graphic" style:parent-style-name="standard">
      <style:graphic-properties draw:stroke="none" draw:fill="none" draw:textarea-horizontal-align="left" draw:textarea-vertical-align="top" draw:auto-grow-height="true" draw:auto-grow-width="true" fo:min-height="1.234cm" fo:min-width="1.261cm" fo:padding-top="0.127cm" fo:padding-bottom="0.127cm" fo:padding-left="0.254cm" fo:padding-right="0.254cm" fo:wrap-option="no-wrap" loext:decorative="false"/>
      <style:paragraph-properties style:writing-mode="lr-tb"/>
    </style:style>
    <style:style style:name="gr136" style:family="graphic" style:parent-style-name="standard">
      <style:graphic-properties draw:stroke="dash" draw:stroke-dash="SysDot" svg:stroke-width="0.035cm" svg:stroke-color="#767171" draw:marker-end="a1289" svg:stroke-opacity="100%" draw:stroke-linejoin="miter" svg:stroke-linecap="butt" draw:fill="none" fo:padding-top="0.142cm" fo:padding-bottom="0.142cm" fo:padding-left="0.267cm" fo:padding-right="0.267cm" loext:decorative="false"/>
    </style:style>
    <style:style style:name="gr137" style:family="graphic" style:parent-style-name="standard">
      <style:graphic-properties draw:stroke="dash" draw:stroke-dash="SysDot" svg:stroke-width="0.035cm" svg:stroke-color="#767171" draw:marker-start="a1300" svg:stroke-opacity="100%" draw:stroke-linejoin="miter" svg:stroke-linecap="butt" draw:fill="none" fo:padding-top="0.142cm" fo:padding-bottom="0.142cm" fo:padding-left="0.267cm" fo:padding-right="0.267cm" loext:decorative="false"/>
    </style:style>
    <style:style style:name="gr138" style:family="graphic" style:parent-style-name="standard">
      <style:graphic-properties draw:stroke="none" draw:fill="none" draw:textarea-horizontal-align="left" draw:textarea-vertical-align="top" draw:auto-grow-height="true" draw:auto-grow-width="true" fo:min-height="0.618cm" fo:min-width="2.53cm" fo:padding-top="0.127cm" fo:padding-bottom="0.127cm" fo:padding-left="0.254cm" fo:padding-right="0.254cm" fo:wrap-option="no-wrap" loext:decorative="false"/>
      <style:paragraph-properties style:writing-mode="lr-tb"/>
    </style:style>
    <style:style style:name="gr139" style:family="graphic" style:parent-style-name="standard">
      <style:graphic-properties draw:stroke="none" draw:fill="none" draw:textarea-horizontal-align="center" draw:textarea-vertical-align="top" draw:auto-grow-height="true" draw:auto-grow-width="true" fo:min-height="0.772cm" fo:min-width="1.672cm" fo:padding-top="0.127cm" fo:padding-bottom="0.127cm" fo:padding-left="0.254cm" fo:padding-right="0.254cm" fo:wrap-option="no-wrap" loext:decorative="false"/>
      <style:paragraph-properties style:writing-mode="lr-tb"/>
    </style:style>
    <style:style style:name="gr140"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1.527cm" fo:min-width="12.195cm" fo:padding-top="0.15cm" fo:padding-bottom="0.15cm" fo:padding-left="0.275cm" fo:padding-right="0.275cm" draw:shadow="visible" draw:shadow-offset-x="0.051cm" draw:shadow-offset-y="-0.051cm" draw:shadow-color="#6a99d0" loext:decorative="false"/>
    </style:style>
    <style:style style:name="gr141" style:family="graphic" style:parent-style-name="standard">
      <style:graphic-properties draw:stroke="none" svg:stroke-color="#000000" draw:fill="none" draw:fill-color="#ffffff" draw:textarea-horizontal-align="left" draw:auto-grow-height="true" draw:auto-grow-width="true" fo:min-height="0.602cm" fo:min-width="0.253cm" draw:shadow="hidden" draw:shadow-offset-x="0.051cm" draw:shadow-offset-y="-0.051cm" draw:shadow-color="#6a99d0" loext:shadow-blur="0cm" loext:decorative="false"/>
      <style:paragraph-properties style:writing-mode="lr-tb"/>
    </style:style>
    <style:style style:name="gr142" style:family="graphic" style:parent-style-name="standard">
      <style:graphic-properties draw:stroke="none" svg:stroke-color="#000000" draw:fill="none" draw:fill-color="#ffffff" draw:textarea-horizontal-align="left" draw:auto-grow-height="true" draw:auto-grow-width="true" fo:min-height="0.602cm" fo:min-width="0.504cm" draw:shadow="hidden" draw:shadow-offset-x="0.051cm" draw:shadow-offset-y="-0.051cm" draw:shadow-color="#6a99d0" loext:shadow-blur="0cm" loext:decorative="false"/>
      <style:paragraph-properties style:writing-mode="lr-tb"/>
    </style:style>
    <style:style style:name="gr143"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2.65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144" style:family="graphic" style:parent-style-name="standard">
      <style:graphic-properties svg:stroke-width="0.051cm" svg:stroke-color="#6a99d0" draw:marker-start-width="0.279cm" draw:marker-end-width="0.279cm" draw:fill="solid" draw:fill-color="#bdd7ee" draw:textarea-horizontal-align="justify" draw:textarea-vertical-align="middle" draw:auto-grow-height="false" fo:min-height="1.395cm" fo:min-width="12.195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14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2.597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146"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2.75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147"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5.869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148"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149" style:family="graphic" style:parent-style-name="standard">
      <style:graphic-properties draw:stroke="none" svg:stroke-color="#000000" draw:fill="none" draw:fill-color="#ffffff" draw:textarea-horizontal-align="center" draw:auto-grow-height="true" draw:auto-grow-width="true" fo:min-height="0cm" fo:min-width="0cm" loext:decorative="false"/>
      <style:paragraph-properties style:writing-mode="lr-tb"/>
    </style:style>
    <style:style style:name="gr150" style:family="graphic" style:parent-style-name="standard">
      <style:graphic-properties svg:stroke-width="0.254cm" svg:stroke-color="#ffffff" draw:marker-start-width="0.584cm" draw:marker-end-width="0.584cm" svg:stroke-linecap="round" draw:fill="solid" draw:fill-color="#ffffff" draw:textarea-vertical-align="middle" fo:padding-top="0.252cm" fo:padding-bottom="0.252cm" fo:padding-left="0.377cm" fo:padding-right="0.377cm" draw:shadow="hidden" draw:shadow-offset-x="0.051cm" draw:shadow-offset-y="-0.051cm" draw:shadow-color="#6a99d0" loext:shadow-blur="0cm" loext:decorative="false"/>
    </style:style>
    <style:style style:name="gr151"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0.645cm" fo:min-width="1.012cm" fo:padding-top="0.127cm" fo:padding-bottom="0.127cm" fo:padding-left="0.254cm" fo:padding-right="0.254cm" fo:wrap-option="wrap" style:writing-mode="lr-tb" loext:decorative="false"/>
      <style:paragraph-properties style:writing-mode="lr-tb"/>
    </style:style>
    <style:style style:name="gr152"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2.312cm" fo:min-width="1.408cm" fo:padding-top="0.127cm" fo:padding-bottom="0.127cm" fo:padding-left="0.254cm" fo:padding-right="0.254cm" fo:wrap-option="wrap" style:writing-mode="lr-tb" loext:decorative="false"/>
      <style:paragraph-properties style:writing-mode="lr-tb"/>
    </style:style>
    <style:style style:name="gr153"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2.312cm" fo:min-width="1.411cm" fo:padding-top="0.127cm" fo:padding-bottom="0.127cm" fo:padding-left="0.254cm" fo:padding-right="0.254cm" fo:wrap-option="wrap" style:writing-mode="lr-tb" loext:decorative="false"/>
      <style:paragraph-properties style:writing-mode="lr-tb"/>
    </style:style>
    <style:style style:name="gr154"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1.784cm" fo:min-width="1.448cm" fo:padding-top="0.127cm" fo:padding-bottom="0.127cm" fo:padding-left="0.254cm" fo:padding-right="0.254cm" fo:wrap-option="wrap" style:writing-mode="lr-tb" loext:decorative="false"/>
      <style:paragraph-properties style:writing-mode="lr-tb"/>
    </style:style>
    <style:style style:name="gr155"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1.776cm" fo:min-width="1.594cm" fo:padding-top="0.127cm" fo:padding-bottom="0.127cm" fo:padding-left="0.254cm" fo:padding-right="0.254cm" fo:wrap-option="wrap" style:writing-mode="lr-tb" loext:decorative="false"/>
      <style:paragraph-properties style:writing-mode="lr-tb"/>
    </style:style>
    <style:style style:name="gr156"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1.569cm" fo:min-width="2.02cm" fo:padding-top="0.127cm" fo:padding-bottom="0.127cm" fo:padding-left="0.254cm" fo:padding-right="0.254cm" fo:wrap-option="wrap" style:writing-mode="lr-tb" loext:decorative="false"/>
      <style:paragraph-properties style:writing-mode="lr-tb"/>
    </style:style>
    <style:style style:name="gr157"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1.57cm" fo:min-width="2.02cm" fo:padding-top="0.127cm" fo:padding-bottom="0.127cm" fo:padding-left="0.254cm" fo:padding-right="0.254cm" fo:wrap-option="wrap" style:writing-mode="lr-tb" loext:decorative="false"/>
      <style:paragraph-properties style:writing-mode="lr-tb"/>
    </style:style>
    <style:style style:name="gr158"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2.312cm" fo:min-width="1.409cm" fo:padding-top="0.127cm" fo:padding-bottom="0.127cm" fo:padding-left="0.254cm" fo:padding-right="0.254cm" fo:wrap-option="wrap" style:writing-mode="lr-tb" loext:decorative="false"/>
      <style:paragraph-properties style:writing-mode="lr-tb"/>
    </style:style>
    <style:style style:name="gr159" style:family="graphic" style:parent-style-name="standard">
      <style:graphic-properties draw:stroke="dash" draw:stroke-dash="SysDash" svg:stroke-width="0.079cm" svg:stroke-color="#2e75b6" svg:stroke-opacity="100%" draw:stroke-linejoin="miter" svg:stroke-linecap="butt" draw:fill="none" draw:textarea-horizontal-align="center" draw:textarea-vertical-align="middle" draw:auto-grow-height="false" draw:auto-grow-width="false" fo:min-height="1.465cm" fo:min-width="2.031cm" fo:padding-top="0.127cm" fo:padding-bottom="0.127cm" fo:padding-left="0.254cm" fo:padding-right="0.254cm" fo:wrap-option="wrap" style:writing-mode="lr-tb" loext:decorative="false"/>
      <style:paragraph-properties style:writing-mode="lr-tb"/>
    </style:style>
    <style:style style:name="gr160" style:family="graphic" style:parent-style-name="standard">
      <style:graphic-properties draw:stroke="dash" draw:stroke-dash="SysDash" svg:stroke-width="0.079cm" svg:stroke-color="#2e75b6" svg:stroke-opacity="100%" draw:stroke-linejoin="miter" svg:stroke-linecap="butt" draw:fill="none" draw:textarea-horizontal-align="center" draw:textarea-vertical-align="middle" draw:auto-grow-height="false" draw:auto-grow-width="false" fo:min-height="1.465cm" fo:min-width="2.029cm" fo:padding-top="0.127cm" fo:padding-bottom="0.127cm" fo:padding-left="0.254cm" fo:padding-right="0.254cm" fo:wrap-option="wrap" style:writing-mode="lr-tb" loext:decorative="false"/>
      <style:paragraph-properties style:writing-mode="lr-tb"/>
    </style:style>
    <style:style style:name="gr161" style:family="graphic" style:parent-style-name="standard">
      <style:graphic-properties draw:stroke="dash" draw:stroke-dash="SysDash" svg:stroke-width="0.079cm" svg:stroke-color="#2e75b6" svg:stroke-opacity="100%" draw:stroke-linejoin="miter" svg:stroke-linecap="butt" draw:fill="none" draw:textarea-horizontal-align="center" draw:textarea-vertical-align="middle" draw:auto-grow-height="false" draw:auto-grow-width="false" fo:min-height="1.465cm" fo:min-width="2.032cm" fo:padding-top="0.127cm" fo:padding-bottom="0.127cm" fo:padding-left="0.254cm" fo:padding-right="0.254cm" fo:wrap-option="wrap" style:writing-mode="lr-tb" loext:decorative="false"/>
      <style:paragraph-properties style:writing-mode="lr-tb"/>
    </style:style>
    <style:style style:name="gr162" style:family="graphic" style:parent-style-name="standard">
      <style:graphic-properties draw:stroke="dash" draw:stroke-dash="SysDash" svg:stroke-width="0.079cm" svg:stroke-color="#2e75b6" svg:stroke-opacity="100%" draw:stroke-linejoin="miter" svg:stroke-linecap="butt" draw:fill="none" draw:textarea-horizontal-align="center" draw:textarea-vertical-align="middle" draw:auto-grow-height="false" draw:auto-grow-width="false" fo:min-height="1.465cm" fo:min-width="2.03cm" fo:padding-top="0.127cm" fo:padding-bottom="0.127cm" fo:padding-left="0.254cm" fo:padding-right="0.254cm" fo:wrap-option="wrap" style:writing-mode="lr-tb" loext:decorative="false"/>
      <style:paragraph-properties style:writing-mode="lr-tb"/>
    </style:style>
    <style:style style:name="gr163" style:family="graphic" style:parent-style-name="standard">
      <style:graphic-properties draw:stroke="dash" draw:stroke-dash="SysDash" svg:stroke-width="0.079cm" svg:stroke-color="#2e75b6" svg:stroke-opacity="100%" draw:stroke-linejoin="miter" svg:stroke-linecap="butt" draw:fill="none" draw:textarea-horizontal-align="center" draw:textarea-vertical-align="middle" draw:auto-grow-height="false" draw:auto-grow-width="false" fo:min-height="1.466cm" fo:min-width="2.031cm" fo:padding-top="0.127cm" fo:padding-bottom="0.127cm" fo:padding-left="0.254cm" fo:padding-right="0.254cm" fo:wrap-option="wrap" style:writing-mode="lr-tb" loext:decorative="false"/>
      <style:paragraph-properties style:writing-mode="lr-tb"/>
    </style:style>
    <style:style style:name="gr164" style:family="graphic" style:parent-style-name="standard">
      <style:graphic-properties draw:stroke="dash" draw:stroke-dash="SysDash" svg:stroke-width="0.079cm" svg:stroke-color="#2e75b6" svg:stroke-opacity="100%" draw:stroke-linejoin="miter" svg:stroke-linecap="butt" draw:fill="none" draw:textarea-horizontal-align="center" draw:textarea-vertical-align="middle" draw:auto-grow-height="false" draw:auto-grow-width="false" fo:min-height="1.466cm" fo:min-width="2.029cm" fo:padding-top="0.127cm" fo:padding-bottom="0.127cm" fo:padding-left="0.254cm" fo:padding-right="0.254cm" fo:wrap-option="wrap" style:writing-mode="lr-tb" loext:decorative="false"/>
      <style:paragraph-properties style:writing-mode="lr-tb"/>
    </style:style>
    <style:style style:name="gr165" style:family="graphic" style:parent-style-name="standard">
      <style:graphic-properties draw:stroke="solid" svg:stroke-width="0.079cm" svg:stroke-color="#2e75b6" svg:stroke-opacity="100%" draw:stroke-linejoin="miter" svg:stroke-linecap="butt" draw:fill="none" draw:textarea-horizontal-align="center" draw:textarea-vertical-align="middle" draw:auto-grow-height="false" draw:auto-grow-width="false" fo:min-height="0.645cm" fo:min-width="1.013cm" fo:padding-top="0.127cm" fo:padding-bottom="0.127cm" fo:padding-left="0.254cm" fo:padding-right="0.254cm" fo:wrap-option="wrap" style:writing-mode="lr-tb" loext:decorative="false"/>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535cm" fo:min-width="1.889cm" fo:padding-top="0.127cm" fo:padding-bottom="0.127cm" fo:padding-left="0.254cm" fo:padding-right="0.254cm" fo:wrap-option="no-wrap" loext:decorative="false"/>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535cm" fo:min-width="1.424cm" fo:padding-top="0.127cm" fo:padding-bottom="0.127cm" fo:padding-left="0.254cm" fo:padding-right="0.254cm" fo:wrap-option="no-wrap" loext:decorative="false"/>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535cm" fo:min-width="0.705cm" fo:padding-top="0.127cm" fo:padding-bottom="0.127cm" fo:padding-left="0.254cm" fo:padding-right="0.254cm" fo:wrap-option="no-wrap" loext:decorative="false"/>
      <style:paragraph-properties style:writing-mode="lr-tb"/>
    </style:style>
    <style:style style:name="gr169" style:family="graphic" style:parent-style-name="standard">
      <style:graphic-properties draw:stroke="solid" svg:stroke-width="0.053cm" svg:stroke-color="#2e75b6" draw:marker-end="a1012" svg:stroke-opacity="100%" draw:stroke-linejoin="miter" svg:stroke-linecap="butt" draw:fill="none" fo:padding-top="0.151cm" fo:padding-bottom="0.151cm" fo:padding-left="0.276cm" fo:padding-right="0.276cm" loext:decorative="false"/>
    </style:style>
    <style:style style:name="gr170" style:family="graphic" style:parent-style-name="standard">
      <style:graphic-properties draw:stroke="solid" svg:stroke-width="0.053cm" svg:stroke-color="#2e75b6" draw:marker-end="a1014" svg:stroke-opacity="100%" draw:stroke-linejoin="miter" svg:stroke-linecap="butt" draw:fill="none" fo:padding-top="0.151cm" fo:padding-bottom="0.151cm" fo:padding-left="0.276cm" fo:padding-right="0.276cm" loext:decorative="false"/>
    </style:style>
    <style:style style:name="gr171" style:family="graphic" style:parent-style-name="standard">
      <style:graphic-properties draw:stroke="solid" svg:stroke-width="0.053cm" svg:stroke-color="#2e75b6" draw:marker-end="a1016" svg:stroke-opacity="100%" draw:stroke-linejoin="miter" svg:stroke-linecap="butt" draw:fill="none" fo:padding-top="0.151cm" fo:padding-bottom="0.151cm" fo:padding-left="0.276cm" fo:padding-right="0.276cm" loext:decorative="false"/>
    </style:style>
    <style:style style:name="gr172" style:family="graphic" style:parent-style-name="standard">
      <style:graphic-properties draw:stroke="solid" svg:stroke-width="0.053cm" svg:stroke-color="#2e75b6" draw:marker-end="a1018" svg:stroke-opacity="100%" draw:stroke-linejoin="miter" svg:stroke-linecap="butt" draw:fill="none" fo:padding-top="0.151cm" fo:padding-bottom="0.151cm" fo:padding-left="0.276cm" fo:padding-right="0.276cm" loext:decorative="false"/>
    </style:style>
    <style:style style:name="gr173" style:family="graphic" style:parent-style-name="standard">
      <style:graphic-properties draw:stroke="solid" svg:stroke-width="0.053cm" svg:stroke-color="#2e75b6" draw:marker-end="a1020" svg:stroke-opacity="100%" draw:stroke-linejoin="miter" svg:stroke-linecap="butt" draw:fill="none" fo:padding-top="0.151cm" fo:padding-bottom="0.151cm" fo:padding-left="0.276cm" fo:padding-right="0.276cm" loext:decorative="false"/>
    </style:style>
    <style:style style:name="gr174" style:family="graphic" style:parent-style-name="standard">
      <style:graphic-properties draw:stroke="solid" svg:stroke-width="0.053cm" svg:stroke-color="#2e75b6" draw:marker-end="a1022" svg:stroke-opacity="100%" draw:stroke-linejoin="miter" svg:stroke-linecap="butt" draw:fill="none" fo:padding-top="0.151cm" fo:padding-bottom="0.151cm" fo:padding-left="0.276cm" fo:padding-right="0.276cm" loext:decorative="false"/>
    </style:style>
    <style:style style:name="gr175" style:family="graphic" style:parent-style-name="standard">
      <style:graphic-properties draw:stroke="solid" svg:stroke-width="0.053cm" svg:stroke-color="#2e75b6" draw:marker-end="a1024" svg:stroke-opacity="100%" draw:stroke-linejoin="miter" svg:stroke-linecap="butt" draw:fill="none" fo:padding-top="0.151cm" fo:padding-bottom="0.151cm" fo:padding-left="0.276cm" fo:padding-right="0.276cm" loext:decorative="false"/>
    </style:style>
    <style:style style:name="gr176" style:family="graphic" style:parent-style-name="standard">
      <style:graphic-properties draw:stroke="solid" svg:stroke-width="0.053cm" svg:stroke-color="#2e75b6" draw:marker-end="a1026" svg:stroke-opacity="100%" draw:stroke-linejoin="miter" svg:stroke-linecap="butt" draw:fill="none" fo:padding-top="0.151cm" fo:padding-bottom="0.151cm" fo:padding-left="0.276cm" fo:padding-right="0.276cm" loext:decorative="false"/>
    </style:style>
    <style:style style:name="gr177" style:family="graphic" style:parent-style-name="standard">
      <style:graphic-properties draw:stroke="solid" svg:stroke-width="0.053cm" svg:stroke-color="#2e75b6" draw:marker-end="a1028" svg:stroke-opacity="100%" draw:stroke-linejoin="miter" svg:stroke-linecap="butt" draw:fill="none" fo:padding-top="0.151cm" fo:padding-bottom="0.151cm" fo:padding-left="0.276cm" fo:padding-right="0.276cm" loext:decorative="false"/>
    </style:style>
    <style:style style:name="gr178" style:family="graphic" style:parent-style-name="standard">
      <style:graphic-properties draw:stroke="solid" svg:stroke-width="0.053cm" svg:stroke-color="#2e75b6" draw:marker-end="a1030" svg:stroke-opacity="100%" draw:stroke-linejoin="miter" svg:stroke-linecap="butt" draw:fill="none" fo:padding-top="0.151cm" fo:padding-bottom="0.151cm" fo:padding-left="0.276cm" fo:padding-right="0.276cm" loext:decorative="false"/>
    </style:style>
    <style:style style:name="gr179" style:family="graphic" style:parent-style-name="standard">
      <style:graphic-properties draw:stroke="solid" svg:stroke-width="0.053cm" svg:stroke-color="#2e75b6" svg:stroke-opacity="100%" draw:stroke-linejoin="miter" svg:stroke-linecap="butt" draw:fill="none" fo:padding-top="0.151cm" fo:padding-bottom="0.151cm" fo:padding-left="0.276cm" fo:padding-right="0.276cm" loext:decorative="false"/>
    </style:style>
    <style:style style:name="gr180" style:family="graphic" style:parent-style-name="standard">
      <style:graphic-properties draw:stroke="solid" svg:stroke-width="0.053cm" svg:stroke-color="#2e75b6" draw:marker-end="a1033" svg:stroke-opacity="100%" draw:stroke-linejoin="miter" svg:stroke-linecap="butt" draw:fill="none" fo:padding-top="0.151cm" fo:padding-bottom="0.151cm" fo:padding-left="0.276cm" fo:padding-right="0.276cm" loext:decorative="false"/>
    </style:style>
    <style:style style:name="gr181" style:family="graphic" style:parent-style-name="standard">
      <style:graphic-properties draw:stroke="solid" svg:stroke-width="0.053cm" svg:stroke-color="#2e75b6" draw:marker-end="a1035" svg:stroke-opacity="100%" draw:stroke-linejoin="miter" svg:stroke-linecap="butt" draw:fill="none" fo:padding-top="0.151cm" fo:padding-bottom="0.151cm" fo:padding-left="0.276cm" fo:padding-right="0.276cm" loext:decorative="false"/>
    </style:style>
    <style:style style:name="gr182" style:family="graphic" style:parent-style-name="standard">
      <style:graphic-properties draw:stroke="solid" svg:stroke-width="0.053cm" svg:stroke-color="#2e75b6" draw:marker-end="a1037" svg:stroke-opacity="100%" draw:stroke-linejoin="miter" svg:stroke-linecap="butt" draw:fill="none" fo:padding-top="0.151cm" fo:padding-bottom="0.151cm" fo:padding-left="0.276cm" fo:padding-right="0.276cm" loext:decorative="false"/>
    </style:style>
    <style:style style:name="gr183" style:family="graphic" style:parent-style-name="standard">
      <style:graphic-properties draw:stroke="solid" svg:stroke-width="0.053cm" svg:stroke-color="#2e75b6" draw:marker-end="a1039" svg:stroke-opacity="100%" draw:stroke-linejoin="miter" svg:stroke-linecap="butt" draw:fill="none" fo:padding-top="0.151cm" fo:padding-bottom="0.151cm" fo:padding-left="0.276cm" fo:padding-right="0.276cm" loext:decorative="false"/>
    </style:style>
    <style:style style:name="gr184" style:family="graphic" style:parent-style-name="standard">
      <style:graphic-properties draw:stroke="solid" svg:stroke-width="0.053cm" svg:stroke-color="#2e75b6" draw:marker-end="a1041" svg:stroke-opacity="100%" draw:stroke-linejoin="miter" svg:stroke-linecap="butt" draw:fill="none" fo:padding-top="0.151cm" fo:padding-bottom="0.151cm" fo:padding-left="0.276cm" fo:padding-right="0.276cm" loext:decorative="false"/>
    </style:style>
    <style:style style:name="gr185" style:family="graphic" style:parent-style-name="standard">
      <style:graphic-properties draw:stroke="solid" svg:stroke-width="0.053cm" svg:stroke-color="#2e75b6" draw:marker-end="a1043" svg:stroke-opacity="100%" draw:stroke-linejoin="miter" svg:stroke-linecap="butt" draw:fill="none" fo:padding-top="0.151cm" fo:padding-bottom="0.151cm" fo:padding-left="0.276cm" fo:padding-right="0.276cm" loext:decorative="false"/>
    </style:style>
    <style:style style:name="gr186" style:family="graphic" style:parent-style-name="standard">
      <style:graphic-properties draw:stroke="solid" svg:stroke-width="0.053cm" svg:stroke-color="#2e75b6" draw:marker-end="a1045" svg:stroke-opacity="100%" draw:stroke-linejoin="miter" svg:stroke-linecap="butt" draw:fill="none" fo:padding-top="0.151cm" fo:padding-bottom="0.151cm" fo:padding-left="0.276cm" fo:padding-right="0.276cm" loext:decorative="false"/>
    </style:style>
    <style:style style:name="gr187" style:family="graphic" style:parent-style-name="standard">
      <style:graphic-properties draw:stroke="solid" svg:stroke-width="0.053cm" svg:stroke-color="#2e75b6" draw:marker-end="a1047" svg:stroke-opacity="100%" draw:stroke-linejoin="miter" svg:stroke-linecap="butt" draw:fill="none" fo:padding-top="0.151cm" fo:padding-bottom="0.151cm" fo:padding-left="0.276cm" fo:padding-right="0.276cm" loext:decorative="false"/>
    </style:style>
    <style:style style:name="gr188" style:family="graphic" style:parent-style-name="standard">
      <style:graphic-properties draw:stroke="solid" svg:stroke-width="0.053cm" svg:stroke-color="#2e75b6" draw:marker-end="a1049" svg:stroke-opacity="100%" draw:stroke-linejoin="miter" svg:stroke-linecap="butt" draw:fill="none" fo:padding-top="0.151cm" fo:padding-bottom="0.151cm" fo:padding-left="0.276cm" fo:padding-right="0.276cm" loext:decorative="false"/>
    </style:style>
    <style:style style:name="gr189" style:family="graphic" style:parent-style-name="standard">
      <style:graphic-properties draw:stroke="solid" svg:stroke-width="0.053cm" svg:stroke-color="#2e75b6" draw:marker-end="a1051" svg:stroke-opacity="100%" draw:stroke-linejoin="miter" svg:stroke-linecap="butt" draw:fill="none" fo:padding-top="0.151cm" fo:padding-bottom="0.151cm" fo:padding-left="0.276cm" fo:padding-right="0.276cm" loext:decorative="false"/>
    </style:style>
    <style:style style:name="gr190" style:family="graphic" style:parent-style-name="standard">
      <style:graphic-properties draw:stroke="solid" svg:stroke-width="0.053cm" svg:stroke-color="#2e75b6" draw:marker-end="a1053" svg:stroke-opacity="100%" draw:stroke-linejoin="miter" svg:stroke-linecap="butt" draw:fill="none" fo:padding-top="0.151cm" fo:padding-bottom="0.151cm" fo:padding-left="0.276cm" fo:padding-right="0.276cm" loext:decorative="false"/>
    </style:style>
    <style:style style:name="gr191" style:family="graphic" style:parent-style-name="standard">
      <style:graphic-properties draw:stroke="solid" svg:stroke-width="0.053cm" svg:stroke-color="#2e75b6" draw:marker-end="a1055" svg:stroke-opacity="100%" draw:stroke-linejoin="miter" svg:stroke-linecap="butt" draw:fill="none" fo:padding-top="0.151cm" fo:padding-bottom="0.151cm" fo:padding-left="0.276cm" fo:padding-right="0.276cm" loext:decorative="false"/>
    </style:style>
    <style:style style:name="gr192" style:family="graphic" style:parent-style-name="standard">
      <style:graphic-properties draw:stroke="solid" svg:stroke-width="0.053cm" svg:stroke-color="#2e75b6" draw:marker-end="a1057" svg:stroke-opacity="100%" draw:stroke-linejoin="miter" svg:stroke-linecap="butt" draw:fill="none" fo:padding-top="0.151cm" fo:padding-bottom="0.151cm" fo:padding-left="0.276cm" fo:padding-right="0.276cm" loext:decorative="false"/>
    </style:style>
    <style:style style:name="gr193" style:family="graphic" style:parent-style-name="standard">
      <style:graphic-properties draw:stroke="solid" svg:stroke-width="0.053cm" svg:stroke-color="#2e75b6" draw:marker-end="a1059" svg:stroke-opacity="100%" draw:stroke-linejoin="miter" svg:stroke-linecap="butt" draw:fill="none" fo:padding-top="0.151cm" fo:padding-bottom="0.151cm" fo:padding-left="0.276cm" fo:padding-right="0.276cm" loext:decorative="false"/>
    </style:style>
    <style:style style:name="gr194" style:family="graphic" style:parent-style-name="standard">
      <style:graphic-properties draw:stroke="solid" svg:stroke-width="0.053cm" svg:stroke-color="#2e75b6" draw:marker-end="a1061" svg:stroke-opacity="100%" draw:stroke-linejoin="miter" svg:stroke-linecap="butt" draw:fill="none" fo:padding-top="0.151cm" fo:padding-bottom="0.151cm" fo:padding-left="0.276cm" fo:padding-right="0.276cm" loext:decorative="false"/>
    </style:style>
    <style:style style:name="gr195" style:family="graphic" style:parent-style-name="standard">
      <style:graphic-properties draw:stroke="solid" svg:stroke-width="0.053cm" svg:stroke-color="#2e75b6" draw:marker-end="a1063" svg:stroke-opacity="100%" draw:stroke-linejoin="miter" svg:stroke-linecap="butt" draw:fill="none" fo:padding-top="0.151cm" fo:padding-bottom="0.151cm" fo:padding-left="0.276cm" fo:padding-right="0.276cm" loext:decorative="false"/>
    </style:style>
    <style:style style:name="gr196" style:family="graphic" style:parent-style-name="standard">
      <style:graphic-properties draw:stroke="solid" svg:stroke-width="0.053cm" svg:stroke-color="#2e75b6" draw:marker-end="a1065" svg:stroke-opacity="100%" draw:stroke-linejoin="miter" svg:stroke-linecap="butt" draw:fill="none" fo:padding-top="0.151cm" fo:padding-bottom="0.151cm" fo:padding-left="0.276cm" fo:padding-right="0.276cm" loext:decorative="false"/>
    </style:style>
    <style:style style:name="gr197" style:family="graphic" style:parent-style-name="standard">
      <style:graphic-properties draw:stroke="solid" svg:stroke-width="0.053cm" svg:stroke-color="#2e75b6" draw:marker-end="a1067" svg:stroke-opacity="100%" draw:stroke-linejoin="miter" svg:stroke-linecap="butt" draw:fill="none" fo:padding-top="0.151cm" fo:padding-bottom="0.151cm" fo:padding-left="0.276cm" fo:padding-right="0.276cm" loext:decorative="false"/>
    </style:style>
    <style:style style:name="gr198" style:family="graphic" style:parent-style-name="standard">
      <style:graphic-properties draw:stroke="solid" svg:stroke-width="0.053cm" svg:stroke-color="#2e75b6" draw:marker-end="a1069" svg:stroke-opacity="100%" draw:stroke-linejoin="miter" svg:stroke-linecap="butt" draw:fill="none" fo:padding-top="0.151cm" fo:padding-bottom="0.151cm" fo:padding-left="0.276cm" fo:padding-right="0.276cm" loext:decorative="false"/>
    </style:style>
    <style:style style:name="gr199" style:family="graphic" style:parent-style-name="standard">
      <style:graphic-properties draw:stroke="solid" svg:stroke-width="0.053cm" svg:stroke-color="#2e75b6" draw:marker-end="a1071" svg:stroke-opacity="100%" draw:stroke-linejoin="miter" svg:stroke-linecap="butt" draw:fill="none" fo:padding-top="0.151cm" fo:padding-bottom="0.151cm" fo:padding-left="0.276cm" fo:padding-right="0.276cm" loext:decorative="false"/>
    </style:style>
    <style:style style:name="pr1" style:family="presentation" style:parent-style-name="Default-notes">
      <style:graphic-properties draw:fill-color="#ffffff" draw:auto-grow-height="false" fo:min-height="12.573cm" loext:decorative="false"/>
      <style:paragraph-properties style:writing-mode="lr-tb"/>
    </style:style>
    <style:style style:name="pr2" style:family="presentation" style:parent-style-name="Blank-notes">
      <style:graphic-properties draw:fill-color="#ffffff" draw:auto-grow-height="false" fo:min-height="13.365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text-properties style:font-name="Calibri" fo:font-size="16pt" style:font-size-asian="16pt" style:font-size-complex="16pt"/>
    </style:style>
    <style:style style:name="P3" style:family="paragraph">
      <style:paragraph-properties fo:text-align="center"/>
    </style:style>
    <style:style style:name="P4" style:family="paragraph">
      <loext:graphic-properties draw:fill="none" draw:fill-color="#ffffff"/>
      <style:paragraph-properties fo:text-align="center"/>
      <style:text-properties style:font-name="Calibri" fo:font-size="16pt" style:font-size-asian="16pt" style:font-size-complex="16pt"/>
    </style:style>
    <style:style style:name="P5" style:family="paragraph">
      <loext:graphic-properties draw:fill="solid" draw:fill-color="#0070c0"/>
      <style:paragraph-properties fo:text-align="center"/>
      <style:text-properties style:font-name="Calibri"/>
    </style:style>
    <style:style style:name="P6" style:family="paragraph">
      <loext:graphic-properties draw:fill="solid" draw:fill-color="#bdd7ee"/>
      <style:paragraph-properties fo:text-align="center"/>
      <style:text-properties style:font-name="Calibri"/>
    </style:style>
    <style:style style:name="P7" style:family="paragraph">
      <loext:graphic-properties draw:fill="solid" draw:fill-color="#6a99d0"/>
      <style:paragraph-properties fo:text-align="center"/>
      <style:text-properties style:font-name="Calibri"/>
    </style:style>
    <style:style style:name="P8" style:family="paragraph">
      <loext:graphic-properties draw:fill-color="#ffffff"/>
    </style:style>
    <style:style style:name="P9" style:family="paragraph">
      <loext:graphic-properties draw:fill="none" draw:fill-color="#ffffff"/>
      <style:text-properties style:font-name="Calibri" fo:font-size="14pt" style:font-size-asian="14pt" style:font-size-complex="14pt"/>
    </style:style>
    <style:style style:name="P10" style:family="paragraph">
      <loext:graphic-properties draw:fill="none" draw:fill-color="#ffffff"/>
      <style:paragraph-properties fo:text-align="center"/>
      <style:text-properties fo:font-size="14pt" style:font-size-asian="14pt" style:font-size-complex="14pt"/>
    </style:style>
    <style:style style:name="P11"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1"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2" style:family="paragraph">
      <loext:graphic-properties draw:fill="none"/>
      <style:paragraph-properties fo:text-align="start"/>
      <style:text-properties fo:font-size="18pt"/>
    </style:style>
    <style:style style:name="P13" style:family="paragraph">
      <loext:graphic-properties draw:fill="none" draw:fill-color="#ffffff"/>
      <style:text-properties style:font-name="Calibri" fo:font-size="14pt"/>
    </style:style>
    <style:style style:name="P14" style:family="paragraph">
      <loext:graphic-properties draw:fill="solid" draw:fill-color="#000000" draw:opacity="100%"/>
      <style:paragraph-properties style:writing-mode="lr-tb" style:font-independent-line-spacing="true"/>
    </style:style>
    <style:style style:name="P15" style:family="paragraph">
      <loext:graphic-properties draw:fill="solid" draw:fill-color="#ffffff"/>
      <style:paragraph-properties fo:text-align="center"/>
    </style:style>
    <style:style style:name="P16" style:family="paragraph">
      <loext:graphic-properties draw:fill="none" draw:fill-color="#ffffff"/>
      <style:text-properties fo:color="#ffffff" loext:opacity="100%" style:font-name="Calibri" fo:font-size="14pt" fo:font-weight="bold" style:font-size-asian="14pt" style:font-weight-asian="bold" style:font-size-complex="14pt" style:font-weight-complex="bold"/>
    </style:style>
    <style:style style:name="P17" style:family="paragraph">
      <loext:graphic-properties draw:fill="none"/>
    </style:style>
    <style:style style:name="P18"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fo:font-size="16pt" style:font-size-asian="16pt" style:font-size-complex="16pt"/>
    </style:style>
    <style:style style:name="P19" style:family="paragraph">
      <loext:graphic-properties draw:fill="solid" draw:fill-color="#ffffff"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font-size="16pt" style:font-size-asian="16pt" style:font-size-complex="16pt"/>
    </style:style>
    <style:style style:name="P20"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21"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style>
    <style:style style:name="P22"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P23" style:family="paragraph">
      <loext:graphic-properties draw:fill="none"/>
      <style:paragraph-properties fo:margin-left="0cm" fo:margin-right="0cm" fo:margin-top="0cm" fo:margin-bottom="0cm" fo:line-height="100%" fo:text-align="end" fo:text-indent="0cm" style:punctuation-wrap="hanging" loext:tab-stop-distance="0cm" style:font-independent-line-spacing="true">
        <style:tab-stops/>
      </style:paragraph-properties>
    </style:style>
    <style:style style:name="P24"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P25" style:family="paragraph">
      <loext:graphic-properties draw:fill="solid" draw:fill-color="#deebf7"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26" style:family="paragraph">
      <loext:graphic-properties draw:fill="solid" draw:fill-color="#5b9bd5" draw:opacity="100%"/>
      <style:paragraph-properties style:writing-mode="lr-tb" style:font-independent-line-spacing="true"/>
    </style:style>
    <style:style style:name="P27" style:family="paragraph">
      <loext:graphic-properties draw:fill="none"/>
      <style:paragraph-properties fo:margin-left="0cm" fo:margin-right="0cm" fo:margin-top="0cm" fo:margin-bottom="0cm" fo:line-height="100%" fo:text-align="end" fo:text-indent="0cm" style:punctuation-wrap="hanging" loext:tab-stop-distance="0cm" style:font-independent-line-spacing="true">
        <style:tab-stops/>
      </style:paragraph-properties>
      <style:text-properties fo:font-size="14pt" style:font-size-asian="14pt" style:font-size-complex="14pt"/>
    </style:style>
    <style:style style:name="P28" style:family="paragraph">
      <loext:graphic-properties draw:fill="gradient" draw:fill-gradient-name="a854"/>
      <style:paragraph-properties style:writing-mode="lr-tb" style:font-independent-line-spacing="true"/>
    </style:style>
    <style:style style:name="P29" style:family="paragraph">
      <loext:graphic-properties draw:fill="gradient" draw:fill-gradient-name="a840"/>
      <style:paragraph-properties style:writing-mode="lr-tb" style:font-independent-line-spacing="true"/>
    </style:style>
    <style:style style:name="P30" style:family="paragraph">
      <loext:graphic-properties draw:fill="gradient" draw:fill-gradient-name="a826"/>
      <style:paragraph-properties style:writing-mode="lr-tb" style:font-independent-line-spacing="true"/>
    </style:style>
    <style:style style:name="P31" style:family="paragraph">
      <loext:graphic-properties draw:fill="gradient" draw:fill-gradient-name="a812"/>
      <style:paragraph-properties style:writing-mode="lr-tb" style:font-independent-line-spacing="true"/>
    </style:style>
    <style:style style:name="P32" style:family="paragraph">
      <loext:graphic-properties draw:fill="gradient" draw:fill-gradient-name="a798"/>
      <style:paragraph-properties style:writing-mode="lr-tb" style:font-independent-line-spacing="true"/>
    </style:style>
    <style:style style:name="P33" style:family="paragraph">
      <loext:graphic-properties draw:fill="gradient" draw:fill-gradient-name="a1084"/>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34" style:family="paragraph">
      <loext:graphic-properties draw:fill="gradient" draw:fill-gradient-name="a1088"/>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35" style:family="paragraph">
      <style:paragraph-properties fo:margin-left="0cm" fo:margin-right="0cm" fo:margin-top="0cm" fo:margin-bottom="0cm" fo:line-height="80%" fo:text-align="center" fo:text-indent="0cm" style:punctuation-wrap="hanging" loext:tab-stop-distance="0cm" style:writing-mode="lr-tb">
        <style:tab-stops/>
      </style:paragraph-properties>
    </style:style>
    <style:style style:name="P36" style:family="paragraph">
      <loext:graphic-properties draw:fill="none"/>
      <style:paragraph-properties style:font-independent-line-spacing="true"/>
    </style:style>
    <style:style style:name="P37" style:family="paragraph">
      <loext:graphic-properties draw:fill="gradient" draw:fill-gradient-name="a1112"/>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38" style:family="paragraph">
      <loext:graphic-properties draw:fill="gradient" draw:fill-gradient-name="a1116"/>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39" style:family="paragraph">
      <loext:graphic-properties draw:fill="gradient" draw:fill-gradient-name="a112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40" style:family="paragraph">
      <loext:graphic-properties draw:fill="gradient" draw:fill-gradient-name="a1124"/>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41" style:family="paragraph">
      <loext:graphic-properties draw:fill="gradient" draw:fill-gradient-name="a1128"/>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42" style:family="paragraph">
      <loext:graphic-properties draw:fill="gradient" draw:fill-gradient-name="a1133"/>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43" style:family="paragraph">
      <loext:graphic-properties draw:fill="none"/>
      <style:paragraph-properties style:writing-mode="lr-tb" style:font-independent-line-spacing="true"/>
    </style:style>
    <style:style style:name="P44" style:family="paragraph">
      <loext:graphic-properties draw:fill="none"/>
      <style:paragraph-properties fo:margin-left="0cm" fo:margin-right="0cm" fo:margin-top="0cm" fo:margin-bottom="0cm" fo:line-height="80%" fo:text-align="center" fo:text-indent="0cm" style:punctuation-wrap="hanging" loext:tab-stop-distance="0cm" style:font-independent-line-spacing="true">
        <style:tab-stops/>
      </style:paragraph-properties>
    </style:style>
    <style:style style:name="P45"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fo:font-size="18pt"/>
    </style:style>
    <style:style style:name="P46" style:family="paragraph">
      <loext:graphic-properties draw:fill="solid" draw:fill-color="#deebf7"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font-size="18pt"/>
    </style:style>
    <style:style style:name="P47" style:family="paragraph">
      <loext:graphic-properties draw:fill="solid" draw:fill-color="#ffffff"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font-size="18pt"/>
    </style:style>
    <style:style style:name="P48"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fo:font-size="18pt"/>
    </style:style>
    <style:style style:name="P49"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font-size="18pt"/>
    </style:style>
    <style:style style:name="P50" style:family="paragraph">
      <style:paragraph-properties fo:margin-left="0cm" fo:margin-right="0cm" fo:margin-top="0cm" fo:margin-bottom="0cm" fo:line-height="80%" fo:text-align="start" fo:text-indent="0cm" style:punctuation-wrap="hanging" loext:tab-stop-distance="0cm" style:writing-mode="lr-tb">
        <style:tab-stops/>
      </style:paragraph-properties>
    </style:style>
    <style:style style:name="P51" style:family="paragraph">
      <loext:graphic-properties draw:fill="none"/>
      <style:paragraph-properties fo:margin-left="0cm" fo:margin-right="0cm" fo:margin-top="0cm" fo:margin-bottom="0cm" fo:line-height="80%" fo:text-align="start" fo:text-indent="0cm" style:punctuation-wrap="hanging" loext:tab-stop-distance="0cm" style:font-independent-line-spacing="true">
        <style:tab-stops/>
      </style:paragraph-properties>
      <style:text-properties fo:font-size="18pt"/>
    </style:style>
    <style:style style:name="P52" style:family="paragraph">
      <style:paragraph-properties fo:text-align="center"/>
      <style:text-properties style:font-name="Calibri" fo:font-size="14pt" style:font-size-asian="14pt" style:font-size-complex="14pt"/>
    </style:style>
    <style:style style:name="P53" style:family="paragraph">
      <loext:graphic-properties draw:fill="solid" draw:fill-color="#ffffff"/>
      <style:paragraph-properties fo:text-align="center" style:writing-mode="lr-tb"/>
      <style:text-properties style:font-name="Calibri" fo:font-size="14pt" style:font-size-asian="14pt" style:font-size-complex="14pt"/>
    </style:style>
    <style:style style:name="P54" style:family="paragraph">
      <style:paragraph-properties fo:text-align="center"/>
      <style:text-properties style:font-name="Calibri" fo:font-size="16pt" style:font-size-asian="16pt" style:font-size-complex="16pt"/>
    </style:style>
    <style:style style:name="P55" style:family="paragraph">
      <loext:graphic-properties draw:fill="solid" draw:fill-color="#bdd7ee"/>
      <style:paragraph-properties fo:text-align="center" style:writing-mode="lr-tb"/>
      <style:text-properties style:font-name="Calibri" fo:font-size="16pt" style:font-size-asian="16pt" style:font-size-complex="16pt"/>
    </style:style>
    <style:style style:name="P56" style:family="paragraph">
      <loext:graphic-properties draw:fill="none" draw:fill-color="#ffffff"/>
      <style:paragraph-properties fo:text-align="center"/>
      <style:text-properties style:font-name="Calibri" fo:font-size="14pt" style:font-size-asian="14pt" style:font-size-complex="14pt"/>
    </style:style>
    <style:style style:name="P57" style:family="paragraph">
      <style:paragraph-properties fo:margin-left="0cm" fo:margin-right="0cm" fo:margin-top="0cm" fo:margin-bottom="0cm" fo:line-height="90%" fo:text-align="center" fo:text-indent="0cm" style:punctuation-wrap="hanging" loext:tab-stop-distance="0cm" style:writing-mode="lr-tb">
        <style:tab-stops/>
      </style:paragraph-properties>
    </style:style>
    <style:style style:name="P58" style:family="paragraph">
      <loext:graphic-properties draw:fill="none"/>
      <style:paragraph-properties fo:margin-left="0cm" fo:margin-right="0cm" fo:margin-top="0cm" fo:margin-bottom="0cm" fo:line-height="90%" fo:text-align="center" fo:text-indent="0cm" style:punctuation-wrap="hanging" loext:tab-stop-distance="0cm" style:writing-mode="lr-tb" style:font-independent-line-spacing="true">
        <style:tab-stops/>
      </style:paragraph-properties>
    </style:style>
    <style:style style:name="P59" style:family="paragraph">
      <style:paragraph-properties fo:margin-left="0cm" fo:margin-right="0cm" fo:margin-top="0cm" fo:margin-bottom="0cm" fo:line-height="90%" fo:text-align="start" fo:text-indent="0cm" style:punctuation-wrap="hanging" loext:tab-stop-distance="0cm" style:writing-mode="lr-tb">
        <style:tab-stops/>
      </style:paragraph-properties>
    </style:style>
    <style:style style:name="P60" style:family="paragraph">
      <loext:graphic-properties draw:fill="none"/>
      <style:paragraph-properties fo:margin-left="0cm" fo:margin-right="0cm" fo:margin-top="0cm" fo:margin-bottom="0cm" fo:line-height="90%" fo:text-align="start" fo:text-indent="0cm" style:punctuation-wrap="hanging" loext:tab-stop-distance="0cm" style:font-independent-line-spacing="true">
        <style:tab-stops/>
      </style:paragraph-properties>
    </style:style>
    <style:style style:name="T1" style:family="text">
      <style:text-properties style:font-name="Calibri" fo:font-size="16pt" style:font-size-asian="16pt" style:font-size-complex="16pt"/>
    </style:style>
    <style:style style:name="T2" style:family="text">
      <style:text-properties style:font-name="Calibri" fo:font-size="14pt" style:font-size-asian="14pt" style:font-size-complex="14pt"/>
    </style:style>
    <style:style style:name="T3" style:family="text">
      <style:text-properties fo:font-size="14pt" style:font-size-asian="14pt" style:font-size-complex="14pt"/>
    </style:style>
    <style:style style:name="T4" style:family="text">
      <style:text-properties style:font-name="Calibri" fo:font-size="14pt"/>
    </style:style>
    <style:style style:name="T5" style:family="text">
      <style:text-properties fo:color="#ffffff" loext:opacity="100%" style:font-name="Calibri" fo:font-size="14pt" fo:font-weight="bold" style:font-size-asian="14pt" style:font-weight-asian="bold" style:font-size-complex="14pt" style:font-weight-complex="bold"/>
    </style:style>
    <style:style style:name="T6" style:family="text">
      <style:text-properties style:font-name="Calibri" fo:font-size="14pt" fo:font-weight="normal" style:font-size-asian="14pt" style:font-weight-asian="normal" style:font-size-complex="14pt" style:font-weight-complex="normal"/>
    </style:style>
    <style:style style:name="T7" style:family="text">
      <style:text-properties fo:font-variant="normal" fo:text-transform="none" fo:color="#000000" loext:opacity="100%" style:text-line-through-style="none" style:text-line-through-type="none" style:text-position="0% 100%" style:font-name="Calibri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Calibri1"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12" style:family="text">
      <style:text-properties fo:font-variant="normal" fo:text-transform="none" fo:color="#ffffff"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3" style:family="text">
      <style:text-properties fo:font-variant="normal" fo:text-transform="none" fo:color="#44546a"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4" style:family="text">
      <style:text-properties fo:font-variant="normal" fo:text-transform="none" fo:color="#0070c0"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5" style:family="text">
      <style:text-properties fo:font-variant="normal" fo:text-transform="none" fo:color="#767171"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6" style:family="text">
      <style:text-properties fo:font-variant="normal" fo:text-transform="none" fo:color="#ff0000"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Calibri1" fo:font-size="13.5pt" fo:letter-spacing="normal" fo:language="en" fo:country="US" fo:font-style="normal" style:text-underline-style="none" fo:font-weight="normal" style:text-underline-mode="continuous" style:text-overline-mode="continuous" style:text-line-through-mode="continuous" style:letter-kerning="true" style:font-size-asian="13.5pt" style:font-style-asian="normal" style:font-weight-asian="normal" style:font-size-complex="13.5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575cm" svg:height="3.013cm" svg:x="23.217cm" svg:y="9.812cm">
          <draw:image xlink:href="Pictures/1000000100000316000005E6C4157AF2.png" xlink:type="simple" xlink:show="embed" xlink:actuate="onLoad" draw:mime-type="image/png">
            <text:p/>
          </draw:image>
        </draw:frame>
        <draw:frame draw:style-name="gr1" draw:text-style-name="P1" draw:layer="layout" svg:width="2.571cm" svg:height="2.571cm" svg:x="17.991cm" svg:y="10.084cm">
          <draw:image xlink:href="Pictures/100008A0000046A9000046A969C5F579.svg" xlink:type="simple" xlink:show="embed" xlink:actuate="onLoad" draw:mime-type="image/svg+xml">
            <text:p/>
          </draw:image>
          <draw:image xlink:href="Pictures/10000001000002C3000002C3DF6DA5F5.png" xlink:type="simple" xlink:show="embed" xlink:actuate="onLoad" draw:mime-type="image/png"/>
        </draw:frame>
        <draw:frame draw:style-name="gr1" draw:text-style-name="P1" draw:layer="layout" svg:width="1.188cm" svg:height="1.782cm" svg:x="15.32cm" svg:y="10.678cm">
          <draw:image xlink:href="Pictures/1000184A00001CAA00002AFFD75A7ACE.pdf" xlink:type="simple" xlink:show="embed" xlink:actuate="onLoad" draw:mime-type="application/pdf">
            <text:p/>
          </draw:image>
          <draw:image xlink:href="Pictures/1000000100000138000001D4939E222C.png" xlink:type="simple" xlink:show="embed" xlink:actuate="onLoad" draw:mime-type="image/png"/>
        </draw:frame>
        <draw:frame draw:style-name="gr2" draw:text-style-name="P2" draw:layer="layout" svg:width="6.729cm" svg:height="1.175cm" svg:x="1.842cm" svg:y="1.175cm">
          <draw:text-box>
            <text:p><text:span text:style-name="T1">Calibri (16pt by default)</text:span></text:p>
          </draw:text-box>
        </draw:frame>
        <draw:frame draw:style-name="gr2" draw:text-style-name="P2" draw:layer="layout" svg:width="6.729cm" svg:height="1.175cm" svg:x="1.843cm" svg:y="1.176cm">
          <draw:text-box>
            <text:p><text:span text:style-name="T1">Calibri (16pt by default)</text:span></text:p>
          </draw:text-box>
        </draw:frame>
        <draw:frame draw:style-name="gr3" draw:text-style-name="P4" draw:layer="layout" svg:width="4.506cm" svg:height="1.631cm" svg:x="5.984cm" svg:y="12.883cm">
          <draw:text-box>
            <text:p text:style-name="P3"><text:span text:style-name="T1">Generic</text:span></text:p>
            <text:p text:style-name="P3"><text:span text:style-name="T1">Switch</text:span></text:p>
          </draw:text-box>
        </draw:frame>
        <draw:frame draw:style-name="gr1" draw:text-style-name="P1" draw:layer="layout" svg:width="2.388cm" svg:height="1.682cm" svg:x="10.761cm" svg:y="10.922cm">
          <draw:image xlink:href="Pictures/10004B2B000068BB000049DD8AB69D38.pdf" xlink:type="simple" xlink:show="embed" xlink:actuate="onLoad" draw:mime-type="application/pdf">
            <text:p/>
          </draw:image>
          <draw:image xlink:href="Pictures/100000010000047400000324E1A3B353.png" xlink:type="simple" xlink:show="embed" xlink:actuate="onLoad" draw:mime-type="image/png"/>
        </draw:frame>
        <draw:frame draw:style-name="gr3" draw:text-style-name="P4" draw:layer="layout" svg:width="4.506cm" svg:height="1.631cm" svg:x="9.889cm" svg:y="12.884cm">
          <draw:text-box>
            <text:p text:style-name="P3"><text:span text:style-name="T1">User</text:span></text:p>
          </draw:text-box>
        </draw:frame>
        <draw:frame draw:style-name="gr3" draw:text-style-name="P4" draw:layer="layout" svg:width="4.506cm" svg:height="1.631cm" svg:x="5.984cm" svg:y="12.884cm">
          <draw:text-box>
            <text:p text:style-name="P3"><text:span text:style-name="T1">Generic</text:span></text:p>
            <text:p text:style-name="P3"><text:span text:style-name="T1">Switch</text:span></text:p>
          </draw:text-box>
        </draw:frame>
        <draw:frame draw:style-name="gr3" draw:text-style-name="P4" draw:layer="layout" svg:width="4.506cm" svg:height="1.631cm" svg:x="13.589cm" svg:y="12.885cm">
          <draw:text-box>
            <text:p text:style-name="P3"><text:span text:style-name="T1">UE</text:span></text:p>
            <text:p text:style-name="P3"><text:span text:style-name="T1">Phone</text:span></text:p>
          </draw:text-box>
        </draw:frame>
        <draw:frame draw:style-name="gr3" draw:text-style-name="P4" draw:layer="layout" svg:width="4.506cm" svg:height="1.631cm" svg:x="13.589cm" svg:y="12.886cm">
          <draw:text-box>
            <text:p text:style-name="P3"><text:span text:style-name="T1">UE</text:span></text:p>
            <text:p text:style-name="P3"><text:span text:style-name="T1">Phone</text:span></text:p>
          </draw:text-box>
        </draw:frame>
        <draw:frame draw:style-name="gr3" draw:text-style-name="P4" draw:layer="layout" svg:width="4.506cm" svg:height="1.631cm" svg:x="17.089cm" svg:y="12.887cm">
          <draw:text-box>
            <text:p text:style-name="P3"><text:span text:style-name="T1">Generic Office</text:span></text:p>
            <text:p text:style-name="P3"><text:span text:style-name="T1">or Enterprise</text:span></text:p>
          </draw:text-box>
        </draw:frame>
        <draw:frame draw:style-name="gr3" draw:text-style-name="P4" draw:layer="layout" svg:width="4.506cm" svg:height="1.631cm" svg:x="13.589cm" svg:y="12.887cm">
          <draw:text-box>
            <text:p text:style-name="P3"><text:span text:style-name="T1">UE</text:span></text:p>
            <text:p text:style-name="P3"><text:span text:style-name="T1">Phone</text:span></text:p>
          </draw:text-box>
        </draw:frame>
        <draw:frame draw:style-name="gr3" draw:text-style-name="P4" draw:layer="layout" svg:width="4.506cm" svg:height="1.631cm" svg:x="21.789cm" svg:y="12.888cm">
          <draw:text-box>
            <text:p text:style-name="P3"><text:span text:style-name="T1">5G</text:span></text:p>
            <text:p text:style-name="P3"><text:span text:style-name="T1">Basestation</text:span></text:p>
          </draw:text-box>
        </draw:frame>
        <draw:frame draw:style-name="gr3" draw:text-style-name="P4" draw:layer="layout" svg:width="4.506cm" svg:height="1.631cm" svg:x="21.735cm" svg:y="7.008cm">
          <draw:text-box>
            <text:p text:style-name="P3"><text:span text:style-name="T1">WiFi</text:span></text:p>
            <text:p text:style-name="P3"><text:span text:style-name="T1">Access Point</text:span></text:p>
          </draw:text-box>
        </draw:frame>
        <draw:custom-shape draw:style-name="gr4" draw:text-style-name="P5" draw:layer="layout" svg:width="1.461cm" svg:height="0.889cm" svg:x="2.158cm" svg:y="2.594cm">
          <text:p/>
          <draw:enhanced-geometry svg:viewBox="0 0 21600 21600" draw:type="rectangle" draw:enhanced-path="M 0 0 L 21600 0 21600 21600 0 21600 0 0 Z N"/>
        </draw:custom-shape>
        <draw:custom-shape draw:style-name="gr5" draw:text-style-name="P6" draw:layer="layout" svg:width="1.461cm" svg:height="0.889cm" svg:x="2.158cm" svg:y="5.283cm">
          <text:p/>
          <draw:enhanced-geometry svg:viewBox="0 0 21600 21600" draw:type="rectangle" draw:enhanced-path="M 0 0 L 21600 0 21600 21600 0 21600 0 0 Z N"/>
        </draw:custom-shape>
        <draw:frame draw:style-name="gr2" draw:text-style-name="P2" draw:layer="layout" svg:width="6.729cm" svg:height="1.175cm" svg:x="3.744cm" svg:y="2.577cm">
          <draw:text-box>
            <text:p><text:span text:style-name="T1">Darker Color 0070c0</text:span></text:p>
          </draw:text-box>
        </draw:frame>
        <draw:frame draw:style-name="gr2" draw:text-style-name="P2" draw:layer="layout" svg:width="6.729cm" svg:height="1.175cm" svg:x="3.745cm" svg:y="5.178cm">
          <draw:text-box>
            <text:p><text:span text:style-name="T1">Lighter Color bdd7ee</text:span></text:p>
          </draw:text-box>
        </draw:frame>
        <draw:custom-shape draw:style-name="gr6" draw:text-style-name="P7" draw:layer="layout" svg:width="1.461cm" svg:height="0.889cm" svg:x="2.126cm" svg:y="3.916cm">
          <text:p/>
          <draw:enhanced-geometry svg:viewBox="0 0 21600 21600" draw:type="rectangle" draw:enhanced-path="M 0 0 L 21600 0 21600 21600 0 21600 0 0 Z N"/>
        </draw:custom-shape>
        <draw:frame draw:style-name="gr2" draw:text-style-name="P2" draw:layer="layout" svg:width="6.729cm" svg:height="1.175cm" svg:x="3.745cm" svg:y="3.878cm">
          <draw:text-box>
            <text:p><text:span text:style-name="T1">Default Color 6a99d0</text:span></text:p>
          </draw:text-box>
        </draw:frame>
        <draw:frame draw:style-name="gr1" draw:text-style-name="P1" draw:layer="layout" svg:width="2.947cm" svg:height="2.947cm" svg:x="6.708cm" svg:y="9.936cm">
          <draw:image xlink:href="Pictures/10000001000004B0000004B0D531CF7C.png" xlink:type="simple" xlink:show="embed" xlink:actuate="onLoad" draw:mime-type="image/png">
            <text:p/>
          </draw:image>
        </draw:frame>
        <draw:frame draw:style-name="gr1" draw:text-style-name="P1" draw:layer="layout" svg:width="2.974cm" svg:height="2.974cm" svg:x="22.445cm" svg:y="4.55cm">
          <draw:image xlink:href="Pictures/10000001000004B0000004B0B6C3AB3D.png" xlink:type="simple" xlink:show="embed" xlink:actuate="onLoad" draw:mime-type="image/png">
            <text:p/>
          </draw:image>
        </draw:frame>
        <draw:frame draw:style-name="gr1" draw:text-style-name="P1" draw:layer="layout" svg:width="2.7cm" svg:height="1.198cm" svg:x="6.708cm" svg:y="8.932cm">
          <draw:image xlink:href="Pictures/10000001000001370000008A3032A3C2.png" xlink:type="simple" xlink:show="embed" xlink:actuate="onLoad" draw:mime-type="image/png">
            <text:p/>
          </draw:image>
        </draw:frame>
        <presentation:notes draw:style-name="dp2">
          <draw:page-thumbnail draw:style-name="gr7" draw:layer="layout" svg:width="18.624cm" svg:height="10.476cm" svg:x="1.482cm" svg:y="2.123cm" draw:page-number="1" presentation:class="page"/>
          <draw:frame presentation:style-name="pr1" draw:text-style-name="P8" draw:layer="layout" svg:width="17.271cm" svg:height="12.572cm" svg:x="2.159cm" svg:y="13.271cm" presentation:class="notes" presentation:placeholder="true">
            <draw:text-box/>
          </draw:frame>
        </presentation:notes>
      </draw:page>
      <draw:page draw:name="DNS-oblivious" draw:style-name="dp3" draw:master-page-name="Blank" presentation:presentation-page-layout-name="AL1T0">
        <draw:frame draw:style-name="gr1" draw:text-style-name="P1" draw:layer="layout" svg:width="3cm" svg:height="2.5cm" svg:x="1.699cm" svg:y="2.198cm">
          <draw:image xlink:href="Pictures/10000001000004B0000004B07B09B8D8.png" xlink:type="simple" xlink:show="embed" xlink:actuate="onLoad" draw:mime-type="image/png">
            <text:p/>
          </draw:image>
        </draw:frame>
        <draw:frame draw:style-name="gr1" draw:text-style-name="P1" draw:layer="layout" svg:width="5.312cm" svg:height="5.312cm" svg:x="8.076cm" svg:y="0.713cm">
          <draw:image xlink:href="Pictures/10000001000004B0000004B02D8E20B8.png" xlink:type="simple" xlink:show="embed" xlink:actuate="onLoad" draw:mime-type="image/png">
            <text:p/>
          </draw:image>
        </draw:frame>
        <draw:frame draw:style-name="gr8" draw:text-style-name="P9" draw:layer="layout" svg:width="1.661cm" svg:height="0.852cm" svg:x="2.25cm" svg:y="4.423cm">
          <draw:text-box>
            <text:p><text:span text:style-name="T2">Client</text:span></text:p>
          </draw:text-box>
        </draw:frame>
        <draw:frame draw:style-name="gr9" draw:text-style-name="P10" draw:layer="layout" svg:width="3.316cm" svg:height="1.453cm" svg:x="9.238cm" svg:y="4.474cm">
          <draw:text-box>
            <text:p text:style-name="P3"><text:span text:style-name="T2">Server</text:span><text:span text:style-name="T3"> </text:span></text:p>
          </draw:text-box>
        </draw:frame>
        <draw:line draw:style-name="gr10" draw:text-style-name="P1" draw:layer="layout" svg:x1="4.507cm" svg:y1="2.8cm" svg:x2="9.204cm" svg:y2="2.806cm">
          <text:p/>
        </draw:line>
        <draw:line draw:style-name="gr11" draw:text-style-name="P1" draw:layer="layout" svg:x1="9.04cm" svg:y1="3.835cm" svg:x2="4.507cm" svg:y2="3.84cm">
          <text:p/>
        </draw:line>
        <draw:g draw:style-name="gr12">
          <draw:g draw:name="Group 2" draw:style-name="gr12">
            <draw:custom-shape draw:name="Rectangle 3" draw:style-name="gr13" draw:text-style-name="P11" draw:layer="layout" svg:width="4.327cm" svg:height="1.254cm" svg:x="4.62cm" svg:y="0.8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4" draw:text-style-name="P11" draw:layer="layout" svg:width="4.305cm" svg:height="0.409cm" svg:x="4.636cm" svg:y="0.894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5" draw:text-style-name="P12" draw:layer="layout" draw:type="line" svg:x1="5.821cm" svg:y1="1.182cm" svg:x2="4.635cm" svg:y2="2.15cm" svg:d="M5821 1182l-1186 968" svg:viewBox="0 0 1187 969">
              <text:p/>
            </draw:connector>
            <draw:connector draw:name="Straight Connector 4" draw:style-name="gr15" draw:text-style-name="P12" draw:layer="layout" draw:type="line" svg:x1="7.779cm" svg:y1="1.218cm" svg:x2="8.941cm" svg:y2="2.15cm" svg:d="M7779 1218l1162 932" svg:viewBox="0 0 1163 933">
              <text:p/>
            </draw:connector>
          </draw:g>
          <draw:frame draw:style-name="gr16" draw:text-style-name="P13" draw:layer="layout" svg:width="1.741cm" svg:height="0.852cm" svg:x="5.904cm" svg:y="1.303cm">
            <draw:text-box>
              <text:p><text:span text:style-name="T4">Query</text:span></text:p>
            </draw:text-box>
          </draw:frame>
        </draw:g>
        <draw:g draw:style-name="gr12">
          <draw:g draw:name="Group 2" draw:style-name="gr12">
            <draw:custom-shape draw:name="Rectangle 3" draw:style-name="gr17" draw:text-style-name="P11" draw:layer="layout" svg:width="4.273cm" svg:height="1.254cm" svg:x="4.661cm" svg:y="4.3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8" draw:text-style-name="P11" draw:layer="layout" svg:width="4.251cm" svg:height="0.409cm" svg:x="4.676cm" svg:y="4.37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5" draw:text-style-name="P12" draw:layer="layout" draw:type="line" svg:x1="5.847cm" svg:y1="4.658cm" svg:x2="4.675cm" svg:y2="5.626cm" svg:d="M5847 4658l-1172 968" svg:viewBox="0 0 1173 969">
              <text:p/>
            </draw:connector>
            <draw:connector draw:name="Straight Connector 4" draw:style-name="gr15" draw:text-style-name="P12" draw:layer="layout" draw:type="line" svg:x1="7.781cm" svg:y1="4.694cm" svg:x2="8.927cm" svg:y2="5.626cm" svg:d="M7781 4694l1146 932" svg:viewBox="0 0 1147 933">
              <text:p/>
            </draw:connector>
          </draw:g>
          <draw:frame draw:style-name="gr19" draw:text-style-name="P13" draw:layer="layout" svg:width="2.491cm" svg:height="0.852cm" svg:x="5.564cm" svg:y="4.779cm">
            <draw:text-box>
              <text:p><text:span text:style-name="T4">Response</text:span></text:p>
            </draw:text-box>
          </draw:frame>
        </draw:g>
        <draw:custom-shape draw:name="Freeform 2" draw:style-name="gr20" draw:text-style-name="P14" draw:layer="layout" svg:width="6.952cm" svg:height="3.252cm" svg:x="7.234cm" svg:y="8.866cm">
          <text:p/>
          <draw:enhanced-geometry svg:viewBox="0 0 386 244" draw:text-areas="?f170 ?f172 ?f171 ?f173" draw:glue-points="?f89 ?f90 ?f91 ?f90 ?f92 ?f93 ?f94 ?f95 ?f96 ?f97 ?f98 ?f99 ?f100 ?f101 ?f102 ?f103 ?f104 ?f105 ?f94 ?f106 ?f107 ?f108 ?f109 ?f110 ?f111 ?f112 ?f113 ?f114 ?f115 ?f116 ?f117 ?f118 ?f119 ?f120 ?f89 ?f90 ?f121 ?f122 ?f123 ?f124 ?f91 ?f125 ?f126 ?f127 ?f128 ?f129 ?f130 ?f131 ?f132 ?f122 ?f133 ?f134 ?f135 ?f136 ?f137 ?f138 ?f117 ?f139 ?f140 ?f141 ?f142 ?f143 ?f142 ?f143 ?f144 ?f145 ?f146 ?f147 ?f148 ?f149 ?f150 ?f151 ?f152 ?f153 ?f154 ?f155 ?f156 ?f157 ?f158 ?f159 ?f160 ?f101 ?f98 ?f161 ?f154 ?f162 ?f163 ?f164 ?f165 ?f166 ?f167 ?f118 ?f168 ?f169 ?f121 ?f122" draw:type="non-primitive" draw:enhanced-path="M 242 244 C 242 244 241 244 241 244 224 244 208 238 196 226 182 234 164 238 146 238 123 237 101 229 86 216 79 219 70 220 62 220 27 219 0 191 1 158 2 124 30 97 65 98 67 98 70 98 72 99 82 67 112 46 146 47 154 47 162 49 169 51 184 19 215 0 249 1 291 2 326 35 333 79 364 85 386 116 385 152 385 172 376 192 362 205 350 216 335 222 319 222 312 222 305 220 298 217 285 234 264 244 242 244 Z M 199 206 C 203 211 203 211 203 211 213 222 227 228 241 228 260 229 278 219 288 203 293 196 293 196 293 196 299 200 299 200 299 200 306 204 313 206 320 206 331 206 342 202 351 193 362 183 369 168 369 151 370 121 351 96 325 94 319 93 319 93 319 93 318 87 318 87 318 87 315 48 285 18 248 17 248 17 248 17 248 17 219 16 192 35 181 64 177 72 177 72 177 72 170 69 170 69 170 69 162 65 154 63 145 63 117 62 92 82 85 110 84 118 84 118 84 118 76 116 76 116 76 116 72 115 68 114 64 114 39 114 18 133 17 158 17 183 37 204 62 204 70 204 78 203 84 199 89 197 89 197 89 197 94 201 94 201 94 201 106 213 125 221 147 222 164 222 180 218 193 210 L 199 20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6"/>
            <draw:equation draw:name="f7" draw:formula="?f4 / 244"/>
            <draw:equation draw:name="f8" draw:formula="242 * ?f5 / 386"/>
            <draw:equation draw:name="f9" draw:formula="244 * ?f4 / 244"/>
            <draw:equation draw:name="f10" draw:formula="241 * ?f5 / 386"/>
            <draw:equation draw:name="f11" draw:formula="196 * ?f5 / 386"/>
            <draw:equation draw:name="f12" draw:formula="226 * ?f4 / 244"/>
            <draw:equation draw:name="f13" draw:formula="146 * ?f5 / 386"/>
            <draw:equation draw:name="f14" draw:formula="238 * ?f4 / 244"/>
            <draw:equation draw:name="f15" draw:formula="86 * ?f5 / 386"/>
            <draw:equation draw:name="f16" draw:formula="216 * ?f4 / 244"/>
            <draw:equation draw:name="f17" draw:formula="62 * ?f5 / 386"/>
            <draw:equation draw:name="f18" draw:formula="220 * ?f4 / 244"/>
            <draw:equation draw:name="f19" draw:formula="1 * ?f5 / 386"/>
            <draw:equation draw:name="f20" draw:formula="158 * ?f4 / 244"/>
            <draw:equation draw:name="f21" draw:formula="65 * ?f5 / 386"/>
            <draw:equation draw:name="f22" draw:formula="98 * ?f4 / 244"/>
            <draw:equation draw:name="f23" draw:formula="72 * ?f5 / 386"/>
            <draw:equation draw:name="f24" draw:formula="99 * ?f4 / 244"/>
            <draw:equation draw:name="f25" draw:formula="47 * ?f4 / 244"/>
            <draw:equation draw:name="f26" draw:formula="169 * ?f5 / 386"/>
            <draw:equation draw:name="f27" draw:formula="51 * ?f4 / 244"/>
            <draw:equation draw:name="f28" draw:formula="249 * ?f5 / 386"/>
            <draw:equation draw:name="f29" draw:formula="1 * ?f4 / 244"/>
            <draw:equation draw:name="f30" draw:formula="333 * ?f5 / 386"/>
            <draw:equation draw:name="f31" draw:formula="79 * ?f4 / 244"/>
            <draw:equation draw:name="f32" draw:formula="385 * ?f5 / 386"/>
            <draw:equation draw:name="f33" draw:formula="152 * ?f4 / 244"/>
            <draw:equation draw:name="f34" draw:formula="362 * ?f5 / 386"/>
            <draw:equation draw:name="f35" draw:formula="205 * ?f4 / 244"/>
            <draw:equation draw:name="f36" draw:formula="319 * ?f5 / 386"/>
            <draw:equation draw:name="f37" draw:formula="222 * ?f4 / 244"/>
            <draw:equation draw:name="f38" draw:formula="298 * ?f5 / 386"/>
            <draw:equation draw:name="f39" draw:formula="217 * ?f4 / 244"/>
            <draw:equation draw:name="f40" draw:formula="199 * ?f5 / 386"/>
            <draw:equation draw:name="f41" draw:formula="206 * ?f4 / 244"/>
            <draw:equation draw:name="f42" draw:formula="203 * ?f5 / 386"/>
            <draw:equation draw:name="f43" draw:formula="211 * ?f4 / 244"/>
            <draw:equation draw:name="f44" draw:formula="228 * ?f4 / 244"/>
            <draw:equation draw:name="f45" draw:formula="288 * ?f5 / 386"/>
            <draw:equation draw:name="f46" draw:formula="203 * ?f4 / 244"/>
            <draw:equation draw:name="f47" draw:formula="293 * ?f5 / 386"/>
            <draw:equation draw:name="f48" draw:formula="196 * ?f4 / 244"/>
            <draw:equation draw:name="f49" draw:formula="299 * ?f5 / 386"/>
            <draw:equation draw:name="f50" draw:formula="200 * ?f4 / 244"/>
            <draw:equation draw:name="f51" draw:formula="320 * ?f5 / 386"/>
            <draw:equation draw:name="f52" draw:formula="351 * ?f5 / 386"/>
            <draw:equation draw:name="f53" draw:formula="193 * ?f4 / 244"/>
            <draw:equation draw:name="f54" draw:formula="369 * ?f5 / 386"/>
            <draw:equation draw:name="f55" draw:formula="151 * ?f4 / 244"/>
            <draw:equation draw:name="f56" draw:formula="325 * ?f5 / 386"/>
            <draw:equation draw:name="f57" draw:formula="94 * ?f4 / 244"/>
            <draw:equation draw:name="f58" draw:formula="93 * ?f4 / 244"/>
            <draw:equation draw:name="f59" draw:formula="318 * ?f5 / 386"/>
            <draw:equation draw:name="f60" draw:formula="87 * ?f4 / 244"/>
            <draw:equation draw:name="f61" draw:formula="248 * ?f5 / 386"/>
            <draw:equation draw:name="f62" draw:formula="17 * ?f4 / 244"/>
            <draw:equation draw:name="f63" draw:formula="181 * ?f5 / 386"/>
            <draw:equation draw:name="f64" draw:formula="64 * ?f4 / 244"/>
            <draw:equation draw:name="f65" draw:formula="177 * ?f5 / 386"/>
            <draw:equation draw:name="f66" draw:formula="72 * ?f4 / 244"/>
            <draw:equation draw:name="f67" draw:formula="170 * ?f5 / 386"/>
            <draw:equation draw:name="f68" draw:formula="69 * ?f4 / 244"/>
            <draw:equation draw:name="f69" draw:formula="145 * ?f5 / 386"/>
            <draw:equation draw:name="f70" draw:formula="63 * ?f4 / 244"/>
            <draw:equation draw:name="f71" draw:formula="85 * ?f5 / 386"/>
            <draw:equation draw:name="f72" draw:formula="110 * ?f4 / 244"/>
            <draw:equation draw:name="f73" draw:formula="84 * ?f5 / 386"/>
            <draw:equation draw:name="f74" draw:formula="118 * ?f4 / 244"/>
            <draw:equation draw:name="f75" draw:formula="76 * ?f5 / 386"/>
            <draw:equation draw:name="f76" draw:formula="116 * ?f4 / 244"/>
            <draw:equation draw:name="f77" draw:formula="64 * ?f5 / 386"/>
            <draw:equation draw:name="f78" draw:formula="114 * ?f4 / 244"/>
            <draw:equation draw:name="f79" draw:formula="17 * ?f5 / 386"/>
            <draw:equation draw:name="f80" draw:formula="204 * ?f4 / 244"/>
            <draw:equation draw:name="f81" draw:formula="199 * ?f4 / 244"/>
            <draw:equation draw:name="f82" draw:formula="89 * ?f5 / 386"/>
            <draw:equation draw:name="f83" draw:formula="197 * ?f4 / 244"/>
            <draw:equation draw:name="f84" draw:formula="94 * ?f5 / 386"/>
            <draw:equation draw:name="f85" draw:formula="201 * ?f4 / 244"/>
            <draw:equation draw:name="f86" draw:formula="147 * ?f5 / 386"/>
            <draw:equation draw:name="f87" draw:formula="193 * ?f5 / 386"/>
            <draw:equation draw:name="f88" draw:formula="210 * ?f4 / 244"/>
            <draw:equation draw:name="f89" draw:formula="?f8 / ?f6"/>
            <draw:equation draw:name="f90" draw:formula="?f9 / ?f7"/>
            <draw:equation draw:name="f91" draw:formula="?f10 / ?f6"/>
            <draw:equation draw:name="f92" draw:formula="?f11 / ?f6"/>
            <draw:equation draw:name="f93" draw:formula="?f12 / ?f7"/>
            <draw:equation draw:name="f94" draw:formula="?f13 / ?f6"/>
            <draw:equation draw:name="f95" draw:formula="?f14 / ?f7"/>
            <draw:equation draw:name="f96" draw:formula="?f15 / ?f6"/>
            <draw:equation draw:name="f97" draw:formula="?f16 / ?f7"/>
            <draw:equation draw:name="f98" draw:formula="?f17 / ?f6"/>
            <draw:equation draw:name="f99" draw:formula="?f18 / ?f7"/>
            <draw:equation draw:name="f100" draw:formula="?f19 / ?f6"/>
            <draw:equation draw:name="f101" draw:formula="?f20 / ?f7"/>
            <draw:equation draw:name="f102" draw:formula="?f21 / ?f6"/>
            <draw:equation draw:name="f103" draw:formula="?f22 / ?f7"/>
            <draw:equation draw:name="f104" draw:formula="?f23 / ?f6"/>
            <draw:equation draw:name="f105" draw:formula="?f24 / ?f7"/>
            <draw:equation draw:name="f106" draw:formula="?f25 / ?f7"/>
            <draw:equation draw:name="f107" draw:formula="?f26 / ?f6"/>
            <draw:equation draw:name="f108" draw:formula="?f27 / ?f7"/>
            <draw:equation draw:name="f109" draw:formula="?f28 / ?f6"/>
            <draw:equation draw:name="f110" draw:formula="?f29 / ?f7"/>
            <draw:equation draw:name="f111" draw:formula="?f30 / ?f6"/>
            <draw:equation draw:name="f112" draw:formula="?f31 / ?f7"/>
            <draw:equation draw:name="f113" draw:formula="?f32 / ?f6"/>
            <draw:equation draw:name="f114" draw:formula="?f33 / ?f7"/>
            <draw:equation draw:name="f115" draw:formula="?f34 / ?f6"/>
            <draw:equation draw:name="f116" draw:formula="?f35 / ?f7"/>
            <draw:equation draw:name="f117" draw:formula="?f36 / ?f6"/>
            <draw:equation draw:name="f118" draw:formula="?f37 / ?f7"/>
            <draw:equation draw:name="f119" draw:formula="?f38 / ?f6"/>
            <draw:equation draw:name="f120" draw:formula="?f39 / ?f7"/>
            <draw:equation draw:name="f121" draw:formula="?f40 / ?f6"/>
            <draw:equation draw:name="f122" draw:formula="?f41 / ?f7"/>
            <draw:equation draw:name="f123" draw:formula="?f42 / ?f6"/>
            <draw:equation draw:name="f124" draw:formula="?f43 / ?f7"/>
            <draw:equation draw:name="f125" draw:formula="?f44 / ?f7"/>
            <draw:equation draw:name="f126" draw:formula="?f45 / ?f6"/>
            <draw:equation draw:name="f127" draw:formula="?f46 / ?f7"/>
            <draw:equation draw:name="f128" draw:formula="?f47 / ?f6"/>
            <draw:equation draw:name="f129" draw:formula="?f48 / ?f7"/>
            <draw:equation draw:name="f130" draw:formula="?f49 / ?f6"/>
            <draw:equation draw:name="f131" draw:formula="?f50 / ?f7"/>
            <draw:equation draw:name="f132" draw:formula="?f51 / ?f6"/>
            <draw:equation draw:name="f133" draw:formula="?f52 / ?f6"/>
            <draw:equation draw:name="f134" draw:formula="?f53 / ?f7"/>
            <draw:equation draw:name="f135" draw:formula="?f54 / ?f6"/>
            <draw:equation draw:name="f136" draw:formula="?f55 / ?f7"/>
            <draw:equation draw:name="f137" draw:formula="?f56 / ?f6"/>
            <draw:equation draw:name="f138" draw:formula="?f57 / ?f7"/>
            <draw:equation draw:name="f139" draw:formula="?f58 / ?f7"/>
            <draw:equation draw:name="f140" draw:formula="?f59 / ?f6"/>
            <draw:equation draw:name="f141" draw:formula="?f60 / ?f7"/>
            <draw:equation draw:name="f142" draw:formula="?f61 / ?f6"/>
            <draw:equation draw:name="f143" draw:formula="?f62 / ?f7"/>
            <draw:equation draw:name="f144" draw:formula="?f63 / ?f6"/>
            <draw:equation draw:name="f145" draw:formula="?f64 / ?f7"/>
            <draw:equation draw:name="f146" draw:formula="?f65 / ?f6"/>
            <draw:equation draw:name="f147" draw:formula="?f66 / ?f7"/>
            <draw:equation draw:name="f148" draw:formula="?f67 / ?f6"/>
            <draw:equation draw:name="f149" draw:formula="?f68 / ?f7"/>
            <draw:equation draw:name="f150" draw:formula="?f69 / ?f6"/>
            <draw:equation draw:name="f151" draw:formula="?f70 / ?f7"/>
            <draw:equation draw:name="f152" draw:formula="?f71 / ?f6"/>
            <draw:equation draw:name="f153" draw:formula="?f72 / ?f7"/>
            <draw:equation draw:name="f154" draw:formula="?f73 / ?f6"/>
            <draw:equation draw:name="f155" draw:formula="?f74 / ?f7"/>
            <draw:equation draw:name="f156" draw:formula="?f75 / ?f6"/>
            <draw:equation draw:name="f157" draw:formula="?f76 / ?f7"/>
            <draw:equation draw:name="f158" draw:formula="?f77 / ?f6"/>
            <draw:equation draw:name="f159" draw:formula="?f78 / ?f7"/>
            <draw:equation draw:name="f160" draw:formula="?f79 / ?f6"/>
            <draw:equation draw:name="f161" draw:formula="?f80 / ?f7"/>
            <draw:equation draw:name="f162" draw:formula="?f81 / ?f7"/>
            <draw:equation draw:name="f163" draw:formula="?f82 / ?f6"/>
            <draw:equation draw:name="f164" draw:formula="?f83 / ?f7"/>
            <draw:equation draw:name="f165" draw:formula="?f84 / ?f6"/>
            <draw:equation draw:name="f166" draw:formula="?f85 / ?f7"/>
            <draw:equation draw:name="f167" draw:formula="?f86 / ?f6"/>
            <draw:equation draw:name="f168" draw:formula="?f87 / ?f6"/>
            <draw:equation draw:name="f169" draw:formula="?f88 / ?f7"/>
            <draw:equation draw:name="f170" draw:formula="0 / ?f6"/>
            <draw:equation draw:name="f171" draw:formula="?f1 / ?f6"/>
            <draw:equation draw:name="f172" draw:formula="0 / ?f7"/>
            <draw:equation draw:name="f173" draw:formula="?f3 / ?f7"/>
          </draw:enhanced-geometry>
        </draw:custom-shape>
        <draw:frame draw:style-name="gr9" draw:text-style-name="P10" draw:layer="layout" svg:width="3.316cm" svg:height="1.453cm" svg:x="9.371cm" svg:y="12.396cm">
          <draw:text-box>
            <text:p text:style-name="P3"><text:span text:style-name="T2">Cloud</text:span><text:span text:style-name="T3"> </text:span></text:p>
          </draw:text-box>
        </draw:frame>
        <draw:frame draw:style-name="gr1" draw:text-style-name="P1" draw:layer="layout" svg:width="2.283cm" svg:height="1.541cm" svg:x="2.939cm" svg:y="9.598cm">
          <draw:image xlink:href="Pictures/10000001000001F3000001510BDF560F.png" xlink:type="simple" xlink:show="embed" xlink:actuate="onLoad" draw:mime-type="image/png">
            <text:p/>
          </draw:image>
        </draw:frame>
        <draw:frame draw:style-name="gr9" draw:text-style-name="P10" draw:layer="layout" svg:width="3.316cm" svg:height="1.453cm" svg:x="2.581cm" svg:y="11.5cm">
          <draw:text-box>
            <text:p text:style-name="P3"><text:span text:style-name="T2">Router</text:span><text:span text:style-name="T3"> </text:span></text:p>
          </draw:text-box>
        </draw:frame>
        <draw:frame draw:style-name="gr1" draw:text-style-name="P1" draw:layer="layout" svg:width="2.612cm" svg:height="2.612cm" svg:x="13.388cm" svg:y="1.81cm">
          <draw:image xlink:href="Pictures/10000001000004B0000004B065953AC9.png" xlink:type="simple" xlink:show="embed" xlink:actuate="onLoad" draw:mime-type="image/png">
            <text:p/>
          </draw:image>
        </draw:frame>
        <draw:frame draw:style-name="gr1" draw:text-style-name="P1" draw:layer="layout" svg:width="2.859cm" svg:height="2.859cm" svg:x="16.919cm" svg:y="1.777cm">
          <draw:image xlink:href="Pictures/10000001000004B0000004B0923FE4BE.png" xlink:type="simple" xlink:show="embed" xlink:actuate="onLoad" draw:mime-type="image/png">
            <text:p/>
          </draw:image>
        </draw:frame>
        <draw:frame draw:style-name="gr9" draw:text-style-name="P10" draw:layer="layout" svg:width="3.316cm" svg:height="1.453cm" svg:x="13.038cm" svg:y="4.475cm">
          <draw:text-box>
            <text:p text:style-name="P3"><text:span text:style-name="T2">Alt Server</text:span><text:span text:style-name="T3"> </text:span></text:p>
          </draw:text-box>
        </draw:frame>
        <draw:frame draw:style-name="gr9" draw:text-style-name="P10" draw:layer="layout" svg:width="3.316cm" svg:height="1.453cm" svg:x="16.538cm" svg:y="4.376cm">
          <draw:text-box>
            <text:p text:style-name="P3"><text:span text:style-name="T2">Alt Client</text:span><text:span text:style-name="T3"> </text:span></text:p>
          </draw:text-box>
        </draw:frame>
        <draw:g draw:style-name="gr12">
          <draw:custom-shape draw:style-name="gr21" draw:text-style-name="P15" draw:layer="layout" svg:width="7.487cm" svg:height="5.555cm" svg:x="17.32cm" svg:y="7.53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15" draw:layer="layout" svg:width="0.667cm" svg:height="1.053cm" svg:x="23.176cm" svg:y="10.312cm">
            <text:p/>
            <draw:enhanced-geometry svg:viewBox="0 0 21600 21600" draw:type="rectangle" draw:enhanced-path="M 0 0 L 21600 0 21600 21600 0 21600 0 0 Z N"/>
          </draw:custom-shape>
          <draw:custom-shape draw:style-name="gr23" draw:text-style-name="P15" draw:layer="layout" svg:width="0.253cm" svg:height="0.367cm" svg:x="24.29cm" svg:y="9.52cm">
            <text:p/>
            <draw:enhanced-geometry svg:viewBox="0 0 21600 21600" draw:type="rectangle" draw:enhanced-path="M 0 0 L 21600 0 21600 21600 0 21600 0 0 Z N"/>
          </draw:custom-shape>
          <draw:custom-shape draw:style-name="gr24" draw:text-style-name="P15" draw:layer="layout" svg:width="0.292cm" svg:height="0.712cm" svg:x="23.707cm" svg:y="8.26cm">
            <text:p/>
            <draw:enhanced-geometry svg:viewBox="0 0 21600 21600" draw:type="rectangle" draw:enhanced-path="M 0 0 L 21600 0 21600 21600 0 21600 0 0 Z N"/>
          </draw:custom-shape>
          <draw:custom-shape draw:style-name="gr25" draw:text-style-name="P15" draw:layer="layout" svg:width="0.667cm" svg:height="0.712cm" svg:x="22.22cm" svg:y="7.845cm">
            <text:p/>
            <draw:enhanced-geometry svg:viewBox="0 0 21600 21600" draw:type="rectangle" draw:enhanced-path="M 0 0 L 21600 0 21600 21600 0 21600 0 0 Z N"/>
          </draw:custom-shape>
          <draw:custom-shape draw:style-name="gr26" draw:text-style-name="P15" draw:layer="layout" svg:width="0.667cm" svg:height="0.338cm" svg:x="19.499cm" svg:y="8.219cm">
            <text:p/>
            <draw:enhanced-geometry svg:viewBox="0 0 21600 21600" draw:type="rectangle" draw:enhanced-path="M 0 0 L 21600 0 21600 21600 0 21600 0 0 Z N"/>
          </draw:custom-shape>
          <draw:custom-shape draw:style-name="gr27" draw:text-style-name="P15" draw:layer="layout" svg:width="0.425cm" svg:height="0.339cm" svg:x="17.982cm" svg:y="9.406cm">
            <text:p/>
            <draw:enhanced-geometry svg:viewBox="0 0 21600 21600" draw:type="rectangle" draw:enhanced-path="M 0 0 L 21600 0 21600 21600 0 21600 0 0 Z N"/>
          </draw:custom-shape>
          <draw:custom-shape draw:style-name="gr27" draw:text-style-name="P15" draw:layer="layout" svg:width="0.425cm" svg:height="0.339cm" svg:x="17.728cm" svg:y="10.642cm">
            <text:p/>
            <draw:enhanced-geometry svg:viewBox="0 0 21600 21600" draw:type="rectangle" draw:enhanced-path="M 0 0 L 21600 0 21600 21600 0 21600 0 0 Z N"/>
          </draw:custom-shape>
          <draw:custom-shape draw:style-name="gr27" draw:text-style-name="P15" draw:layer="layout" svg:width="0.425cm" svg:height="0.339cm" svg:x="19.927cm" svg:y="12.165cm">
            <text:p/>
            <draw:enhanced-geometry svg:viewBox="0 0 21600 21600" draw:type="rectangle" draw:enhanced-path="M 0 0 L 21600 0 21600 21600 0 21600 0 0 Z N"/>
          </draw:custom-shape>
          <draw:custom-shape draw:style-name="gr27" draw:text-style-name="P15" draw:layer="layout" svg:width="0.227cm" svg:height="0.339cm" svg:x="18.376cm" svg:y="11.733cm">
            <text:p/>
            <draw:enhanced-geometry svg:viewBox="0 0 21600 21600" draw:type="rectangle" draw:enhanced-path="M 0 0 L 21600 0 21600 21600 0 21600 0 0 Z N"/>
          </draw:custom-shape>
          <draw:custom-shape draw:style-name="gr23" draw:text-style-name="P15" draw:layer="layout" svg:width="0.253cm" svg:height="0.367cm" svg:x="21.078cm" svg:y="7.953cm">
            <text:p/>
            <draw:enhanced-geometry svg:viewBox="0 0 21600 21600" draw:type="rectangle" draw:enhanced-path="M 0 0 L 21600 0 21600 21600 0 21600 0 0 Z N"/>
          </draw:custom-shape>
          <draw:custom-shape draw:style-name="gr28" draw:text-style-name="P15" draw:layer="layout" svg:width="0.667cm" svg:height="0.571cm" svg:x="21.854cm" svg:y="11.649cm">
            <text:p/>
            <draw:enhanced-geometry svg:viewBox="0 0 21600 21600" draw:type="rectangle" draw:enhanced-path="M 0 0 L 21600 0 21600 21600 0 21600 0 0 Z N"/>
          </draw:custom-shape>
        </draw:g>
        <draw:frame draw:style-name="gr9" draw:text-style-name="P10" draw:layer="layout" svg:width="3.316cm" svg:height="1.453cm" svg:x="19.281cm" svg:y="13.541cm">
          <draw:text-box>
            <text:p text:style-name="P3"><text:span text:style-name="T3">Network</text:span></text:p>
          </draw:text-box>
        </draw:frame>
        <draw:frame draw:style-name="gr1" draw:text-style-name="P1" draw:layer="layout" svg:width="2.548cm" svg:height="2.548cm" svg:x="21.922cm" svg:y="1.829cm">
          <draw:image xlink:href="Pictures/10000001000004B0000004B0250C3613.png" xlink:type="simple" xlink:show="embed" xlink:actuate="onLoad" draw:mime-type="image/png">
            <text:p/>
          </draw:image>
        </draw:frame>
        <draw:frame draw:style-name="gr9" draw:text-style-name="P10" draw:layer="layout" svg:width="3.316cm" svg:height="1.453cm" svg:x="21.538cm" svg:y="4.077cm">
          <draw:text-box>
            <text:p text:style-name="P3"><text:span text:style-name="T3">Disk</text:span></text:p>
            <text:p text:style-name="P3"><text:span text:style-name="T3">Stable Store</text:span></text:p>
          </draw:text-box>
        </draw:frame>
        <presentation:notes draw:style-name="dp2">
          <draw:page-thumbnail draw:style-name="gr7"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3" draw:master-page-name="Blank" presentation:presentation-page-layout-name="AL2T1">
        <draw:custom-shape draw:style-name="gr29" draw:text-style-name="P15" draw:layer="layout" svg:width="1.856cm" svg:height="2.699cm" svg:x="19.35cm" svg:y="7.357cm">
          <text:p/>
          <draw:enhanced-geometry svg:viewBox="0 0 21600 21600" draw:type="rectangle" draw:enhanced-path="M 0 0 L 21600 0 21600 21600 0 21600 0 0 Z N"/>
        </draw:custom-shape>
        <draw:custom-shape draw:style-name="gr30" draw:text-style-name="P15" draw:layer="layout" svg:width="0.811cm" svg:height="1.825cm" svg:x="20.828cm" svg:y="2.094cm">
          <text:p/>
          <draw:enhanced-geometry svg:viewBox="0 0 21600 21600" draw:type="rectangle" draw:enhanced-path="M 0 0 L 21600 0 21600 21600 0 21600 0 0 Z N"/>
        </draw:custom-shape>
        <draw:custom-shape draw:style-name="gr31" draw:text-style-name="P15" draw:layer="layout" svg:width="1.856cm" svg:height="0.867cm" svg:x="9.118cm" svg:y="1.987cm">
          <text:p/>
          <draw:enhanced-geometry svg:viewBox="0 0 21600 21600" draw:type="rectangle" draw:enhanced-path="M 0 0 L 21600 0 21600 21600 0 21600 0 0 Z N"/>
        </draw:custom-shape>
        <draw:custom-shape draw:style-name="gr32" draw:text-style-name="P15" draw:layer="layout" svg:width="1.183cm" svg:height="0.867cm" svg:x="4.192cm" svg:y="8.204cm">
          <text:p/>
          <draw:enhanced-geometry svg:viewBox="0 0 21600 21600" draw:type="rectangle" draw:enhanced-path="M 0 0 L 21600 0 21600 21600 0 21600 0 0 Z N"/>
        </draw:custom-shape>
        <draw:custom-shape draw:style-name="gr33" draw:text-style-name="P15" draw:layer="layout" svg:width="1.184cm" svg:height="0.867cm" svg:x="10.31cm" svg:y="12.11cm">
          <text:p/>
          <draw:enhanced-geometry svg:viewBox="0 0 21600 21600" draw:type="rectangle" draw:enhanced-path="M 0 0 L 21600 0 21600 21600 0 21600 0 0 Z N"/>
        </draw:custom-shape>
        <draw:custom-shape draw:style-name="gr34" draw:text-style-name="P15" draw:layer="layout" svg:width="0.631cm" svg:height="0.869cm" svg:x="5.994cm" svg:y="11.002cm">
          <text:p/>
          <draw:enhanced-geometry svg:viewBox="0 0 21600 21600" draw:type="rectangle" draw:enhanced-path="M 0 0 L 21600 0 21600 21600 0 21600 0 0 Z N"/>
        </draw:custom-shape>
        <draw:custom-shape draw:style-name="gr35" draw:text-style-name="P15" draw:layer="layout" svg:width="0.702cm" svg:height="0.942cm" svg:x="13.514cm" svg:y="1.305cm">
          <text:p/>
          <draw:enhanced-geometry svg:viewBox="0 0 21600 21600" draw:type="rectangle" draw:enhanced-path="M 0 0 L 21600 0 21600 21600 0 21600 0 0 Z N"/>
        </draw:custom-shape>
        <draw:custom-shape draw:style-name="gr36" draw:text-style-name="P15" draw:layer="layout" svg:width="1.855cm" svg:height="1.464cm" svg:x="15.673cm" svg:y="10.787cm">
          <text:p/>
          <draw:enhanced-geometry svg:viewBox="0 0 21600 21600" draw:type="rectangle" draw:enhanced-path="M 0 0 L 21600 0 21600 21600 0 21600 0 0 Z N"/>
        </draw:custom-shape>
        <draw:custom-shape draw:style-name="gr37" draw:text-style-name="P15" draw:layer="layout" svg:width="1.716cm" svg:height="2.03cm" svg:x="19.751cm" svg:y="7.885cm">
          <text:p/>
          <draw:enhanced-geometry svg:viewBox="0 0 21600 21600" draw:type="rectangle" draw:enhanced-path="M 0 0 L 21600 0 21600 21600 0 21600 0 0 Z N"/>
        </draw:custom-shape>
        <draw:custom-shape draw:style-name="gr38" draw:text-style-name="P15" draw:layer="layout" svg:width="0.651cm" svg:height="1.019cm" svg:x="22.716cm" svg:y="5.691cm">
          <text:p/>
          <draw:enhanced-geometry svg:viewBox="0 0 21600 21600" draw:type="rectangle" draw:enhanced-path="M 0 0 L 21600 0 21600 21600 0 21600 0 0 Z N"/>
        </draw:custom-shape>
        <draw:frame draw:style-name="gr1" draw:text-style-name="P1" draw:layer="layout" svg:width="2.499cm" svg:height="1.062cm" svg:x="7.672cm" svg:y="4.413cm">
          <draw:image xlink:href="Pictures/10000001000001370000008A3032A3C2.png" xlink:type="simple" xlink:show="embed" xlink:actuate="onLoad" draw:mime-type="image/png">
            <text:p/>
          </draw:image>
        </draw:frame>
        <draw:frame draw:style-name="gr1" draw:text-style-name="P1" draw:layer="layout" svg:width="2.499cm" svg:height="1.062cm" svg:x="16.558cm" svg:y="4.413cm">
          <draw:image xlink:href="Pictures/10000001000001370000008A3032A3C2.png" xlink:type="simple" xlink:show="embed" xlink:actuate="onLoad" draw:mime-type="image/png">
            <text:p/>
          </draw:image>
        </draw:frame>
        <draw:frame draw:style-name="gr1" draw:text-style-name="P1" draw:layer="layout" svg:width="2.499cm" svg:height="1.062cm" svg:x="16.558cm" svg:y="10.797cm">
          <draw:image xlink:href="Pictures/10000001000001370000008A3032A3C2.png" xlink:type="simple" xlink:show="embed" xlink:actuate="onLoad" draw:mime-type="image/png">
            <text:p/>
          </draw:image>
        </draw:frame>
        <draw:frame draw:style-name="gr1" draw:text-style-name="P1" draw:layer="layout" svg:width="2.499cm" svg:height="1.062cm" svg:x="12.101cm" svg:y="7.96cm">
          <draw:image xlink:href="Pictures/10000001000001370000008A3032A3C2.png" xlink:type="simple" xlink:show="embed" xlink:actuate="onLoad" draw:mime-type="image/png">
            <text:p/>
          </draw:image>
        </draw:frame>
        <draw:line draw:style-name="gr39" draw:text-style-name="P1" draw:layer="layout" svg:x1="13.934cm" svg:y1="8.017cm" svg:x2="17.483cm" svg:y2="5.359cm">
          <text:p/>
        </draw:line>
        <draw:line draw:style-name="gr39" draw:text-style-name="P1" draw:layer="layout" svg:x1="13.901cm" svg:y1="8.885cm" svg:x2="17.924cm" svg:y2="10.849cm">
          <text:p/>
        </draw:line>
        <draw:line draw:style-name="gr39" draw:text-style-name="P1" draw:layer="layout" svg:x1="9.085cm" svg:y1="5.339cm" svg:x2="12.893cm" svg:y2="8.031cm">
          <text:p/>
        </draw:line>
        <draw:custom-shape draw:style-name="gr40" draw:text-style-name="P15" draw:layer="layout" svg:width="1.589cm" svg:height="0.834cm" svg:x="10.051cm" svg:y="1.98cm">
          <text:p/>
          <draw:enhanced-geometry svg:viewBox="0 0 21600 21600" draw:type="rectangle" draw:enhanced-path="M 0 0 L 21600 0 21600 21600 0 21600 0 0 Z N"/>
        </draw:custom-shape>
        <draw:custom-shape draw:style-name="gr41" draw:text-style-name="P15" draw:layer="layout" svg:width="1.012cm" svg:height="0.834cm" svg:x="6.441cm" svg:y="4.906cm">
          <text:p/>
          <draw:enhanced-geometry svg:viewBox="0 0 21600 21600" draw:type="rectangle" draw:enhanced-path="M 0 0 L 21600 0 21600 21600 0 21600 0 0 Z N"/>
        </draw:custom-shape>
        <draw:custom-shape draw:style-name="gr41" draw:text-style-name="P15" draw:layer="layout" svg:width="1.012cm" svg:height="0.834cm" svg:x="5.836cm" svg:y="7.95cm">
          <text:p/>
          <draw:enhanced-geometry svg:viewBox="0 0 21600 21600" draw:type="rectangle" draw:enhanced-path="M 0 0 L 21600 0 21600 21600 0 21600 0 0 Z N"/>
        </draw:custom-shape>
        <draw:custom-shape draw:style-name="gr42" draw:text-style-name="P15" draw:layer="layout" svg:width="1.012cm" svg:height="0.833cm" svg:x="11.072cm" svg:y="11.702cm">
          <text:p/>
          <draw:enhanced-geometry svg:viewBox="0 0 21600 21600" draw:type="rectangle" draw:enhanced-path="M 0 0 L 21600 0 21600 21600 0 21600 0 0 Z N"/>
        </draw:custom-shape>
        <draw:custom-shape draw:style-name="gr43" draw:text-style-name="P15" draw:layer="layout" svg:width="0.541cm" svg:height="0.833cm" svg:x="7.378cm" svg:y="10.638cm">
          <text:p/>
          <draw:enhanced-geometry svg:viewBox="0 0 21600 21600" draw:type="rectangle" draw:enhanced-path="M 0 0 L 21600 0 21600 21600 0 21600 0 0 Z N"/>
        </draw:custom-shape>
        <draw:frame draw:style-name="gr1" draw:text-style-name="P1" draw:layer="layout" svg:width="2.499cm" svg:height="1.062cm" svg:x="7.672cm" svg:y="10.797cm">
          <draw:image xlink:href="Pictures/10000001000001370000008A3032A3C2.png" xlink:type="simple" xlink:show="embed" xlink:actuate="onLoad" draw:mime-type="image/png">
            <text:p/>
          </draw:image>
        </draw:frame>
        <draw:custom-shape draw:style-name="gr44" draw:text-style-name="P15" draw:layer="layout" svg:width="0.603cm" svg:height="0.903cm" svg:x="13.812cm" svg:y="1.326cm">
          <text:p/>
          <draw:enhanced-geometry svg:viewBox="0 0 21600 21600" draw:type="rectangle" draw:enhanced-path="M 0 0 L 21600 0 21600 21600 0 21600 0 0 Z N"/>
        </draw:custom-shape>
        <draw:frame draw:style-name="gr1" draw:text-style-name="P1" draw:layer="layout" svg:width="2.499cm" svg:height="1.062cm" svg:x="12.101cm" svg:y="1.614cm">
          <draw:image xlink:href="Pictures/10000001000001370000008A3032A3C2.png" xlink:type="simple" xlink:show="embed" xlink:actuate="onLoad" draw:mime-type="image/png">
            <text:p/>
          </draw:image>
        </draw:frame>
        <draw:line draw:style-name="gr45" draw:text-style-name="P1" draw:layer="layout" svg:x1="9.933cm" svg:y1="11.298cm" svg:x2="16.811cm" svg:y2="11.298cm">
          <text:p/>
        </draw:line>
        <draw:line draw:style-name="gr39" draw:text-style-name="P1" draw:layer="layout" svg:x1="8.963cm" svg:y1="10.839cm" svg:x2="12.7cm" svg:y2="8.904cm">
          <text:p/>
        </draw:line>
        <draw:line draw:style-name="gr45" draw:text-style-name="P1" draw:layer="layout" svg:x1="14.088cm" svg:y1="2.392cm" svg:x2="17.213cm" svg:y2="4.508cm">
          <text:p/>
        </draw:line>
        <draw:line draw:style-name="gr39" draw:text-style-name="P1" draw:layer="layout" svg:x1="9.712cm" svg:y1="4.468cm" svg:x2="12.455cm" svg:y2="2.563cm">
          <text:p/>
        </draw:line>
        <draw:frame draw:style-name="gr1" draw:text-style-name="P1" draw:layer="layout" svg:width="2.499cm" svg:height="1.062cm" svg:x="20.179cm" svg:y="7.885cm">
          <draw:image xlink:href="Pictures/10000001000001370000008A3032A3C2.png" xlink:type="simple" xlink:show="embed" xlink:actuate="onLoad" draw:mime-type="image/png">
            <text:p/>
          </draw:image>
        </draw:frame>
        <draw:line draw:style-name="gr39" draw:text-style-name="P1" draw:layer="layout" svg:x1="14.349cm" svg:y1="8.444cm" svg:x2="20.381cm" svg:y2="8.444cm">
          <text:p/>
        </draw:line>
        <draw:line draw:style-name="gr45" draw:text-style-name="P1" draw:layer="layout" svg:x1="17.936cm" svg:y1="5.27cm" svg:x2="21.425cm" svg:y2="7.949cm">
          <text:p/>
        </draw:line>
        <draw:frame draw:style-name="gr46" draw:text-style-name="P16" draw:layer="layout" svg:width="0.987cm" svg:height="0.852cm" svg:x="12.86cm" svg:y="8.26cm">
          <draw:text-box>
            <text:p><text:span text:style-name="T5">S1</text:span></text:p>
          </draw:text-box>
        </draw:frame>
        <draw:frame draw:style-name="gr46" draw:text-style-name="P16" draw:layer="layout" svg:width="0.987cm" svg:height="0.852cm" svg:x="8.422cm" svg:y="4.721cm">
          <draw:text-box>
            <text:p><text:span text:style-name="T5">S2</text:span></text:p>
          </draw:text-box>
        </draw:frame>
        <draw:frame draw:style-name="gr46" draw:text-style-name="P16" draw:layer="layout" svg:width="0.987cm" svg:height="0.852cm" svg:x="12.854cm" svg:y="1.92cm">
          <draw:text-box>
            <text:p><text:span text:style-name="T5">S3</text:span></text:p>
          </draw:text-box>
        </draw:frame>
        <draw:frame draw:style-name="gr46" draw:text-style-name="P16" draw:layer="layout" svg:width="0.987cm" svg:height="0.852cm" svg:x="17.345cm" svg:y="11.099cm">
          <draw:text-box>
            <text:p><text:span text:style-name="T5">S4</text:span></text:p>
          </draw:text-box>
        </draw:frame>
        <draw:frame draw:style-name="gr46" draw:text-style-name="P16" draw:layer="layout" svg:width="0.987cm" svg:height="0.852cm" svg:x="8.446cm" svg:y="11.108cm">
          <draw:text-box>
            <text:p><text:span text:style-name="T5">S6</text:span></text:p>
          </draw:text-box>
        </draw:frame>
        <draw:frame draw:style-name="gr46" draw:text-style-name="P16" draw:layer="layout" svg:width="0.987cm" svg:height="0.852cm" svg:x="20.962cm" svg:y="8.182cm">
          <draw:text-box>
            <text:p><text:span text:style-name="T5">S7</text:span></text:p>
          </draw:text-box>
        </draw:frame>
        <draw:line draw:style-name="gr39" draw:text-style-name="P1" draw:layer="layout" svg:x1="14.5cm" svg:y1="1.778cm" svg:x2="16.058cm" svg:y2="1.778cm">
          <text:p/>
        </draw:line>
        <draw:frame draw:style-name="gr47" draw:text-style-name="P9" draw:layer="layout" svg:width="1.824cm" svg:height="0.852cm" svg:x="15.936cm" svg:y="0.46cm">
          <draw:text-box>
            <text:p><text:span text:style-name="T2">Host A</text:span></text:p>
          </draw:text-box>
        </draw:frame>
        <draw:frame draw:style-name="gr48" draw:text-style-name="P9" draw:layer="layout" svg:width="1.807cm" svg:height="0.852cm" svg:x="21.784cm" svg:y="4.86cm">
          <draw:text-box>
            <text:p><text:span text:style-name="T2">Host </text:span><text:span text:style-name="T6">B</text:span></text:p>
          </draw:text-box>
        </draw:frame>
        <draw:line draw:style-name="gr39" draw:text-style-name="P1" draw:layer="layout" svg:x1="22.254cm" svg:y1="6.73cm" svg:x2="21.426cm" svg:y2="7.95cm">
          <text:p/>
        </draw:line>
        <draw:custom-shape draw:style-name="gr38" draw:text-style-name="P15" draw:layer="layout" svg:width="0.651cm" svg:height="1.019cm" svg:x="21.059cm" svg:y="10.482cm">
          <text:p/>
          <draw:enhanced-geometry svg:viewBox="0 0 21600 21600" draw:type="rectangle" draw:enhanced-path="M 0 0 L 21600 0 21600 21600 0 21600 0 0 Z N"/>
        </draw:custom-shape>
        <draw:frame draw:style-name="gr1" draw:text-style-name="P1" draw:layer="layout" svg:width="2.129cm" svg:height="2.129cm" svg:x="20.025cm" svg:y="10.061cm">
          <draw:image xlink:href="Pictures/10000001000004B0000004B0923FE4BE.png" xlink:type="simple" xlink:show="embed" xlink:actuate="onLoad" draw:mime-type="image/png">
            <text:p/>
          </draw:image>
        </draw:frame>
        <draw:frame draw:style-name="gr49" draw:text-style-name="P9" draw:layer="layout" svg:width="1.802cm" svg:height="0.852cm" svg:x="20.127cm" svg:y="9.651cm">
          <draw:text-box>
            <text:p><text:span text:style-name="T2">Host </text:span><text:span text:style-name="T6">C</text:span></text:p>
          </draw:text-box>
        </draw:frame>
        <draw:line draw:style-name="gr39" draw:text-style-name="P1" draw:layer="layout" svg:x1="20.17cm" svg:y1="10.96cm" svg:x2="18.957cm" svg:y2="10.96cm">
          <text:p/>
        </draw:line>
        <draw:frame draw:style-name="gr46" draw:text-style-name="P16" draw:layer="layout" svg:width="0.987cm" svg:height="0.852cm" svg:x="17.282cm" svg:y="4.721cm">
          <draw:text-box>
            <text:p><text:span text:style-name="T5">S5</text:span></text:p>
          </draw:text-box>
        </draw:frame>
        <draw:frame draw:style-name="gr1" draw:text-style-name="P1" draw:layer="layout" svg:width="2.129cm" svg:height="2.129cm" svg:x="21.682cm" svg:y="5.27cm">
          <draw:image xlink:href="Pictures/10000001000004B0000004B0923FE4BE.png" xlink:type="simple" xlink:show="embed" xlink:actuate="onLoad" draw:mime-type="image/png">
            <text:p/>
          </draw:image>
        </draw:frame>
        <draw:frame draw:style-name="gr1" draw:text-style-name="P1" draw:layer="layout" svg:width="2.129cm" svg:height="2.129cm" svg:x="15.884cm" svg:y="0.819cm">
          <draw:image xlink:href="Pictures/10000001000004B0000004B0923FE4BE.png" xlink:type="simple" xlink:show="embed" xlink:actuate="onLoad" draw:mime-type="image/png">
            <text:p/>
          </draw:image>
        </draw:frame>
        <presentation:notes draw:style-name="dp2">
          <draw:page-thumbnail draw:style-name="gr7" draw:layer="layout" svg:width="0.001cm" svg:height="0.001cm" svg:x="0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3" draw:master-page-name="Blank" presentation:presentation-page-layout-name="AL2T1">
        <draw:custom-shape draw:style-name="gr29" draw:text-style-name="P15" draw:layer="layout" svg:width="1.856cm" svg:height="2.699cm" svg:x="19.35cm" svg:y="7.357cm">
          <text:p/>
          <draw:enhanced-geometry svg:viewBox="0 0 21600 21600" draw:type="rectangle" draw:enhanced-path="M 0 0 L 21600 0 21600 21600 0 21600 0 0 Z N"/>
        </draw:custom-shape>
        <draw:custom-shape draw:style-name="gr30" draw:text-style-name="P15" draw:layer="layout" svg:width="0.811cm" svg:height="1.825cm" svg:x="20.828cm" svg:y="2.094cm">
          <text:p/>
          <draw:enhanced-geometry svg:viewBox="0 0 21600 21600" draw:type="rectangle" draw:enhanced-path="M 0 0 L 21600 0 21600 21600 0 21600 0 0 Z N"/>
        </draw:custom-shape>
        <draw:custom-shape draw:style-name="gr31" draw:text-style-name="P15" draw:layer="layout" svg:width="1.856cm" svg:height="0.867cm" svg:x="9.118cm" svg:y="1.987cm">
          <text:p/>
          <draw:enhanced-geometry svg:viewBox="0 0 21600 21600" draw:type="rectangle" draw:enhanced-path="M 0 0 L 21600 0 21600 21600 0 21600 0 0 Z N"/>
        </draw:custom-shape>
        <draw:custom-shape draw:style-name="gr32" draw:text-style-name="P15" draw:layer="layout" svg:width="1.183cm" svg:height="0.867cm" svg:x="4.192cm" svg:y="8.204cm">
          <text:p/>
          <draw:enhanced-geometry svg:viewBox="0 0 21600 21600" draw:type="rectangle" draw:enhanced-path="M 0 0 L 21600 0 21600 21600 0 21600 0 0 Z N"/>
        </draw:custom-shape>
        <draw:custom-shape draw:style-name="gr33" draw:text-style-name="P15" draw:layer="layout" svg:width="1.184cm" svg:height="0.867cm" svg:x="10.31cm" svg:y="12.11cm">
          <text:p/>
          <draw:enhanced-geometry svg:viewBox="0 0 21600 21600" draw:type="rectangle" draw:enhanced-path="M 0 0 L 21600 0 21600 21600 0 21600 0 0 Z N"/>
        </draw:custom-shape>
        <draw:custom-shape draw:style-name="gr34" draw:text-style-name="P15" draw:layer="layout" svg:width="0.631cm" svg:height="0.869cm" svg:x="5.994cm" svg:y="11.002cm">
          <text:p/>
          <draw:enhanced-geometry svg:viewBox="0 0 21600 21600" draw:type="rectangle" draw:enhanced-path="M 0 0 L 21600 0 21600 21600 0 21600 0 0 Z N"/>
        </draw:custom-shape>
        <draw:custom-shape draw:style-name="gr35" draw:text-style-name="P15" draw:layer="layout" svg:width="0.702cm" svg:height="0.942cm" svg:x="13.514cm" svg:y="1.305cm">
          <text:p/>
          <draw:enhanced-geometry svg:viewBox="0 0 21600 21600" draw:type="rectangle" draw:enhanced-path="M 0 0 L 21600 0 21600 21600 0 21600 0 0 Z N"/>
        </draw:custom-shape>
        <draw:custom-shape draw:style-name="gr36" draw:text-style-name="P15" draw:layer="layout" svg:width="1.855cm" svg:height="1.464cm" svg:x="15.673cm" svg:y="10.787cm">
          <text:p/>
          <draw:enhanced-geometry svg:viewBox="0 0 21600 21600" draw:type="rectangle" draw:enhanced-path="M 0 0 L 21600 0 21600 21600 0 21600 0 0 Z N"/>
        </draw:custom-shape>
        <draw:custom-shape draw:style-name="gr37" draw:text-style-name="P15" draw:layer="layout" svg:width="1.716cm" svg:height="2.03cm" svg:x="19.751cm" svg:y="7.885cm">
          <text:p/>
          <draw:enhanced-geometry svg:viewBox="0 0 21600 21600" draw:type="rectangle" draw:enhanced-path="M 0 0 L 21600 0 21600 21600 0 21600 0 0 Z N"/>
        </draw:custom-shape>
        <draw:custom-shape draw:style-name="gr38" draw:text-style-name="P15" draw:layer="layout" svg:width="0.651cm" svg:height="1.019cm" svg:x="22.716cm" svg:y="5.691cm">
          <text:p/>
          <draw:enhanced-geometry svg:viewBox="0 0 21600 21600" draw:type="rectangle" draw:enhanced-path="M 0 0 L 21600 0 21600 21600 0 21600 0 0 Z N"/>
        </draw:custom-shape>
        <draw:frame draw:style-name="gr1" draw:text-style-name="P1" draw:layer="layout" svg:width="2.499cm" svg:height="1.062cm" svg:x="7.672cm" svg:y="4.413cm">
          <draw:image xlink:href="Pictures/10000001000001370000008A3032A3C2.png" xlink:type="simple" xlink:show="embed" xlink:actuate="onLoad" draw:mime-type="image/png">
            <text:p/>
          </draw:image>
        </draw:frame>
        <draw:frame draw:style-name="gr1" draw:text-style-name="P1" draw:layer="layout" svg:width="2.499cm" svg:height="1.062cm" svg:x="16.558cm" svg:y="4.413cm">
          <draw:image xlink:href="Pictures/10000001000001370000008A3032A3C2.png" xlink:type="simple" xlink:show="embed" xlink:actuate="onLoad" draw:mime-type="image/png">
            <text:p/>
          </draw:image>
        </draw:frame>
        <draw:frame draw:style-name="gr1" draw:text-style-name="P1" draw:layer="layout" svg:width="2.499cm" svg:height="1.062cm" svg:x="16.558cm" svg:y="10.797cm">
          <draw:image xlink:href="Pictures/10000001000001370000008A3032A3C2.png" xlink:type="simple" xlink:show="embed" xlink:actuate="onLoad" draw:mime-type="image/png">
            <text:p/>
          </draw:image>
        </draw:frame>
        <draw:frame draw:style-name="gr1" draw:text-style-name="P1" draw:layer="layout" svg:width="2.499cm" svg:height="1.062cm" svg:x="12.101cm" svg:y="7.96cm">
          <draw:image xlink:href="Pictures/10000001000001370000008A3032A3C2.png" xlink:type="simple" xlink:show="embed" xlink:actuate="onLoad" draw:mime-type="image/png">
            <text:p/>
          </draw:image>
        </draw:frame>
        <draw:line draw:style-name="gr39" draw:text-style-name="P1" draw:layer="layout" svg:x1="13.934cm" svg:y1="8.017cm" svg:x2="17.483cm" svg:y2="5.359cm">
          <text:p/>
        </draw:line>
        <draw:line draw:style-name="gr39" draw:text-style-name="P1" draw:layer="layout" svg:x1="13.901cm" svg:y1="8.885cm" svg:x2="17.924cm" svg:y2="10.849cm">
          <text:p/>
        </draw:line>
        <draw:line draw:style-name="gr39" draw:text-style-name="P1" draw:layer="layout" svg:x1="9.085cm" svg:y1="5.339cm" svg:x2="12.893cm" svg:y2="8.031cm">
          <text:p/>
        </draw:line>
        <draw:custom-shape draw:style-name="gr40" draw:text-style-name="P15" draw:layer="layout" svg:width="1.589cm" svg:height="0.834cm" svg:x="10.051cm" svg:y="1.98cm">
          <text:p/>
          <draw:enhanced-geometry svg:viewBox="0 0 21600 21600" draw:type="rectangle" draw:enhanced-path="M 0 0 L 21600 0 21600 21600 0 21600 0 0 Z N"/>
        </draw:custom-shape>
        <draw:custom-shape draw:style-name="gr41" draw:text-style-name="P15" draw:layer="layout" svg:width="1.012cm" svg:height="0.834cm" svg:x="6.441cm" svg:y="4.906cm">
          <text:p/>
          <draw:enhanced-geometry svg:viewBox="0 0 21600 21600" draw:type="rectangle" draw:enhanced-path="M 0 0 L 21600 0 21600 21600 0 21600 0 0 Z N"/>
        </draw:custom-shape>
        <draw:custom-shape draw:style-name="gr41" draw:text-style-name="P15" draw:layer="layout" svg:width="1.012cm" svg:height="0.834cm" svg:x="5.836cm" svg:y="7.95cm">
          <text:p/>
          <draw:enhanced-geometry svg:viewBox="0 0 21600 21600" draw:type="rectangle" draw:enhanced-path="M 0 0 L 21600 0 21600 21600 0 21600 0 0 Z N"/>
        </draw:custom-shape>
        <draw:custom-shape draw:style-name="gr42" draw:text-style-name="P15" draw:layer="layout" svg:width="1.012cm" svg:height="0.833cm" svg:x="11.072cm" svg:y="11.702cm">
          <text:p/>
          <draw:enhanced-geometry svg:viewBox="0 0 21600 21600" draw:type="rectangle" draw:enhanced-path="M 0 0 L 21600 0 21600 21600 0 21600 0 0 Z N"/>
        </draw:custom-shape>
        <draw:custom-shape draw:style-name="gr43" draw:text-style-name="P15" draw:layer="layout" svg:width="0.541cm" svg:height="0.833cm" svg:x="7.378cm" svg:y="10.638cm">
          <text:p/>
          <draw:enhanced-geometry svg:viewBox="0 0 21600 21600" draw:type="rectangle" draw:enhanced-path="M 0 0 L 21600 0 21600 21600 0 21600 0 0 Z N"/>
        </draw:custom-shape>
        <draw:frame draw:style-name="gr1" draw:text-style-name="P1" draw:layer="layout" svg:width="2.499cm" svg:height="1.062cm" svg:x="7.672cm" svg:y="10.797cm">
          <draw:image xlink:href="Pictures/10000001000001370000008A3032A3C2.png" xlink:type="simple" xlink:show="embed" xlink:actuate="onLoad" draw:mime-type="image/png">
            <text:p/>
          </draw:image>
        </draw:frame>
        <draw:custom-shape draw:style-name="gr44" draw:text-style-name="P15" draw:layer="layout" svg:width="0.603cm" svg:height="0.903cm" svg:x="13.812cm" svg:y="1.326cm">
          <text:p/>
          <draw:enhanced-geometry svg:viewBox="0 0 21600 21600" draw:type="rectangle" draw:enhanced-path="M 0 0 L 21600 0 21600 21600 0 21600 0 0 Z N"/>
        </draw:custom-shape>
        <draw:frame draw:style-name="gr1" draw:text-style-name="P1" draw:layer="layout" svg:width="2.499cm" svg:height="1.062cm" svg:x="12.101cm" svg:y="1.614cm">
          <draw:image xlink:href="Pictures/10000001000001370000008A3032A3C2.png" xlink:type="simple" xlink:show="embed" xlink:actuate="onLoad" draw:mime-type="image/png">
            <text:p/>
          </draw:image>
        </draw:frame>
        <draw:line draw:style-name="gr50" draw:text-style-name="P1" draw:layer="layout" svg:x1="9.933cm" svg:y1="11.298cm" svg:x2="16.811cm" svg:y2="11.298cm">
          <text:p/>
        </draw:line>
        <draw:line draw:style-name="gr39" draw:text-style-name="P1" draw:layer="layout" svg:x1="8.963cm" svg:y1="10.839cm" svg:x2="12.7cm" svg:y2="8.904cm">
          <text:p/>
        </draw:line>
        <draw:line draw:style-name="gr50" draw:text-style-name="P1" draw:layer="layout" svg:x1="14.088cm" svg:y1="2.392cm" svg:x2="17.213cm" svg:y2="4.508cm">
          <text:p/>
        </draw:line>
        <draw:line draw:style-name="gr39" draw:text-style-name="P1" draw:layer="layout" svg:x1="9.712cm" svg:y1="4.468cm" svg:x2="12.455cm" svg:y2="2.563cm">
          <text:p/>
        </draw:line>
        <draw:frame draw:style-name="gr1" draw:text-style-name="P1" draw:layer="layout" svg:width="2.499cm" svg:height="1.062cm" svg:x="20.179cm" svg:y="7.885cm">
          <draw:image xlink:href="Pictures/10000001000001370000008A3032A3C2.png" xlink:type="simple" xlink:show="embed" xlink:actuate="onLoad" draw:mime-type="image/png">
            <text:p/>
          </draw:image>
        </draw:frame>
        <draw:line draw:style-name="gr39" draw:text-style-name="P1" draw:layer="layout" svg:x1="14.349cm" svg:y1="8.444cm" svg:x2="20.381cm" svg:y2="8.444cm">
          <text:p/>
        </draw:line>
        <draw:line draw:style-name="gr50" draw:text-style-name="P1" draw:layer="layout" svg:x1="17.936cm" svg:y1="5.27cm" svg:x2="21.425cm" svg:y2="7.949cm">
          <text:p/>
        </draw:line>
        <draw:frame draw:style-name="gr46" draw:text-style-name="P16" draw:layer="layout" svg:width="0.987cm" svg:height="0.852cm" svg:x="12.86cm" svg:y="8.26cm">
          <draw:text-box>
            <text:p><text:span text:style-name="T5">S1</text:span></text:p>
          </draw:text-box>
        </draw:frame>
        <draw:frame draw:style-name="gr46" draw:text-style-name="P16" draw:layer="layout" svg:width="0.987cm" svg:height="0.852cm" svg:x="8.422cm" svg:y="4.721cm">
          <draw:text-box>
            <text:p><text:span text:style-name="T5">S2</text:span></text:p>
          </draw:text-box>
        </draw:frame>
        <draw:frame draw:style-name="gr46" draw:text-style-name="P16" draw:layer="layout" svg:width="0.987cm" svg:height="0.852cm" svg:x="12.854cm" svg:y="1.92cm">
          <draw:text-box>
            <text:p><text:span text:style-name="T5">S3</text:span></text:p>
          </draw:text-box>
        </draw:frame>
        <draw:frame draw:style-name="gr46" draw:text-style-name="P16" draw:layer="layout" svg:width="0.987cm" svg:height="0.852cm" svg:x="17.345cm" svg:y="11.099cm">
          <draw:text-box>
            <text:p><text:span text:style-name="T5">S4</text:span></text:p>
          </draw:text-box>
        </draw:frame>
        <draw:frame draw:style-name="gr46" draw:text-style-name="P16" draw:layer="layout" svg:width="0.987cm" svg:height="0.852cm" svg:x="8.446cm" svg:y="11.108cm">
          <draw:text-box>
            <text:p><text:span text:style-name="T5">S6</text:span></text:p>
          </draw:text-box>
        </draw:frame>
        <draw:frame draw:style-name="gr46" draw:text-style-name="P16" draw:layer="layout" svg:width="0.987cm" svg:height="0.852cm" svg:x="20.962cm" svg:y="8.182cm">
          <draw:text-box>
            <text:p><text:span text:style-name="T5">S7</text:span></text:p>
          </draw:text-box>
        </draw:frame>
        <draw:line draw:style-name="gr39" draw:text-style-name="P1" draw:layer="layout" svg:x1="14.5cm" svg:y1="1.778cm" svg:x2="16.058cm" svg:y2="1.778cm">
          <text:p/>
        </draw:line>
        <draw:frame draw:style-name="gr47" draw:text-style-name="P9" draw:layer="layout" svg:width="1.824cm" svg:height="0.852cm" svg:x="15.936cm" svg:y="0.46cm">
          <draw:text-box>
            <text:p><text:span text:style-name="T2">Host A</text:span></text:p>
          </draw:text-box>
        </draw:frame>
        <draw:frame draw:style-name="gr48" draw:text-style-name="P9" draw:layer="layout" svg:width="1.807cm" svg:height="0.852cm" svg:x="21.784cm" svg:y="4.86cm">
          <draw:text-box>
            <text:p><text:span text:style-name="T2">Host </text:span><text:span text:style-name="T6">B</text:span></text:p>
          </draw:text-box>
        </draw:frame>
        <draw:line draw:style-name="gr39" draw:text-style-name="P1" draw:layer="layout" svg:x1="22.254cm" svg:y1="6.73cm" svg:x2="21.426cm" svg:y2="7.95cm">
          <text:p/>
        </draw:line>
        <draw:custom-shape draw:style-name="gr38" draw:text-style-name="P15" draw:layer="layout" svg:width="0.651cm" svg:height="1.019cm" svg:x="21.059cm" svg:y="10.482cm">
          <text:p/>
          <draw:enhanced-geometry svg:viewBox="0 0 21600 21600" draw:type="rectangle" draw:enhanced-path="M 0 0 L 21600 0 21600 21600 0 21600 0 0 Z N"/>
        </draw:custom-shape>
        <draw:frame draw:style-name="gr1" draw:text-style-name="P1" draw:layer="layout" svg:width="2.129cm" svg:height="2.129cm" svg:x="20.025cm" svg:y="10.061cm">
          <draw:image xlink:href="Pictures/10000001000004B0000004B0923FE4BE.png" xlink:type="simple" xlink:show="embed" xlink:actuate="onLoad" draw:mime-type="image/png">
            <text:p/>
          </draw:image>
        </draw:frame>
        <draw:frame draw:style-name="gr49" draw:text-style-name="P9" draw:layer="layout" svg:width="1.802cm" svg:height="0.852cm" svg:x="20.127cm" svg:y="9.651cm">
          <draw:text-box>
            <text:p><text:span text:style-name="T2">Host </text:span><text:span text:style-name="T6">C</text:span></text:p>
          </draw:text-box>
        </draw:frame>
        <draw:line draw:style-name="gr39" draw:text-style-name="P1" draw:layer="layout" svg:x1="20.17cm" svg:y1="10.96cm" svg:x2="18.957cm" svg:y2="10.96cm">
          <text:p/>
        </draw:line>
        <draw:frame draw:style-name="gr46" draw:text-style-name="P16" draw:layer="layout" svg:width="0.987cm" svg:height="0.852cm" svg:x="17.282cm" svg:y="4.721cm">
          <draw:text-box>
            <text:p><text:span text:style-name="T5">S5</text:span></text:p>
          </draw:text-box>
        </draw:frame>
        <draw:frame draw:style-name="gr1" draw:text-style-name="P1" draw:layer="layout" svg:width="2.129cm" svg:height="2.129cm" svg:x="21.682cm" svg:y="5.27cm">
          <draw:image xlink:href="Pictures/10000001000004B0000004B0923FE4BE.png" xlink:type="simple" xlink:show="embed" xlink:actuate="onLoad" draw:mime-type="image/png">
            <text:p/>
          </draw:image>
        </draw:frame>
        <draw:frame draw:style-name="gr1" draw:text-style-name="P1" draw:layer="layout" svg:width="2.129cm" svg:height="2.129cm" svg:x="15.884cm" svg:y="0.819cm">
          <draw:image xlink:href="Pictures/10000001000004B0000004B0923FE4BE.png" xlink:type="simple" xlink:show="embed" xlink:actuate="onLoad" draw:mime-type="image/png">
            <text:p/>
          </draw:image>
        </draw:frame>
        <presentation:notes draw:style-name="dp2">
          <draw:page-thumbnail draw:style-name="gr7" draw:layer="layout" svg:width="0.001cm" svg:height="0.001cm" svg:x="0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3" draw:master-page-name="Blank" presentation:presentation-page-layout-name="AL2T1">
        <draw:line draw:style-name="gr39" draw:text-style-name="P1" draw:layer="layout" svg:x1="7.971cm" svg:y1="3.143cm" svg:x2="5.315cm" svg:y2="5.615cm">
          <text:p/>
        </draw:line>
        <draw:line draw:style-name="gr39" draw:text-style-name="P1" draw:layer="layout" svg:x1="13.416cm" svg:y1="8.4cm" svg:x2="8.187cm" svg:y2="8.4cm">
          <text:p/>
        </draw:line>
        <draw:line draw:style-name="gr39" draw:text-style-name="P1" draw:layer="layout" svg:x1="10.743cm" svg:y1="10.943cm" svg:x2="5.514cm" svg:y2="10.943cm">
          <text:p/>
        </draw:line>
        <draw:line draw:style-name="gr39" draw:text-style-name="P1" draw:layer="layout" svg:x1="5.485cm" svg:y1="6.101cm" svg:x2="10.342cm" svg:y2="10.615cm">
          <text:p/>
        </draw:line>
        <draw:line draw:style-name="gr39" draw:text-style-name="P1" draw:layer="layout" svg:x1="10.457cm" svg:y1="5.943cm" svg:x2="5.314cm" svg:y2="10.715cm">
          <text:p/>
        </draw:line>
        <draw:line draw:style-name="gr39" draw:text-style-name="P1" draw:layer="layout" svg:x1="8.143cm" svg:y1="3.372cm" svg:x2="13cm" svg:y2="7.886cm">
          <text:p/>
        </draw:line>
        <draw:custom-shape draw:style-name="gr32" draw:text-style-name="P15" draw:layer="layout" svg:width="1.183cm" svg:height="0.867cm" svg:x="4.503cm" svg:y="8.104cm">
          <text:p/>
          <draw:enhanced-geometry svg:viewBox="0 0 21600 21600" draw:type="rectangle" draw:enhanced-path="M 0 0 L 21600 0 21600 21600 0 21600 0 0 Z N"/>
        </draw:custom-shape>
        <draw:frame draw:style-name="gr51" draw:text-style-name="P16" draw:layer="layout" svg:width="0.845cm" svg:height="1.453cm" svg:x="10.242cm" svg:y="10.181cm">
          <draw:text-box>
            <text:p><text:span text:style-name="T5">S6</text:span></text:p>
          </draw:text-box>
        </draw:frame>
        <draw:custom-shape draw:style-name="gr52" draw:text-style-name="P15" draw:layer="layout" svg:width="1.257cm" svg:height="1.257cm" svg:x="4.466cm" svg:y="10.279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12.682cm" svg:y="7.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7.269cm" svg:y="7.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10.036cm" svg:y="5.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10.036cm" svg:y="10.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4.466cm" svg:y="5.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7.24cm" svg:y="2.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 draw:text-style-name="P1" draw:layer="layout" svg:x1="18.997cm" svg:y1="3.105cm" svg:x2="16.341cm" svg:y2="5.577cm">
          <text:p/>
        </draw:line>
        <draw:line draw:style-name="gr39" draw:text-style-name="P1" draw:layer="layout" svg:x1="24.442cm" svg:y1="8.362cm" svg:x2="19.213cm" svg:y2="8.362cm">
          <text:p/>
        </draw:line>
        <draw:line draw:style-name="gr39" draw:text-style-name="P1" draw:layer="layout" svg:x1="16.511cm" svg:y1="6.063cm" svg:x2="21.368cm" svg:y2="10.577cm">
          <text:p/>
        </draw:line>
        <draw:line draw:style-name="gr39" draw:text-style-name="P1" draw:layer="layout" svg:x1="21.483cm" svg:y1="5.905cm" svg:x2="16.34cm" svg:y2="10.677cm">
          <text:p/>
        </draw:line>
        <draw:custom-shape draw:style-name="gr32" draw:text-style-name="P15" draw:layer="layout" svg:width="1.183cm" svg:height="0.867cm" svg:x="15.529cm" svg:y="8.066cm">
          <text:p/>
          <draw:enhanced-geometry svg:viewBox="0 0 21600 21600" draw:type="rectangle" draw:enhanced-path="M 0 0 L 21600 0 21600 21600 0 21600 0 0 Z N"/>
        </draw:custom-shape>
        <draw:frame draw:style-name="gr51" draw:text-style-name="P16" draw:layer="layout" svg:width="0.845cm" svg:height="1.453cm" svg:x="21.268cm" svg:y="10.143cm">
          <draw:text-box>
            <text:p><text:span text:style-name="T5">S6</text:span></text:p>
          </draw:text-box>
        </draw:frame>
        <draw:custom-shape draw:style-name="gr52" draw:text-style-name="P15" draw:layer="layout" svg:width="1.257cm" svg:height="1.257cm" svg:x="15.492cm" svg:y="10.24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23.708cm" svg:y="7.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18.295cm" svg:y="7.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21.062cm" svg:y="5.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21.062cm" svg:y="10.2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15.492cm" svg:y="5.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5" draw:layer="layout" svg:width="1.257cm" svg:height="1.257cm" svg:x="18.266cm" svg:y="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3" draw:text-style-name="P2" draw:layer="layout" svg:width="1.113cm" svg:height="0.941cm" svg:x="4.514cm" svg:y="2.744cm">
          <draw:text-box>
            <text:p><text:span text:style-name="T1">(a)</text:span></text:p>
          </draw:text-box>
        </draw:frame>
        <draw:frame draw:style-name="gr54" draw:text-style-name="P2" draw:layer="layout" svg:width="1.139cm" svg:height="0.941cm" svg:x="15.586cm" svg:y="2.745cm">
          <draw:text-box>
            <text:p><text:span text:style-name="T1">(b)</text:span></text:p>
          </draw:text-box>
        </draw:frame>
        <presentation:notes draw:style-name="dp2">
          <draw:page-thumbnail draw:style-name="gr7" draw:layer="layout" svg:width="0.001cm" svg:height="0.001cm" svg:x="0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3" draw:master-page-name="Blank" presentation:presentation-page-layout-name="AL2T1">
        <draw:connector draw:name="Straight Arrow Connector 7" draw:style-name="gr55" draw:text-style-name="P17" draw:layer="layout" draw:type="line" svg:x1="4.607cm" svg:y1="5.519cm" svg:x2="4.586cm" svg:y2="9.441cm" svg:d="M4607 5519l-21 3922" svg:viewBox="0 0 22 3923">
          <text:p/>
        </draw:connector>
        <draw:custom-shape draw:name="Rectangle 8" draw:style-name="gr56" draw:text-style-name="P19" draw:layer="layout" svg:width="2.973cm" svg:height="1.85cm" svg:x="3.013cm" svg:y="0.935cm">
          <text:p text:style-name="P18"><text:span text:style-name="T7">Control</text:span></text:p>
          <text:p text:style-name="P18"><text:span text:style-name="T7">App</text:span></text:p>
          <draw:enhanced-geometry svg:viewBox="0 0 21600 21600" draw:type="non-primitive" draw:enhanced-path="M 0 0 L 21600 0 21600 21600 0 21600 Z N"/>
        </draw:custom-shape>
        <draw:frame draw:name="TextBox 12" draw:style-name="gr57" draw:text-style-name="P21" draw:layer="layout" svg:width="1.365cm" svg:height="1.102cm" svg:x="14.031cm" svg:y="1.624cm">
          <draw:text-box>
            <text:p text:style-name="P20"><text:span text:style-name="T8">. . .</text:span></text:p>
          </draw:text-box>
        </draw:frame>
        <draw:connector draw:name="Straight Arrow Connector 16" draw:style-name="gr58" draw:text-style-name="P17" draw:layer="layout" draw:type="line" svg:x1="12.773cm" svg:y1="5.41cm" svg:x2="12.752cm" svg:y2="9.332cm" svg:d="M12773 5410l-21 3922" svg:viewBox="0 0 22 3923">
          <text:p/>
        </draw:connector>
        <draw:connector draw:name="Straight Arrow Connector 17" draw:style-name="gr59" draw:text-style-name="P17" draw:layer="layout" draw:type="line" svg:x1="17.052cm" svg:y1="3.302cm" svg:x2="17.03cm" svg:y2="7.223cm" svg:d="M17052 3302l-22 3921" svg:viewBox="0 0 23 3922">
          <text:p/>
        </draw:connector>
        <draw:connector draw:name="Straight Arrow Connector 18" draw:style-name="gr60" draw:text-style-name="P17" draw:layer="layout" draw:type="line" svg:x1="9.215cm" svg:y1="3.211cm" svg:x2="9.193cm" svg:y2="7.133cm" svg:d="M9215 3211l-22 3922" svg:viewBox="0 0 23 3923">
          <text:p/>
        </draw:connector>
        <draw:connector draw:name="Straight Connector 32" draw:style-name="gr61" draw:text-style-name="P17" draw:layer="layout" draw:type="line" svg:x1="1.941cm" svg:y1="6.317cm" svg:x2="23.78cm" svg:y2="6.349cm" svg:d="M1941 6317l21839 32" svg:viewBox="0 0 21840 33">
          <text:p/>
        </draw:connector>
        <draw:frame draw:name="TextBox 33" draw:style-name="gr62" draw:text-style-name="P21" draw:layer="layout" svg:width="3.987cm" svg:height="1.017cm" svg:x="20.313cm" svg:y="5.412cm">
          <draw:text-box>
            <text:p text:style-name="P20"><text:span text:style-name="T9">Control Plane</text:span></text:p>
          </draw:text-box>
        </draw:frame>
        <draw:frame draw:name="TextBox 34" draw:style-name="gr63" draw:text-style-name="P21" draw:layer="layout" svg:width="3.279cm" svg:height="1.017cm" svg:x="20.97cm" svg:y="6.376cm">
          <draw:text-box>
            <text:p text:style-name="P20"><text:span text:style-name="T9">Data Plane</text:span></text:p>
          </draw:text-box>
        </draw:frame>
        <draw:frame draw:name="TextBox 35" draw:style-name="gr64" draw:text-style-name="P23" draw:layer="layout" svg:width="3.266cm" svg:height="1.017cm" svg:x="1.628cm" svg:y="7.085cm">
          <draw:text-box>
            <text:p text:style-name="P22"><text:span text:style-name="T9">Flow Rules</text:span></text:p>
          </draw:text-box>
        </draw:frame>
        <draw:custom-shape draw:name="Rectangle 51" draw:style-name="gr56" draw:text-style-name="P19" draw:layer="layout" svg:width="2.973cm" svg:height="1.85cm" svg:x="6.769cm" svg:y="0.935cm">
          <text:p text:style-name="P18"><text:span text:style-name="T7">Control</text:span></text:p>
          <text:p text:style-name="P18"><text:span text:style-name="T7">App</text:span></text:p>
          <draw:enhanced-geometry svg:viewBox="0 0 21600 21600" draw:type="non-primitive" draw:enhanced-path="M 0 0 L 21600 0 21600 21600 0 21600 Z N"/>
        </draw:custom-shape>
        <draw:custom-shape draw:name="Rectangle 52" draw:style-name="gr65" draw:text-style-name="P19" draw:layer="layout" svg:width="2.974cm" svg:height="1.85cm" svg:x="10.407cm" svg:y="0.935cm">
          <text:p text:style-name="P18"><text:span text:style-name="T7">Control</text:span></text:p>
          <text:p text:style-name="P18"><text:span text:style-name="T7">App</text:span></text:p>
          <draw:enhanced-geometry svg:viewBox="0 0 21600 21600" draw:type="non-primitive" draw:enhanced-path="M 0 0 L 21600 0 21600 21600 0 21600 Z N"/>
        </draw:custom-shape>
        <draw:custom-shape draw:name="Rectangle 53" draw:style-name="gr65" draw:text-style-name="P19" draw:layer="layout" svg:width="2.974cm" svg:height="1.85cm" svg:x="15.881cm" svg:y="0.935cm">
          <text:p text:style-name="P18"><text:span text:style-name="T7">Control</text:span></text:p>
          <text:p text:style-name="P18"><text:span text:style-name="T7">App</text:span></text:p>
          <draw:enhanced-geometry svg:viewBox="0 0 21600 21600" draw:type="non-primitive" draw:enhanced-path="M 0 0 L 21600 0 21600 21600 0 21600 Z N"/>
        </draw:custom-shape>
        <draw:g draw:name="Group 50" draw:style-name="gr12">
          <draw:custom-shape draw:name="Rectangle 49" draw:style-name="gr66" draw:text-style-name="P25" draw:layer="layout" svg:width="15.803cm" svg:height="2.835cm" svg:x="3.013cm" svg:y="3.147cm">
            <text:p text:style-name="P24"><text:span text:style-name="T10">Network OS</text:span></text:p>
            <draw:enhanced-geometry svg:viewBox="0 0 21600 21600" draw:type="non-primitive" draw:enhanced-path="M 0 0 L 21600 0 21600 21600 0 21600 Z N"/>
          </draw:custom-shape>
          <draw:g draw:name="Group 20" draw:style-name="gr12">
            <draw:custom-shape draw:name="Oval 21" draw:style-name="gr67" draw:text-style-name="P26" draw:layer="layout" svg:width="0.64cm" svg:height="0.626cm" svg:x="13.999cm" svg:y="4.53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2" draw:style-name="gr68" draw:text-style-name="P26" draw:layer="layout" svg:width="0.64cm" svg:height="0.627cm" svg:x="15.029cm" svg:y="5.18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3" draw:style-name="gr67" draw:text-style-name="P26" draw:layer="layout" svg:width="0.64cm" svg:height="0.626cm" svg:x="15.029cm" svg:y="3.90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4" draw:style-name="gr68" draw:text-style-name="P26" draw:layer="layout" svg:width="0.64cm" svg:height="0.627cm" svg:x="16.16cm" svg:y="3.28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5" draw:style-name="gr67" draw:text-style-name="P26" draw:layer="layout" svg:width="0.64cm" svg:height="0.626cm" svg:x="16.16cm" svg:y="4.53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Connector 26" draw:style-name="gr69" draw:text-style-name="P17" draw:layer="layout" draw:type="line" svg:x1="14.545cm" svg:y1="4.625cm" svg:x2="16.706cm" svg:y2="3.373cm" svg:d="M14545 4625l2161-1252" svg:viewBox="0 0 2162 1253">
              <text:p/>
            </draw:connector>
            <draw:connector draw:name="Straight Connector 27" draw:style-name="gr69" draw:text-style-name="P17" draw:layer="layout" draw:type="line" svg:x1="16.706cm" svg:y1="4.625cm" svg:x2="15.575cm" svg:y2="5.28cm" svg:d="M16706 4625l-1131 655" svg:viewBox="0 0 1132 656">
              <text:p/>
            </draw:connector>
            <draw:connector draw:name="Straight Connector 28" draw:style-name="gr69" draw:text-style-name="P17" draw:layer="layout" draw:type="line" svg:x1="15.123cm" svg:y1="3.999cm" svg:x2="16.706cm" svg:y2="5.068cm" svg:d="M15123 3999l1583 1069" svg:viewBox="0 0 1584 1070">
              <text:p/>
            </draw:connector>
            <draw:connector draw:name="Straight Connector 29" draw:style-name="gr69" draw:text-style-name="P17" draw:layer="layout" draw:type="line" svg:x1="14.093cm" svg:y1="4.625cm" svg:x2="15.575cm" svg:y2="5.723cm" svg:d="M14093 4625l1482 1098" svg:viewBox="0 0 1483 1099">
              <text:p/>
            </draw:connector>
            <draw:connector draw:name="Straight Connector 30" draw:style-name="gr69" draw:text-style-name="P17" draw:layer="layout" draw:type="line" svg:x1="16.48cm" svg:y1="3.908cm" svg:x2="16.48cm" svg:y2="4.534cm" svg:d="M16480 3908v626" svg:viewBox="0 0 1 627">
              <text:p/>
            </draw:connector>
          </draw:g>
          <draw:frame draw:name="TextBox 31" draw:style-name="gr70" draw:text-style-name="P27" draw:layer="layout" svg:width="2.54cm" svg:height="2.159cm" svg:x="16.342cm" svg:y="3.176cm">
            <draw:text-box>
              <text:p text:style-name="P22"><text:span text:style-name="T11">Global </text:span></text:p>
              <text:p text:style-name="P22"><text:span text:style-name="T11">Network</text:span></text:p>
              <text:p text:style-name="P22"><text:span text:style-name="T11">Map</text:span></text:p>
            </draw:text-box>
          </draw:frame>
        </draw:g>
        <draw:connector draw:name="Straight Connector 46" draw:style-name="gr71" draw:text-style-name="P17" draw:layer="layout" draw:type="line" svg:x1="12.686cm" svg:y1="10.109cm" svg:x2="9.423cm" svg:y2="11.699cm" svg:d="M12686 10109l-3263 1590" svg:viewBox="0 0 3264 1591">
          <text:p/>
        </draw:connector>
        <draw:connector draw:name="Straight Connector 47" draw:style-name="gr71" draw:text-style-name="P17" draw:layer="layout" draw:type="line" svg:x1="8.242cm" svg:y1="8.042cm" svg:x2="5.403cm" svg:y2="9.494cm" svg:d="M8242 8042l-2839 1452" svg:viewBox="0 0 2840 1453">
          <text:p/>
        </draw:connector>
        <draw:connector draw:name="Straight Connector 48" draw:style-name="gr71" draw:text-style-name="P17" draw:layer="layout" draw:type="line" svg:x1="11.773cm" svg:y1="9.5cm" svg:x2="9.422cm" svg:y2="7.949cm" svg:d="M11773 9500l-2351-1551" svg:viewBox="0 0 2352 1552">
          <text:p/>
        </draw:connector>
        <draw:g draw:name="Group 54" draw:style-name="gr12">
          <draw:custom-shape draw:name="Cube 55" draw:style-name="gr72" draw:text-style-name="P28" draw:layer="layout" svg:width="2.875cm" svg:height="1.097cm" svg:x="7.754cm" svg:y="7.159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56" draw:style-name="gr12">
            <draw:g draw:name="Group 57" draw:style-name="gr73">
              <draw:connector draw:name="Straight Arrow Connector 63" draw:style-name="gr74" draw:text-style-name="P17" draw:layer="layout" draw:type="line" svg:x1="9.365cm" svg:y1="7.318cm" svg:x2="10.35cm" svg:y2="7.318cm" svg:d="M9365 7318h985" svg:viewBox="0 0 986 1">
                <text:p/>
              </draw:connector>
              <draw:connector draw:name="Straight Arrow Connector 64" draw:style-name="gr75" draw:text-style-name="P17" draw:layer="layout" draw:type="line" svg:x1="9.365cm" svg:y1="7.667cm" svg:x2="9.984cm" svg:y2="7.667cm" svg:d="M9365 7667h619" svg:viewBox="0 0 620 1">
                <text:p/>
              </draw:connector>
            </draw:g>
            <draw:g draw:name="Group 58" draw:style-name="gr73">
              <draw:connector draw:name="Straight Arrow Connector 61" draw:style-name="gr76" draw:text-style-name="P17" draw:layer="layout" draw:type="line" svg:x1="9.018cm" svg:y1="7.324cm" svg:x2="8.415cm" svg:y2="7.324cm" svg:d="M9018 7324h-603" svg:viewBox="0 0 604 1">
                <text:p/>
              </draw:connector>
              <draw:connector draw:name="Straight Arrow Connector 62" draw:style-name="gr77" draw:text-style-name="P17" draw:layer="layout" draw:type="line" svg:x1="9.018cm" svg:y1="7.667cm" svg:x2="8.048cm" svg:y2="7.667cm" svg:d="M9018 7667h-970" svg:viewBox="0 0 971 1">
                <text:p/>
              </draw:connector>
            </draw:g>
            <draw:connector draw:name="Straight Connector 59" draw:style-name="gr78" draw:text-style-name="P17" draw:layer="layout" draw:type="line" svg:x1="8.998cm" svg:y1="7.674cm" svg:x2="9.385cm" svg:y2="7.312cm" svg:d="M8998 7674l387-362" svg:viewBox="0 0 388 363">
              <text:p/>
            </draw:connector>
            <draw:connector draw:name="Straight Connector 60" draw:style-name="gr78" draw:text-style-name="P17" draw:layer="layout" draw:type="line" svg:x1="9.385cm" svg:y1="7.674cm" svg:x2="8.998cm" svg:y2="7.312cm" svg:d="M9385 7674l-387-362" svg:viewBox="0 0 388 363">
              <text:p/>
            </draw:connector>
          </draw:g>
        </draw:g>
        <draw:connector draw:name="Straight Connector 65" draw:style-name="gr71" draw:text-style-name="P17" draw:layer="layout" draw:type="line" svg:x1="7.749cm" svg:y1="11.517cm" svg:x2="5.593cm" svg:y2="9.855cm" svg:d="M7749 11517l-2156-1662" svg:viewBox="0 0 2157 1663">
          <text:p/>
        </draw:connector>
        <draw:connector draw:name="Straight Connector 66" draw:style-name="gr71" draw:text-style-name="P17" draw:layer="layout" draw:type="line" svg:x1="16.421cm" svg:y1="8.065cm" svg:x2="13.51cm" svg:y2="9.494cm" svg:d="M16421 8065l-2911 1429" svg:viewBox="0 0 2912 1430">
          <text:p/>
        </draw:connector>
        <draw:g draw:name="Group 67" draw:style-name="gr12">
          <draw:custom-shape draw:name="Cube 68" draw:style-name="gr79" draw:text-style-name="P29" draw:layer="layout" svg:width="2.875cm" svg:height="1.048cm" svg:x="11.267cm" svg:y="9.348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69" draw:style-name="gr12">
            <draw:g draw:name="Group 70" draw:style-name="gr73">
              <draw:connector draw:name="Straight Arrow Connector 76" draw:style-name="gr80" draw:text-style-name="P17" draw:layer="layout" draw:type="line" svg:x1="12.879cm" svg:y1="9.508cm" svg:x2="13.865cm" svg:y2="9.508cm" svg:d="M12879 9508h986" svg:viewBox="0 0 987 1">
                <text:p/>
              </draw:connector>
              <draw:connector draw:name="Straight Arrow Connector 77" draw:style-name="gr81" draw:text-style-name="P17" draw:layer="layout" draw:type="line" svg:x1="12.879cm" svg:y1="9.857cm" svg:x2="13.498cm" svg:y2="9.857cm" svg:d="M12879 9857h619" svg:viewBox="0 0 620 1">
                <text:p/>
              </draw:connector>
            </draw:g>
            <draw:g draw:name="Group 71" draw:style-name="gr73">
              <draw:connector draw:name="Straight Arrow Connector 74" draw:style-name="gr82" draw:text-style-name="P17" draw:layer="layout" draw:type="line" svg:x1="12.531cm" svg:y1="9.514cm" svg:x2="11.93cm" svg:y2="9.514cm" svg:d="M12531 9514h-601" svg:viewBox="0 0 602 1">
                <text:p/>
              </draw:connector>
              <draw:connector draw:name="Straight Arrow Connector 75" draw:style-name="gr83" draw:text-style-name="P17" draw:layer="layout" draw:type="line" svg:x1="12.531cm" svg:y1="9.857cm" svg:x2="11.563cm" svg:y2="9.857cm" svg:d="M12531 9857h-968" svg:viewBox="0 0 969 1">
                <text:p/>
              </draw:connector>
            </draw:g>
            <draw:connector draw:name="Straight Connector 72" draw:style-name="gr78" draw:text-style-name="P17" draw:layer="layout" draw:type="line" svg:x1="12.512cm" svg:y1="9.863cm" svg:x2="12.899cm" svg:y2="9.502cm" svg:d="M12512 9863l387-361" svg:viewBox="0 0 388 362">
              <text:p/>
            </draw:connector>
            <draw:connector draw:name="Straight Connector 73" draw:style-name="gr78" draw:text-style-name="P17" draw:layer="layout" draw:type="line" svg:x1="12.899cm" svg:y1="9.863cm" svg:x2="12.512cm" svg:y2="9.502cm" svg:d="M12899 9863l-387-361" svg:viewBox="0 0 388 362">
              <text:p/>
            </draw:connector>
          </draw:g>
        </draw:g>
        <draw:g draw:name="Group 78" draw:style-name="gr12">
          <draw:custom-shape draw:name="Cube 79" draw:style-name="gr84" draw:text-style-name="P30" draw:layer="layout" svg:width="2.875cm" svg:height="1.077cm" svg:x="15.61cm" svg:y="7.228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80" draw:style-name="gr12">
            <draw:g draw:name="Group 81" draw:style-name="gr73">
              <draw:connector draw:name="Straight Arrow Connector 87" draw:style-name="gr85" draw:text-style-name="P17" draw:layer="layout" draw:type="line" svg:x1="17.221cm" svg:y1="7.388cm" svg:x2="18.207cm" svg:y2="7.388cm" svg:d="M17221 7388h986" svg:viewBox="0 0 987 1">
                <text:p/>
              </draw:connector>
              <draw:connector draw:name="Straight Arrow Connector 88" draw:style-name="gr86" draw:text-style-name="P17" draw:layer="layout" draw:type="line" svg:x1="17.221cm" svg:y1="7.737cm" svg:x2="17.84cm" svg:y2="7.737cm" svg:d="M17221 7737h619" svg:viewBox="0 0 620 1">
                <text:p/>
              </draw:connector>
            </draw:g>
            <draw:g draw:name="Group 82" draw:style-name="gr73">
              <draw:connector draw:name="Straight Arrow Connector 85" draw:style-name="gr87" draw:text-style-name="P17" draw:layer="layout" draw:type="line" svg:x1="16.874cm" svg:y1="7.394cm" svg:x2="16.272cm" svg:y2="7.394cm" svg:d="M16874 7394h-602" svg:viewBox="0 0 603 1">
                <text:p/>
              </draw:connector>
              <draw:connector draw:name="Straight Arrow Connector 86" draw:style-name="gr88" draw:text-style-name="P17" draw:layer="layout" draw:type="line" svg:x1="16.874cm" svg:y1="7.737cm" svg:x2="15.905cm" svg:y2="7.737cm" svg:d="M16874 7737h-969" svg:viewBox="0 0 970 1">
                <text:p/>
              </draw:connector>
            </draw:g>
            <draw:connector draw:name="Straight Connector 83" draw:style-name="gr78" draw:text-style-name="P17" draw:layer="layout" draw:type="line" svg:x1="16.854cm" svg:y1="7.743cm" svg:x2="17.241cm" svg:y2="7.382cm" svg:d="M16854 7743l387-361" svg:viewBox="0 0 388 362">
              <text:p/>
            </draw:connector>
            <draw:connector draw:name="Straight Connector 84" draw:style-name="gr78" draw:text-style-name="P17" draw:layer="layout" draw:type="line" svg:x1="17.241cm" svg:y1="7.743cm" svg:x2="16.854cm" svg:y2="7.382cm" svg:d="M17241 7743l-387-361" svg:viewBox="0 0 388 362">
              <text:p/>
            </draw:connector>
          </draw:g>
        </draw:g>
        <draw:g draw:name="Group 89" draw:style-name="gr12">
          <draw:custom-shape draw:name="Cube 90" draw:style-name="gr89" draw:text-style-name="P31" draw:layer="layout" svg:width="2.875cm" svg:height="1.097cm" svg:x="6.895cm" svg:y="11.517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91" draw:style-name="gr12">
            <draw:g draw:name="Group 92" draw:style-name="gr73">
              <draw:connector draw:name="Straight Arrow Connector 98" draw:style-name="gr90" draw:text-style-name="P17" draw:layer="layout" draw:type="line" svg:x1="8.506cm" svg:y1="11.676cm" svg:x2="9.491cm" svg:y2="11.676cm" svg:d="M8506 11676h985" svg:viewBox="0 0 986 1">
                <text:p/>
              </draw:connector>
              <draw:connector draw:name="Straight Arrow Connector 99" draw:style-name="gr91" draw:text-style-name="P17" draw:layer="layout" draw:type="line" svg:x1="8.506cm" svg:y1="12.025cm" svg:x2="9.125cm" svg:y2="12.025cm" svg:d="M8506 12025h619" svg:viewBox="0 0 620 1">
                <text:p/>
              </draw:connector>
            </draw:g>
            <draw:g draw:name="Group 93" draw:style-name="gr73">
              <draw:connector draw:name="Straight Arrow Connector 96" draw:style-name="gr92" draw:text-style-name="P17" draw:layer="layout" draw:type="line" svg:x1="8.159cm" svg:y1="11.682cm" svg:x2="7.556cm" svg:y2="11.682cm" svg:d="M8159 11682h-603" svg:viewBox="0 0 604 1">
                <text:p/>
              </draw:connector>
              <draw:connector draw:name="Straight Arrow Connector 97" draw:style-name="gr93" draw:text-style-name="P17" draw:layer="layout" draw:type="line" svg:x1="8.159cm" svg:y1="12.025cm" svg:x2="7.189cm" svg:y2="12.025cm" svg:d="M8159 12025h-970" svg:viewBox="0 0 971 1">
                <text:p/>
              </draw:connector>
            </draw:g>
            <draw:connector draw:name="Straight Connector 94" draw:style-name="gr78" draw:text-style-name="P17" draw:layer="layout" draw:type="line" svg:x1="8.139cm" svg:y1="12.032cm" svg:x2="8.526cm" svg:y2="11.67cm" svg:d="M8139 12032l387-362" svg:viewBox="0 0 388 363">
              <text:p/>
            </draw:connector>
            <draw:connector draw:name="Straight Connector 95" draw:style-name="gr78" draw:text-style-name="P17" draw:layer="layout" draw:type="line" svg:x1="8.526cm" svg:y1="12.032cm" svg:x2="8.139cm" svg:y2="11.67cm" svg:d="M8526 12032l-387-362" svg:viewBox="0 0 388 363">
              <text:p/>
            </draw:connector>
          </draw:g>
        </draw:g>
        <draw:g draw:name="Group 100" draw:style-name="gr12">
          <draw:custom-shape draw:name="Cube 101" draw:style-name="gr94" draw:text-style-name="P32" draw:layer="layout" svg:width="2.874cm" svg:height="0.998cm" svg:x="3.123cm" svg:y="9.46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102" draw:style-name="gr12">
            <draw:g draw:name="Group 103" draw:style-name="gr73">
              <draw:connector draw:name="Straight Arrow Connector 109" draw:style-name="gr95" draw:text-style-name="P17" draw:layer="layout" draw:type="line" svg:x1="4.734cm" svg:y1="9.62cm" svg:x2="5.72cm" svg:y2="9.62cm" svg:d="M4734 9620h986" svg:viewBox="0 0 987 1">
                <text:p/>
              </draw:connector>
              <draw:connector draw:name="Straight Arrow Connector 110" draw:style-name="gr96" draw:text-style-name="P17" draw:layer="layout" draw:type="line" svg:x1="4.734cm" svg:y1="9.97cm" svg:x2="5.353cm" svg:y2="9.97cm" svg:d="M4734 9970h619" svg:viewBox="0 0 620 1">
                <text:p/>
              </draw:connector>
            </draw:g>
            <draw:g draw:name="Group 104" draw:style-name="gr73">
              <draw:connector draw:name="Straight Arrow Connector 107" draw:style-name="gr97" draw:text-style-name="P17" draw:layer="layout" draw:type="line" svg:x1="4.386cm" svg:y1="9.627cm" svg:x2="3.785cm" svg:y2="9.627cm" svg:d="M4386 9627h-601" svg:viewBox="0 0 602 1">
                <text:p/>
              </draw:connector>
              <draw:connector draw:name="Straight Arrow Connector 108" draw:style-name="gr98" draw:text-style-name="P17" draw:layer="layout" draw:type="line" svg:x1="4.386cm" svg:y1="9.97cm" svg:x2="3.418cm" svg:y2="9.97cm" svg:d="M4386 9970h-968" svg:viewBox="0 0 969 1">
                <text:p/>
              </draw:connector>
            </draw:g>
            <draw:connector draw:name="Straight Connector 105" draw:style-name="gr78" draw:text-style-name="P17" draw:layer="layout" draw:type="line" svg:x1="4.367cm" svg:y1="9.976cm" svg:x2="4.754cm" svg:y2="9.615cm" svg:d="M4367 9976l387-361" svg:viewBox="0 0 388 362">
              <text:p/>
            </draw:connector>
            <draw:connector draw:name="Straight Connector 106" draw:style-name="gr78" draw:text-style-name="P17" draw:layer="layout" draw:type="line" svg:x1="4.754cm" svg:y1="9.976cm" svg:x2="4.367cm" svg:y2="9.615cm" svg:d="M4754 9976l-387-361" svg:viewBox="0 0 388 362">
              <text:p/>
            </draw:connector>
          </draw:g>
        </draw:g>
        <presentation:notes draw:style-name="dp2">
          <draw:page-thumbnail draw:style-name="gr7" draw:layer="layout" svg:width="0.001cm" svg:height="0.001cm" svg:x="0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3" draw:master-page-name="Blank" presentation:presentation-page-layout-name="AL2T1">
        <draw:connector draw:style-name="gr99" draw:text-style-name="P1" draw:layer="layout" draw:type="line" svg:x1="10.695cm" svg:y1="6.261cm" svg:x2="10.695cm" svg:y2="7.437cm" svg:d="M10695 6261v1176" svg:viewBox="0 0 1 1177">
          <text:p/>
        </draw:connector>
        <draw:connector draw:name="Straight Connector 19" draw:style-name="gr69" draw:text-style-name="P17" draw:layer="layout" draw:type="line" svg:x1="13.304cm" svg:y1="3.186cm" svg:x2="10.882cm" svg:y2="5.724cm" svg:d="M13304 3186l-2422 2538" svg:viewBox="0 0 2423 2539">
          <text:p/>
        </draw:connector>
        <draw:connector draw:name="Straight Connector 20" draw:style-name="gr69" draw:text-style-name="P17" draw:layer="layout" draw:type="line" svg:x1="14.038cm" svg:y1="3.203cm" svg:x2="13.881cm" svg:y2="6.34cm" draw:start-shape="id1" draw:start-glue-point="2" draw:end-shape="id2" draw:end-glue-point="0" svg:d="M14038 3203l-157 3137" svg:viewBox="0 0 158 3138">
          <text:p/>
        </draw:connector>
        <draw:connector draw:name="Straight Connector 23" draw:style-name="gr69" draw:text-style-name="P17" draw:layer="layout" draw:type="line" svg:x1="11.922cm" svg:y1="5.732cm" svg:x2="18.418cm" svg:y2="3.176cm" svg:d="M11922 5732l6496-2556" svg:viewBox="0 0 6497 2557">
          <text:p/>
        </draw:connector>
        <draw:connector draw:name="Straight Connector 24" draw:style-name="gr69" draw:text-style-name="P17" draw:layer="layout" draw:type="line" svg:x1="19.117cm" svg:y1="2.877cm" svg:x2="14.189cm" svg:y2="6.481cm" svg:d="M19117 2877l-4928 3604" svg:viewBox="0 0 4929 3605">
          <text:p/>
        </draw:connector>
        <draw:connector draw:name="Straight Connector 25" draw:style-name="gr69" draw:text-style-name="P17" draw:layer="layout" draw:type="line" svg:x1="20.081cm" svg:y1="3.203cm" svg:x2="23.244cm" svg:y2="5.685cm" svg:d="M20081 3203l3163 2482" svg:viewBox="0 0 3164 2483">
          <text:p/>
        </draw:connector>
        <draw:connector draw:name="Straight Connector 2" draw:style-name="gr69" draw:text-style-name="P17" draw:layer="layout" draw:type="line" svg:x1="19.596cm" svg:y1="3.203cm" svg:x2="19.651cm" svg:y2="6.34cm" draw:end-shape="id3" draw:end-glue-point="0" svg:d="M19596 3203l55 3137" svg:viewBox="0 0 56 3138">
          <text:p/>
        </draw:connector>
        <draw:connector draw:name="Straight Connector 3" draw:style-name="gr69" draw:text-style-name="P17" draw:layer="layout" draw:type="line" svg:x1="15.108cm" svg:y1="3.14cm" svg:x2="22.415cm" svg:y2="5.685cm" svg:d="M15108 3140l7307 2545" svg:viewBox="0 0 7308 2546">
          <text:p/>
        </draw:connector>
        <draw:connector draw:name="Straight Connector 5" draw:style-name="gr69" draw:text-style-name="P17" draw:layer="layout" draw:type="line" svg:x1="14.668cm" svg:y1="3.14cm" svg:x2="18.945cm" svg:y2="6.368cm" svg:d="M14668 3140l4277 3228" svg:viewBox="0 0 4278 3229">
          <text:p/>
        </draw:connector>
        <draw:custom-shape draw:name="Rounded Rectangle 47" draw:style-name="gr100" draw:text-style-name="P33" xml:id="id4" draw:id="id4" draw:layer="layout" svg:width="3.194cm" svg:height="1.231cm" svg:x="13.67cm" svg:y="8.855cm">
          <text:p text:style-name="P24"><text:span text:style-name="T9">Server</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48" draw:style-name="gr101" draw:text-style-name="P34" xml:id="id5" draw:id="id5" draw:layer="layout" svg:width="3.194cm" svg:height="1.231cm" svg:x="13.67cm" svg:y="10.285cm">
          <text:p text:style-name="P24"><text:span text:style-name="T9">Server</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name="Elbow Connector 50" draw:style-name="gr69" draw:text-style-name="P17" draw:layer="layout" svg:x1="13.67cm" svg:y1="9.47cm" svg:x2="13.131cm" svg:y2="7.619cm" draw:start-shape="id4" draw:start-glue-point="3" svg:d="M13670 9470h-524v-1851h-15" svg:viewBox="0 0 540 1852">
          <text:p/>
        </draw:connector>
        <draw:connector draw:name="Elbow Connector 52" draw:style-name="gr69" draw:text-style-name="P17" draw:layer="layout" svg:x1="13.67cm" svg:y1="10.9cm" svg:x2="12.825cm" svg:y2="7.572cm" draw:start-shape="id5" draw:start-glue-point="3" svg:d="M13670 10900h-677v-3328h-168" svg:viewBox="0 0 846 3329">
          <text:p/>
        </draw:connector>
        <draw:connector draw:name="Elbow Connector 54" draw:style-name="gr69" draw:text-style-name="P17" draw:layer="layout" draw:line-skew="2.397cm" svg:x1="11.228cm" svg:y1="6.955cm" svg:x2="13.67cm" svg:y2="9.137cm" draw:start-shape="id6" draw:start-glue-point="2" svg:d="M11228 6955v3743h2442v-1561" svg:viewBox="0 0 2443 3744">
          <text:p/>
        </draw:connector>
        <draw:connector draw:name="Elbow Connector 55" draw:style-name="gr69" draw:text-style-name="P17" draw:layer="layout" svg:x1="10.701cm" svg:y1="7.428cm" svg:x2="13.67cm" svg:y2="11.034cm" svg:d="M10701 7428v1803h2969v1803" svg:viewBox="0 0 2970 3607">
          <text:p/>
        </draw:connector>
        <draw:frame draw:name="TextBox 71" draw:style-name="gr102" draw:text-style-name="P36" draw:layer="layout" svg:width="2.41cm" svg:height="1.351cm" svg:x="21.095cm" svg:y="13.173cm">
          <draw:text-box>
            <text:p text:style-name="P35"><text:span text:style-name="T7">External</text:span></text:p>
            <text:p text:style-name="P35"><text:span text:style-name="T7">Routers</text:span></text:p>
          </draw:text-box>
        </draw:frame>
        <draw:connector draw:name="Straight Connector 6" draw:style-name="gr69" draw:text-style-name="P17" draw:layer="layout" draw:type="line" svg:x1="19.651cm" svg:y1="7.571cm" svg:x2="22.3cm" svg:y2="11.905cm" draw:start-shape="id3" draw:start-glue-point="2" svg:d="M19651 7571l2649 4334" svg:viewBox="0 0 2650 4335">
          <text:p/>
        </draw:connector>
        <draw:connector draw:name="Straight Connector 76" draw:style-name="gr69" draw:text-style-name="P17" draw:layer="layout" draw:type="line" svg:x1="22.3cm" svg:y1="6.916cm" svg:x2="19.652cm" svg:y2="12.928cm" draw:start-shape="id7" draw:start-glue-point="2" svg:d="M22300 6916l-2648 6012" svg:viewBox="0 0 2649 6013">
          <text:p/>
        </draw:connector>
        <draw:connector draw:name="Straight Connector 79" draw:style-name="gr69" draw:text-style-name="P17" draw:layer="layout" draw:type="line" svg:x1="22.3cm" svg:y1="6.916cm" svg:x2="22.3cm" svg:y2="11.905cm" draw:start-shape="id7" draw:start-glue-point="2" svg:d="M22300 6916v4989" svg:viewBox="0 0 1 4990">
          <text:p/>
        </draw:connector>
        <draw:connector draw:name="Straight Connector 82" draw:style-name="gr69" draw:text-style-name="P17" draw:layer="layout" draw:type="line" svg:x1="19.651cm" svg:y1="7.571cm" svg:x2="19.652cm" svg:y2="12.928cm" draw:start-shape="id3" draw:start-glue-point="2" svg:d="M19651 7571l1 5357" svg:viewBox="0 0 2 5358">
          <text:p/>
        </draw:connector>
        <draw:connector draw:name="Straight Connector 89" draw:style-name="gr69" draw:text-style-name="P17" draw:layer="layout" draw:type="line" svg:x1="13.151cm" svg:y1="3.186cm" svg:x2="10.665cm" svg:y2="5.816cm" svg:d="M13151 3186l-2486 2630" svg:viewBox="0 0 2487 2631">
          <text:p/>
        </draw:connector>
        <draw:connector draw:name="Straight Connector 91" draw:style-name="gr69" draw:text-style-name="P17" draw:layer="layout" draw:type="line" svg:x1="11.757cm" svg:y1="5.705cm" svg:x2="18.252cm" svg:y2="3.126cm" svg:d="M11757 5705l6495-2579" svg:viewBox="0 0 6496 2580">
          <text:p/>
        </draw:connector>
        <draw:connector draw:name="Straight Connector 92" draw:style-name="gr69" draw:text-style-name="P17" draw:layer="layout" draw:type="line" svg:x1="13.884cm" svg:y1="3.203cm" svg:x2="13.727cm" svg:y2="6.34cm" svg:d="M13884 3203l-157 3137" svg:viewBox="0 0 158 3138">
          <text:p/>
        </draw:connector>
        <draw:connector draw:name="Straight Connector 93" draw:style-name="gr69" draw:text-style-name="P17" draw:layer="layout" draw:type="line" svg:x1="19.466cm" svg:y1="2.762cm" svg:x2="14.549cm" svg:y2="6.368cm" svg:d="M19466 2762l-4917 3606" svg:viewBox="0 0 4918 3607">
          <text:p/>
        </draw:connector>
        <draw:connector draw:name="Straight Connector 7" draw:style-name="gr69" draw:text-style-name="P17" draw:layer="layout" draw:type="line" svg:x1="14.828cm" svg:y1="3.149cm" svg:x2="22.815cm" svg:y2="5.981cm" svg:d="M14828 3149l7987 2832" svg:viewBox="0 0 7988 2833">
          <text:p/>
        </draw:connector>
        <draw:connector draw:name="Straight Connector 8" draw:style-name="gr69" draw:text-style-name="P17" draw:layer="layout" draw:type="line" svg:x1="20.33cm" svg:y1="3.203cm" svg:x2="23.493cm" svg:y2="5.685cm" svg:d="M20330 3203l3163 2482" svg:viewBox="0 0 3164 2483">
          <text:p/>
        </draw:connector>
        <draw:connector draw:name="Straight Connector 98" draw:style-name="gr69" draw:text-style-name="P17" draw:layer="layout" draw:type="line" svg:x1="19.739cm" svg:y1="3.213cm" svg:x2="19.805cm" svg:y2="6.378cm" svg:d="M19739 3213l66 3165" svg:viewBox="0 0 67 3166">
          <text:p/>
        </draw:connector>
        <draw:custom-shape draw:name="Rounded Rectangle 1" draw:style-name="gr103" draw:text-style-name="P37" draw:layer="layout" svg:width="3.194cm" svg:height="1.231cm" svg:x="17.54cm" svg:y="1.972cm">
          <text:p text:style-name="P24"><text:span text:style-name="T12">Spine 2</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5" draw:style-name="gr104" draw:text-style-name="P38" xml:id="id7" draw:id="id7" draw:layer="layout" svg:width="3.194cm" svg:height="1.231cm" svg:x="20.703cm" svg:y="5.685cm">
          <text:p text:style-name="P24"><text:span text:style-name="T9">Leaf 3</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2" draw:style-name="gr105" draw:text-style-name="P39" xml:id="id6" draw:id="id6" draw:layer="layout" svg:width="3.194cm" svg:height="1.231cm" svg:x="9.631cm" svg:y="5.724cm">
          <text:p text:style-name="P24"><text:span text:style-name="T9">Leaf 1</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6" draw:style-name="gr106" draw:text-style-name="P40" xml:id="id2" draw:id="id2" draw:layer="layout" svg:width="3.194cm" svg:height="1.231cm" svg:x="12.284cm" svg:y="6.34cm">
          <text:p text:style-name="P24"><text:span text:style-name="T9">Leaf 2</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8" draw:style-name="gr107" draw:text-style-name="P41" xml:id="id1" draw:id="id1" draw:layer="layout" svg:width="3.194cm" svg:height="1.231cm" svg:x="12.441cm" svg:y="1.972cm">
          <text:p text:style-name="P24"><text:span text:style-name="T12">Spine 1</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name="Straight Connector 130" draw:style-name="gr69" draw:text-style-name="P17" draw:layer="layout" draw:type="line" svg:x1="14.58cm" svg:y1="3.213cm" svg:x2="18.857cm" svg:y2="6.441cm" svg:d="M14580 3213l4277 3228" svg:viewBox="0 0 4278 3229">
          <text:p/>
        </draw:connector>
        <draw:custom-shape draw:name="Rounded Rectangle 3" draw:style-name="gr108" draw:text-style-name="P42" xml:id="id3" draw:id="id3" draw:layer="layout" svg:width="3.194cm" svg:height="1.231cm" svg:x="18.054cm" svg:y="6.34cm">
          <text:p text:style-name="P24"><text:span text:style-name="T9">Leaf 4</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Oval 131" draw:style-name="gr109" draw:text-style-name="P43" draw:layer="layout" svg:width="0.971cm" svg:height="0.398cm" svg:x="20.272cm" svg:y="3.4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3" draw:style-name="gr110" draw:text-style-name="P43" draw:layer="layout" svg:width="3.006cm" svg:height="0.427cm" svg:x="20.355cm" svg:y="5.10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4" draw:style-name="gr111" draw:text-style-name="P43" draw:layer="layout" svg:width="2.579cm" svg:height="0.516cm" svg:x="17.685cm" svg:y="5.63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5" draw:style-name="gr112" draw:text-style-name="P43" xml:id="id9" draw:id="id9" draw:layer="layout" svg:width="0.896cm" svg:height="0.35cm" svg:x="12.316cm" svg:y="3.46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6" draw:style-name="gr111" draw:text-style-name="P43" draw:layer="layout" svg:width="2.579cm" svg:height="0.516cm" svg:x="13.283cm" svg:y="5.62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7" draw:style-name="gr113" draw:text-style-name="P43" xml:id="id10" draw:id="id10" draw:layer="layout" svg:width="3.006cm" svg:height="0.427cm" svg:x="10.619cm" svg:y="5.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8" draw:style-name="gr114" draw:text-style-name="P43" xml:id="id13" draw:id="id13" draw:layer="layout" svg:width="0.385cm" svg:height="0.672cm" svg:x="13.155cm" svg:y="10.46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9" draw:style-name="gr114" draw:text-style-name="P43" xml:id="id12" draw:id="id12" draw:layer="layout" svg:width="0.385cm" svg:height="0.672cm" svg:x="13.216cm" svg:y="8.97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TextBox 141" draw:style-name="gr115" draw:text-style-name="P36" xml:id="id8" draw:id="id8" draw:layer="layout" svg:width="2.185cm" svg:height="1.351cm" svg:x="8.871cm" svg:y="2.963cm">
          <draw:text-box>
            <text:p text:style-name="P35"><text:span text:style-name="T7">ECMP</text:span></text:p>
            <text:p text:style-name="P35"><text:span text:style-name="T7">Groups</text:span></text:p>
          </draw:text-box>
        </draw:frame>
        <draw:connector draw:name="Straight Arrow Connector 143" draw:style-name="gr116" draw:text-style-name="P17" draw:layer="layout" draw:type="line" svg:x1="11.056cm" svg:y1="3.638cm" svg:x2="12.316cm" svg:y2="3.636cm" draw:start-shape="id8" draw:start-glue-point="1" draw:end-shape="id9" draw:end-glue-point="3" svg:d="M11056 3638l1260-2" svg:viewBox="0 0 1261 3">
          <text:p/>
        </draw:connector>
        <draw:connector draw:name="Straight Arrow Connector 145" draw:style-name="gr117" draw:text-style-name="P17" draw:layer="layout" draw:type="line" svg:x1="11.056cm" svg:y1="3.638cm" svg:x2="11.059cm" svg:y2="5.162cm" draw:start-shape="id8" draw:start-glue-point="1" draw:end-shape="id10" draw:end-glue-point="4" svg:d="M11056 3638l3 1524" svg:viewBox="0 0 4 1525">
          <text:p/>
        </draw:connector>
        <draw:custom-shape draw:name="Oval 150" draw:style-name="gr118" draw:text-style-name="P43" draw:layer="layout" svg:width="0.928cm" svg:height="0.369cm" svg:x="19.225cm" svg:y="3.60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51" draw:style-name="gr119" draw:text-style-name="P43" draw:layer="layout" svg:width="0.869cm" svg:height="0.329cm" svg:x="17.501cm" svg:y="3.61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52" draw:style-name="gr120" draw:text-style-name="P43" draw:layer="layout" svg:width="0.878cm" svg:height="0.269cm" svg:x="17.087cm" svg:y="3.31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53" draw:style-name="gr118" draw:text-style-name="P43" draw:layer="layout" svg:width="0.928cm" svg:height="0.369cm" svg:x="15.693cm" svg:y="3.33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54" draw:style-name="gr118" draw:text-style-name="P43" draw:layer="layout" svg:width="0.928cm" svg:height="0.369cm" svg:x="15.028cm" svg:y="3.68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55" draw:style-name="gr118" draw:text-style-name="P43" draw:layer="layout" svg:width="0.928cm" svg:height="0.369cm" svg:x="13.468cm" svg:y="3.57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TextBox 158" draw:style-name="gr121" draw:text-style-name="P36" draw:layer="layout" svg:width="3.434cm" svg:height="1.351cm" svg:x="13.453cm" svg:y="11.704cm">
          <draw:text-box>
            <text:p text:style-name="P35"><text:span text:style-name="T7">Dual-Homed</text:span></text:p>
            <text:p text:style-name="P35"><text:span text:style-name="T7">Servers</text:span></text:p>
          </draw:text-box>
        </draw:frame>
        <draw:frame draw:name="TextBox 159" draw:style-name="gr122" draw:text-style-name="P44" xml:id="id11" draw:id="id11" draw:layer="layout" svg:width="3.759cm" svg:height="0.84cm" svg:x="9.18cm" svg:y="11.905cm">
          <draw:text-box>
            <text:p text:style-name="P35"><text:span text:style-name="T7">Link Bonding</text:span></text:p>
          </draw:text-box>
        </draw:frame>
        <draw:connector draw:name="Straight Arrow Connector 161" draw:style-name="gr123" draw:text-style-name="P17" draw:layer="layout" draw:type="line" svg:x1="11.059cm" svg:y1="11.905cm" svg:x2="13.272cm" svg:y2="9.545cm" draw:start-shape="id11" draw:start-glue-point="0" draw:end-shape="id12" draw:end-glue-point="5" svg:d="M11059 11905l2213-2360" svg:viewBox="0 0 2214 2361">
          <text:p/>
        </draw:connector>
        <draw:connector draw:name="Straight Arrow Connector 163" draw:style-name="gr124" draw:text-style-name="P17" draw:layer="layout" draw:type="line" svg:x1="11.059cm" svg:y1="11.905cm" svg:x2="13.211cm" svg:y2="11.036cm" draw:start-shape="id11" draw:start-glue-point="0" draw:end-shape="id13" draw:end-glue-point="5" svg:d="M11059 11905l2152-869" svg:viewBox="0 0 2153 870">
          <text:p/>
        </draw:connector>
        <draw:frame draw:name="TextBox 164" draw:style-name="gr125" draw:text-style-name="P36" draw:layer="layout" svg:width="3.103cm" svg:height="1.898cm" svg:x="15.234cm" svg:y="6.467cm">
          <draw:text-box>
            <text:p text:style-name="P35"><text:span text:style-name="T7">Paired</text:span></text:p>
            <text:p text:style-name="P35"><text:span text:style-name="T7">Leaves</text:span></text:p>
            <text:p text:style-name="P35"><text:span text:style-name="T7">(Dual ToRs)</text:span></text:p>
          </draw:text-box>
        </draw:frame>
        <draw:frame draw:style-name="gr1" draw:text-style-name="P1" draw:layer="layout" svg:width="1.604cm" svg:height="1.083cm" svg:x="18.858cm" svg:y="12.928cm">
          <draw:image xlink:href="Pictures/10000001000001F3000001510BDF560F.png" xlink:type="simple" xlink:show="embed" xlink:actuate="onLoad" draw:mime-type="image/png">
            <text:p/>
          </draw:image>
        </draw:frame>
        <draw:frame draw:style-name="gr1" draw:text-style-name="P1" draw:layer="layout" svg:width="1.604cm" svg:height="1.083cm" svg:x="21.49cm" svg:y="11.838cm">
          <draw:image xlink:href="Pictures/10000001000001F3000001510BDF560F.png" xlink:type="simple" xlink:show="embed" xlink:actuate="onLoad" draw:mime-type="image/png">
            <text:p/>
          </draw:image>
        </draw:frame>
        <presentation:notes draw:style-name="dp2">
          <draw:page-thumbnail draw:style-name="gr7" draw:layer="layout" svg:width="0.001cm" svg:height="0.001cm" svg:x="0cm" svg:y="2.257cm" draw:page-number="7" presentation:class="page"/>
          <draw:frame presentation:style-name="pr2" draw:text-style-name="P8" draw:layer="layout" svg:width="16.799cm" svg:height="13.364cm" svg:x="2.1cm" svg:y="14.107cm" presentation:class="notes" presentation:placeholder="true">
            <draw:text-box/>
          </draw:frame>
        </presentation:notes>
      </draw:page>
      <draw:page draw:name="page8" draw:style-name="dp3" draw:master-page-name="Blank" presentation:presentation-page-layout-name="AL2T1">
        <draw:custom-shape draw:name="Rectangle 7" draw:style-name="gr126" draw:text-style-name="P46" draw:layer="layout" svg:width="4.971cm" svg:height="2.975cm" svg:x="18.823cm" svg:y="6.892cm">
          <text:p text:style-name="P45"><text:span text:style-name="T13">Match: </text:span></text:p>
          <text:p text:style-name="P45"><text:span text:style-name="T13">DST_IP <text:s/>= 10.0.2.1/32</text:span></text:p>
          <draw:enhanced-geometry svg:viewBox="0 0 21600 21600" draw:type="non-primitive" draw:enhanced-path="M 0 0 L 21600 0 21600 21600 0 21600 Z N"/>
        </draw:custom-shape>
        <draw:custom-shape draw:name="Rectangle 2" draw:style-name="gr126" draw:text-style-name="P46" draw:layer="layout" svg:width="4.971cm" svg:height="2.975cm" svg:x="8.203cm" svg:y="6.892cm">
          <text:p text:style-name="P45"><text:span text:style-name="T13">Match: </text:span></text:p>
          <text:p text:style-name="P45"><text:span text:style-name="T13">DST_IP <text:s/>= 10.0.2.0/24</text:span></text:p>
          <draw:enhanced-geometry svg:viewBox="0 0 21600 21600" draw:type="non-primitive" draw:enhanced-path="M 0 0 L 21600 0 21600 21600 0 21600 Z N"/>
        </draw:custom-shape>
        <draw:custom-shape draw:name="Rectangle 5" draw:style-name="gr126" draw:text-style-name="P46" xml:id="id15" draw:id="id15" draw:layer="layout" svg:width="4.971cm" svg:height="2.975cm" svg:x="7.903cm" svg:y="6.592cm">
          <text:p text:style-name="P45"><text:span text:style-name="T13">Match: </text:span></text:p>
          <text:p text:style-name="P45"><text:span text:style-name="T13">DST_IP <text:s/>= 10.0.2.0/24</text:span></text:p>
          <draw:enhanced-geometry svg:viewBox="0 0 21600 21600" draw:type="non-primitive" draw:enhanced-path="M 0 0 L 21600 0 21600 21600 0 21600 Z N"/>
        </draw:custom-shape>
        <draw:custom-shape draw:name="Rectangle 6" draw:style-name="gr126" draw:text-style-name="P46" xml:id="id17" draw:id="id17" draw:layer="layout" svg:width="4.971cm" svg:height="2.975cm" svg:x="18.523cm" svg:y="6.592cm">
          <text:p text:style-name="P45"><text:span text:style-name="T13">Match: </text:span></text:p>
          <text:p text:style-name="P45"><text:span text:style-name="T13">DST_IP <text:s/>= 10.0.2.1/32</text:span></text:p>
          <draw:enhanced-geometry svg:viewBox="0 0 21600 21600" draw:type="non-primitive" draw:enhanced-path="M 0 0 L 21600 0 21600 21600 0 21600 Z N"/>
        </draw:custom-shape>
        <draw:custom-shape draw:name="Oval 7" draw:style-name="gr127" draw:text-style-name="P47" xml:id="id19" draw:id="id19" draw:layer="layout" svg:width="4.971cm" svg:height="3.012cm" svg:x="7.903cm" svg:y="11.805cm">
          <text:p text:style-name="P45"><text:span text:style-name="T14">10.0.1.1/2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 draw:style-name="gr127" draw:text-style-name="P47" xml:id="id18" draw:id="id18" draw:layer="layout" svg:width="4.971cm" svg:height="3.012cm" svg:x="18.523cm" svg:y="11.805cm">
          <text:p text:style-name="P45"><text:span text:style-name="T14">10.0.2.1/2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Connector 10" draw:style-name="gr71" draw:text-style-name="P17" draw:layer="layout" draw:type="line" svg:x1="10.388cm" svg:y1="4.354cm" svg:x2="10.388cm" svg:y2="6.592cm" draw:start-shape="id14" draw:start-glue-point="2" draw:end-shape="id15" draw:end-glue-point="0" svg:d="M10388 4354v2238" svg:viewBox="0 0 1 2239">
          <text:p/>
        </draw:connector>
        <draw:connector draw:name="Straight Connector 11" draw:style-name="gr71" draw:text-style-name="P17" draw:layer="layout" draw:type="line" svg:x1="21.008cm" svg:y1="4.354cm" svg:x2="21.008cm" svg:y2="6.592cm" draw:start-shape="id16" draw:start-glue-point="2" draw:end-shape="id17" draw:end-glue-point="0" svg:d="M21008 4354v2238" svg:viewBox="0 0 1 2239">
          <text:p/>
        </draw:connector>
        <draw:connector draw:name="Straight Connector 14" draw:style-name="gr71" draw:text-style-name="P17" draw:layer="layout" draw:type="line" svg:x1="21.008cm" svg:y1="9.567cm" svg:x2="21.008cm" svg:y2="11.805cm" draw:start-shape="id17" draw:start-glue-point="2" draw:end-shape="id18" draw:end-glue-point="0" svg:d="M21008 9567v2238" svg:viewBox="0 0 1 2239">
          <text:p/>
        </draw:connector>
        <draw:connector draw:name="Straight Connector 17" draw:style-name="gr71" draw:text-style-name="P17" draw:layer="layout" draw:type="line" svg:x1="10.388cm" svg:y1="9.567cm" svg:x2="10.388cm" svg:y2="11.805cm" draw:start-shape="id15" draw:start-glue-point="2" draw:end-shape="id19" draw:end-glue-point="0" svg:d="M10388 9567v2238" svg:viewBox="0 0 1 2239">
          <text:p/>
        </draw:connector>
        <draw:connector draw:name="Straight Connector 9" draw:style-name="gr71" draw:text-style-name="P17" draw:layer="layout" draw:type="line" svg:x1="19.732cm" svg:y1="4.306cm" svg:x2="11.604cm" svg:y2="6.592cm" svg:d="M19732 4306l-8128 2286" svg:viewBox="0 0 8129 2287">
          <text:p/>
        </draw:connector>
        <draw:connector draw:name="Straight Connector 12" draw:style-name="gr71" draw:text-style-name="P17" draw:layer="layout" draw:type="line" svg:x1="19.732cm" svg:y1="6.592cm" svg:x2="11.698cm" svg:y2="4.33cm" svg:d="M19732 6592l-8034-2262" svg:viewBox="0 0 8035 2263">
          <text:p/>
        </draw:connector>
        <draw:frame draw:name="TextBox 26" draw:style-name="gr128" draw:text-style-name="P48" draw:layer="layout" svg:width="2.077cm" svg:height="1.795cm" svg:x="5.826cm" svg:y="7.182cm">
          <draw:text-box>
            <text:p text:style-name="P24"><text:span text:style-name="T9">Leaf 1</text:span></text:p>
            <text:p text:style-name="P24"><text:span text:style-name="T9">(101)</text:span></text:p>
          </draw:text-box>
        </draw:frame>
        <draw:frame draw:name="TextBox 27" draw:style-name="gr129" draw:text-style-name="P48" draw:layer="layout" svg:width="2.423cm" svg:height="1.795cm" svg:x="5.48cm" svg:y="1.969cm">
          <draw:text-box>
            <text:p text:style-name="P24"><text:span text:style-name="T9">Spine 1</text:span></text:p>
            <text:p text:style-name="P24"><text:span text:style-name="T9">(103)</text:span></text:p>
          </draw:text-box>
        </draw:frame>
        <draw:frame draw:name="TextBox 28" draw:style-name="gr129" draw:text-style-name="P48" draw:layer="layout" svg:width="2.423cm" svg:height="1.795cm" svg:x="23.458cm" svg:y="1.969cm">
          <draw:text-box>
            <text:p text:style-name="P24"><text:span text:style-name="T9">Spine 2</text:span></text:p>
            <text:p text:style-name="P24"><text:span text:style-name="T9">(104)</text:span></text:p>
          </draw:text-box>
        </draw:frame>
        <draw:frame draw:name="TextBox 29" draw:style-name="gr128" draw:text-style-name="P48" draw:layer="layout" svg:width="2.077cm" svg:height="1.795cm" svg:x="23.722cm" svg:y="7.182cm">
          <draw:text-box>
            <text:p text:style-name="P24"><text:span text:style-name="T9">Leaf 2</text:span></text:p>
            <text:p text:style-name="P24"><text:span text:style-name="T9">(102)</text:span></text:p>
          </draw:text-box>
        </draw:frame>
        <draw:connector draw:name="Straight Arrow Connector 38" draw:style-name="gr130" draw:text-style-name="P17" draw:layer="layout" draw:type="line" svg:x1="10.842cm" svg:y1="11.539cm" svg:x2="10.842cm" svg:y2="9.869cm" svg:d="M10842 11539v-1670" svg:viewBox="0 0 1 1671">
          <text:p/>
        </draw:connector>
        <draw:frame draw:name="TextBox 39" draw:style-name="gr131" draw:text-style-name="P49" draw:layer="layout" svg:width="1.003cm" svg:height="1.026cm" svg:x="10.733cm" svg:y="10.264cm">
          <draw:text-box>
            <text:p text:style-name="P20"><text:span text:style-name="T15">IP</text:span></text:p>
          </draw:text-box>
        </draw:frame>
        <draw:connector draw:name="Straight Arrow Connector 40" draw:style-name="gr132" draw:text-style-name="P17" draw:layer="layout" draw:type="line" svg:x1="21.389cm" svg:y1="11.526cm" svg:x2="21.389cm" svg:y2="9.857cm" svg:d="M21389 11526v-1669" svg:viewBox="0 0 1 1670">
          <text:p/>
        </draw:connector>
        <draw:frame draw:name="TextBox 41" draw:style-name="gr131" draw:text-style-name="P49" draw:layer="layout" svg:width="1.003cm" svg:height="1.026cm" svg:x="21.281cm" svg:y="10.251cm">
          <draw:text-box>
            <text:p text:style-name="P20"><text:span text:style-name="T15">IP</text:span></text:p>
          </draw:text-box>
        </draw:frame>
        <draw:custom-shape draw:name="Rectangle 4" draw:style-name="gr126" draw:text-style-name="P46" xml:id="id16" draw:id="id16" draw:layer="layout" svg:width="4.971cm" svg:height="2.975cm" svg:x="18.523cm" svg:y="1.379cm">
          <text:p text:style-name="P45"><text:span text:style-name="T13">Match:</text:span></text:p>
          <text:p text:style-name="P45"><text:span text:style-name="T13">Label = 102</text:span></text:p>
          <draw:enhanced-geometry svg:viewBox="0 0 21600 21600" draw:type="non-primitive" draw:enhanced-path="M 0 0 L 21600 0 21600 21600 0 21600 Z N"/>
        </draw:custom-shape>
        <draw:connector draw:name="Straight Arrow Connector 5" draw:style-name="gr133" draw:text-style-name="P17" draw:layer="layout" draw:type="line" svg:x1="10.842cm" svg:y1="6.313cm" svg:x2="10.842cm" svg:y2="4.644cm" svg:d="M10842 6313v-1669" svg:viewBox="0 0 1 1670">
          <text:p/>
        </draw:connector>
        <draw:connector draw:name="Straight Arrow Connector 51" draw:style-name="gr134" draw:text-style-name="P17" draw:layer="layout" draw:type="line" svg:x1="11.235cm" svg:y1="6.313cm" svg:x2="18.523cm" svg:y2="4.306cm" svg:d="M11235 6313l7288-2007" svg:viewBox="0 0 7289 2008">
          <text:p/>
        </draw:connector>
        <draw:frame draw:name="TextBox 53" draw:style-name="gr135" draw:text-style-name="P51" draw:layer="layout" svg:width="1.769cm" svg:height="1.488cm" svg:x="10.77cm" svg:y="4.799cm">
          <draw:text-box>
            <text:p text:style-name="P50"><text:span text:style-name="T15">Push</text:span></text:p>
            <text:p text:style-name="P50"><text:span text:style-name="T15">102</text:span></text:p>
          </draw:text-box>
        </draw:frame>
        <draw:connector draw:name="Straight Arrow Connector 55" draw:style-name="gr136" draw:text-style-name="P17" draw:layer="layout" draw:type="line" svg:x1="12.642cm" svg:y1="4.136cm" svg:x2="19.757cm" svg:y2="6.192cm" draw:end-shape="id20" draw:end-glue-point="3" svg:d="M12642 4136l7115 2056" svg:viewBox="0 0 7116 2057">
          <text:p/>
        </draw:connector>
        <draw:frame draw:name="TextBox 56" draw:style-name="gr131" draw:text-style-name="P49" xml:id="id20" draw:id="id20" draw:layer="layout" svg:width="1.003cm" svg:height="1.026cm" svg:x="19.757cm" svg:y="5.679cm">
          <draw:text-box>
            <text:p text:style-name="P20"><text:span text:style-name="T15">IP</text:span></text:p>
          </draw:text-box>
        </draw:frame>
        <draw:custom-shape draw:name="Rectangle 1" draw:style-name="gr126" draw:text-style-name="P46" xml:id="id14" draw:id="id14" draw:layer="layout" svg:width="4.971cm" svg:height="2.975cm" svg:x="7.903cm" svg:y="1.379cm">
          <text:p text:style-name="P45"><text:span text:style-name="T13">Match:</text:span></text:p>
          <text:p text:style-name="P45"><text:span text:style-name="T13">Label = 102</text:span></text:p>
          <draw:enhanced-geometry svg:viewBox="0 0 21600 21600" draw:type="non-primitive" draw:enhanced-path="M 0 0 L 21600 0 21600 21600 0 21600 Z N"/>
        </draw:custom-shape>
        <draw:connector draw:name="Straight Arrow Connector 59" draw:style-name="gr137" draw:text-style-name="P17" draw:layer="layout" draw:type="line" svg:x1="21.414cm" svg:y1="6.326cm" svg:x2="21.414cm" svg:y2="4.656cm" svg:d="M21414 6326v-1670" svg:viewBox="0 0 1 1671">
          <text:p/>
        </draw:connector>
        <draw:frame draw:name="TextBox 60" draw:style-name="gr131" draw:text-style-name="P49" draw:layer="layout" svg:width="1.003cm" svg:height="1.026cm" svg:x="21.341cm" svg:y="5.667cm">
          <draw:text-box>
            <text:p text:style-name="P20"><text:span text:style-name="T15">IP</text:span></text:p>
          </draw:text-box>
        </draw:frame>
        <draw:frame draw:name="TextBox 61" draw:style-name="gr138" draw:text-style-name="P51" draw:layer="layout" svg:width="3.038cm" svg:height="0.872cm" svg:x="12.732cm" svg:y="3.446cm">
          <draw:text-box>
            <text:p text:style-name="P50"><text:span text:style-name="T15">Pop</text:span><text:span text:style-name="T16"> </text:span><text:span text:style-name="T15">Label</text:span></text:p>
          </draw:text-box>
        </draw:frame>
        <draw:frame draw:name="TextBox 62" draw:style-name="gr138" draw:text-style-name="P51" draw:layer="layout" svg:width="3.038cm" svg:height="0.872cm" svg:x="21.327cm" svg:y="4.338cm">
          <draw:text-box>
            <text:p text:style-name="P50"><text:span text:style-name="T15">Pop</text:span><text:span text:style-name="T16"> </text:span><text:span text:style-name="T15">Label</text:span></text:p>
          </draw:text-box>
        </draw:frame>
        <draw:frame draw:name="TextBox 64" draw:style-name="gr139" draw:text-style-name="P48" draw:layer="layout" svg:width="2.18cm" svg:height="1.026cm" svg:x="5.695cm" svg:y="12.798cm">
          <draw:text-box>
            <text:p text:style-name="P24"><text:span text:style-name="T9">Host 1</text:span></text:p>
          </draw:text-box>
        </draw:frame>
        <draw:frame draw:name="TextBox 65" draw:style-name="gr139" draw:text-style-name="P48" draw:layer="layout" svg:width="2.18cm" svg:height="1.026cm" svg:x="23.522cm" svg:y="12.798cm">
          <draw:text-box>
            <text:p text:style-name="P24"><text:span text:style-name="T9">Host 2</text:span></text:p>
          </draw:text-box>
        </draw:frame>
        <presentation:notes draw:style-name="dp2">
          <draw:page-thumbnail draw:style-name="gr7" draw:layer="layout" svg:width="0.001cm" svg:height="0.001cm" svg:x="0cm" svg:y="2.257cm" draw:page-number="8" presentation:class="page"/>
          <draw:frame presentation:style-name="pr2" draw:text-style-name="P8" draw:layer="layout" svg:width="16.799cm" svg:height="13.364cm" svg:x="2.1cm" svg:y="14.107cm" presentation:class="notes" presentation:placeholder="true">
            <draw:text-box/>
          </draw:frame>
        </presentation:notes>
      </draw:page>
      <draw:page draw:name="page9" draw:style-name="dp3" draw:master-page-name="Blank" presentation:presentation-page-layout-name="AL2T1">
        <draw:custom-shape draw:style-name="gr140" draw:text-style-name="P15" draw:layer="layout" svg:width="12.745cm" svg:height="11.827cm" svg:x="5.121cm" svg:y="1.32cm">
          <text:p/>
          <draw:enhanced-geometry svg:viewBox="0 0 21600 21600" draw:type="rectangle" draw:enhanced-path="M 0 0 L 21600 0 21600 21600 0 21600 0 0 Z N"/>
        </draw:custom-shape>
        <draw:frame draw:style-name="gr141" draw:text-style-name="P9" draw:layer="layout" svg:width="0.753cm" svg:height="0.852cm" svg:x="4.904cm" svg:y="0.554cm">
          <draw:text-box>
            <text:p><text:span text:style-name="T2">0</text:span></text:p>
          </draw:text-box>
        </draw:frame>
        <draw:frame draw:style-name="gr142" draw:text-style-name="P9" draw:layer="layout" svg:width="1.004cm" svg:height="0.852cm" svg:x="11.305cm" svg:y="0.554cm">
          <draw:text-box>
            <text:p><text:span text:style-name="T2">16</text:span></text:p>
          </draw:text-box>
        </draw:frame>
        <draw:frame draw:style-name="gr142" draw:text-style-name="P9" draw:layer="layout" svg:width="1.004cm" svg:height="0.852cm" svg:x="17.105cm" svg:y="0.554cm">
          <draw:text-box>
            <text:p><text:span text:style-name="T2">31</text:span></text:p>
          </draw:text-box>
        </draw:frame>
        <draw:custom-shape draw:style-name="gr143" draw:text-style-name="P53" draw:layer="layout" svg:width="3.2cm" svg:height="1.695cm" svg:x="5.121cm" svg:y="3.02cm">
          <text:p text:style-name="P52"><text:span text:style-name="T2">Last Entry</text:span></text:p>
          <draw:enhanced-geometry svg:viewBox="0 0 21600 21600" draw:type="rectangle" draw:enhanced-path="M 0 0 L 21600 0 21600 21600 0 21600 0 0 Z N"/>
        </draw:custom-shape>
        <draw:custom-shape draw:style-name="gr144" draw:text-style-name="P55" draw:layer="layout" svg:width="12.745cm" svg:height="1.695cm" svg:x="5.121cm" svg:y="8.12cm">
          <text:p text:style-name="P54"><text:span text:style-name="T1"/></text:p>
          <draw:enhanced-geometry svg:viewBox="0 0 21600 21600" draw:type="rectangle" draw:enhanced-path="M 0 0 L 21600 0 21600 21600 0 21600 0 0 Z N"/>
        </draw:custom-shape>
        <draw:custom-shape draw:style-name="gr145" draw:text-style-name="P53" draw:layer="layout" svg:width="3.147cm" svg:height="1.695cm" svg:x="8.321cm" svg:y="3.02cm">
          <text:p text:style-name="P52"><text:span text:style-name="T2">Flags</text:span></text:p>
          <draw:enhanced-geometry svg:viewBox="0 0 21600 21600" draw:type="rectangle" draw:enhanced-path="M 0 0 L 21600 0 21600 21600 0 21600 0 0 Z N"/>
        </draw:custom-shape>
        <draw:frame draw:style-name="gr141" draw:text-style-name="P9" draw:layer="layout" svg:width="0.753cm" svg:height="0.852cm" svg:x="8.206cm" svg:y="0.554cm">
          <draw:text-box>
            <text:p><text:span text:style-name="T2">8</text:span></text:p>
          </draw:text-box>
        </draw:frame>
        <draw:custom-shape draw:style-name="gr143" draw:text-style-name="P53" draw:layer="layout" svg:width="3.2cm" svg:height="1.695cm" svg:x="5.121cm" svg:y="1.32cm">
          <text:p text:style-name="P52"><text:span text:style-name="T2">Next Hdr</text:span></text:p>
          <draw:enhanced-geometry svg:viewBox="0 0 21600 21600" draw:type="rectangle" draw:enhanced-path="M 0 0 L 21600 0 21600 21600 0 21600 0 0 Z N"/>
        </draw:custom-shape>
        <draw:custom-shape draw:style-name="gr145" draw:text-style-name="P53" draw:layer="layout" svg:width="3.147cm" svg:height="1.695cm" svg:x="8.321cm" svg:y="1.32cm">
          <text:p text:style-name="P52"><text:span text:style-name="T2">Hdr Ext Len</text:span></text:p>
          <draw:enhanced-geometry svg:viewBox="0 0 21600 21600" draw:type="rectangle" draw:enhanced-path="M 0 0 L 21600 0 21600 21600 0 21600 0 0 Z N"/>
        </draw:custom-shape>
        <draw:custom-shape draw:style-name="gr146" draw:text-style-name="P53" draw:layer="layout" svg:width="3.3cm" svg:height="1.695cm" svg:x="11.421cm" svg:y="1.32cm">
          <text:p text:style-name="P52"><text:span text:style-name="T2">Routing Type</text:span></text:p>
          <draw:enhanced-geometry svg:viewBox="0 0 21600 21600" draw:type="rectangle" draw:enhanced-path="M 0 0 L 21600 0 21600 21600 0 21600 0 0 Z N"/>
        </draw:custom-shape>
        <draw:custom-shape draw:style-name="gr147" draw:text-style-name="P53" draw:layer="layout" svg:width="6.419cm" svg:height="1.695cm" svg:x="11.421cm" svg:y="3.02cm">
          <text:p text:style-name="P52"><text:span text:style-name="T2">Tag</text:span></text:p>
          <draw:enhanced-geometry svg:viewBox="0 0 21600 21600" draw:type="rectangle" draw:enhanced-path="M 0 0 L 21600 0 21600 21600 0 21600 0 0 Z N"/>
        </draw:custom-shape>
        <draw:frame draw:style-name="gr148" draw:text-style-name="P9" draw:layer="layout" svg:width="3.334cm" svg:height="0.852cm" svg:x="14.621cm" svg:y="1.765cm">
          <draw:text-box>
            <text:p><text:span text:style-name="T2">Segments Left</text:span></text:p>
          </draw:text-box>
        </draw:frame>
        <draw:frame draw:style-name="gr149" draw:text-style-name="P56" draw:layer="layout" svg:width="8.159cm" svg:height="0.852cm" svg:x="7.414cm" svg:y="6.094cm">
          <draw:text-box>
            <text:p text:style-name="P3"><text:span text:style-name="T2">Segment List[0] (128-bit IPv6 Address)</text:span></text:p>
          </draw:text-box>
        </draw:frame>
        <draw:frame draw:style-name="gr149" draw:text-style-name="P56" draw:layer="layout" svg:width="8.168cm" svg:height="0.852cm" svg:x="7.409cm" svg:y="11.194cm">
          <draw:text-box>
            <text:p text:style-name="P3"><text:span text:style-name="T2">Segment List[n] (128-bit IPv6 Address)</text:span></text:p>
          </draw:text-box>
        </draw:frame>
        <draw:line draw:style-name="gr150" draw:text-style-name="P15" draw:layer="layout" svg:x1="5.06cm" svg:y1="9.37cm" svg:x2="7.598cm" svg:y2="8.759cm">
          <text:p/>
        </draw:line>
        <draw:line draw:style-name="gr150" draw:text-style-name="P15" draw:layer="layout" svg:x1="9.96cm" svg:y1="9.371cm" svg:x2="12.654cm" svg:y2="8.642cm">
          <text:p/>
        </draw:line>
        <draw:line draw:style-name="gr150" draw:text-style-name="P15" draw:layer="layout" svg:x1="15.265cm" svg:y1="9.372cm" svg:x2="18.017cm" svg:y2="8.556cm">
          <text:p/>
        </draw:line>
        <draw:line draw:style-name="gr150" draw:text-style-name="P15" draw:layer="layout" svg:x1="7.598cm" svg:y1="8.759cm" svg:x2="9.96cm" svg:y2="9.371cm">
          <text:p/>
        </draw:line>
        <draw:line draw:style-name="gr150" draw:text-style-name="P15" draw:layer="layout" svg:x1="12.654cm" svg:y1="8.642cm" svg:x2="15.265cm" svg:y2="9.372cm">
          <text:p/>
        </draw:line>
        <presentation:notes draw:style-name="dp2">
          <draw:page-thumbnail draw:style-name="gr7" draw:layer="layout" svg:width="0.001cm" svg:height="0.001cm" svg:x="0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page10" draw:style-name="dp3" draw:master-page-name="Blank" presentation:presentation-page-layout-name="AL2T1">
        <draw:g draw:style-name="gr12">
          <draw:custom-shape draw:name="Oval 4" draw:style-name="gr151" draw:text-style-name="P58" xml:id="id21" draw:id="id21" draw:layer="layout" svg:width="2.15cm" svg:height="1.271cm" svg:x="0.685cm" svg:y="1.627cm">
            <text:p text:style-name="P57"><text:span text:style-name="T11">Phy</text:span></text:p>
            <text:p text:style-name="P57"><text:span text:style-name="T11">Port</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Rounded Rectangle 5" draw:style-name="gr152" draw:text-style-name="P58" xml:id="id22" draw:id="id22" draw:layer="layout" svg:width="2.122cm" svg:height="2.772cm" svg:x="0.699cm" svg:y="3.561cm">
            <text:p text:style-name="P57"><text:span text:style-name="T17">Ingress</text:span></text:p>
            <text:p text:style-name="P57"><text:span text:style-name="T11">Port</text:span></text:p>
            <text:p text:style-name="P57"><text:span text:style-name="T11">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6" draw:style-name="gr152" draw:text-style-name="P58" xml:id="id23" draw:id="id23" draw:layer="layout" svg:width="2.122cm" svg:height="2.772cm" svg:x="0.699cm" svg:y="6.997cm">
            <text:p text:style-name="P57"><text:span text:style-name="T11">VLAN</text:span></text:p>
            <text:p text:style-name="P57"><text:span text:style-name="T11">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7" draw:style-name="gr153" draw:text-style-name="P58" xml:id="id25" draw:id="id25" draw:layer="layout" svg:width="2.125cm" svg:height="2.772cm" svg:x="3.355cm" svg:y="6.997cm">
            <text:p text:style-name="P57"><text:span text:style-name="T11">Termin-ation MAC</text:span></text:p>
            <text:p text:style-name="P57"><text:span text:style-name="T11">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8" draw:style-name="gr154" draw:text-style-name="P58" xml:id="id26" draw:id="id26" draw:layer="layout" svg:width="2.166cm" svg:height="2.248cm" svg:x="3.36cm" svg:y="10.438cm">
            <text:p text:style-name="P57"><text:span text:style-name="T11">MPLS</text:span></text:p>
            <text:p text:style-name="P57"><text:span text:style-name="T11">L2 Port</text:span></text:p>
            <text:p text:style-name="P57"><text:span text:style-name="T11">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9" draw:style-name="gr155" draw:text-style-name="P58" xml:id="id24" draw:id="id24" draw:layer="layout" svg:width="2.32cm" svg:height="2.248cm" svg:x="0.6cm" svg:y="10.438cm">
            <text:p text:style-name="P57"><text:span text:style-name="T11">VLAN 1</text:span></text:p>
            <text:p text:style-name="P57"><text:span text:style-name="T11">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0" draw:style-name="gr156" draw:text-style-name="P58" xml:id="id30" draw:id="id30" draw:layer="layout" svg:width="2.724cm" svg:height="2.019cm" svg:x="6.505cm" svg:y="13.034cm">
            <text:p text:style-name="P57"><text:span text:style-name="T11">Bridging 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1" draw:style-name="gr156" draw:text-style-name="P58" xml:id="id29" draw:id="id29" draw:layer="layout" svg:width="2.724cm" svg:height="2.019cm" svg:x="6.505cm" svg:y="9.601cm">
            <text:p text:style-name="P57"><text:span text:style-name="T11">MPLS 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2" draw:style-name="gr156" draw:text-style-name="P58" xml:id="id28" draw:id="id28" draw:layer="layout" svg:width="2.724cm" svg:height="2.019cm" svg:x="6.505cm" svg:y="5.669cm">
            <text:p text:style-name="P57"><text:span text:style-name="T11">Unicast Routing 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3" draw:style-name="gr157" draw:text-style-name="P58" xml:id="id27" draw:id="id27" draw:layer="layout" svg:width="2.724cm" svg:height="2.02cm" svg:x="6.505cm" svg:y="2.12cm">
            <text:p text:style-name="P57"><text:span text:style-name="T11">Multicast</text:span></text:p>
            <text:p text:style-name="P57"><text:span text:style-name="T11">Routing 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4" draw:style-name="gr158" draw:text-style-name="P58" xml:id="id31" draw:id="id31" draw:layer="layout" svg:width="2.123cm" svg:height="2.772cm" svg:x="9.998cm" svg:y="7.204cm">
            <text:p text:style-name="P57"><text:span text:style-name="T11">ACL Policy Tabl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9" draw:style-name="gr159" draw:text-style-name="P58" xml:id="id40" draw:id="id40" draw:layer="layout" svg:width="2.725cm" svg:height="1.905cm" svg:x="13.138cm" svg:y="9.603cm">
            <text:p text:style-name="P57"><text:span text:style-name="T11">L2 Flood Group</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20" draw:style-name="gr160" draw:text-style-name="P58" xml:id="id39" draw:id="id39" draw:layer="layout" svg:width="2.723cm" svg:height="1.905cm" svg:x="13.135cm" svg:y="5.826cm">
            <text:p text:style-name="P57"><text:span text:style-name="T11">L3 Unicast Group</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22" draw:style-name="gr160" draw:text-style-name="P58" xml:id="id36" draw:id="id36" draw:layer="layout" svg:width="2.723cm" svg:height="1.905cm" svg:x="13.135cm" svg:y="2.551cm">
            <text:p text:style-name="P57"><text:span text:style-name="T11">L3 ECMP Group</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23" draw:style-name="gr161" draw:text-style-name="P58" xml:id="id37" draw:id="id37" draw:layer="layout" svg:width="2.724cm" svg:height="1.903cm" svg:x="16.454cm" svg:y="1.427cm">
            <text:p text:style-name="P57"><text:span text:style-name="T11">MPLS Label Group</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24" draw:style-name="gr162" draw:text-style-name="P58" xml:id="id38" draw:id="id38" draw:layer="layout" svg:width="2.724cm" svg:height="1.905cm" svg:x="16.454cm" svg:y="3.619cm">
            <text:p text:style-name="P57"><text:span text:style-name="T11">MPLS Label Group</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25" draw:style-name="gr163" draw:text-style-name="P58" xml:id="id32" draw:id="id32" draw:layer="layout" svg:width="2.723cm" svg:height="1.904cm" svg:x="21.091cm" svg:y="7.645cm">
            <text:p text:style-name="P57"><text:span text:style-name="T11">L2 Interface Group</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26" draw:style-name="gr163" draw:text-style-name="P58" xml:id="id34" draw:id="id34" draw:layer="layout" svg:width="2.723cm" svg:height="1.904cm" svg:x="21.091cm" svg:y="9.948cm">
            <text:p text:style-name="P57"><text:span text:style-name="T11">L2 Interface Group</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27" draw:style-name="gr164" draw:text-style-name="P58" xml:id="id41" draw:id="id41" draw:layer="layout" svg:width="2.723cm" svg:height="1.906cm" svg:x="13.135cm" svg:y="12.805cm">
            <text:p text:style-name="P57"><text:span text:style-name="T11">L3 Multicast Group</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Oval 28" draw:style-name="gr151" draw:text-style-name="P58" xml:id="id33" draw:id="id33" draw:layer="layout" svg:width="2.15cm" svg:height="1.271cm" svg:x="24.254cm" svg:y="7.962cm">
            <text:p text:style-name="P57"><text:span text:style-name="T11">Phy Port</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9" draw:style-name="gr165" draw:text-style-name="P58" xml:id="id35" draw:id="id35" draw:layer="layout" svg:width="2.151cm" svg:height="1.271cm" svg:x="24.239cm" svg:y="10.264cm">
            <text:p text:style-name="P57"><text:span text:style-name="T11">Phy Port</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TextBox 32" draw:style-name="gr166" draw:text-style-name="P60" draw:layer="layout" svg:width="2.397cm" svg:height="0.789cm" svg:x="21.339cm" svg:y="6.866cm">
            <draw:text-box>
              <text:p text:style-name="P59"><text:span text:style-name="T11">INDIRECT</text:span></text:p>
            </draw:text-box>
          </draw:frame>
          <draw:frame draw:name="TextBox 1" draw:style-name="gr166" draw:text-style-name="P60" draw:layer="layout" svg:width="2.397cm" svg:height="0.789cm" svg:x="16.703cm" svg:y="0.658cm">
            <draw:text-box>
              <text:p text:style-name="P59"><text:span text:style-name="T11">INDIRECT</text:span></text:p>
            </draw:text-box>
          </draw:frame>
          <draw:frame draw:name="TextBox 2" draw:style-name="gr167" draw:text-style-name="P60" draw:layer="layout" svg:width="1.932cm" svg:height="0.789cm" svg:x="13.598cm" svg:y="1.785cm">
            <draw:text-box>
              <text:p text:style-name="P59"><text:span text:style-name="T11">SELECT</text:span></text:p>
            </draw:text-box>
          </draw:frame>
          <draw:frame draw:name="TextBox 3" draw:style-name="gr166" draw:text-style-name="P60" draw:layer="layout" svg:width="2.397cm" svg:height="0.789cm" svg:x="13.382cm" svg:y="5.037cm">
            <draw:text-box>
              <text:p text:style-name="P59"><text:span text:style-name="T11">INDIRECT</text:span></text:p>
            </draw:text-box>
          </draw:frame>
          <draw:frame draw:name="TextBox 36" draw:style-name="gr168" draw:text-style-name="P60" draw:layer="layout" svg:width="1.213cm" svg:height="0.789cm" svg:x="13.933cm" svg:y="8.827cm">
            <draw:text-box>
              <text:p text:style-name="P59"><text:span text:style-name="T11">ALL</text:span></text:p>
            </draw:text-box>
          </draw:frame>
          <draw:frame draw:name="TextBox 37" draw:style-name="gr168" draw:text-style-name="P60" draw:layer="layout" svg:width="1.213cm" svg:height="0.789cm" svg:x="13.933cm" svg:y="12.033cm">
            <draw:text-box>
              <text:p text:style-name="P59"><text:span text:style-name="T11">ALL</text:span></text:p>
            </draw:text-box>
          </draw:frame>
          <draw:connector draw:name="Straight Arrow Connector 39" draw:style-name="gr169" draw:text-style-name="P17" draw:layer="layout" draw:type="line" svg:x1="1.76cm" svg:y1="2.898cm" svg:x2="1.76cm" svg:y2="3.561cm" draw:start-shape="id21" draw:start-glue-point="2" draw:end-shape="id22" draw:end-glue-point="0" svg:d="M1760 2898v663" svg:viewBox="0 0 1 664">
            <text:p/>
          </draw:connector>
          <draw:connector draw:name="Straight Arrow Connector 42" draw:style-name="gr170" draw:text-style-name="P17" draw:layer="layout" draw:type="line" svg:x1="1.76cm" svg:y1="6.333cm" svg:x2="1.76cm" svg:y2="6.997cm" draw:start-shape="id22" draw:start-glue-point="2" draw:end-shape="id23" draw:end-glue-point="0" svg:d="M1760 6333v664" svg:viewBox="0 0 1 665">
            <text:p/>
          </draw:connector>
          <draw:connector draw:name="Straight Arrow Connector 45" draw:style-name="gr171" draw:text-style-name="P17" draw:layer="layout" draw:type="line" svg:x1="1.76cm" svg:y1="9.769cm" svg:x2="1.76cm" svg:y2="10.438cm" draw:start-shape="id23" draw:start-glue-point="2" draw:end-shape="id24" draw:end-glue-point="0" svg:d="M1760 9769v669" svg:viewBox="0 0 1 670">
            <text:p/>
          </draw:connector>
          <draw:connector draw:name="Straight Arrow Connector 49" draw:style-name="gr172" draw:text-style-name="P17" draw:layer="layout" draw:type="line" svg:x1="2.821cm" svg:y1="8.383cm" svg:x2="3.355cm" svg:y2="8.383cm" draw:start-shape="id23" draw:start-glue-point="1" draw:end-shape="id25" draw:end-glue-point="3" svg:d="M2821 8383h534" svg:viewBox="0 0 535 1">
            <text:p/>
          </draw:connector>
          <draw:connector draw:name="Straight Arrow Connector 50" draw:style-name="gr173" draw:text-style-name="P17" draw:layer="layout" draw:type="line" svg:x1="2.92cm" svg:y1="11.562cm" svg:x2="3.36cm" svg:y2="11.562cm" draw:start-shape="id24" draw:start-glue-point="1" draw:end-shape="id26" draw:end-glue-point="3" svg:d="M2920 11562h440" svg:viewBox="0 0 441 1">
            <text:p/>
          </draw:connector>
          <draw:connector draw:name="Straight Arrow Connector 53" draw:style-name="gr174" draw:text-style-name="P17" draw:layer="layout" draw:type="line" svg:x1="5.48cm" svg:y1="8.383cm" svg:x2="6.505cm" svg:y2="3.13cm" draw:start-shape="id25" draw:start-glue-point="1" draw:end-shape="id27" draw:end-glue-point="3" svg:d="M5480 8383l1025-5253" svg:viewBox="0 0 1026 5254">
            <text:p/>
          </draw:connector>
          <draw:connector draw:name="Straight Arrow Connector 57" draw:style-name="gr175" draw:text-style-name="P17" draw:layer="layout" draw:type="line" svg:x1="5.48cm" svg:y1="8.383cm" svg:x2="6.505cm" svg:y2="6.678cm" draw:start-shape="id25" draw:start-glue-point="1" draw:end-shape="id28" draw:end-glue-point="3" svg:d="M5480 8383l1025-1705" svg:viewBox="0 0 1026 1706">
            <text:p/>
          </draw:connector>
          <draw:connector draw:name="Straight Arrow Connector 60" draw:style-name="gr176" draw:text-style-name="P17" draw:layer="layout" draw:type="line" svg:x1="5.48cm" svg:y1="8.383cm" svg:x2="6.505cm" svg:y2="10.61cm" draw:start-shape="id25" draw:start-glue-point="1" draw:end-shape="id29" draw:end-glue-point="3" svg:d="M5480 8383l1025 2227" svg:viewBox="0 0 1026 2228">
            <text:p/>
          </draw:connector>
          <draw:connector draw:name="Straight Arrow Connector 1" draw:style-name="gr177" draw:text-style-name="P17" draw:layer="layout" draw:type="line" svg:x1="5.48cm" svg:y1="8.383cm" svg:x2="6.505cm" svg:y2="14.043cm" draw:start-shape="id25" draw:start-glue-point="1" draw:end-shape="id30" draw:end-glue-point="3" svg:d="M5480 8383l1025 5660" svg:viewBox="0 0 1026 5661">
            <text:p/>
          </draw:connector>
          <draw:connector draw:name="Straight Arrow Connector 66" draw:style-name="gr178" draw:text-style-name="P17" draw:layer="layout" draw:type="line" svg:x1="6.505cm" svg:y1="8.59cm" svg:x2="9.998cm" svg:y2="8.59cm" draw:end-shape="id31" draw:end-glue-point="3" svg:d="M6505 8590h3493" svg:viewBox="0 0 3494 1">
            <text:p/>
          </draw:connector>
          <draw:connector draw:name="Straight Connector 71" draw:style-name="gr179" draw:text-style-name="P17" draw:layer="layout" draw:type="line" svg:x1="5.526cm" svg:y1="11.562cm" svg:x2="6.505cm" svg:y2="8.59cm" draw:start-shape="id26" draw:start-glue-point="1" svg:d="M5526 11562l979-2972" svg:viewBox="0 0 980 2973">
            <text:p/>
          </draw:connector>
          <draw:connector draw:name="Straight Arrow Connector 72" draw:style-name="gr180" draw:text-style-name="P17" draw:layer="layout" draw:type="line" svg:x1="9.229cm" svg:y1="6.678cm" svg:x2="9.998cm" svg:y2="8.59cm" draw:start-shape="id28" draw:start-glue-point="1" draw:end-shape="id31" draw:end-glue-point="3" svg:d="M9229 6678l769 1912" svg:viewBox="0 0 770 1913">
            <text:p/>
          </draw:connector>
          <draw:connector draw:name="Straight Arrow Connector 2" draw:style-name="gr181" draw:text-style-name="P17" draw:layer="layout" draw:type="line" svg:x1="9.229cm" svg:y1="3.13cm" svg:x2="9.998cm" svg:y2="8.59cm" draw:start-shape="id27" draw:start-glue-point="1" draw:end-shape="id31" draw:end-glue-point="3" svg:d="M9229 3130l769 5460" svg:viewBox="0 0 770 5461">
            <text:p/>
          </draw:connector>
          <draw:connector draw:name="Straight Arrow Connector 78" draw:style-name="gr182" draw:text-style-name="P17" draw:layer="layout" draw:type="line" svg:x1="9.229cm" svg:y1="10.61cm" svg:x2="9.998cm" svg:y2="8.59cm" draw:start-shape="id29" draw:start-glue-point="1" draw:end-shape="id31" draw:end-glue-point="3" svg:d="M9229 10610l769-2020" svg:viewBox="0 0 770 2021">
            <text:p/>
          </draw:connector>
          <draw:connector draw:name="Straight Arrow Connector 81" draw:style-name="gr183" draw:text-style-name="P17" draw:layer="layout" draw:type="line" svg:x1="9.229cm" svg:y1="14.043cm" svg:x2="9.998cm" svg:y2="8.59cm" draw:start-shape="id30" draw:start-glue-point="1" draw:end-shape="id31" draw:end-glue-point="3" svg:d="M9229 14043l769-5453" svg:viewBox="0 0 770 5454">
            <text:p/>
          </draw:connector>
          <draw:connector draw:name="Straight Arrow Connector 84" draw:style-name="gr184" draw:text-style-name="P17" draw:layer="layout" draw:type="line" svg:x1="23.814cm" svg:y1="8.597cm" svg:x2="24.254cm" svg:y2="8.597cm" draw:start-shape="id32" draw:start-glue-point="1" draw:end-shape="id33" draw:end-glue-point="3" svg:d="M23814 8597h440" svg:viewBox="0 0 441 1">
            <text:p/>
          </draw:connector>
          <draw:connector draw:name="Straight Arrow Connector 89" draw:style-name="gr185" draw:text-style-name="P17" draw:layer="layout" draw:type="line" svg:x1="23.814cm" svg:y1="10.9cm" svg:x2="24.239cm" svg:y2="10.899cm" draw:start-shape="id34" draw:start-glue-point="1" draw:end-shape="id35" draw:end-glue-point="3" svg:d="M23814 10900l425-1" svg:viewBox="0 0 426 2">
            <text:p/>
          </draw:connector>
          <draw:connector draw:name="Straight Arrow Connector 92" draw:style-name="gr186" draw:text-style-name="P17" draw:layer="layout" draw:type="line" svg:x1="15.858cm" svg:y1="3.503cm" svg:x2="16.454cm" svg:y2="2.378cm" draw:start-shape="id36" draw:start-glue-point="1" draw:end-shape="id37" draw:end-glue-point="3" svg:d="M15858 3503l596-1125" svg:viewBox="0 0 597 1126">
            <text:p/>
          </draw:connector>
          <draw:connector draw:name="Straight Arrow Connector 95" draw:style-name="gr187" draw:text-style-name="P17" draw:layer="layout" draw:type="line" svg:x1="15.858cm" svg:y1="3.503cm" svg:x2="16.454cm" svg:y2="4.571cm" draw:start-shape="id36" draw:start-glue-point="1" draw:end-shape="id38" draw:end-glue-point="3" svg:d="M15858 3503l596 1068" svg:viewBox="0 0 597 1069">
            <text:p/>
          </draw:connector>
          <draw:connector draw:name="Straight Arrow Connector 3" draw:style-name="gr188" draw:text-style-name="P17" draw:layer="layout" draw:type="line" svg:x1="12.121cm" svg:y1="8.59cm" svg:x2="13.135cm" svg:y2="3.503cm" draw:start-shape="id31" draw:start-glue-point="1" draw:end-shape="id36" draw:end-glue-point="3" svg:d="M12121 8590l1014-5087" svg:viewBox="0 0 1015 5088">
            <text:p/>
          </draw:connector>
          <draw:connector draw:name="Straight Arrow Connector 101" draw:style-name="gr189" draw:text-style-name="P17" draw:layer="layout" draw:type="line" svg:x1="12.121cm" svg:y1="8.59cm" svg:x2="13.135cm" svg:y2="6.778cm" draw:start-shape="id31" draw:start-glue-point="1" draw:end-shape="id39" draw:end-glue-point="3" svg:d="M12121 8590l1014-1812" svg:viewBox="0 0 1015 1813">
            <text:p/>
          </draw:connector>
          <draw:connector draw:name="Straight Arrow Connector 104" draw:style-name="gr190" draw:text-style-name="P17" draw:layer="layout" draw:type="line" svg:x1="12.121cm" svg:y1="8.59cm" svg:x2="13.138cm" svg:y2="10.555cm" draw:start-shape="id31" draw:start-glue-point="1" draw:end-shape="id40" draw:end-glue-point="3" svg:d="M12121 8590l1017 1965" svg:viewBox="0 0 1018 1966">
            <text:p/>
          </draw:connector>
          <draw:connector draw:name="Straight Arrow Connector 4" draw:style-name="gr191" draw:text-style-name="P17" draw:layer="layout" draw:type="line" svg:x1="12.121cm" svg:y1="8.59cm" svg:x2="13.135cm" svg:y2="13.758cm" draw:start-shape="id31" draw:start-glue-point="1" draw:end-shape="id41" draw:end-glue-point="3" svg:d="M12121 8590l1014 5168" svg:viewBox="0 0 1015 5169">
            <text:p/>
          </draw:connector>
          <draw:connector draw:name="Straight Arrow Connector 111" draw:style-name="gr192" draw:text-style-name="P17" draw:layer="layout" draw:type="line" svg:x1="12.121cm" svg:y1="8.59cm" svg:x2="21.091cm" svg:y2="8.597cm" draw:start-shape="id31" draw:start-glue-point="1" draw:end-shape="id32" draw:end-glue-point="3" svg:d="M12121 8590l8970 7" svg:viewBox="0 0 8971 8">
            <text:p/>
          </draw:connector>
          <draw:connector draw:name="Straight Arrow Connector 114" draw:style-name="gr193" draw:text-style-name="P17" draw:layer="layout" draw:type="line" svg:x1="15.858cm" svg:y1="13.758cm" svg:x2="21.091cm" svg:y2="10.9cm" draw:start-shape="id41" draw:start-glue-point="1" draw:end-shape="id34" draw:end-glue-point="3" svg:d="M15858 13758l5233-2858" svg:viewBox="0 0 5234 2859">
            <text:p/>
          </draw:connector>
          <draw:connector draw:name="Straight Arrow Connector 117" draw:style-name="gr194" draw:text-style-name="P17" draw:layer="layout" draw:type="line" svg:x1="15.858cm" svg:y1="13.758cm" svg:x2="21.091cm" svg:y2="8.597cm" draw:start-shape="id41" draw:start-glue-point="1" draw:end-shape="id32" draw:end-glue-point="3" svg:d="M15858 13758l5233-5161" svg:viewBox="0 0 5234 5162">
            <text:p/>
          </draw:connector>
          <draw:connector draw:name="Straight Arrow Connector 120" draw:style-name="gr195" draw:text-style-name="P17" draw:layer="layout" draw:type="line" svg:x1="15.863cm" svg:y1="10.555cm" svg:x2="21.091cm" svg:y2="8.597cm" draw:start-shape="id40" draw:start-glue-point="1" draw:end-shape="id32" draw:end-glue-point="3" svg:d="M15863 10555l5228-1958" svg:viewBox="0 0 5229 1959">
            <text:p/>
          </draw:connector>
          <draw:connector draw:name="Straight Arrow Connector 123" draw:style-name="gr196" draw:text-style-name="P17" draw:layer="layout" draw:type="line" svg:x1="15.863cm" svg:y1="10.555cm" svg:x2="21.091cm" svg:y2="10.9cm" draw:start-shape="id40" draw:start-glue-point="1" draw:end-shape="id34" draw:end-glue-point="3" svg:d="M15863 10555l5228 345" svg:viewBox="0 0 5229 346">
            <text:p/>
          </draw:connector>
          <draw:connector draw:name="Straight Arrow Connector 126" draw:style-name="gr197" draw:text-style-name="P17" draw:layer="layout" draw:type="line" svg:x1="19.178cm" svg:y1="4.571cm" svg:x2="21.091cm" svg:y2="10.9cm" draw:start-shape="id38" draw:start-glue-point="1" draw:end-shape="id34" draw:end-glue-point="3" svg:d="M19178 4571l1913 6329" svg:viewBox="0 0 1914 6330">
            <text:p/>
          </draw:connector>
          <draw:connector draw:name="Straight Arrow Connector 129" draw:style-name="gr198" draw:text-style-name="P17" draw:layer="layout" draw:type="line" svg:x1="19.178cm" svg:y1="2.378cm" svg:x2="21.091cm" svg:y2="8.597cm" draw:start-shape="id37" draw:start-glue-point="1" draw:end-shape="id32" draw:end-glue-point="3" svg:d="M19178 2378l1913 6219" svg:viewBox="0 0 1914 6220">
            <text:p/>
          </draw:connector>
          <draw:connector draw:name="Straight Arrow Connector 132" draw:style-name="gr199" draw:text-style-name="P17" draw:layer="layout" draw:type="line" svg:x1="15.858cm" svg:y1="6.778cm" svg:x2="21.091cm" svg:y2="8.597cm" draw:start-shape="id39" draw:start-glue-point="1" draw:end-shape="id32" draw:end-glue-point="3" svg:d="M15858 6778l5233 1819" svg:viewBox="0 0 5234 1820">
            <text:p/>
          </draw:connector>
        </draw:g>
        <presentation:notes draw:style-name="dp2">
          <draw:page-thumbnail draw:style-name="gr7" draw:layer="layout" svg:width="0.001cm" svg:height="0.001cm" svg:x="0cm" svg:y="2.257cm" draw:page-number="10"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a1084"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1088"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1112" draw:style="linear" draw:start-color="#71a6db" draw:end-color="#559bdb" draw:start-intensity="100%" draw:end-intensity="100%" draw:angle="0deg" draw:border="0%">
      <loext:gradient-stop svg:offset="0" loext:color-type="rgb" loext:color-value="#71a6db"/>
      <loext:gradient-stop svg:offset="1" loext:color-type="rgb" loext:color-value="#559bdb"/>
    </draw:gradient>
    <draw:gradient draw:name="a1116" draw:style="linear" draw:start-color="#b1cbe9" draw:end-color="#a3c1e5" draw:start-intensity="100%" draw:end-intensity="100%" draw:angle="0deg" draw:border="0%">
      <loext:gradient-stop svg:offset="0" loext:color-type="rgb" loext:color-value="#b1cbe9"/>
      <loext:gradient-stop svg:offset="1" loext:color-type="rgb" loext:color-value="#a3c1e5"/>
    </draw:gradient>
    <draw:gradient draw:name="a1120" draw:style="linear" draw:start-color="#b1cbe9" draw:end-color="#a3c1e5" draw:start-intensity="100%" draw:end-intensity="100%" draw:angle="0deg" draw:border="0%">
      <loext:gradient-stop svg:offset="0" loext:color-type="rgb" loext:color-value="#b1cbe9"/>
      <loext:gradient-stop svg:offset="1" loext:color-type="rgb" loext:color-value="#a3c1e5"/>
    </draw:gradient>
    <draw:gradient draw:name="a1124" draw:style="linear" draw:start-color="#b1cbe9" draw:end-color="#a3c1e5" draw:start-intensity="100%" draw:end-intensity="100%" draw:angle="0deg" draw:border="0%">
      <loext:gradient-stop svg:offset="0" loext:color-type="rgb" loext:color-value="#b1cbe9"/>
      <loext:gradient-stop svg:offset="1" loext:color-type="rgb" loext:color-value="#a3c1e5"/>
    </draw:gradient>
    <draw:gradient draw:name="a1128" draw:style="linear" draw:start-color="#71a6db" draw:end-color="#559bdb" draw:start-intensity="100%" draw:end-intensity="100%" draw:angle="0deg" draw:border="0%">
      <loext:gradient-stop svg:offset="0" loext:color-type="rgb" loext:color-value="#71a6db"/>
      <loext:gradient-stop svg:offset="1" loext:color-type="rgb" loext:color-value="#559bdb"/>
    </draw:gradient>
    <draw:gradient draw:name="a1133" draw:style="linear" draw:start-color="#b1cbe9" draw:end-color="#a3c1e5" draw:start-intensity="100%" draw:end-intensity="100%" draw:angle="0deg" draw:border="0%">
      <loext:gradient-stop svg:offset="0" loext:color-type="rgb" loext:color-value="#b1cbe9"/>
      <loext:gradient-stop svg:offset="1" loext:color-type="rgb" loext:color-value="#a3c1e5"/>
    </draw:gradient>
    <draw:gradient draw:name="a798"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12"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26"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40"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gradient draw:name="a854" draw:style="radial" draw:cx="50%" draw:cy="50%" draw:start-color="#4382ba" draw:end-color="#2c5981" draw:start-intensity="100%" draw:end-intensity="100%" draw:border="0%">
      <loext:gradient-stop svg:offset="0" loext:color-type="rgb" loext:color-value="#4382ba"/>
      <loext:gradient-stop svg:offset="1" loext:color-type="rgb" loext:color-value="#2c5981"/>
    </draw:gradient>
    <draw:marker draw:name="Arrow" svg:viewBox="0 0 20 30" svg:d="M10 0l-10 30h20z"/>
    <draw:marker draw:name="Arrowheads_20_2" draw:display-name="Arrowheads 2" svg:viewBox="0 0 20 20" svg:d="M0 20l10-20 10 20z"/>
    <draw:marker draw:name="a1012" svg:viewBox="0 0 20 30" svg:d="M10 0l-10 30h20z"/>
    <draw:marker draw:name="a1014" svg:viewBox="0 0 20 30" svg:d="M10 0l-10 30h20z"/>
    <draw:marker draw:name="a1016" svg:viewBox="0 0 20 30" svg:d="M10 0l-10 30h20z"/>
    <draw:marker draw:name="a1018" svg:viewBox="0 0 20 30" svg:d="M10 0l-10 30h20z"/>
    <draw:marker draw:name="a1020" svg:viewBox="0 0 20 30" svg:d="M10 0l-10 30h20z"/>
    <draw:marker draw:name="a1022" svg:viewBox="0 0 20 30" svg:d="M10 0l-10 30h20z"/>
    <draw:marker draw:name="a1024" svg:viewBox="0 0 20 30" svg:d="M10 0l-10 30h20z"/>
    <draw:marker draw:name="a1026" svg:viewBox="0 0 20 30" svg:d="M10 0l-10 30h20z"/>
    <draw:marker draw:name="a1028" svg:viewBox="0 0 20 30" svg:d="M10 0l-10 30h20z"/>
    <draw:marker draw:name="a1030" svg:viewBox="0 0 20 30" svg:d="M10 0l-10 30h20z"/>
    <draw:marker draw:name="a1033" svg:viewBox="0 0 20 30" svg:d="M10 0l-10 30h20z"/>
    <draw:marker draw:name="a1035" svg:viewBox="0 0 20 30" svg:d="M10 0l-10 30h20z"/>
    <draw:marker draw:name="a1037" svg:viewBox="0 0 20 30" svg:d="M10 0l-10 30h20z"/>
    <draw:marker draw:name="a1039" svg:viewBox="0 0 20 30" svg:d="M10 0l-10 30h20z"/>
    <draw:marker draw:name="a1041" svg:viewBox="0 0 20 30" svg:d="M10 0l-10 30h20z"/>
    <draw:marker draw:name="a1043" svg:viewBox="0 0 20 30" svg:d="M10 0l-10 30h20z"/>
    <draw:marker draw:name="a1045" svg:viewBox="0 0 20 30" svg:d="M10 0l-10 30h20z"/>
    <draw:marker draw:name="a1047" svg:viewBox="0 0 20 30" svg:d="M10 0l-10 30h20z"/>
    <draw:marker draw:name="a1049" svg:viewBox="0 0 20 30" svg:d="M10 0l-10 30h20z"/>
    <draw:marker draw:name="a1051" svg:viewBox="0 0 20 30" svg:d="M10 0l-10 30h20z"/>
    <draw:marker draw:name="a1053" svg:viewBox="0 0 20 30" svg:d="M10 0l-10 30h20z"/>
    <draw:marker draw:name="a1055" svg:viewBox="0 0 20 30" svg:d="M10 0l-10 30h20z"/>
    <draw:marker draw:name="a1057" svg:viewBox="0 0 20 30" svg:d="M10 0l-10 30h20z"/>
    <draw:marker draw:name="a1059" svg:viewBox="0 0 20 30" svg:d="M10 0l-10 30h20z"/>
    <draw:marker draw:name="a1061" svg:viewBox="0 0 20 30" svg:d="M10 0l-10 30h20z"/>
    <draw:marker draw:name="a1063" svg:viewBox="0 0 20 30" svg:d="M10 0l-10 30h20z"/>
    <draw:marker draw:name="a1065" svg:viewBox="0 0 20 30" svg:d="M10 0l-10 30h20z"/>
    <draw:marker draw:name="a1067" svg:viewBox="0 0 20 30" svg:d="M10 0l-10 30h20z"/>
    <draw:marker draw:name="a1069" svg:viewBox="0 0 20 30" svg:d="M10 0l-10 30h20z"/>
    <draw:marker draw:name="a1071" svg:viewBox="0 0 20 30" svg:d="M10 0l-10 30h20z"/>
    <draw:marker draw:name="a1164" svg:viewBox="0 0 20 30" svg:d="M10 0l-10 30h20z"/>
    <draw:marker draw:name="a1166" svg:viewBox="0 0 20 30" svg:d="M10 0l-10 30h20z"/>
    <draw:marker draw:name="a1196" svg:viewBox="0 0 20 30" svg:d="M10 0l-10 30h20z"/>
    <draw:marker draw:name="a1198" svg:viewBox="0 0 20 30" svg:d="M10 0l-10 30h20z"/>
    <draw:marker draw:name="a1261" svg:viewBox="0 0 20 30" svg:d="M10 0l-10 30h20z"/>
    <draw:marker draw:name="a1267" svg:viewBox="0 0 20 30" svg:d="M10 0l-10 30h20z"/>
    <draw:marker draw:name="a1278" svg:viewBox="0 0 20 30" svg:d="M10 0l-10 30h20z"/>
    <draw:marker draw:name="a1281" svg:viewBox="0 0 20 30" svg:d="M10 0l-10 30h20z"/>
    <draw:marker draw:name="a1289" svg:viewBox="0 0 20 30" svg:d="M10 0l-10 30h20z"/>
    <draw:marker draw:name="a1300" svg:viewBox="0 0 20 30" svg:d="M10 0l-10 30h20z"/>
    <draw:marker draw:name="a745" svg:viewBox="0 0 20 30" svg:d="M10 0l-10 30h20z"/>
    <draw:marker draw:name="a756" svg:viewBox="0 0 20 30" svg:d="M10 0l-10 30h20z"/>
    <draw:marker draw:name="a759" svg:viewBox="0 0 20 30" svg:d="M10 0l-10 30h20z"/>
    <draw:marker draw:name="a762" svg:viewBox="0 0 20 30" svg:d="M10 0l-10 30h20z"/>
    <draw:marker draw:name="a802" svg:viewBox="0 0 20 30" svg:d="M10 0l-10 30h20z"/>
    <draw:marker draw:name="a804" svg:viewBox="0 0 20 30" svg:d="M10 0l-10 30h20z"/>
    <draw:marker draw:name="a806" svg:viewBox="0 0 20 30" svg:d="M10 0l-10 30h20z"/>
    <draw:marker draw:name="a808" svg:viewBox="0 0 20 30" svg:d="M10 0l-10 30h20z"/>
    <draw:marker draw:name="a816" svg:viewBox="0 0 20 30" svg:d="M10 0l-10 30h20z"/>
    <draw:marker draw:name="a818" svg:viewBox="0 0 20 30" svg:d="M10 0l-10 30h20z"/>
    <draw:marker draw:name="a820" svg:viewBox="0 0 20 30" svg:d="M10 0l-10 30h20z"/>
    <draw:marker draw:name="a822" svg:viewBox="0 0 20 30" svg:d="M10 0l-10 30h20z"/>
    <draw:marker draw:name="a830" svg:viewBox="0 0 20 30" svg:d="M10 0l-10 30h20z"/>
    <draw:marker draw:name="a832" svg:viewBox="0 0 20 30" svg:d="M10 0l-10 30h20z"/>
    <draw:marker draw:name="a834" svg:viewBox="0 0 20 30" svg:d="M10 0l-10 30h20z"/>
    <draw:marker draw:name="a836" svg:viewBox="0 0 20 30" svg:d="M10 0l-10 30h20z"/>
    <draw:marker draw:name="a844" svg:viewBox="0 0 20 30" svg:d="M10 0l-10 30h20z"/>
    <draw:marker draw:name="a846" svg:viewBox="0 0 20 30" svg:d="M10 0l-10 30h20z"/>
    <draw:marker draw:name="a848" svg:viewBox="0 0 20 30" svg:d="M10 0l-10 30h20z"/>
    <draw:marker draw:name="a850" svg:viewBox="0 0 20 30" svg:d="M10 0l-10 30h20z"/>
    <draw:marker draw:name="a858" svg:viewBox="0 0 20 30" svg:d="M10 0l-10 30h20z"/>
    <draw:marker draw:name="a860" svg:viewBox="0 0 20 30" svg:d="M10 0l-10 30h20z"/>
    <draw:marker draw:name="a862" svg:viewBox="0 0 20 30" svg:d="M10 0l-10 30h20z"/>
    <draw:marker draw:name="a864" svg:viewBox="0 0 20 30" svg:d="M10 0l-10 30h20z"/>
    <draw:stroke-dash draw:name="Long_20_Dash" draw:display-name="Long Dash" draw:style="rect" draw:dots1="1" draw:dots1-length="400%" draw:distance="300%"/>
    <draw:stroke-dash draw:name="SysDash" draw:style="rect" draw:dots1="1" draw:dots1-length="0.079cm" draw:distance="0.079cm"/>
    <draw:stroke-dash draw:name="SysDot" draw:style="rect" draw:dots1="1" draw:dots1-length="0.035cm" draw:distance="0.035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9</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9</text:page-number></text:span></text:p>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9</text:page-number></text:span></text:p>
          </draw:text-box>
        </draw:frame>
      </presentation:notes>
    </style:master-page>
    <style:master-page style:name="Blank" style:page-layout-name="PM1" draw:style-name="Mdp2">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Date Placeholder 1" presentation:style-name="Mpr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4" draw:text-style-name="MP8" draw:layer="backgroundobjects" svg:width="7.619cm" svg:height="1.013cm" svg:x="23.918cm" svg:y="17.657cm" presentation:class="page-number" presentation:user-transformed="true">
        <draw:text-box>
          <text:p text:style-name="MP10"><text:span text:style-name="MT2"><text:page-number>9</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1T12:25:18.326757000</meta:creation-date>
    <dc:date>2026-07-19T15:12:50.387718000</dc:date>
    <meta:editing-duration>P2DT8H12M3S</meta:editing-duration>
    <meta:editing-cycles>24</meta:editing-cycles>
    <meta:generator>LibreOffice/25.2.4.3$MacOSX_AARCH64 LibreOffice_project/33e196637044ead23f5c3226cde09b47731f7e27</meta:generator>
    <meta:print-date>2026-03-18T10:05:16.646670000</meta:print-date>
    <meta:printed-by>PDF files</meta:printed-by>
    <meta:document-statistic meta:object-count="505"/>
  </office:meta>
</office:document-meta>
</file>