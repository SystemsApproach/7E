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250C3613.png" manifest:media-type="image/png"/>
  <manifest:file-entry manifest:full-path="Pictures/10000001000004B0000004B065953AC9.png" manifest:media-type="image/png"/>
  <manifest:file-entry manifest:full-path="Pictures/10000001000004B0000004B02D8E20B8.png" manifest:media-type="image/png"/>
  <manifest:file-entry manifest:full-path="Pictures/10000001000001370000008A3032A3C2.png" manifest:media-type="image/png"/>
  <manifest:file-entry manifest:full-path="Pictures/100000010000047400000324E1A3B353.png" manifest:media-type="image/png"/>
  <manifest:file-entry manifest:full-path="Pictures/10000001000004B0000004B0923FE4BE.png" manifest:media-type="image/png"/>
  <manifest:file-entry manifest:full-path="Pictures/10000001000004B0000004B0D531CF7C.png" manifest:media-type="image/png"/>
  <manifest:file-entry manifest:full-path="Pictures/10004B2B000068BB000049DD8AB69D38.pdf" manifest:media-type="application/pdf"/>
  <manifest:file-entry manifest:full-path="Pictures/100008A0000046A9000046A969C5F579.svg" manifest:media-type="image/svg+xml"/>
  <manifest:file-entry manifest:full-path="Pictures/10000001000004B0000004B07B09B8D8.png" manifest:media-type="image/png"/>
  <manifest:file-entry manifest:full-path="Pictures/1000000100000138000001D4939E222C.png" manifest:media-type="image/png"/>
  <manifest:file-entry manifest:full-path="Pictures/10000001000001F3000001510BDF560F.png" manifest:media-type="image/png"/>
  <manifest:file-entry manifest:full-path="Pictures/1000184A00001CAA00002AFFD75A7ACE.pdf" manifest:media-type="application/pdf"/>
  <manifest:file-entry manifest:full-path="Pictures/10000001000002C3000002C39E67A95F.png" manifest:media-type="image/png"/>
  <manifest:file-entry manifest:full-path="Pictures/10000001000004B0000004B0B6C3AB3D.png" manifest:media-type="image/png"/>
  <manifest:file-entry manifest:full-path="Pictures/1000000100000316000005E6C4157AF2.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4"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5"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6"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7" style:family="graphic">
      <style:graphic-properties style:protect="size" loext:decorative="false"/>
    </style:style>
    <style:style style:name="gr8"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9"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0"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2" style:family="graphic">
      <style:graphic-properties style:writing-mode="lr-tb" loext:decorative="false"/>
    </style:style>
    <style:style style:name="gr13"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4"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6"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0"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2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25"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6"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9" style:family="graphic" style:parent-style-name="standard">
      <style:graphic-properties svg:stroke-color="#ffffff" draw:fill="solid" draw:fill-color="#ffffff" draw:textarea-horizontal-align="justify" draw:textarea-vertical-align="middle" draw:auto-grow-height="false" fo:min-height="2.449cm" fo:min-width="1.356cm" loext:decorative="false"/>
    </style:style>
    <style:style style:name="gr30" style:family="graphic" style:parent-style-name="standard">
      <style:graphic-properties svg:stroke-color="#ffffff" draw:fill="solid" draw:fill-color="#ffffff" draw:textarea-horizontal-align="justify" draw:textarea-vertical-align="middle" draw:auto-grow-height="false" fo:min-height="1.575cm" fo:min-width="0.311cm" loext:decorative="false"/>
    </style:style>
    <style:style style:name="gr31" style:family="graphic" style:parent-style-name="standard">
      <style:graphic-properties svg:stroke-color="#ffffff" draw:fill="solid" draw:fill-color="#ffffff" draw:textarea-horizontal-align="justify" draw:textarea-vertical-align="middle" draw:auto-grow-height="false" fo:min-height="0.617cm" fo:min-width="1.356cm" loext:decorative="false"/>
    </style:style>
    <style:style style:name="gr32" style:family="graphic" style:parent-style-name="standard">
      <style:graphic-properties svg:stroke-color="#ffffff" draw:fill="solid" draw:fill-color="#ffffff" draw:textarea-horizontal-align="justify" draw:textarea-vertical-align="middle" draw:auto-grow-height="false" fo:min-height="0.617cm" fo:min-width="0.683cm" loext:decorative="false"/>
    </style:style>
    <style:style style:name="gr33" style:family="graphic" style:parent-style-name="standard">
      <style:graphic-properties svg:stroke-color="#ffffff" draw:fill="solid" draw:fill-color="#ffffff" draw:textarea-horizontal-align="justify" draw:textarea-vertical-align="middle" draw:auto-grow-height="false" fo:min-height="0.617cm" fo:min-width="0.684cm" loext:decorative="false"/>
    </style:style>
    <style:style style:name="gr34" style:family="graphic" style:parent-style-name="standard">
      <style:graphic-properties svg:stroke-color="#ffffff" draw:fill="solid" draw:fill-color="#ffffff" draw:textarea-horizontal-align="justify" draw:textarea-vertical-align="middle" draw:auto-grow-height="false" fo:min-height="0.619cm" fo:min-width="0.131cm" loext:decorative="false"/>
    </style:style>
    <style:style style:name="gr35" style:family="graphic" style:parent-style-name="standard">
      <style:graphic-properties svg:stroke-color="#ffffff" draw:fill="solid" draw:fill-color="#ffffff" draw:textarea-horizontal-align="justify" draw:textarea-vertical-align="middle" draw:auto-grow-height="false" fo:min-height="0.692cm" fo:min-width="0.202cm" loext:decorative="false"/>
    </style:style>
    <style:style style:name="gr36" style:family="graphic" style:parent-style-name="standard">
      <style:graphic-properties svg:stroke-color="#ffffff" draw:fill="solid" draw:fill-color="#ffffff" draw:textarea-horizontal-align="justify" draw:textarea-vertical-align="middle" draw:auto-grow-height="false" fo:min-height="1.214cm" fo:min-width="1.355cm" loext:decorative="false"/>
    </style:style>
    <style:style style:name="gr37" style:family="graphic" style:parent-style-name="standard">
      <style:graphic-properties svg:stroke-color="#ffffff" draw:fill="solid" draw:fill-color="#ffffff" draw:textarea-horizontal-align="justify" draw:textarea-vertical-align="middle" draw:auto-grow-height="false" fo:min-height="1.78cm" fo:min-width="1.216cm" loext:decorative="false"/>
    </style:style>
    <style:style style:name="gr38" style:family="graphic" style:parent-style-name="standard">
      <style:graphic-properties svg:stroke-color="#ffffff" draw:fill="solid" draw:fill-color="#ffffff" draw:textarea-horizontal-align="justify" draw:textarea-vertical-align="middle" draw:auto-grow-height="false" fo:min-height="0.769cm" fo:min-width="0.151cm" loext:decorative="false"/>
    </style:style>
    <style:style style:name="gr39"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40" style:family="graphic" style:parent-style-name="standard">
      <style:graphic-properties svg:stroke-color="#ffffff" draw:fill="solid" draw:fill-color="#ffffff" draw:textarea-horizontal-align="justify" draw:textarea-vertical-align="middle" draw:auto-grow-height="false" fo:min-height="0.584cm" fo:min-width="1.089cm" loext:decorative="false"/>
    </style:style>
    <style:style style:name="gr41" style:family="graphic" style:parent-style-name="standard">
      <style:graphic-properties svg:stroke-color="#ffffff" draw:fill="solid" draw:fill-color="#ffffff" draw:textarea-horizontal-align="justify" draw:textarea-vertical-align="middle" draw:auto-grow-height="false" fo:min-height="0.584cm" fo:min-width="0.512cm" loext:decorative="false"/>
    </style:style>
    <style:style style:name="gr42" style:family="graphic" style:parent-style-name="standard">
      <style:graphic-properties svg:stroke-color="#ffffff" draw:fill="solid" draw:fill-color="#ffffff" draw:textarea-horizontal-align="justify" draw:textarea-vertical-align="middle" draw:auto-grow-height="false" fo:min-height="0.583cm" fo:min-width="0.512cm" loext:decorative="false"/>
    </style:style>
    <style:style style:name="gr43" style:family="graphic" style:parent-style-name="standard">
      <style:graphic-properties svg:stroke-color="#ffffff" draw:fill="solid" draw:fill-color="#ffffff" draw:textarea-horizontal-align="justify" draw:textarea-vertical-align="middle" draw:auto-grow-height="false" fo:min-height="0.583cm" fo:min-width="0.041cm" loext:decorative="false"/>
    </style:style>
    <style:style style:name="gr44" style:family="graphic" style:parent-style-name="standard">
      <style:graphic-properties svg:stroke-color="#ffffff" draw:fill="solid" draw:fill-color="#ffffff" draw:textarea-horizontal-align="justify" draw:textarea-vertical-align="middle" draw:auto-grow-height="false" fo:min-height="0.653cm" fo:min-width="0.103cm" loext:decorative="false"/>
    </style:style>
    <style:style style:name="gr45" style:family="graphic" style:parent-style-name="objectwithoutfill">
      <style:graphic-properties draw:stroke="solid" draw:stroke-dash="Long_20_Dash" svg:stroke-width="0.051cm" draw:marker-start-width="0.279cm" draw:marker-end-width="0.279cm" draw:fill="none" draw:textarea-vertical-align="middle" fo:padding-top="0.15cm" fo:padding-bottom="0.15cm" fo:padding-left="0.275cm" fo:padding-right="0.275cm"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02cm" fo:min-width="0.487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602cm" fo:min-width="1.324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602cm" fo:min-width="1.307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602cm" fo:min-width="1.302cm" loext:decorative="false"/>
      <style:paragraph-properties style:writing-mode="lr-tb"/>
    </style:style>
    <style:style style:name="gr50" style:family="graphic" style:parent-style-name="objectwithoutfill">
      <style:graphic-properties draw:stroke="dash" draw:stroke-dash="Long_20_Dash" svg:stroke-width="0.051cm" draw:marker-start-width="0.279cm" draw:marker-end-width="0.279cm" draw:fill="none" draw:textarea-vertical-align="middle" fo:padding-top="0.15cm" fo:padding-bottom="0.15cm" fo:padding-left="0.275cm" fo:padding-right="0.275cm" loext:decorative="false"/>
    </style:style>
    <style:style style:name="gr51" style:family="graphic" style:parent-style-name="standard">
      <style:graphic-properties draw:stroke="none" svg:stroke-color="#000000" draw:fill="none" draw:fill-color="#ffffff" draw:textarea-horizontal-align="left" draw:auto-grow-height="true" draw:auto-grow-width="false" fo:min-height="1.203cm" fo:min-width="0.345cm" loext:decorative="false"/>
      <style:paragraph-properties style:writing-mode="lr-tb"/>
    </style:style>
    <style:style style:name="gr52"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0.589cm" fo:min-width="0.339cm" fo:padding-top="0.15cm" fo:padding-bottom="0.15cm" fo:padding-left="0.275cm" fo:padding-right="0.275cm" draw:shadow="visible" draw:shadow-offset-x="0.051cm" draw:shadow-offset-y="-0.051cm" draw:shadow-color="#6a99d0" loext:decorative="false"/>
    </style:style>
    <style:style style:name="gr53" style:family="graphic" style:parent-style-name="standard">
      <style:graphic-properties draw:stroke="none" svg:stroke-color="#000000" draw:fill="none" draw:fill-color="#ffffff" draw:textarea-horizontal-align="left" draw:auto-grow-height="true" draw:auto-grow-width="true" fo:min-height="0.691cm" fo:min-width="0.613cm"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691cm" fo:min-width="0.639cm" loext:decorative="false"/>
      <style:paragraph-properties style:writing-mode="lr-tb"/>
    </style:style>
    <style:style style:name="gr55" style:family="graphic" style:parent-style-name="standard">
      <style:graphic-properties draw:stroke="dash" draw:stroke-dash="SysDot" svg:stroke-width="0.053cm" svg:stroke-color="#5b9bd5" draw:marker-end="a745" svg:stroke-opacity="100%" draw:stroke-linejoin="miter" svg:stroke-linecap="butt" draw:fill="none" fo:padding-top="0.151cm" fo:padding-bottom="0.151cm" fo:padding-left="0.276cm" fo:padding-right="0.276cm" loext:decorative="false"/>
    </style:style>
    <style:style style:name="gr56" style:family="graphic" style:parent-style-name="standard">
      <style:graphic-properties draw:stroke="solid" svg:stroke-width="0.159cm" svg:stroke-color="#5b9bd5" svg:stroke-opacity="100%" draw:stroke-linejoin="miter" svg:stroke-linecap="butt" draw:fill="solid" draw:fill-color="#ffffff" draw:opacity="100%" draw:textarea-horizontal-align="center" draw:textarea-vertical-align="middle" draw:auto-grow-height="false" draw:auto-grow-width="false" fo:min-height="1.596cm" fo:min-width="2.465cm" fo:padding-top="0.127cm" fo:padding-bottom="0.127cm" fo:padding-left="0.254cm" fo:padding-right="0.254cm" fo:wrap-option="wrap" style:writing-mode="lr-tb" loext:decorative="false"/>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848cm" fo:min-width="0.857cm" fo:padding-top="0.127cm" fo:padding-bottom="0.127cm" fo:padding-left="0.254cm" fo:padding-right="0.254cm" fo:wrap-option="no-wrap" loext:decorative="false"/>
      <style:paragraph-properties style:writing-mode="lr-tb"/>
    </style:style>
    <style:style style:name="gr58" style:family="graphic" style:parent-style-name="standard">
      <style:graphic-properties draw:stroke="dash" draw:stroke-dash="SysDot" svg:stroke-width="0.053cm" svg:stroke-color="#5b9bd5" draw:marker-end="a756" svg:stroke-opacity="100%" draw:stroke-linejoin="miter" svg:stroke-linecap="butt" draw:fill="none" fo:padding-top="0.151cm" fo:padding-bottom="0.151cm" fo:padding-left="0.276cm" fo:padding-right="0.276cm" loext:decorative="false"/>
    </style:style>
    <style:style style:name="gr59" style:family="graphic" style:parent-style-name="standard">
      <style:graphic-properties draw:stroke="dash" draw:stroke-dash="SysDot" svg:stroke-width="0.053cm" svg:stroke-color="#5b9bd5" draw:marker-end="a759" svg:stroke-opacity="100%" draw:stroke-linejoin="miter" svg:stroke-linecap="butt" draw:fill="none" fo:padding-top="0.151cm" fo:padding-bottom="0.151cm" fo:padding-left="0.276cm" fo:padding-right="0.276cm" loext:decorative="false"/>
    </style:style>
    <style:style style:name="gr60" style:family="graphic" style:parent-style-name="standard">
      <style:graphic-properties draw:stroke="dash" draw:stroke-dash="SysDot" svg:stroke-width="0.053cm" svg:stroke-color="#5b9bd5" draw:marker-end="a762" svg:stroke-opacity="100%" draw:stroke-linejoin="miter" svg:stroke-linecap="butt" draw:fill="none" fo:padding-top="0.151cm" fo:padding-bottom="0.151cm" fo:padding-left="0.276cm" fo:padding-right="0.276cm" loext:decorative="false"/>
    </style:style>
    <style:style style:name="gr61" style:family="graphic" style:parent-style-name="standard">
      <style:graphic-properties draw:stroke="solid" svg:stroke-width="0.026cm" svg:stroke-color="#5b9bd5" svg:stroke-opacity="100%" draw:stroke-linejoin="miter" svg:stroke-linecap="butt" draw:fill="none" fo:padding-top="0.138cm" fo:padding-bottom="0.138cm" fo:padding-left="0.263cm" fo:padding-right="0.263cm" loext:decorative="false"/>
    </style:style>
    <style:style style:name="gr62" style:family="graphic" style:parent-style-name="standard">
      <style:graphic-properties draw:stroke="none" draw:fill="none" draw:textarea-horizontal-align="left" draw:textarea-vertical-align="top" draw:auto-grow-height="true" draw:auto-grow-width="true" fo:min-height="0.763cm" fo:min-width="3.479cm" fo:padding-top="0.127cm" fo:padding-bottom="0.127cm" fo:padding-left="0.254cm" fo:padding-right="0.254cm" fo:wrap-option="no-wrap" loext:decorative="false"/>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763cm" fo:min-width="2.771cm" fo:padding-top="0.127cm" fo:padding-bottom="0.127cm" fo:padding-left="0.254cm" fo:padding-right="0.254cm" fo:wrap-option="no-wrap" loext:decorative="false"/>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763cm" fo:min-width="2.758cm" fo:padding-top="0.127cm" fo:padding-bottom="0.127cm" fo:padding-left="0.254cm" fo:padding-right="0.254cm" fo:wrap-option="no-wrap" loext:decorative="false"/>
      <style:paragraph-properties style:writing-mode="lr-tb"/>
    </style:style>
    <style:style style:name="gr65" style:family="graphic" style:parent-style-name="standard">
      <style:graphic-properties draw:stroke="solid" svg:stroke-width="0.159cm" svg:stroke-color="#5b9bd5" svg:stroke-opacity="100%" draw:stroke-linejoin="miter" svg:stroke-linecap="butt" draw:fill="solid" draw:fill-color="#ffffff" draw:opacity="100%" draw:textarea-horizontal-align="center" draw:textarea-vertical-align="middle" draw:auto-grow-height="false" draw:auto-grow-width="false" fo:min-height="1.596cm" fo:min-width="2.466cm" fo:padding-top="0.127cm" fo:padding-bottom="0.127cm" fo:padding-left="0.254cm" fo:padding-right="0.254cm" fo:wrap-option="wrap" style:writing-mode="lr-tb" loext:decorative="false"/>
      <style:paragraph-properties style:writing-mode="lr-tb"/>
    </style:style>
    <style:style style:name="gr66" style:family="graphic" style:parent-style-name="standard">
      <style:graphic-properties draw:stroke="solid" svg:stroke-width="0.159cm" svg:stroke-color="#5b9bd5" svg:stroke-opacity="100%" draw:stroke-linejoin="miter" svg:stroke-linecap="butt" draw:fill="solid" draw:fill-color="#deebf7" draw:opacity="100%" draw:textarea-horizontal-align="center" draw:textarea-vertical-align="middle" draw:auto-grow-height="false" draw:auto-grow-width="false" fo:min-height="2.581cm" fo:min-width="15.295cm" fo:padding-top="0.127cm" fo:padding-bottom="0.127cm" fo:padding-left="0.254cm" fo:padding-right="0.254cm" fo:wrap-option="wrap" style:writing-mode="lr-tb" loext:decorative="false"/>
      <style:paragraph-properties style:writing-mode="lr-tb"/>
    </style:style>
    <style:style style:name="gr67" style:family="graphic" style:parent-style-name="standard">
      <style:graphic-properties draw:stroke="solid" svg:stroke-width="0.035cm" svg:stroke-color="#5b9bd5" svg:stroke-opacity="100%" draw:stroke-linejoin="miter" svg:stroke-linecap="butt" draw:fill="solid" draw:fill-color="#5b9bd5" draw:opacity="100%" draw:textarea-horizontal-align="center" draw:textarea-vertical-align="middle" draw:auto-grow-height="false" draw:auto-grow-width="false" fo:min-height="0.19cm" fo:min-width="0cm" fo:padding-top="0.127cm" fo:padding-bottom="0.127cm" fo:padding-left="0.254cm" fo:padding-right="0.254cm" fo:wrap-option="wrap" style:writing-mode="lr-tb" loext:decorative="false"/>
      <style:paragraph-properties style:writing-mode="lr-tb"/>
    </style:style>
    <style:style style:name="gr68" style:family="graphic" style:parent-style-name="standard">
      <style:graphic-properties draw:stroke="solid" svg:stroke-width="0.035cm" svg:stroke-color="#5b9bd5" svg:stroke-opacity="100%" draw:stroke-linejoin="miter" svg:stroke-linecap="butt" draw:fill="solid" draw:fill-color="#5b9bd5" draw:opacity="100%" draw:textarea-horizontal-align="center" draw:textarea-vertical-align="middle" draw:auto-grow-height="false" draw:auto-grow-width="false" fo:min-height="0.191cm" fo:min-width="0cm" fo:padding-top="0.127cm" fo:padding-bottom="0.127cm" fo:padding-left="0.254cm" fo:padding-right="0.254cm" fo:wrap-option="wrap" style:writing-mode="lr-tb" loext:decorative="false"/>
      <style:paragraph-properties style:writing-mode="lr-tb"/>
    </style:style>
    <style:style style:name="gr69" style:family="graphic" style:parent-style-name="standard">
      <style:graphic-properties draw:stroke="solid" svg:stroke-width="0.018cm" svg:stroke-color="#5b9bd5" svg:stroke-opacity="100%" draw:stroke-linejoin="miter" svg:stroke-linecap="butt" draw:fill="none" fo:padding-top="0.134cm" fo:padding-bottom="0.134cm" fo:padding-left="0.259cm" fo:padding-right="0.259cm" loext:decorative="false"/>
    </style:style>
    <style:style style:name="gr70" style:family="graphic" style:parent-style-name="standard">
      <style:graphic-properties draw:stroke="none" draw:fill="none" draw:textarea-horizontal-align="left" draw:textarea-vertical-align="top" draw:auto-grow-height="true" draw:auto-grow-width="true" fo:min-height="1.905cm" fo:min-width="2.032cm" fo:padding-top="0.127cm" fo:padding-bottom="0.127cm" fo:padding-left="0.254cm" fo:padding-right="0.254cm" fo:wrap-option="no-wrap" loext:decorative="false"/>
      <style:paragraph-properties style:writing-mode="lr-tb"/>
    </style:style>
    <style:style style:name="gr71" style:family="graphic" style:parent-style-name="standard">
      <style:graphic-properties draw:stroke="solid" svg:stroke-width="0.079cm" svg:stroke-color="#5b9bd5" svg:stroke-opacity="100%" draw:stroke-linejoin="miter" svg:stroke-linecap="butt" draw:fill="none" fo:padding-top="0.164cm" fo:padding-bottom="0.164cm" fo:padding-left="0.289cm" fo:padding-right="0.289cm" loext:decorative="false"/>
    </style:style>
    <style:style style:name="gr72" style:family="graphic" style:parent-style-name="standard">
      <style:graphic-properties draw:stroke="none" draw:fill="gradient" draw:fill-gradient-name="a854"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73" style:family="graphic">
      <style:graphic-properties loext:decorative="false"/>
    </style:style>
    <style:style style:name="gr74" style:family="graphic" style:parent-style-name="standard">
      <style:graphic-properties draw:stroke="solid" svg:stroke-width="0.106cm" svg:stroke-color="#ffffff" draw:marker-end="a862" svg:stroke-opacity="100%" draw:stroke-linejoin="miter" svg:stroke-linecap="butt" draw:fill="none" fo:padding-top="0.178cm" fo:padding-bottom="0.178cm" fo:padding-left="0.303cm" fo:padding-right="0.303cm" loext:decorative="false"/>
    </style:style>
    <style:style style:name="gr75" style:family="graphic" style:parent-style-name="standard">
      <style:graphic-properties draw:stroke="solid" svg:stroke-width="0.106cm" svg:stroke-color="#ffffff" draw:marker-end="a864" svg:stroke-opacity="100%" draw:stroke-linejoin="miter" svg:stroke-linecap="butt" draw:fill="none" fo:padding-top="0.178cm" fo:padding-bottom="0.178cm" fo:padding-left="0.303cm" fo:padding-right="0.303cm" loext:decorative="false"/>
    </style:style>
    <style:style style:name="gr76" style:family="graphic" style:parent-style-name="standard">
      <style:graphic-properties draw:stroke="solid" svg:stroke-width="0.106cm" svg:stroke-color="#ffffff" draw:marker-end="a858" svg:stroke-opacity="100%" draw:stroke-linejoin="miter" svg:stroke-linecap="butt" draw:fill="none" fo:padding-top="0.178cm" fo:padding-bottom="0.178cm" fo:padding-left="0.303cm" fo:padding-right="0.303cm" loext:decorative="false"/>
    </style:style>
    <style:style style:name="gr77" style:family="graphic" style:parent-style-name="standard">
      <style:graphic-properties draw:stroke="solid" svg:stroke-width="0.106cm" svg:stroke-color="#ffffff" draw:marker-end="a860" svg:stroke-opacity="100%" draw:stroke-linejoin="miter" svg:stroke-linecap="butt" draw:fill="none" fo:padding-top="0.178cm" fo:padding-bottom="0.178cm" fo:padding-left="0.303cm" fo:padding-right="0.303cm" loext:decorative="false"/>
    </style:style>
    <style:style style:name="gr78"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79" style:family="graphic" style:parent-style-name="standard">
      <style:graphic-properties draw:stroke="none" draw:fill="gradient" draw:fill-gradient-name="a840" draw:textarea-horizontal-align="center" draw:textarea-vertical-align="middle" draw:auto-grow-height="false" draw:auto-grow-width="false" fo:min-height="0.101cm" fo:min-width="1.67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0" style:family="graphic" style:parent-style-name="standard">
      <style:graphic-properties draw:stroke="solid" svg:stroke-width="0.106cm" svg:stroke-color="#ffffff" draw:marker-end="a848" svg:stroke-opacity="100%" draw:stroke-linejoin="miter" svg:stroke-linecap="butt" draw:fill="none" fo:padding-top="0.178cm" fo:padding-bottom="0.178cm" fo:padding-left="0.303cm" fo:padding-right="0.303cm" loext:decorative="false"/>
    </style:style>
    <style:style style:name="gr81" style:family="graphic" style:parent-style-name="standard">
      <style:graphic-properties draw:stroke="solid" svg:stroke-width="0.106cm" svg:stroke-color="#ffffff" draw:marker-end="a850" svg:stroke-opacity="100%" draw:stroke-linejoin="miter" svg:stroke-linecap="butt" draw:fill="none" fo:padding-top="0.178cm" fo:padding-bottom="0.178cm" fo:padding-left="0.303cm" fo:padding-right="0.303cm" loext:decorative="false"/>
    </style:style>
    <style:style style:name="gr82" style:family="graphic" style:parent-style-name="standard">
      <style:graphic-properties draw:stroke="solid" svg:stroke-width="0.106cm" svg:stroke-color="#ffffff" draw:marker-end="a844" svg:stroke-opacity="100%" draw:stroke-linejoin="miter" svg:stroke-linecap="butt" draw:fill="none" fo:padding-top="0.178cm" fo:padding-bottom="0.178cm" fo:padding-left="0.303cm" fo:padding-right="0.303cm" loext:decorative="false"/>
    </style:style>
    <style:style style:name="gr83" style:family="graphic" style:parent-style-name="standard">
      <style:graphic-properties draw:stroke="solid" svg:stroke-width="0.106cm" svg:stroke-color="#ffffff" draw:marker-end="a846" svg:stroke-opacity="100%" draw:stroke-linejoin="miter" svg:stroke-linecap="butt" draw:fill="none" fo:padding-top="0.178cm" fo:padding-bottom="0.178cm" fo:padding-left="0.303cm" fo:padding-right="0.303cm" loext:decorative="false"/>
    </style:style>
    <style:style style:name="gr84" style:family="graphic" style:parent-style-name="standard">
      <style:graphic-properties draw:stroke="none" draw:fill="gradient" draw:fill-gradient-name="a826" draw:textarea-horizontal-align="center" draw:textarea-vertical-align="middle" draw:auto-grow-height="false" draw:auto-grow-width="false" fo:min-height="0.111cm" fo:min-width="1.654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5" style:family="graphic" style:parent-style-name="standard">
      <style:graphic-properties draw:stroke="solid" svg:stroke-width="0.106cm" svg:stroke-color="#ffffff" draw:marker-end="a834" svg:stroke-opacity="100%" draw:stroke-linejoin="miter" svg:stroke-linecap="butt" draw:fill="none" fo:padding-top="0.178cm" fo:padding-bottom="0.178cm" fo:padding-left="0.303cm" fo:padding-right="0.303cm" loext:decorative="false"/>
    </style:style>
    <style:style style:name="gr86" style:family="graphic" style:parent-style-name="standard">
      <style:graphic-properties draw:stroke="solid" svg:stroke-width="0.106cm" svg:stroke-color="#ffffff" draw:marker-end="a836" svg:stroke-opacity="100%" draw:stroke-linejoin="miter" svg:stroke-linecap="butt" draw:fill="none" fo:padding-top="0.178cm" fo:padding-bottom="0.178cm" fo:padding-left="0.303cm" fo:padding-right="0.303cm" loext:decorative="false"/>
    </style:style>
    <style:style style:name="gr87" style:family="graphic" style:parent-style-name="standard">
      <style:graphic-properties draw:stroke="solid" svg:stroke-width="0.106cm" svg:stroke-color="#ffffff" draw:marker-end="a830" svg:stroke-opacity="100%" draw:stroke-linejoin="miter" svg:stroke-linecap="butt" draw:fill="none" fo:padding-top="0.178cm" fo:padding-bottom="0.178cm" fo:padding-left="0.303cm" fo:padding-right="0.303cm" loext:decorative="false"/>
    </style:style>
    <style:style style:name="gr88" style:family="graphic" style:parent-style-name="standard">
      <style:graphic-properties draw:stroke="solid" svg:stroke-width="0.106cm" svg:stroke-color="#ffffff" draw:marker-end="a832" svg:stroke-opacity="100%" draw:stroke-linejoin="miter" svg:stroke-linecap="butt" draw:fill="none" fo:padding-top="0.178cm" fo:padding-bottom="0.178cm" fo:padding-left="0.303cm" fo:padding-right="0.303cm" loext:decorative="false"/>
    </style:style>
    <style:style style:name="gr89" style:family="graphic" style:parent-style-name="standard">
      <style:graphic-properties draw:stroke="none" draw:fill="gradient" draw:fill-gradient-name="a812"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0" style:family="graphic" style:parent-style-name="standard">
      <style:graphic-properties draw:stroke="solid" svg:stroke-width="0.106cm" svg:stroke-color="#ffffff" draw:marker-end="a820" svg:stroke-opacity="100%" draw:stroke-linejoin="miter" svg:stroke-linecap="butt" draw:fill="none" fo:padding-top="0.178cm" fo:padding-bottom="0.178cm" fo:padding-left="0.303cm" fo:padding-right="0.303cm" loext:decorative="false"/>
    </style:style>
    <style:style style:name="gr91" style:family="graphic" style:parent-style-name="standard">
      <style:graphic-properties draw:stroke="solid" svg:stroke-width="0.106cm" svg:stroke-color="#ffffff" draw:marker-end="a822" svg:stroke-opacity="100%" draw:stroke-linejoin="miter" svg:stroke-linecap="butt" draw:fill="none" fo:padding-top="0.178cm" fo:padding-bottom="0.178cm" fo:padding-left="0.303cm" fo:padding-right="0.303cm" loext:decorative="false"/>
    </style:style>
    <style:style style:name="gr92" style:family="graphic" style:parent-style-name="standard">
      <style:graphic-properties draw:stroke="solid" svg:stroke-width="0.106cm" svg:stroke-color="#ffffff" draw:marker-end="a816" svg:stroke-opacity="100%" draw:stroke-linejoin="miter" svg:stroke-linecap="butt" draw:fill="none" fo:padding-top="0.178cm" fo:padding-bottom="0.178cm" fo:padding-left="0.303cm" fo:padding-right="0.303cm" loext:decorative="false"/>
    </style:style>
    <style:style style:name="gr93" style:family="graphic" style:parent-style-name="standard">
      <style:graphic-properties draw:stroke="solid" svg:stroke-width="0.106cm" svg:stroke-color="#ffffff" draw:marker-end="a818" svg:stroke-opacity="100%" draw:stroke-linejoin="miter" svg:stroke-linecap="butt" draw:fill="none" fo:padding-top="0.178cm" fo:padding-bottom="0.178cm" fo:padding-left="0.303cm" fo:padding-right="0.303cm" loext:decorative="false"/>
    </style:style>
    <style:style style:name="gr94" style:family="graphic" style:parent-style-name="standard">
      <style:graphic-properties draw:stroke="none" draw:fill="gradient" draw:fill-gradient-name="a798" draw:textarea-horizontal-align="center" draw:textarea-vertical-align="middle" draw:auto-grow-height="false" draw:auto-grow-width="false" fo:min-height="0.084cm" fo:min-width="1.705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5" style:family="graphic" style:parent-style-name="standard">
      <style:graphic-properties draw:stroke="solid" svg:stroke-width="0.106cm" svg:stroke-color="#ffffff" draw:marker-end="a806" svg:stroke-opacity="100%" draw:stroke-linejoin="miter" svg:stroke-linecap="butt" draw:fill="none" fo:padding-top="0.178cm" fo:padding-bottom="0.178cm" fo:padding-left="0.303cm" fo:padding-right="0.303cm" loext:decorative="false"/>
    </style:style>
    <style:style style:name="gr96" style:family="graphic" style:parent-style-name="standard">
      <style:graphic-properties draw:stroke="solid" svg:stroke-width="0.106cm" svg:stroke-color="#ffffff" draw:marker-end="a808" svg:stroke-opacity="100%" draw:stroke-linejoin="miter" svg:stroke-linecap="butt" draw:fill="none" fo:padding-top="0.178cm" fo:padding-bottom="0.178cm" fo:padding-left="0.303cm" fo:padding-right="0.303cm" loext:decorative="false"/>
    </style:style>
    <style:style style:name="gr97" style:family="graphic" style:parent-style-name="standard">
      <style:graphic-properties draw:stroke="solid" svg:stroke-width="0.106cm" svg:stroke-color="#ffffff" draw:marker-end="a802" svg:stroke-opacity="100%" draw:stroke-linejoin="miter" svg:stroke-linecap="butt" draw:fill="none" fo:padding-top="0.178cm" fo:padding-bottom="0.178cm" fo:padding-left="0.303cm" fo:padding-right="0.303cm" loext:decorative="false"/>
    </style:style>
    <style:style style:name="gr98" style:family="graphic" style:parent-style-name="standard">
      <style:graphic-properties draw:stroke="solid" svg:stroke-width="0.106cm" svg:stroke-color="#ffffff" draw:marker-end="a804" svg:stroke-opacity="100%" draw:stroke-linejoin="miter" svg:stroke-linecap="butt" draw:fill="none" fo:padding-top="0.178cm" fo:padding-bottom="0.178cm" fo:padding-left="0.303cm" fo:padding-right="0.303cm" loext:decorative="false"/>
    </style:style>
    <style:style style:name="gr99" style:family="graphic" style:parent-style-name="objectwithoutfill">
      <style:graphic-properties svg:stroke-width="0.025cm" svg:stroke-color="#5b9bd5" draw:marker-start-width="0.229cm" draw:marker-end-width="0.229cm" draw:fill="none" draw:textarea-vertical-align="middle" fo:padding-top="0.137cm" fo:padding-bottom="0.137cm" fo:padding-left="0.262cm" fo:padding-right="0.262cm" loext:decorative="false"/>
    </style:style>
    <style:style style:name="gr100" style:family="graphic" style:parent-style-name="standard">
      <style:graphic-properties draw:stroke="solid" svg:stroke-width="0.018cm" svg:stroke-color="#a5a5a5" svg:stroke-opacity="100%" draw:stroke-linejoin="miter" svg:stroke-linecap="butt" draw:fill="gradient" draw:fill-gradient-name="a1084"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1" style:family="graphic" style:parent-style-name="standard">
      <style:graphic-properties draw:stroke="solid" svg:stroke-width="0.018cm" svg:stroke-color="#a5a5a5" svg:stroke-opacity="100%" draw:stroke-linejoin="miter" svg:stroke-linecap="butt" draw:fill="gradient" draw:fill-gradient-name="a1088"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2" style:family="graphic" style:parent-style-name="standard">
      <style:graphic-properties draw:stroke="none" draw:fill="none" draw:textarea-horizontal-align="center" draw:textarea-vertical-align="top" draw:auto-grow-height="true" draw:auto-grow-width="true" fo:min-height="1.097cm" fo:min-width="1.902cm" fo:padding-top="0.127cm" fo:padding-bottom="0.127cm" fo:padding-left="0.254cm" fo:padding-right="0.254cm" fo:wrap-option="no-wrap" loext:decorative="false"/>
      <style:paragraph-properties style:writing-mode="lr-tb"/>
    </style:style>
    <style:style style:name="gr103" style:family="graphic" style:parent-style-name="standard">
      <style:graphic-properties draw:stroke="solid" svg:stroke-width="0.018cm" svg:stroke-color="#5b9bd5" svg:stroke-opacity="100%" draw:stroke-linejoin="miter" svg:stroke-linecap="butt" draw:fill="gradient" draw:fill-gradient-name="a1112"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4" style:family="graphic" style:parent-style-name="standard">
      <style:graphic-properties draw:stroke="solid" svg:stroke-width="0.018cm" svg:stroke-color="#5b9bd5" svg:stroke-opacity="100%" draw:stroke-linejoin="miter" svg:stroke-linecap="butt" draw:fill="gradient" draw:fill-gradient-name="a1116"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5" style:family="graphic" style:parent-style-name="standard">
      <style:graphic-properties draw:stroke="solid" svg:stroke-width="0.018cm" svg:stroke-color="#5b9bd5" svg:stroke-opacity="100%" draw:stroke-linejoin="miter" svg:stroke-linecap="butt" draw:fill="gradient" draw:fill-gradient-name="a1120"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6" style:family="graphic" style:parent-style-name="standard">
      <style:graphic-properties draw:stroke="solid" svg:stroke-width="0.018cm" svg:stroke-color="#5b9bd5" svg:stroke-opacity="100%" draw:stroke-linejoin="miter" svg:stroke-linecap="butt" draw:fill="gradient" draw:fill-gradient-name="a1124"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7" style:family="graphic" style:parent-style-name="standard">
      <style:graphic-properties draw:stroke="solid" svg:stroke-width="0.018cm" svg:stroke-color="#5b9bd5" svg:stroke-opacity="100%" draw:stroke-linejoin="miter" svg:stroke-linecap="butt" draw:fill="gradient" draw:fill-gradient-name="a1128"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8" style:family="graphic" style:parent-style-name="standard">
      <style:graphic-properties draw:stroke="solid" svg:stroke-width="0.018cm" svg:stroke-color="#5b9bd5" svg:stroke-opacity="100%" draw:stroke-linejoin="miter" svg:stroke-linecap="butt" draw:fill="gradient" draw:fill-gradient-name="a1133"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9"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28cm" fo:min-width="0.179cm" fo:padding-top="0.127cm" fo:padding-bottom="0.127cm" fo:padding-left="0.254cm" fo:padding-right="0.254cm" fo:wrap-option="wrap" style:writing-mode="lr-tb" loext:decorative="false"/>
      <style:paragraph-properties style:writing-mode="lr-tb"/>
    </style:style>
    <style:style style:name="gr110"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49cm" fo:min-width="1.618cm" fo:padding-top="0.127cm" fo:padding-bottom="0.127cm" fo:padding-left="0.254cm" fo:padding-right="0.254cm" fo:wrap-option="wrap" style:writing-mode="lr-tb" loext:decorative="false"/>
      <style:paragraph-properties style:writing-mode="lr-tb"/>
    </style:style>
    <style:style style:name="gr111"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112cm" fo:min-width="1.317cm" fo:padding-top="0.127cm" fo:padding-bottom="0.127cm" fo:padding-left="0.254cm" fo:padding-right="0.254cm" fo:wrap-option="wrap" style:writing-mode="lr-tb" loext:decorative="false"/>
      <style:paragraph-properties style:writing-mode="lr-tb"/>
    </style:style>
    <style:style style:name="gr112"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26cm" fo:padding-top="0.127cm" fo:padding-bottom="0.127cm" fo:padding-left="0.254cm" fo:padding-right="0.254cm" fo:wrap-option="wrap" style:writing-mode="lr-tb" loext:decorative="false"/>
      <style:paragraph-properties style:writing-mode="lr-tb"/>
    </style:style>
    <style:style style:name="gr113" style:family="graphic" style:parent-style-name="standard">
      <style:graphic-properties draw:stroke="solid" svg:stroke-width="0.051cm" svg:stroke-color="#000000" draw:marker-start-width="0.229cm" draw:marker-end-width="0.229cm" svg:stroke-opacity="100%" draw:stroke-linejoin="miter" svg:stroke-linecap="butt" draw:fill="none" draw:textarea-horizontal-align="center" draw:textarea-vertical-align="middle" draw:auto-grow-height="false" draw:auto-grow-width="false" fo:min-height="0.003cm" fo:min-width="1.618cm" fo:padding-top="0.135cm" fo:padding-bottom="0.135cm" fo:padding-left="0.262cm" fo:padding-right="0.262cm" fo:wrap-option="wrap" style:writing-mode="lr-tb" loext:decorative="false"/>
      <style:paragraph-properties style:writing-mode="lr-tb"/>
    </style:style>
    <style:style style:name="gr114"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222cm" fo:min-width="0cm" fo:padding-top="0.127cm" fo:padding-bottom="0.127cm" fo:padding-left="0.254cm" fo:padding-right="0.254cm" fo:wrap-option="wrap" style:writing-mode="lr-tb" loext:decorative="false"/>
      <style:paragraph-properties style:writing-mode="lr-tb"/>
    </style:style>
    <style:style style:name="gr115" style:family="graphic" style:parent-style-name="standard">
      <style:graphic-properties draw:stroke="none" draw:fill="none" draw:textarea-horizontal-align="center" draw:textarea-vertical-align="top" draw:auto-grow-height="true" draw:auto-grow-width="true" fo:min-height="1.097cm" fo:min-width="1.677cm" fo:padding-top="0.127cm" fo:padding-bottom="0.127cm" fo:padding-left="0.254cm" fo:padding-right="0.254cm" fo:wrap-option="no-wrap" loext:decorative="false"/>
      <style:paragraph-properties style:writing-mode="lr-tb"/>
    </style:style>
    <style:style style:name="gr116" style:family="graphic" style:parent-style-name="standard">
      <style:graphic-properties draw:stroke="solid" svg:stroke-width="0.018cm" svg:stroke-color="#bfbfbf" draw:marker-end="a1164" svg:stroke-opacity="100%" draw:stroke-linejoin="miter" svg:stroke-linecap="butt" draw:fill="none" fo:padding-top="0.134cm" fo:padding-bottom="0.134cm" fo:padding-left="0.259cm" fo:padding-right="0.259cm" loext:decorative="false"/>
    </style:style>
    <style:style style:name="gr117" style:family="graphic" style:parent-style-name="standard">
      <style:graphic-properties draw:stroke="solid" svg:stroke-width="0.018cm" svg:stroke-color="#bfbfbf" draw:marker-end="a1166" svg:stroke-opacity="100%" draw:stroke-linejoin="miter" svg:stroke-linecap="butt" draw:fill="none" fo:padding-top="0.134cm" fo:padding-bottom="0.134cm" fo:padding-left="0.259cm" fo:padding-right="0.259cm" loext:decorative="false"/>
    </style:style>
    <style:style style:name="gr118"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07cm" fo:min-width="0.148cm" fo:padding-top="0.127cm" fo:padding-bottom="0.127cm" fo:padding-left="0.254cm" fo:padding-right="0.254cm" fo:wrap-option="wrap" style:writing-mode="lr-tb" loext:decorative="false"/>
      <style:paragraph-properties style:writing-mode="lr-tb"/>
    </style:style>
    <style:style style:name="gr119"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07cm" fo:padding-top="0.127cm" fo:padding-bottom="0.127cm" fo:padding-left="0.254cm" fo:padding-right="0.254cm" fo:wrap-option="wrap" style:writing-mode="lr-tb" loext:decorative="false"/>
      <style:paragraph-properties style:writing-mode="lr-tb"/>
    </style:style>
    <style:style style:name="gr120"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14cm" fo:padding-top="0.127cm" fo:padding-bottom="0.127cm" fo:padding-left="0.254cm" fo:padding-right="0.254cm" fo:wrap-option="wrap" style:writing-mode="lr-tb" loext:decorative="false"/>
      <style:paragraph-properties style:writing-mode="lr-tb"/>
    </style:style>
    <style:style style:name="gr121" style:family="graphic" style:parent-style-name="standard">
      <style:graphic-properties draw:stroke="none" draw:fill="none" draw:textarea-horizontal-align="center" draw:textarea-vertical-align="top" draw:auto-grow-height="true" draw:auto-grow-width="true" fo:min-height="1.097cm" fo:min-width="2.926cm" fo:padding-top="0.127cm" fo:padding-bottom="0.127cm" fo:padding-left="0.254cm" fo:padding-right="0.254cm" fo:wrap-option="no-wrap" loext:decorative="false"/>
      <style:paragraph-properties style:writing-mode="lr-tb"/>
    </style:style>
    <style:style style:name="gr122" style:family="graphic" style:parent-style-name="standard">
      <style:graphic-properties draw:stroke="none" draw:fill="none" draw:textarea-horizontal-align="center" draw:textarea-vertical-align="top" draw:auto-grow-height="true" draw:auto-grow-width="true" fo:min-height="0.586cm" fo:min-width="3.251cm" fo:padding-top="0.127cm" fo:padding-bottom="0.127cm" fo:padding-left="0.254cm" fo:padding-right="0.254cm" fo:wrap-option="no-wrap" loext:decorative="false"/>
      <style:paragraph-properties style:writing-mode="lr-tb"/>
    </style:style>
    <style:style style:name="gr123" style:family="graphic" style:parent-style-name="standard">
      <style:graphic-properties draw:stroke="solid" svg:stroke-width="0.018cm" svg:stroke-color="#bfbfbf" draw:marker-end="a1196" svg:stroke-opacity="100%" draw:stroke-linejoin="miter" svg:stroke-linecap="butt" draw:fill="none" fo:padding-top="0.134cm" fo:padding-bottom="0.134cm" fo:padding-left="0.259cm" fo:padding-right="0.259cm" loext:decorative="false"/>
    </style:style>
    <style:style style:name="gr124" style:family="graphic" style:parent-style-name="standard">
      <style:graphic-properties draw:stroke="solid" svg:stroke-width="0.018cm" svg:stroke-color="#bfbfbf" draw:marker-end="a1198" svg:stroke-opacity="100%" draw:stroke-linejoin="miter" svg:stroke-linecap="butt" draw:fill="none" fo:padding-top="0.134cm" fo:padding-bottom="0.134cm" fo:padding-left="0.259cm" fo:padding-right="0.259cm" loext:decorative="false"/>
    </style:style>
    <style:style style:name="gr125" style:family="graphic" style:parent-style-name="standard">
      <style:graphic-properties draw:stroke="none" draw:fill="none" draw:textarea-horizontal-align="center" draw:textarea-vertical-align="top" draw:auto-grow-height="true" draw:auto-grow-width="true" fo:min-height="1.644cm" fo:min-width="2.595cm" fo:padding-top="0.127cm" fo:padding-bottom="0.127cm" fo:padding-left="0.254cm" fo:padding-right="0.254cm" fo:wrap-option="no-wrap" loext:decorative="false"/>
      <style:paragraph-properties style:writing-mode="lr-tb"/>
    </style:style>
    <style:style style:name="gr126" style:family="graphic" style:parent-style-name="standard">
      <style:graphic-properties draw:stroke="solid" svg:stroke-width="0.079cm" svg:stroke-color="#5b9bd5" svg:stroke-opacity="100%" draw:stroke-linejoin="miter" svg:stroke-linecap="butt" draw:fill="solid" draw:fill-color="#deebf7" draw:opacity="100%" draw:textarea-horizontal-align="center" draw:textarea-vertical-align="middle" draw:auto-grow-height="false" draw:auto-grow-width="false" fo:min-height="2.721cm" fo:min-width="4.463cm" fo:padding-top="0.127cm" fo:padding-bottom="0.127cm" fo:padding-left="0.254cm" fo:padding-right="0.254cm" fo:wrap-option="wrap" style:writing-mode="lr-tb" loext:decorative="false"/>
      <style:paragraph-properties style:writing-mode="lr-tb"/>
    </style:style>
    <style:style style:name="gr127" style:family="graphic" style:parent-style-name="standard">
      <style:graphic-properties draw:stroke="solid" svg:stroke-width="0.079cm" svg:stroke-color="#5b9bd5" svg:stroke-opacity="100%" draw:stroke-linejoin="miter" svg:stroke-linecap="butt" draw:fill="solid" draw:fill-color="#ffffff" draw:opacity="100%" draw:textarea-horizontal-align="center" draw:textarea-vertical-align="middle" draw:auto-grow-height="false" draw:auto-grow-width="false" fo:min-height="1.876cm" fo:min-width="3.007cm" fo:padding-top="0.127cm" fo:padding-bottom="0.127cm" fo:padding-left="0.254cm" fo:padding-right="0.254cm" fo:wrap-option="wrap" style:writing-mode="lr-tb" loext:decorative="false"/>
      <style:paragraph-properties style:writing-mode="lr-tb"/>
    </style:style>
    <style:style style:name="gr128" style:family="graphic" style:parent-style-name="standard">
      <style:graphic-properties draw:stroke="none" draw:fill="none" draw:textarea-horizontal-align="center" draw:textarea-vertical-align="top" draw:auto-grow-height="true" draw:auto-grow-width="true" fo:min-height="1.541cm" fo:min-width="1.569cm" fo:padding-top="0.127cm" fo:padding-bottom="0.127cm" fo:padding-left="0.254cm" fo:padding-right="0.254cm" fo:wrap-option="no-wrap" loext:decorative="false"/>
      <style:paragraph-properties style:writing-mode="lr-tb"/>
    </style:style>
    <style:style style:name="gr129" style:family="graphic" style:parent-style-name="standard">
      <style:graphic-properties draw:stroke="none" draw:fill="none" draw:textarea-horizontal-align="center" draw:textarea-vertical-align="top" draw:auto-grow-height="true" draw:auto-grow-width="true" fo:min-height="1.541cm" fo:min-width="1.915cm" fo:padding-top="0.127cm" fo:padding-bottom="0.127cm" fo:padding-left="0.254cm" fo:padding-right="0.254cm" fo:wrap-option="no-wrap" loext:decorative="false"/>
      <style:paragraph-properties style:writing-mode="lr-tb"/>
    </style:style>
    <style:style style:name="gr130" style:family="graphic" style:parent-style-name="standard">
      <style:graphic-properties draw:stroke="dash" draw:stroke-dash="SysDot" svg:stroke-width="0.035cm" svg:stroke-color="#767171" draw:marker-end="a1261" svg:stroke-opacity="100%" draw:stroke-linejoin="miter" svg:stroke-linecap="butt" draw:fill="none" fo:padding-top="0.142cm" fo:padding-bottom="0.142cm" fo:padding-left="0.267cm" fo:padding-right="0.267cm" loext:decorative="false"/>
    </style:style>
    <style:style style:name="gr131" style:family="graphic" style:parent-style-name="standard">
      <style:graphic-properties draw:stroke="none" draw:fill="none" draw:textarea-horizontal-align="left" draw:textarea-vertical-align="top" draw:auto-grow-height="true" draw:auto-grow-width="true" fo:min-height="0.772cm" fo:min-width="0.495cm" fo:padding-top="0.127cm" fo:padding-bottom="0.127cm" fo:padding-left="0.254cm" fo:padding-right="0.254cm" fo:wrap-option="no-wrap" loext:decorative="false"/>
      <style:paragraph-properties style:writing-mode="lr-tb"/>
    </style:style>
    <style:style style:name="gr132" style:family="graphic" style:parent-style-name="standard">
      <style:graphic-properties draw:stroke="dash" draw:stroke-dash="SysDot" svg:stroke-width="0.035cm" svg:stroke-color="#767171" draw:marker-start="a1267" svg:stroke-opacity="100%" draw:stroke-linejoin="miter" svg:stroke-linecap="butt" draw:fill="none" fo:padding-top="0.142cm" fo:padding-bottom="0.142cm" fo:padding-left="0.267cm" fo:padding-right="0.267cm" loext:decorative="false"/>
    </style:style>
    <style:style style:name="gr133" style:family="graphic" style:parent-style-name="standard">
      <style:graphic-properties draw:stroke="dash" draw:stroke-dash="SysDot" svg:stroke-width="0.035cm" svg:stroke-color="#767171" draw:marker-end="a1278" svg:stroke-opacity="100%" draw:stroke-linejoin="miter" svg:stroke-linecap="butt" draw:fill="none" fo:padding-top="0.142cm" fo:padding-bottom="0.142cm" fo:padding-left="0.267cm" fo:padding-right="0.267cm" loext:decorative="false"/>
    </style:style>
    <style:style style:name="gr134" style:family="graphic" style:parent-style-name="standard">
      <style:graphic-properties draw:stroke="dash" draw:stroke-dash="SysDot" svg:stroke-width="0.035cm" svg:stroke-color="#767171" draw:marker-end="a1281" svg:stroke-opacity="100%" draw:stroke-linejoin="miter" svg:stroke-linecap="butt" draw:fill="none" fo:padding-top="0.142cm" fo:padding-bottom="0.142cm" fo:padding-left="0.267cm" fo:padding-right="0.267cm" loext:decorative="false"/>
    </style:style>
    <style:style style:name="gr135" style:family="graphic" style:parent-style-name="standard">
      <style:graphic-properties draw:stroke="none" draw:fill="none" draw:textarea-horizontal-align="left" draw:textarea-vertical-align="top" draw:auto-grow-height="true" draw:auto-grow-width="true" fo:min-height="1.234cm" fo:min-width="1.261cm" fo:padding-top="0.127cm" fo:padding-bottom="0.127cm" fo:padding-left="0.254cm" fo:padding-right="0.254cm" fo:wrap-option="no-wrap" loext:decorative="false"/>
      <style:paragraph-properties style:writing-mode="lr-tb"/>
    </style:style>
    <style:style style:name="gr136" style:family="graphic" style:parent-style-name="standard">
      <style:graphic-properties draw:stroke="dash" draw:stroke-dash="SysDot" svg:stroke-width="0.035cm" svg:stroke-color="#767171" draw:marker-end="a1289" svg:stroke-opacity="100%" draw:stroke-linejoin="miter" svg:stroke-linecap="butt" draw:fill="none" fo:padding-top="0.142cm" fo:padding-bottom="0.142cm" fo:padding-left="0.267cm" fo:padding-right="0.267cm" loext:decorative="false"/>
    </style:style>
    <style:style style:name="gr137" style:family="graphic" style:parent-style-name="standard">
      <style:graphic-properties draw:stroke="dash" draw:stroke-dash="SysDot" svg:stroke-width="0.035cm" svg:stroke-color="#767171" draw:marker-start="a1300" svg:stroke-opacity="100%" draw:stroke-linejoin="miter" svg:stroke-linecap="butt" draw:fill="none" fo:padding-top="0.142cm" fo:padding-bottom="0.142cm" fo:padding-left="0.267cm" fo:padding-right="0.267cm" loext:decorative="false"/>
    </style:style>
    <style:style style:name="gr138" style:family="graphic" style:parent-style-name="standard">
      <style:graphic-properties draw:stroke="none" draw:fill="none" draw:textarea-horizontal-align="left" draw:textarea-vertical-align="top" draw:auto-grow-height="true" draw:auto-grow-width="true" fo:min-height="0.618cm" fo:min-width="2.53cm" fo:padding-top="0.127cm" fo:padding-bottom="0.127cm" fo:padding-left="0.254cm" fo:padding-right="0.254cm" fo:wrap-option="no-wrap" loext:decorative="false"/>
      <style:paragraph-properties style:writing-mode="lr-tb"/>
    </style:style>
    <style:style style:name="gr139" style:family="graphic" style:parent-style-name="standard">
      <style:graphic-properties draw:stroke="none" draw:fill="none" draw:textarea-horizontal-align="center" draw:textarea-vertical-align="top" draw:auto-grow-height="true" draw:auto-grow-width="true" fo:min-height="0.772cm" fo:min-width="1.672cm" fo:padding-top="0.127cm" fo:padding-bottom="0.127cm" fo:padding-left="0.254cm" fo:padding-right="0.254cm" fo:wrap-option="no-wrap" loext:decorative="false"/>
      <style:paragraph-properties style:writing-mode="lr-tb"/>
    </style:style>
    <style:style style:name="gr140"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0.645cm" fo:min-width="1.012cm" fo:padding-top="0.127cm" fo:padding-bottom="0.127cm" fo:padding-left="0.254cm" fo:padding-right="0.254cm" fo:wrap-option="wrap" style:writing-mode="lr-tb" loext:decorative="false"/>
      <style:paragraph-properties style:writing-mode="lr-tb"/>
    </style:style>
    <style:style style:name="gr141"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08cm" fo:padding-top="0.127cm" fo:padding-bottom="0.127cm" fo:padding-left="0.254cm" fo:padding-right="0.254cm" fo:wrap-option="wrap" style:writing-mode="lr-tb" loext:decorative="false"/>
      <style:paragraph-properties style:writing-mode="lr-tb"/>
    </style:style>
    <style:style style:name="gr142"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11cm" fo:padding-top="0.127cm" fo:padding-bottom="0.127cm" fo:padding-left="0.254cm" fo:padding-right="0.254cm" fo:wrap-option="wrap" style:writing-mode="lr-tb" loext:decorative="false"/>
      <style:paragraph-properties style:writing-mode="lr-tb"/>
    </style:style>
    <style:style style:name="gr143"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784cm" fo:min-width="1.448cm" fo:padding-top="0.127cm" fo:padding-bottom="0.127cm" fo:padding-left="0.254cm" fo:padding-right="0.254cm" fo:wrap-option="wrap" style:writing-mode="lr-tb" loext:decorative="false"/>
      <style:paragraph-properties style:writing-mode="lr-tb"/>
    </style:style>
    <style:style style:name="gr144"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776cm" fo:min-width="1.594cm" fo:padding-top="0.127cm" fo:padding-bottom="0.127cm" fo:padding-left="0.254cm" fo:padding-right="0.254cm" fo:wrap-option="wrap" style:writing-mode="lr-tb" loext:decorative="false"/>
      <style:paragraph-properties style:writing-mode="lr-tb"/>
    </style:style>
    <style:style style:name="gr145"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569cm" fo:min-width="2.02cm" fo:padding-top="0.127cm" fo:padding-bottom="0.127cm" fo:padding-left="0.254cm" fo:padding-right="0.254cm" fo:wrap-option="wrap" style:writing-mode="lr-tb" loext:decorative="false"/>
      <style:paragraph-properties style:writing-mode="lr-tb"/>
    </style:style>
    <style:style style:name="gr146"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57cm" fo:min-width="2.02cm" fo:padding-top="0.127cm" fo:padding-bottom="0.127cm" fo:padding-left="0.254cm" fo:padding-right="0.254cm" fo:wrap-option="wrap" style:writing-mode="lr-tb" loext:decorative="false"/>
      <style:paragraph-properties style:writing-mode="lr-tb"/>
    </style:style>
    <style:style style:name="gr147"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09cm" fo:padding-top="0.127cm" fo:padding-bottom="0.127cm" fo:padding-left="0.254cm" fo:padding-right="0.254cm" fo:wrap-option="wrap" style:writing-mode="lr-tb" loext:decorative="false"/>
      <style:paragraph-properties style:writing-mode="lr-tb"/>
    </style:style>
    <style:style style:name="gr148"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1cm" fo:padding-top="0.127cm" fo:padding-bottom="0.127cm" fo:padding-left="0.254cm" fo:padding-right="0.254cm" fo:wrap-option="wrap" style:writing-mode="lr-tb" loext:decorative="false"/>
      <style:paragraph-properties style:writing-mode="lr-tb"/>
    </style:style>
    <style:style style:name="gr149"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29cm" fo:padding-top="0.127cm" fo:padding-bottom="0.127cm" fo:padding-left="0.254cm" fo:padding-right="0.254cm" fo:wrap-option="wrap" style:writing-mode="lr-tb" loext:decorative="false"/>
      <style:paragraph-properties style:writing-mode="lr-tb"/>
    </style:style>
    <style:style style:name="gr150"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2cm" fo:padding-top="0.127cm" fo:padding-bottom="0.127cm" fo:padding-left="0.254cm" fo:padding-right="0.254cm" fo:wrap-option="wrap" style:writing-mode="lr-tb" loext:decorative="false"/>
      <style:paragraph-properties style:writing-mode="lr-tb"/>
    </style:style>
    <style:style style:name="gr151"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cm" fo:padding-top="0.127cm" fo:padding-bottom="0.127cm" fo:padding-left="0.254cm" fo:padding-right="0.254cm" fo:wrap-option="wrap" style:writing-mode="lr-tb" loext:decorative="false"/>
      <style:paragraph-properties style:writing-mode="lr-tb"/>
    </style:style>
    <style:style style:name="gr152"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6cm" fo:min-width="2.031cm" fo:padding-top="0.127cm" fo:padding-bottom="0.127cm" fo:padding-left="0.254cm" fo:padding-right="0.254cm" fo:wrap-option="wrap" style:writing-mode="lr-tb" loext:decorative="false"/>
      <style:paragraph-properties style:writing-mode="lr-tb"/>
    </style:style>
    <style:style style:name="gr153"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6cm" fo:min-width="2.029cm" fo:padding-top="0.127cm" fo:padding-bottom="0.127cm" fo:padding-left="0.254cm" fo:padding-right="0.254cm" fo:wrap-option="wrap" style:writing-mode="lr-tb" loext:decorative="false"/>
      <style:paragraph-properties style:writing-mode="lr-tb"/>
    </style:style>
    <style:style style:name="gr154"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0.645cm" fo:min-width="1.013cm" fo:padding-top="0.127cm" fo:padding-bottom="0.127cm" fo:padding-left="0.254cm" fo:padding-right="0.254cm" fo:wrap-option="wrap" style:writing-mode="lr-tb" loext:decorative="false"/>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535cm" fo:min-width="1.889cm" fo:padding-top="0.127cm" fo:padding-bottom="0.127cm" fo:padding-left="0.254cm" fo:padding-right="0.254cm" fo:wrap-option="no-wrap" loext:decorative="false"/>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535cm" fo:min-width="1.424cm" fo:padding-top="0.127cm" fo:padding-bottom="0.127cm" fo:padding-left="0.254cm" fo:padding-right="0.254cm" fo:wrap-option="no-wrap" loext:decorative="false"/>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535cm" fo:min-width="0.705cm" fo:padding-top="0.127cm" fo:padding-bottom="0.127cm" fo:padding-left="0.254cm" fo:padding-right="0.254cm" fo:wrap-option="no-wrap" loext:decorative="false"/>
      <style:paragraph-properties style:writing-mode="lr-tb"/>
    </style:style>
    <style:style style:name="gr158" style:family="graphic" style:parent-style-name="standard">
      <style:graphic-properties draw:stroke="solid" svg:stroke-width="0.053cm" svg:stroke-color="#2e75b6" draw:marker-end="a1012" svg:stroke-opacity="100%" draw:stroke-linejoin="miter" svg:stroke-linecap="butt" draw:fill="none" fo:padding-top="0.151cm" fo:padding-bottom="0.151cm" fo:padding-left="0.276cm" fo:padding-right="0.276cm" loext:decorative="false"/>
    </style:style>
    <style:style style:name="gr159" style:family="graphic" style:parent-style-name="standard">
      <style:graphic-properties draw:stroke="solid" svg:stroke-width="0.053cm" svg:stroke-color="#2e75b6" draw:marker-end="a1014" svg:stroke-opacity="100%" draw:stroke-linejoin="miter" svg:stroke-linecap="butt" draw:fill="none" fo:padding-top="0.151cm" fo:padding-bottom="0.151cm" fo:padding-left="0.276cm" fo:padding-right="0.276cm" loext:decorative="false"/>
    </style:style>
    <style:style style:name="gr160" style:family="graphic" style:parent-style-name="standard">
      <style:graphic-properties draw:stroke="solid" svg:stroke-width="0.053cm" svg:stroke-color="#2e75b6" draw:marker-end="a1016" svg:stroke-opacity="100%" draw:stroke-linejoin="miter" svg:stroke-linecap="butt" draw:fill="none" fo:padding-top="0.151cm" fo:padding-bottom="0.151cm" fo:padding-left="0.276cm" fo:padding-right="0.276cm" loext:decorative="false"/>
    </style:style>
    <style:style style:name="gr161" style:family="graphic" style:parent-style-name="standard">
      <style:graphic-properties draw:stroke="solid" svg:stroke-width="0.053cm" svg:stroke-color="#2e75b6" draw:marker-end="a1018" svg:stroke-opacity="100%" draw:stroke-linejoin="miter" svg:stroke-linecap="butt" draw:fill="none" fo:padding-top="0.151cm" fo:padding-bottom="0.151cm" fo:padding-left="0.276cm" fo:padding-right="0.276cm" loext:decorative="false"/>
    </style:style>
    <style:style style:name="gr162" style:family="graphic" style:parent-style-name="standard">
      <style:graphic-properties draw:stroke="solid" svg:stroke-width="0.053cm" svg:stroke-color="#2e75b6" draw:marker-end="a1020" svg:stroke-opacity="100%" draw:stroke-linejoin="miter" svg:stroke-linecap="butt" draw:fill="none" fo:padding-top="0.151cm" fo:padding-bottom="0.151cm" fo:padding-left="0.276cm" fo:padding-right="0.276cm" loext:decorative="false"/>
    </style:style>
    <style:style style:name="gr163" style:family="graphic" style:parent-style-name="standard">
      <style:graphic-properties draw:stroke="solid" svg:stroke-width="0.053cm" svg:stroke-color="#2e75b6" draw:marker-end="a1022" svg:stroke-opacity="100%" draw:stroke-linejoin="miter" svg:stroke-linecap="butt" draw:fill="none" fo:padding-top="0.151cm" fo:padding-bottom="0.151cm" fo:padding-left="0.276cm" fo:padding-right="0.276cm" loext:decorative="false"/>
    </style:style>
    <style:style style:name="gr164" style:family="graphic" style:parent-style-name="standard">
      <style:graphic-properties draw:stroke="solid" svg:stroke-width="0.053cm" svg:stroke-color="#2e75b6" draw:marker-end="a1024" svg:stroke-opacity="100%" draw:stroke-linejoin="miter" svg:stroke-linecap="butt" draw:fill="none" fo:padding-top="0.151cm" fo:padding-bottom="0.151cm" fo:padding-left="0.276cm" fo:padding-right="0.276cm" loext:decorative="false"/>
    </style:style>
    <style:style style:name="gr165" style:family="graphic" style:parent-style-name="standard">
      <style:graphic-properties draw:stroke="solid" svg:stroke-width="0.053cm" svg:stroke-color="#2e75b6" draw:marker-end="a1026" svg:stroke-opacity="100%" draw:stroke-linejoin="miter" svg:stroke-linecap="butt" draw:fill="none" fo:padding-top="0.151cm" fo:padding-bottom="0.151cm" fo:padding-left="0.276cm" fo:padding-right="0.276cm" loext:decorative="false"/>
    </style:style>
    <style:style style:name="gr166" style:family="graphic" style:parent-style-name="standard">
      <style:graphic-properties draw:stroke="solid" svg:stroke-width="0.053cm" svg:stroke-color="#2e75b6" draw:marker-end="a1028" svg:stroke-opacity="100%" draw:stroke-linejoin="miter" svg:stroke-linecap="butt" draw:fill="none" fo:padding-top="0.151cm" fo:padding-bottom="0.151cm" fo:padding-left="0.276cm" fo:padding-right="0.276cm" loext:decorative="false"/>
    </style:style>
    <style:style style:name="gr167" style:family="graphic" style:parent-style-name="standard">
      <style:graphic-properties draw:stroke="solid" svg:stroke-width="0.053cm" svg:stroke-color="#2e75b6" draw:marker-end="a1030" svg:stroke-opacity="100%" draw:stroke-linejoin="miter" svg:stroke-linecap="butt" draw:fill="none" fo:padding-top="0.151cm" fo:padding-bottom="0.151cm" fo:padding-left="0.276cm" fo:padding-right="0.276cm" loext:decorative="false"/>
    </style:style>
    <style:style style:name="gr168" style:family="graphic" style:parent-style-name="standard">
      <style:graphic-properties draw:stroke="solid" svg:stroke-width="0.053cm" svg:stroke-color="#2e75b6" svg:stroke-opacity="100%" draw:stroke-linejoin="miter" svg:stroke-linecap="butt" draw:fill="none" fo:padding-top="0.151cm" fo:padding-bottom="0.151cm" fo:padding-left="0.276cm" fo:padding-right="0.276cm" loext:decorative="false"/>
    </style:style>
    <style:style style:name="gr169" style:family="graphic" style:parent-style-name="standard">
      <style:graphic-properties draw:stroke="solid" svg:stroke-width="0.053cm" svg:stroke-color="#2e75b6" draw:marker-end="a1033" svg:stroke-opacity="100%" draw:stroke-linejoin="miter" svg:stroke-linecap="butt" draw:fill="none" fo:padding-top="0.151cm" fo:padding-bottom="0.151cm" fo:padding-left="0.276cm" fo:padding-right="0.276cm" loext:decorative="false"/>
    </style:style>
    <style:style style:name="gr170" style:family="graphic" style:parent-style-name="standard">
      <style:graphic-properties draw:stroke="solid" svg:stroke-width="0.053cm" svg:stroke-color="#2e75b6" draw:marker-end="a1035" svg:stroke-opacity="100%" draw:stroke-linejoin="miter" svg:stroke-linecap="butt" draw:fill="none" fo:padding-top="0.151cm" fo:padding-bottom="0.151cm" fo:padding-left="0.276cm" fo:padding-right="0.276cm" loext:decorative="false"/>
    </style:style>
    <style:style style:name="gr171" style:family="graphic" style:parent-style-name="standard">
      <style:graphic-properties draw:stroke="solid" svg:stroke-width="0.053cm" svg:stroke-color="#2e75b6" draw:marker-end="a1037" svg:stroke-opacity="100%" draw:stroke-linejoin="miter" svg:stroke-linecap="butt" draw:fill="none" fo:padding-top="0.151cm" fo:padding-bottom="0.151cm" fo:padding-left="0.276cm" fo:padding-right="0.276cm" loext:decorative="false"/>
    </style:style>
    <style:style style:name="gr172" style:family="graphic" style:parent-style-name="standard">
      <style:graphic-properties draw:stroke="solid" svg:stroke-width="0.053cm" svg:stroke-color="#2e75b6" draw:marker-end="a1039" svg:stroke-opacity="100%" draw:stroke-linejoin="miter" svg:stroke-linecap="butt" draw:fill="none" fo:padding-top="0.151cm" fo:padding-bottom="0.151cm" fo:padding-left="0.276cm" fo:padding-right="0.276cm" loext:decorative="false"/>
    </style:style>
    <style:style style:name="gr173" style:family="graphic" style:parent-style-name="standard">
      <style:graphic-properties draw:stroke="solid" svg:stroke-width="0.053cm" svg:stroke-color="#2e75b6" draw:marker-end="a1041" svg:stroke-opacity="100%" draw:stroke-linejoin="miter" svg:stroke-linecap="butt" draw:fill="none" fo:padding-top="0.151cm" fo:padding-bottom="0.151cm" fo:padding-left="0.276cm" fo:padding-right="0.276cm" loext:decorative="false"/>
    </style:style>
    <style:style style:name="gr174" style:family="graphic" style:parent-style-name="standard">
      <style:graphic-properties draw:stroke="solid" svg:stroke-width="0.053cm" svg:stroke-color="#2e75b6" draw:marker-end="a1043" svg:stroke-opacity="100%" draw:stroke-linejoin="miter" svg:stroke-linecap="butt" draw:fill="none" fo:padding-top="0.151cm" fo:padding-bottom="0.151cm" fo:padding-left="0.276cm" fo:padding-right="0.276cm" loext:decorative="false"/>
    </style:style>
    <style:style style:name="gr175" style:family="graphic" style:parent-style-name="standard">
      <style:graphic-properties draw:stroke="solid" svg:stroke-width="0.053cm" svg:stroke-color="#2e75b6" draw:marker-end="a1045" svg:stroke-opacity="100%" draw:stroke-linejoin="miter" svg:stroke-linecap="butt" draw:fill="none" fo:padding-top="0.151cm" fo:padding-bottom="0.151cm" fo:padding-left="0.276cm" fo:padding-right="0.276cm" loext:decorative="false"/>
    </style:style>
    <style:style style:name="gr176" style:family="graphic" style:parent-style-name="standard">
      <style:graphic-properties draw:stroke="solid" svg:stroke-width="0.053cm" svg:stroke-color="#2e75b6" draw:marker-end="a1047" svg:stroke-opacity="100%" draw:stroke-linejoin="miter" svg:stroke-linecap="butt" draw:fill="none" fo:padding-top="0.151cm" fo:padding-bottom="0.151cm" fo:padding-left="0.276cm" fo:padding-right="0.276cm" loext:decorative="false"/>
    </style:style>
    <style:style style:name="gr177" style:family="graphic" style:parent-style-name="standard">
      <style:graphic-properties draw:stroke="solid" svg:stroke-width="0.053cm" svg:stroke-color="#2e75b6" draw:marker-end="a1049" svg:stroke-opacity="100%" draw:stroke-linejoin="miter" svg:stroke-linecap="butt" draw:fill="none" fo:padding-top="0.151cm" fo:padding-bottom="0.151cm" fo:padding-left="0.276cm" fo:padding-right="0.276cm" loext:decorative="false"/>
    </style:style>
    <style:style style:name="gr178" style:family="graphic" style:parent-style-name="standard">
      <style:graphic-properties draw:stroke="solid" svg:stroke-width="0.053cm" svg:stroke-color="#2e75b6" draw:marker-end="a1051" svg:stroke-opacity="100%" draw:stroke-linejoin="miter" svg:stroke-linecap="butt" draw:fill="none" fo:padding-top="0.151cm" fo:padding-bottom="0.151cm" fo:padding-left="0.276cm" fo:padding-right="0.276cm" loext:decorative="false"/>
    </style:style>
    <style:style style:name="gr179" style:family="graphic" style:parent-style-name="standard">
      <style:graphic-properties draw:stroke="solid" svg:stroke-width="0.053cm" svg:stroke-color="#2e75b6" draw:marker-end="a1053" svg:stroke-opacity="100%" draw:stroke-linejoin="miter" svg:stroke-linecap="butt" draw:fill="none" fo:padding-top="0.151cm" fo:padding-bottom="0.151cm" fo:padding-left="0.276cm" fo:padding-right="0.276cm" loext:decorative="false"/>
    </style:style>
    <style:style style:name="gr180" style:family="graphic" style:parent-style-name="standard">
      <style:graphic-properties draw:stroke="solid" svg:stroke-width="0.053cm" svg:stroke-color="#2e75b6" draw:marker-end="a1055" svg:stroke-opacity="100%" draw:stroke-linejoin="miter" svg:stroke-linecap="butt" draw:fill="none" fo:padding-top="0.151cm" fo:padding-bottom="0.151cm" fo:padding-left="0.276cm" fo:padding-right="0.276cm" loext:decorative="false"/>
    </style:style>
    <style:style style:name="gr181" style:family="graphic" style:parent-style-name="standard">
      <style:graphic-properties draw:stroke="solid" svg:stroke-width="0.053cm" svg:stroke-color="#2e75b6" draw:marker-end="a1057" svg:stroke-opacity="100%" draw:stroke-linejoin="miter" svg:stroke-linecap="butt" draw:fill="none" fo:padding-top="0.151cm" fo:padding-bottom="0.151cm" fo:padding-left="0.276cm" fo:padding-right="0.276cm" loext:decorative="false"/>
    </style:style>
    <style:style style:name="gr182" style:family="graphic" style:parent-style-name="standard">
      <style:graphic-properties draw:stroke="solid" svg:stroke-width="0.053cm" svg:stroke-color="#2e75b6" draw:marker-end="a1059" svg:stroke-opacity="100%" draw:stroke-linejoin="miter" svg:stroke-linecap="butt" draw:fill="none" fo:padding-top="0.151cm" fo:padding-bottom="0.151cm" fo:padding-left="0.276cm" fo:padding-right="0.276cm" loext:decorative="false"/>
    </style:style>
    <style:style style:name="gr183" style:family="graphic" style:parent-style-name="standard">
      <style:graphic-properties draw:stroke="solid" svg:stroke-width="0.053cm" svg:stroke-color="#2e75b6" draw:marker-end="a1061" svg:stroke-opacity="100%" draw:stroke-linejoin="miter" svg:stroke-linecap="butt" draw:fill="none" fo:padding-top="0.151cm" fo:padding-bottom="0.151cm" fo:padding-left="0.276cm" fo:padding-right="0.276cm" loext:decorative="false"/>
    </style:style>
    <style:style style:name="gr184" style:family="graphic" style:parent-style-name="standard">
      <style:graphic-properties draw:stroke="solid" svg:stroke-width="0.053cm" svg:stroke-color="#2e75b6" draw:marker-end="a1063" svg:stroke-opacity="100%" draw:stroke-linejoin="miter" svg:stroke-linecap="butt" draw:fill="none" fo:padding-top="0.151cm" fo:padding-bottom="0.151cm" fo:padding-left="0.276cm" fo:padding-right="0.276cm" loext:decorative="false"/>
    </style:style>
    <style:style style:name="gr185" style:family="graphic" style:parent-style-name="standard">
      <style:graphic-properties draw:stroke="solid" svg:stroke-width="0.053cm" svg:stroke-color="#2e75b6" draw:marker-end="a1065" svg:stroke-opacity="100%" draw:stroke-linejoin="miter" svg:stroke-linecap="butt" draw:fill="none" fo:padding-top="0.151cm" fo:padding-bottom="0.151cm" fo:padding-left="0.276cm" fo:padding-right="0.276cm" loext:decorative="false"/>
    </style:style>
    <style:style style:name="gr186" style:family="graphic" style:parent-style-name="standard">
      <style:graphic-properties draw:stroke="solid" svg:stroke-width="0.053cm" svg:stroke-color="#2e75b6" draw:marker-end="a1067" svg:stroke-opacity="100%" draw:stroke-linejoin="miter" svg:stroke-linecap="butt" draw:fill="none" fo:padding-top="0.151cm" fo:padding-bottom="0.151cm" fo:padding-left="0.276cm" fo:padding-right="0.276cm" loext:decorative="false"/>
    </style:style>
    <style:style style:name="gr187" style:family="graphic" style:parent-style-name="standard">
      <style:graphic-properties draw:stroke="solid" svg:stroke-width="0.053cm" svg:stroke-color="#2e75b6" draw:marker-end="a1069" svg:stroke-opacity="100%" draw:stroke-linejoin="miter" svg:stroke-linecap="butt" draw:fill="none" fo:padding-top="0.151cm" fo:padding-bottom="0.151cm" fo:padding-left="0.276cm" fo:padding-right="0.276cm" loext:decorative="false"/>
    </style:style>
    <style:style style:name="gr188" style:family="graphic" style:parent-style-name="standard">
      <style:graphic-properties draw:stroke="solid" svg:stroke-width="0.053cm" svg:stroke-color="#2e75b6" draw:marker-end="a1071" svg:stroke-opacity="100%" draw:stroke-linejoin="miter" svg:stroke-linecap="butt" draw:fill="none" fo:padding-top="0.151cm" fo:padding-bottom="0.151cm" fo:padding-left="0.276cm" fo:padding-right="0.276cm"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libri" fo:font-size="16pt" style:font-size-asian="16pt" style:font-size-complex="16pt"/>
    </style:style>
    <style:style style:name="P5" style:family="paragraph">
      <loext:graphic-properties draw:fill="solid" draw:fill-color="#0070c0"/>
      <style:paragraph-properties fo:text-align="center"/>
      <style:text-properties style:font-name="Calibri"/>
    </style:style>
    <style:style style:name="P6" style:family="paragraph">
      <loext:graphic-properties draw:fill="solid" draw:fill-color="#bdd7ee"/>
      <style:paragraph-properties fo:text-align="center"/>
      <style:text-properties style:font-name="Calibri"/>
    </style:style>
    <style:style style:name="P7" style:family="paragraph">
      <loext:graphic-properties draw:fill="solid" draw:fill-color="#6a99d0"/>
      <style:paragraph-properties fo:text-align="center"/>
      <style:text-properties style:font-name="Calibri"/>
    </style:style>
    <style:style style:name="P8" style:family="paragraph">
      <loext:graphic-properties draw:fill-color="#ffffff"/>
    </style:style>
    <style:style style:name="P9" style:family="paragraph">
      <loext:graphic-properties draw:fill="none" draw:fill-color="#ffffff"/>
      <style:text-properties style:font-name="Calibri" fo:font-size="14pt" style:font-size-asian="14pt" style:font-size-complex="14pt"/>
    </style:style>
    <style:style style:name="P10" style:family="paragraph">
      <loext:graphic-properties draw:fill="none" draw:fill-color="#ffffff"/>
      <style:paragraph-properties fo:text-align="center"/>
      <style:text-properties fo:font-size="14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text-properties style:font-name="Calibri" fo:font-size="14pt"/>
    </style:style>
    <style:style style:name="P14" style:family="paragraph">
      <loext:graphic-properties draw:fill="solid" draw:fill-color="#000000" draw:opacity="100%"/>
      <style:paragraph-properties style:writing-mode="lr-tb" style:font-independent-line-spacing="true"/>
    </style:style>
    <style:style style:name="P15" style:family="paragraph">
      <loext:graphic-properties draw:fill="solid" draw:fill-color="#ffffff"/>
      <style:paragraph-properties fo:text-align="center"/>
    </style:style>
    <style:style style:name="P16" style:family="paragraph">
      <loext:graphic-properties draw:fill="none" draw:fill-color="#ffffff"/>
      <style:text-properties fo:color="#ffffff" loext:opacity="100%" style:font-name="Calibri" fo:font-size="14pt" fo:font-weight="bold" style:font-size-asian="14pt" style:font-weight-asian="bold" style:font-size-complex="14pt" style:font-weight-complex="bold"/>
    </style:style>
    <style:style style:name="P17" style:family="paragraph">
      <loext:graphic-properties draw:fill="none"/>
    </style:style>
    <style:style style:name="P1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6pt" style:font-size-asian="16pt" style:font-size-complex="16pt"/>
    </style:style>
    <style:style style:name="P19"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6pt" style:font-size-asian="16pt" style:font-size-complex="16pt"/>
    </style:style>
    <style:style style:name="P20"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1"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style>
    <style:style style:name="P22"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23"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style>
    <style:style style:name="P24"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5"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26" style:family="paragraph">
      <loext:graphic-properties draw:fill="solid" draw:fill-color="#5b9bd5" draw:opacity="100%"/>
      <style:paragraph-properties style:writing-mode="lr-tb" style:font-independent-line-spacing="true"/>
    </style:style>
    <style:style style:name="P27"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4pt" style:font-size-asian="14pt" style:font-size-complex="14pt"/>
    </style:style>
    <style:style style:name="P28" style:family="paragraph">
      <loext:graphic-properties draw:fill="gradient" draw:fill-gradient-name="a854"/>
      <style:paragraph-properties style:writing-mode="lr-tb" style:font-independent-line-spacing="true"/>
    </style:style>
    <style:style style:name="P29" style:family="paragraph">
      <loext:graphic-properties draw:fill="gradient" draw:fill-gradient-name="a840"/>
      <style:paragraph-properties style:writing-mode="lr-tb" style:font-independent-line-spacing="true"/>
    </style:style>
    <style:style style:name="P30" style:family="paragraph">
      <loext:graphic-properties draw:fill="gradient" draw:fill-gradient-name="a826"/>
      <style:paragraph-properties style:writing-mode="lr-tb" style:font-independent-line-spacing="true"/>
    </style:style>
    <style:style style:name="P31" style:family="paragraph">
      <loext:graphic-properties draw:fill="gradient" draw:fill-gradient-name="a812"/>
      <style:paragraph-properties style:writing-mode="lr-tb" style:font-independent-line-spacing="true"/>
    </style:style>
    <style:style style:name="P32" style:family="paragraph">
      <loext:graphic-properties draw:fill="gradient" draw:fill-gradient-name="a798"/>
      <style:paragraph-properties style:writing-mode="lr-tb" style:font-independent-line-spacing="true"/>
    </style:style>
    <style:style style:name="P33" style:family="paragraph">
      <loext:graphic-properties draw:fill="gradient" draw:fill-gradient-name="a1084"/>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4" style:family="paragraph">
      <loext:graphic-properties draw:fill="gradient" draw:fill-gradient-name="a1088"/>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5" style:family="paragraph">
      <style:paragraph-properties fo:margin-left="0cm" fo:margin-right="0cm" fo:margin-top="0cm" fo:margin-bottom="0cm" fo:line-height="80%" fo:text-align="center" fo:text-indent="0cm" style:punctuation-wrap="hanging" loext:tab-stop-distance="0cm" style:writing-mode="lr-tb">
        <style:tab-stops/>
      </style:paragraph-properties>
    </style:style>
    <style:style style:name="P36" style:family="paragraph">
      <loext:graphic-properties draw:fill="none"/>
      <style:paragraph-properties style:font-independent-line-spacing="true"/>
    </style:style>
    <style:style style:name="P37" style:family="paragraph">
      <loext:graphic-properties draw:fill="gradient" draw:fill-gradient-name="a111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8" style:family="paragraph">
      <loext:graphic-properties draw:fill="gradient" draw:fill-gradient-name="a1116"/>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9" style:family="paragraph">
      <loext:graphic-properties draw:fill="gradient" draw:fill-gradient-name="a112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0" style:family="paragraph">
      <loext:graphic-properties draw:fill="gradient" draw:fill-gradient-name="a1124"/>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1" style:family="paragraph">
      <loext:graphic-properties draw:fill="gradient" draw:fill-gradient-name="a1128"/>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2" style:family="paragraph">
      <loext:graphic-properties draw:fill="gradient" draw:fill-gradient-name="a1133"/>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3" style:family="paragraph">
      <loext:graphic-properties draw:fill="none"/>
      <style:paragraph-properties style:writing-mode="lr-tb" style:font-independent-line-spacing="true"/>
    </style:style>
    <style:style style:name="P44" style:family="paragraph">
      <loext:graphic-properties draw:fill="none"/>
      <style:paragraph-properties fo:margin-left="0cm" fo:margin-right="0cm" fo:margin-top="0cm" fo:margin-bottom="0cm" fo:line-height="80%" fo:text-align="center" fo:text-indent="0cm" style:punctuation-wrap="hanging" loext:tab-stop-distance="0cm" style:font-independent-line-spacing="true">
        <style:tab-stops/>
      </style:paragraph-properties>
    </style:style>
    <style:style style:name="P4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46"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7"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8"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49"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50" style:family="paragraph">
      <style:paragraph-properties fo:margin-left="0cm" fo:margin-right="0cm" fo:margin-top="0cm" fo:margin-bottom="0cm" fo:line-height="80%" fo:text-align="start" fo:text-indent="0cm" style:punctuation-wrap="hanging" loext:tab-stop-distance="0cm" style:writing-mode="lr-tb">
        <style:tab-stops/>
      </style:paragraph-properties>
    </style:style>
    <style:style style:name="P51" style:family="paragraph">
      <loext:graphic-properties draw:fill="none"/>
      <style:paragraph-properties fo:margin-left="0cm" fo:margin-right="0cm" fo:margin-top="0cm" fo:margin-bottom="0cm" fo:line-height="80%" fo:text-align="start" fo:text-indent="0cm" style:punctuation-wrap="hanging" loext:tab-stop-distance="0cm" style:font-independent-line-spacing="true">
        <style:tab-stops/>
      </style:paragraph-properties>
      <style:text-properties fo:font-size="18pt"/>
    </style:style>
    <style:style style:name="P52"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53" style:family="paragraph">
      <loext:graphic-properties draw:fill="none"/>
      <style:paragraph-properties fo:margin-left="0cm" fo:margin-right="0cm" fo:margin-top="0cm" fo:margin-bottom="0cm" fo:line-height="90%" fo:text-align="center" fo:text-indent="0cm" style:punctuation-wrap="hanging" loext:tab-stop-distance="0cm" style:writing-mode="lr-tb" style:font-independent-line-spacing="true">
        <style:tab-stops/>
      </style:paragraph-properties>
    </style:style>
    <style:style style:name="P54"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P55" style:family="paragraph">
      <loext:graphic-properties draw:fill="none"/>
      <style:paragraph-properties fo:margin-left="0cm" fo:margin-right="0cm" fo:margin-top="0cm" fo:margin-bottom="0cm" fo:line-height="90%" fo:text-align="start" fo:text-indent="0cm" style:punctuation-wrap="hanging" loext:tab-stop-distance="0cm" style:font-independent-line-spacing="true">
        <style:tab-stops/>
      </style:paragraph-properties>
    </style:style>
    <style:style style:name="T1" style:family="text">
      <style:text-properties style:font-name="Calibri" fo:font-size="16pt" style:font-size-asian="16pt" style:font-size-complex="16pt"/>
    </style:style>
    <style:style style:name="T2" style:family="text">
      <style:text-properties style:font-name="Calibri"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 fo:font-size="14pt"/>
    </style:style>
    <style:style style:name="T5" style:family="text">
      <style:text-properties fo:color="#ffffff" loext:opacity="100%" style:font-name="Calibri" fo:font-size="14pt" fo:font-weight="bold" style:font-size-asian="14pt" style:font-weight-asian="bold" style:font-size-complex="14pt" style:font-weight-complex="bold"/>
    </style:style>
    <style:style style:name="T6" style:family="text">
      <style:text-properties style:font-name="Calibri" fo:font-size="14pt" fo:font-weight="normal" style:font-size-asian="14pt" style:font-weight-asian="normal" style:font-size-complex="14pt"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44546a"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4" style:family="text">
      <style:text-properties fo:font-variant="normal" fo:text-transform="none" fo:color="#0070c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5" style:family="text">
      <style:text-properties fo:font-variant="normal" fo:text-transform="none" fo:color="#767171"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6" style:family="text">
      <style:text-properties fo:font-variant="normal" fo:text-transform="none" fo:color="#ff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1" fo:font-size="13.5pt" fo:letter-spacing="normal" fo:language="en" fo:country="US" fo:font-style="normal" style:text-underline-style="none" fo:font-weight="normal" style:text-underline-mode="continuous" style:text-overline-mode="continuous" style:text-line-through-mode="continuous" style:letter-kerning="true" style:font-size-asian="13.5pt" style:font-style-asian="normal" style:font-weight-asian="normal" style:font-size-complex="13.5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C4157AF2.png" xlink:type="simple" xlink:show="embed" xlink:actuate="onLoad" draw:mime-type="image/png">
            <text:p/>
          </draw:image>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9E67A95F.png" xlink:type="simple" xlink:show="embed" xlink:actuate="onLoad" draw:mime-type="image/png"/>
        </draw:frame>
        <draw:frame draw:style-name="gr1" draw:text-style-name="P1" draw:layer="layout" svg:width="1.188cm" svg:height="1.782cm" svg:x="15.32cm" svg:y="10.678cm">
          <draw:image xlink:href="Pictures/1000184A00001CAA00002AFFD75A7ACE.pdf" xlink:type="simple" xlink:show="embed" xlink:actuate="onLoad" draw:mime-type="application/pdf">
            <text:p/>
          </draw:image>
          <draw:image xlink:href="Pictures/1000000100000138000001D4939E222C.png" xlink:type="simple" xlink:show="embed" xlink:actuate="onLoad" draw:mime-type="image/png"/>
        </draw:frame>
        <draw:frame draw:style-name="gr2" draw:text-style-name="P2" draw:layer="layout" svg:width="6.729cm" svg:height="1.175cm" svg:x="1.842cm" svg:y="1.175cm">
          <draw:text-box>
            <text:p><text:span text:style-name="T1">Calibri (16pt by default)</text:span></text:p>
          </draw:text-box>
        </draw:frame>
        <draw:frame draw:style-name="gr2" draw:text-style-name="P2" draw:layer="layout" svg:width="6.729cm" svg:height="1.175cm" svg:x="1.843cm" svg:y="1.176cm">
          <draw:text-box>
            <text:p><text:span text:style-name="T1">Calibri (16pt by default)</text:span></text:p>
          </draw:text-box>
        </draw:frame>
        <draw:frame draw:style-name="gr3" draw:text-style-name="P4" draw:layer="layout" svg:width="4.506cm" svg:height="1.631cm" svg:x="5.984cm" svg:y="12.883cm">
          <draw:text-box>
            <text:p text:style-name="P3"><text:span text:style-name="T1">Generic</text:span></text:p>
            <text:p text:style-name="P3"><text:span text:style-name="T1">Switch</text:span></text:p>
          </draw:text-box>
        </draw:frame>
        <draw:frame draw:style-name="gr1" draw:text-style-name="P1" draw:layer="layout" svg:width="2.388cm" svg:height="1.682cm" svg:x="10.761cm" svg:y="10.922cm">
          <draw:image xlink:href="Pictures/10004B2B000068BB000049DD8AB69D38.pdf" xlink:type="simple" xlink:show="embed" xlink:actuate="onLoad" draw:mime-type="application/pdf">
            <text:p/>
          </draw:image>
          <draw:image xlink:href="Pictures/100000010000047400000324E1A3B353.png" xlink:type="simple" xlink:show="embed" xlink:actuate="onLoad" draw:mime-type="image/png"/>
        </draw:frame>
        <draw:frame draw:style-name="gr3" draw:text-style-name="P4" draw:layer="layout" svg:width="4.506cm" svg:height="1.631cm" svg:x="9.889cm" svg:y="12.884cm">
          <draw:text-box>
            <text:p text:style-name="P3"><text:span text:style-name="T1">User</text:span></text:p>
          </draw:text-box>
        </draw:frame>
        <draw:frame draw:style-name="gr3" draw:text-style-name="P4" draw:layer="layout" svg:width="4.506cm" svg:height="1.631cm" svg:x="5.984cm" svg:y="12.884cm">
          <draw:text-box>
            <text:p text:style-name="P3"><text:span text:style-name="T1">Generic</text:span></text:p>
            <text:p text:style-name="P3"><text:span text:style-name="T1">Switch</text:span></text:p>
          </draw:text-box>
        </draw:frame>
        <draw:frame draw:style-name="gr3" draw:text-style-name="P4" draw:layer="layout" svg:width="4.506cm" svg:height="1.631cm" svg:x="13.589cm" svg:y="12.885cm">
          <draw:text-box>
            <text:p text:style-name="P3"><text:span text:style-name="T1">UE</text:span></text:p>
            <text:p text:style-name="P3"><text:span text:style-name="T1">Phone</text:span></text:p>
          </draw:text-box>
        </draw:frame>
        <draw:frame draw:style-name="gr3" draw:text-style-name="P4" draw:layer="layout" svg:width="4.506cm" svg:height="1.631cm" svg:x="13.589cm" svg:y="12.886cm">
          <draw:text-box>
            <text:p text:style-name="P3"><text:span text:style-name="T1">UE</text:span></text:p>
            <text:p text:style-name="P3"><text:span text:style-name="T1">Phone</text:span></text:p>
          </draw:text-box>
        </draw:frame>
        <draw:frame draw:style-name="gr3" draw:text-style-name="P4" draw:layer="layout" svg:width="4.506cm" svg:height="1.631cm" svg:x="17.089cm" svg:y="12.887cm">
          <draw:text-box>
            <text:p text:style-name="P3"><text:span text:style-name="T1">Generic Office</text:span></text:p>
            <text:p text:style-name="P3"><text:span text:style-name="T1">or Enterprise</text:span></text:p>
          </draw:text-box>
        </draw:frame>
        <draw:frame draw:style-name="gr3" draw:text-style-name="P4" draw:layer="layout" svg:width="4.506cm" svg:height="1.631cm" svg:x="13.589cm" svg:y="12.887cm">
          <draw:text-box>
            <text:p text:style-name="P3"><text:span text:style-name="T1">UE</text:span></text:p>
            <text:p text:style-name="P3"><text:span text:style-name="T1">Phone</text:span></text:p>
          </draw:text-box>
        </draw:frame>
        <draw:frame draw:style-name="gr3" draw:text-style-name="P4" draw:layer="layout" svg:width="4.506cm" svg:height="1.631cm" svg:x="21.789cm" svg:y="12.888cm">
          <draw:text-box>
            <text:p text:style-name="P3"><text:span text:style-name="T1">5G</text:span></text:p>
            <text:p text:style-name="P3"><text:span text:style-name="T1">Basestation</text:span></text:p>
          </draw:text-box>
        </draw:frame>
        <draw:frame draw:style-name="gr3" draw:text-style-name="P4" draw:layer="layout" svg:width="4.506cm" svg:height="1.631cm" svg:x="21.735cm" svg:y="7.008cm">
          <draw:text-box>
            <text:p text:style-name="P3"><text:span text:style-name="T1">WiFi</text:span></text:p>
            <text:p text:style-name="P3"><text:span text:style-name="T1">Access Point</text:span></text:p>
          </draw:text-box>
        </draw:frame>
        <draw:custom-shape draw:style-name="gr4" draw:text-style-name="P5" draw:layer="layout" svg:width="1.461cm" svg:height="0.889cm" svg:x="2.158cm" svg:y="2.594cm">
          <text:p/>
          <draw:enhanced-geometry svg:viewBox="0 0 21600 21600" draw:type="rectangle" draw:enhanced-path="M 0 0 L 21600 0 21600 21600 0 21600 0 0 Z N"/>
        </draw:custom-shape>
        <draw:custom-shape draw:style-name="gr5" draw:text-style-name="P6" draw:layer="layout" svg:width="1.461cm" svg:height="0.889cm" svg:x="2.158cm" svg:y="5.283cm">
          <text:p/>
          <draw:enhanced-geometry svg:viewBox="0 0 21600 21600" draw:type="rectangle" draw:enhanced-path="M 0 0 L 21600 0 21600 21600 0 21600 0 0 Z N"/>
        </draw:custom-shape>
        <draw:frame draw:style-name="gr2" draw:text-style-name="P2" draw:layer="layout" svg:width="6.729cm" svg:height="1.175cm" svg:x="3.744cm" svg:y="2.577cm">
          <draw:text-box>
            <text:p><text:span text:style-name="T1">Darker Color 0070c0</text:span></text:p>
          </draw:text-box>
        </draw:frame>
        <draw:frame draw:style-name="gr2" draw:text-style-name="P2" draw:layer="layout" svg:width="6.729cm" svg:height="1.175cm" svg:x="3.745cm" svg:y="5.178cm">
          <draw:text-box>
            <text:p><text:span text:style-name="T1">Lighter Color bdd7ee</text:span></text:p>
          </draw:text-box>
        </draw:frame>
        <draw:custom-shape draw:style-name="gr6" draw:text-style-name="P7" draw:layer="layout" svg:width="1.461cm" svg:height="0.889cm" svg:x="2.126cm" svg:y="3.916cm">
          <text:p/>
          <draw:enhanced-geometry svg:viewBox="0 0 21600 21600" draw:type="rectangle" draw:enhanced-path="M 0 0 L 21600 0 21600 21600 0 21600 0 0 Z N"/>
        </draw:custom-shape>
        <draw:frame draw:style-name="gr2" draw:text-style-name="P2" draw:layer="layout" svg:width="6.729cm" svg:height="1.175cm" svg:x="3.745cm" svg:y="3.878cm">
          <draw:text-box>
            <text:p><text:span text:style-name="T1">Default Color 6a99d0</text:span></text:p>
          </draw:text-box>
        </draw:frame>
        <draw:frame draw:style-name="gr1" draw:text-style-name="P1" draw:layer="layout" svg:width="2.947cm" svg:height="2.947cm" svg:x="6.708cm" svg:y="9.936cm">
          <draw:image xlink:href="Pictures/10000001000004B0000004B0D531CF7C.png" xlink:type="simple" xlink:show="embed" xlink:actuate="onLoad" draw:mime-type="image/png">
            <text:p/>
          </draw:image>
        </draw:frame>
        <draw:frame draw:style-name="gr1" draw:text-style-name="P1" draw:layer="layout" svg:width="2.974cm" svg:height="2.974cm" svg:x="22.445cm" svg:y="4.55cm">
          <draw:image xlink:href="Pictures/10000001000004B0000004B0B6C3AB3D.png" xlink:type="simple" xlink:show="embed" xlink:actuate="onLoad" draw:mime-type="image/png">
            <text:p/>
          </draw:image>
        </draw:frame>
        <draw:frame draw:style-name="gr1" draw:text-style-name="P1" draw:layer="layout" svg:width="2.7cm" svg:height="1.198cm" svg:x="6.708cm" svg:y="8.932cm">
          <draw:image xlink:href="Pictures/10000001000001370000008A3032A3C2.png" xlink:type="simple" xlink:show="embed" xlink:actuate="onLoad" draw:mime-type="image/png">
            <text:p/>
          </draw:image>
        </draw:frame>
        <presentation:notes draw:style-name="dp2">
          <draw:page-thumbnail draw:style-name="gr7"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8" draw:text-style-name="P9" draw:layer="layout" svg:width="1.661cm" svg:height="0.852cm" svg:x="2.25cm" svg:y="4.423cm">
          <draw:text-box>
            <text:p><text:span text:style-name="T2">Client</text:span></text:p>
          </draw:text-box>
        </draw:frame>
        <draw:frame draw:style-name="gr9" draw:text-style-name="P10" draw:layer="layout" svg:width="3.316cm" svg:height="1.453cm" svg:x="9.238cm" svg:y="4.474cm">
          <draw:text-box>
            <text:p text:style-name="P3"><text:span text:style-name="T2">Server</text:span><text:span text:style-name="T3"> </text:span></text:p>
          </draw:text-box>
        </draw:frame>
        <draw:line draw:style-name="gr10" draw:text-style-name="P1" draw:layer="layout" svg:x1="4.507cm" svg:y1="2.8cm" svg:x2="9.204cm" svg:y2="2.806cm">
          <text:p/>
        </draw:line>
        <draw:line draw:style-name="gr11" draw:text-style-name="P1" draw:layer="layout" svg:x1="9.04cm" svg:y1="3.835cm" svg:x2="4.507cm" svg:y2="3.84cm">
          <text:p/>
        </draw:line>
        <draw:g draw:style-name="gr12">
          <draw:g draw:name="Group 2" draw:style-name="gr12">
            <draw:custom-shape draw:name="Rectangle 3" draw:style-name="gr13" draw:text-style-name="P11"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4" draw:text-style-name="P11"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21cm" svg:y1="1.182cm" svg:x2="4.635cm" svg:y2="2.15cm" svg:d="M5821 1182l-1186 968" svg:viewBox="0 0 1187 969">
              <text:p/>
            </draw:connector>
            <draw:connector draw:name="Straight Connector 4" draw:style-name="gr15" draw:text-style-name="P12" draw:layer="layout" draw:type="line" svg:x1="7.779cm" svg:y1="1.218cm" svg:x2="8.941cm" svg:y2="2.15cm" svg:d="M7779 1218l1162 932" svg:viewBox="0 0 1163 933">
              <text:p/>
            </draw:connector>
          </draw:g>
          <draw:frame draw:style-name="gr16" draw:text-style-name="P13" draw:layer="layout" svg:width="1.741cm" svg:height="0.852cm" svg:x="5.904cm" svg:y="1.303cm">
            <draw:text-box>
              <text:p><text:span text:style-name="T4">Query</text:span></text:p>
            </draw:text-box>
          </draw:frame>
        </draw:g>
        <draw:g draw:style-name="gr12">
          <draw:g draw:name="Group 2" draw:style-name="gr12">
            <draw:custom-shape draw:name="Rectangle 3" draw:style-name="gr17" draw:text-style-name="P11"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11"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47cm" svg:y1="4.658cm" svg:x2="4.675cm" svg:y2="5.626cm" svg:d="M5847 4658l-1172 968" svg:viewBox="0 0 1173 969">
              <text:p/>
            </draw:connector>
            <draw:connector draw:name="Straight Connector 4" draw:style-name="gr15" draw:text-style-name="P12" draw:layer="layout" draw:type="line" svg:x1="7.781cm" svg:y1="4.694cm" svg:x2="8.927cm" svg:y2="5.626cm" svg:d="M7781 4694l1146 932" svg:viewBox="0 0 1147 933">
              <text:p/>
            </draw:connector>
          </draw:g>
          <draw:frame draw:style-name="gr19" draw:text-style-name="P13" draw:layer="layout" svg:width="2.491cm" svg:height="0.852cm" svg:x="5.564cm" svg:y="4.779cm">
            <draw:text-box>
              <text:p><text:span text:style-name="T4">Response</text:span></text:p>
            </draw:text-box>
          </draw:frame>
        </draw:g>
        <draw:custom-shape draw:name="Freeform 2" draw:style-name="gr20" draw:text-style-name="P14"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9" draw:text-style-name="P10" draw:layer="layout" svg:width="3.316cm" svg:height="1.453cm" svg:x="9.371cm" svg:y="12.396cm">
          <draw:text-box>
            <text:p text:style-name="P3"><text:span text:style-name="T2">Cloud</text:span><text:span text:style-name="T3"> </text:span></text:p>
          </draw:text-box>
        </draw:frame>
        <draw:frame draw:style-name="gr1" draw:text-style-name="P1" draw:layer="layout" svg:width="2.283cm" svg:height="1.541cm" svg:x="2.939cm" svg:y="9.598cm">
          <draw:image xlink:href="Pictures/10000001000001F3000001510BDF560F.png" xlink:type="simple" xlink:show="embed" xlink:actuate="onLoad" draw:mime-type="image/png">
            <text:p/>
          </draw:image>
        </draw:frame>
        <draw:frame draw:style-name="gr9" draw:text-style-name="P10" draw:layer="layout" svg:width="3.316cm" svg:height="1.453cm" svg:x="2.581cm" svg:y="11.5cm">
          <draw:text-box>
            <text:p text:style-name="P3"><text:span text:style-name="T2">Router</text:span><text:span text:style-name="T3">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9" draw:text-style-name="P10" draw:layer="layout" svg:width="3.316cm" svg:height="1.453cm" svg:x="13.038cm" svg:y="4.475cm">
          <draw:text-box>
            <text:p text:style-name="P3"><text:span text:style-name="T2">Alt Server</text:span><text:span text:style-name="T3"> </text:span></text:p>
          </draw:text-box>
        </draw:frame>
        <draw:frame draw:style-name="gr9" draw:text-style-name="P10" draw:layer="layout" svg:width="3.316cm" svg:height="1.453cm" svg:x="16.538cm" svg:y="4.376cm">
          <draw:text-box>
            <text:p text:style-name="P3"><text:span text:style-name="T2">Alt Client</text:span><text:span text:style-name="T3"> </text:span></text:p>
          </draw:text-box>
        </draw:frame>
        <draw:g draw:style-name="gr12">
          <draw:custom-shape draw:style-name="gr21" draw:text-style-name="P15"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5" draw:layer="layout" svg:width="0.667cm" svg:height="1.053cm" svg:x="23.176cm" svg:y="10.312cm">
            <text:p/>
            <draw:enhanced-geometry svg:viewBox="0 0 21600 21600" draw:type="rectangle" draw:enhanced-path="M 0 0 L 21600 0 21600 21600 0 21600 0 0 Z N"/>
          </draw:custom-shape>
          <draw:custom-shape draw:style-name="gr23" draw:text-style-name="P15" draw:layer="layout" svg:width="0.253cm" svg:height="0.367cm" svg:x="24.29cm" svg:y="9.52cm">
            <text:p/>
            <draw:enhanced-geometry svg:viewBox="0 0 21600 21600" draw:type="rectangle" draw:enhanced-path="M 0 0 L 21600 0 21600 21600 0 21600 0 0 Z N"/>
          </draw:custom-shape>
          <draw:custom-shape draw:style-name="gr24" draw:text-style-name="P15" draw:layer="layout" svg:width="0.292cm" svg:height="0.712cm" svg:x="23.707cm" svg:y="8.26cm">
            <text:p/>
            <draw:enhanced-geometry svg:viewBox="0 0 21600 21600" draw:type="rectangle" draw:enhanced-path="M 0 0 L 21600 0 21600 21600 0 21600 0 0 Z N"/>
          </draw:custom-shape>
          <draw:custom-shape draw:style-name="gr25" draw:text-style-name="P15" draw:layer="layout" svg:width="0.667cm" svg:height="0.712cm" svg:x="22.22cm" svg:y="7.845cm">
            <text:p/>
            <draw:enhanced-geometry svg:viewBox="0 0 21600 21600" draw:type="rectangle" draw:enhanced-path="M 0 0 L 21600 0 21600 21600 0 21600 0 0 Z N"/>
          </draw:custom-shape>
          <draw:custom-shape draw:style-name="gr26" draw:text-style-name="P15" draw:layer="layout" svg:width="0.667cm" svg:height="0.338cm" svg:x="19.499cm" svg:y="8.219cm">
            <text:p/>
            <draw:enhanced-geometry svg:viewBox="0 0 21600 21600" draw:type="rectangle" draw:enhanced-path="M 0 0 L 21600 0 21600 21600 0 21600 0 0 Z N"/>
          </draw:custom-shape>
          <draw:custom-shape draw:style-name="gr27" draw:text-style-name="P15" draw:layer="layout" svg:width="0.425cm" svg:height="0.339cm" svg:x="17.982cm" svg:y="9.406cm">
            <text:p/>
            <draw:enhanced-geometry svg:viewBox="0 0 21600 21600" draw:type="rectangle" draw:enhanced-path="M 0 0 L 21600 0 21600 21600 0 21600 0 0 Z N"/>
          </draw:custom-shape>
          <draw:custom-shape draw:style-name="gr27" draw:text-style-name="P15" draw:layer="layout" svg:width="0.425cm" svg:height="0.339cm" svg:x="17.728cm" svg:y="10.642cm">
            <text:p/>
            <draw:enhanced-geometry svg:viewBox="0 0 21600 21600" draw:type="rectangle" draw:enhanced-path="M 0 0 L 21600 0 21600 21600 0 21600 0 0 Z N"/>
          </draw:custom-shape>
          <draw:custom-shape draw:style-name="gr27" draw:text-style-name="P15" draw:layer="layout" svg:width="0.425cm" svg:height="0.339cm" svg:x="19.927cm" svg:y="12.165cm">
            <text:p/>
            <draw:enhanced-geometry svg:viewBox="0 0 21600 21600" draw:type="rectangle" draw:enhanced-path="M 0 0 L 21600 0 21600 21600 0 21600 0 0 Z N"/>
          </draw:custom-shape>
          <draw:custom-shape draw:style-name="gr27" draw:text-style-name="P15" draw:layer="layout" svg:width="0.227cm" svg:height="0.339cm" svg:x="18.376cm" svg:y="11.733cm">
            <text:p/>
            <draw:enhanced-geometry svg:viewBox="0 0 21600 21600" draw:type="rectangle" draw:enhanced-path="M 0 0 L 21600 0 21600 21600 0 21600 0 0 Z N"/>
          </draw:custom-shape>
          <draw:custom-shape draw:style-name="gr23" draw:text-style-name="P15" draw:layer="layout" svg:width="0.253cm" svg:height="0.367cm" svg:x="21.078cm" svg:y="7.953cm">
            <text:p/>
            <draw:enhanced-geometry svg:viewBox="0 0 21600 21600" draw:type="rectangle" draw:enhanced-path="M 0 0 L 21600 0 21600 21600 0 21600 0 0 Z N"/>
          </draw:custom-shape>
          <draw:custom-shape draw:style-name="gr28" draw:text-style-name="P15" draw:layer="layout" svg:width="0.667cm" svg:height="0.571cm" svg:x="21.854cm" svg:y="11.649cm">
            <text:p/>
            <draw:enhanced-geometry svg:viewBox="0 0 21600 21600" draw:type="rectangle" draw:enhanced-path="M 0 0 L 21600 0 21600 21600 0 21600 0 0 Z N"/>
          </draw:custom-shape>
        </draw:g>
        <draw:frame draw:style-name="gr9" draw:text-style-name="P10" draw:layer="layout" svg:width="3.316cm" svg:height="1.453cm" svg:x="19.281cm" svg:y="13.541cm">
          <draw:text-box>
            <text:p text:style-name="P3"><text:span text:style-name="T3">Network</text:span></text:p>
          </draw:text-box>
        </draw:frame>
        <draw:frame draw:style-name="gr1" draw:text-style-name="P1" draw:layer="layout" svg:width="2.548cm" svg:height="2.548cm" svg:x="21.922cm" svg:y="1.829cm">
          <draw:image xlink:href="Pictures/10000001000004B0000004B0250C3613.png" xlink:type="simple" xlink:show="embed" xlink:actuate="onLoad" draw:mime-type="image/png">
            <text:p/>
          </draw:image>
        </draw:frame>
        <draw:frame draw:style-name="gr9" draw:text-style-name="P10" draw:layer="layout" svg:width="3.316cm" svg:height="1.453cm" svg:x="21.538cm" svg:y="4.077cm">
          <draw:text-box>
            <text:p text:style-name="P3"><text:span text:style-name="T3">Disk</text:span></text:p>
            <text:p text:style-name="P3"><text:span text:style-name="T3">Stable Store</text:span></text:p>
          </draw:text-box>
        </draw:frame>
        <presentation:notes draw:style-name="dp2">
          <draw:page-thumbnail draw:style-name="gr7"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Blank" presentation:presentation-page-layout-name="AL2T1">
        <draw:custom-shape draw:style-name="gr29" draw:text-style-name="P15" draw:layer="layout" svg:width="1.856cm" svg:height="2.699cm" svg:x="19.35cm" svg:y="7.357cm">
          <text:p/>
          <draw:enhanced-geometry svg:viewBox="0 0 21600 21600" draw:type="rectangle" draw:enhanced-path="M 0 0 L 21600 0 21600 21600 0 21600 0 0 Z N"/>
        </draw:custom-shape>
        <draw:custom-shape draw:style-name="gr30" draw:text-style-name="P15" draw:layer="layout" svg:width="0.811cm" svg:height="1.825cm" svg:x="20.828cm" svg:y="2.094cm">
          <text:p/>
          <draw:enhanced-geometry svg:viewBox="0 0 21600 21600" draw:type="rectangle" draw:enhanced-path="M 0 0 L 21600 0 21600 21600 0 21600 0 0 Z N"/>
        </draw:custom-shape>
        <draw:custom-shape draw:style-name="gr31" draw:text-style-name="P15" draw:layer="layout" svg:width="1.856cm" svg:height="0.867cm" svg:x="9.118cm" svg:y="1.987cm">
          <text:p/>
          <draw:enhanced-geometry svg:viewBox="0 0 21600 21600" draw:type="rectangle" draw:enhanced-path="M 0 0 L 21600 0 21600 21600 0 21600 0 0 Z N"/>
        </draw:custom-shape>
        <draw:custom-shape draw:style-name="gr32" draw:text-style-name="P15" draw:layer="layout" svg:width="1.183cm" svg:height="0.867cm" svg:x="4.192cm" svg:y="8.204cm">
          <text:p/>
          <draw:enhanced-geometry svg:viewBox="0 0 21600 21600" draw:type="rectangle" draw:enhanced-path="M 0 0 L 21600 0 21600 21600 0 21600 0 0 Z N"/>
        </draw:custom-shape>
        <draw:custom-shape draw:style-name="gr33" draw:text-style-name="P15" draw:layer="layout" svg:width="1.184cm" svg:height="0.867cm" svg:x="10.31cm" svg:y="12.11cm">
          <text:p/>
          <draw:enhanced-geometry svg:viewBox="0 0 21600 21600" draw:type="rectangle" draw:enhanced-path="M 0 0 L 21600 0 21600 21600 0 21600 0 0 Z N"/>
        </draw:custom-shape>
        <draw:custom-shape draw:style-name="gr34" draw:text-style-name="P15" draw:layer="layout" svg:width="0.631cm" svg:height="0.869cm" svg:x="5.994cm" svg:y="11.002cm">
          <text:p/>
          <draw:enhanced-geometry svg:viewBox="0 0 21600 21600" draw:type="rectangle" draw:enhanced-path="M 0 0 L 21600 0 21600 21600 0 21600 0 0 Z N"/>
        </draw:custom-shape>
        <draw:custom-shape draw:style-name="gr35" draw:text-style-name="P15" draw:layer="layout" svg:width="0.702cm" svg:height="0.942cm" svg:x="13.514cm" svg:y="1.305cm">
          <text:p/>
          <draw:enhanced-geometry svg:viewBox="0 0 21600 21600" draw:type="rectangle" draw:enhanced-path="M 0 0 L 21600 0 21600 21600 0 21600 0 0 Z N"/>
        </draw:custom-shape>
        <draw:custom-shape draw:style-name="gr36" draw:text-style-name="P15" draw:layer="layout" svg:width="1.855cm" svg:height="1.464cm" svg:x="15.673cm" svg:y="10.787cm">
          <text:p/>
          <draw:enhanced-geometry svg:viewBox="0 0 21600 21600" draw:type="rectangle" draw:enhanced-path="M 0 0 L 21600 0 21600 21600 0 21600 0 0 Z N"/>
        </draw:custom-shape>
        <draw:custom-shape draw:style-name="gr37" draw:text-style-name="P15" draw:layer="layout" svg:width="1.716cm" svg:height="2.03cm" svg:x="19.751cm" svg:y="7.885cm">
          <text:p/>
          <draw:enhanced-geometry svg:viewBox="0 0 21600 21600" draw:type="rectangle" draw:enhanced-path="M 0 0 L 21600 0 21600 21600 0 21600 0 0 Z N"/>
        </draw:custom-shape>
        <draw:custom-shape draw:style-name="gr38" draw:text-style-name="P15" draw:layer="layout" svg:width="0.651cm" svg:height="1.019cm" svg:x="22.716cm" svg:y="5.691cm">
          <text:p/>
          <draw:enhanced-geometry svg:viewBox="0 0 21600 21600" draw:type="rectangle" draw:enhanced-path="M 0 0 L 21600 0 21600 21600 0 21600 0 0 Z N"/>
        </draw:custom-shape>
        <draw:frame draw:style-name="gr1" draw:text-style-name="P1" draw:layer="layout" svg:width="2.499cm" svg:height="1.062cm" svg:x="7.672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10.797cm">
          <draw:image xlink:href="Pictures/10000001000001370000008A3032A3C2.png" xlink:type="simple" xlink:show="embed" xlink:actuate="onLoad" draw:mime-type="image/png">
            <text:p/>
          </draw:image>
        </draw:frame>
        <draw:frame draw:style-name="gr1" draw:text-style-name="P1" draw:layer="layout" svg:width="2.499cm" svg:height="1.062cm" svg:x="12.101cm" svg:y="7.96cm">
          <draw:image xlink:href="Pictures/10000001000001370000008A3032A3C2.png" xlink:type="simple" xlink:show="embed" xlink:actuate="onLoad" draw:mime-type="image/png">
            <text:p/>
          </draw:image>
        </draw:frame>
        <draw:line draw:style-name="gr39" draw:text-style-name="P1" draw:layer="layout" svg:x1="13.934cm" svg:y1="8.017cm" svg:x2="17.483cm" svg:y2="5.359cm">
          <text:p/>
        </draw:line>
        <draw:line draw:style-name="gr39" draw:text-style-name="P1" draw:layer="layout" svg:x1="13.901cm" svg:y1="8.885cm" svg:x2="17.924cm" svg:y2="10.849cm">
          <text:p/>
        </draw:line>
        <draw:line draw:style-name="gr39" draw:text-style-name="P1" draw:layer="layout" svg:x1="9.085cm" svg:y1="5.339cm" svg:x2="12.893cm" svg:y2="8.031cm">
          <text:p/>
        </draw:line>
        <draw:custom-shape draw:style-name="gr40" draw:text-style-name="P15" draw:layer="layout" svg:width="1.589cm" svg:height="0.834cm" svg:x="10.051cm" svg:y="1.98cm">
          <text:p/>
          <draw:enhanced-geometry svg:viewBox="0 0 21600 21600" draw:type="rectangle" draw:enhanced-path="M 0 0 L 21600 0 21600 21600 0 21600 0 0 Z N"/>
        </draw:custom-shape>
        <draw:custom-shape draw:style-name="gr41" draw:text-style-name="P15" draw:layer="layout" svg:width="1.012cm" svg:height="0.834cm" svg:x="6.441cm" svg:y="4.906cm">
          <text:p/>
          <draw:enhanced-geometry svg:viewBox="0 0 21600 21600" draw:type="rectangle" draw:enhanced-path="M 0 0 L 21600 0 21600 21600 0 21600 0 0 Z N"/>
        </draw:custom-shape>
        <draw:custom-shape draw:style-name="gr41" draw:text-style-name="P15" draw:layer="layout" svg:width="1.012cm" svg:height="0.834cm" svg:x="5.836cm" svg:y="7.95cm">
          <text:p/>
          <draw:enhanced-geometry svg:viewBox="0 0 21600 21600" draw:type="rectangle" draw:enhanced-path="M 0 0 L 21600 0 21600 21600 0 21600 0 0 Z N"/>
        </draw:custom-shape>
        <draw:custom-shape draw:style-name="gr42" draw:text-style-name="P15" draw:layer="layout" svg:width="1.012cm" svg:height="0.833cm" svg:x="11.072cm" svg:y="11.702cm">
          <text:p/>
          <draw:enhanced-geometry svg:viewBox="0 0 21600 21600" draw:type="rectangle" draw:enhanced-path="M 0 0 L 21600 0 21600 21600 0 21600 0 0 Z N"/>
        </draw:custom-shape>
        <draw:custom-shape draw:style-name="gr43" draw:text-style-name="P15" draw:layer="layout" svg:width="0.541cm" svg:height="0.833cm" svg:x="7.378cm" svg:y="10.638cm">
          <text:p/>
          <draw:enhanced-geometry svg:viewBox="0 0 21600 21600" draw:type="rectangle" draw:enhanced-path="M 0 0 L 21600 0 21600 21600 0 21600 0 0 Z N"/>
        </draw:custom-shape>
        <draw:frame draw:style-name="gr1" draw:text-style-name="P1" draw:layer="layout" svg:width="2.499cm" svg:height="1.062cm" svg:x="7.672cm" svg:y="10.797cm">
          <draw:image xlink:href="Pictures/10000001000001370000008A3032A3C2.png" xlink:type="simple" xlink:show="embed" xlink:actuate="onLoad" draw:mime-type="image/png">
            <text:p/>
          </draw:image>
        </draw:frame>
        <draw:custom-shape draw:style-name="gr44" draw:text-style-name="P15" draw:layer="layout" svg:width="0.603cm" svg:height="0.903cm" svg:x="13.812cm" svg:y="1.326cm">
          <text:p/>
          <draw:enhanced-geometry svg:viewBox="0 0 21600 21600" draw:type="rectangle" draw:enhanced-path="M 0 0 L 21600 0 21600 21600 0 21600 0 0 Z N"/>
        </draw:custom-shape>
        <draw:frame draw:style-name="gr1" draw:text-style-name="P1" draw:layer="layout" svg:width="2.499cm" svg:height="1.062cm" svg:x="12.101cm" svg:y="1.614cm">
          <draw:image xlink:href="Pictures/10000001000001370000008A3032A3C2.png" xlink:type="simple" xlink:show="embed" xlink:actuate="onLoad" draw:mime-type="image/png">
            <text:p/>
          </draw:image>
        </draw:frame>
        <draw:line draw:style-name="gr45" draw:text-style-name="P1" draw:layer="layout" svg:x1="9.933cm" svg:y1="11.298cm" svg:x2="16.811cm" svg:y2="11.298cm">
          <text:p/>
        </draw:line>
        <draw:line draw:style-name="gr39" draw:text-style-name="P1" draw:layer="layout" svg:x1="8.963cm" svg:y1="10.839cm" svg:x2="12.7cm" svg:y2="8.904cm">
          <text:p/>
        </draw:line>
        <draw:line draw:style-name="gr45" draw:text-style-name="P1" draw:layer="layout" svg:x1="14.088cm" svg:y1="2.392cm" svg:x2="17.213cm" svg:y2="4.508cm">
          <text:p/>
        </draw:line>
        <draw:line draw:style-name="gr39" draw:text-style-name="P1" draw:layer="layout" svg:x1="9.712cm" svg:y1="4.468cm" svg:x2="12.455cm" svg:y2="2.563cm">
          <text:p/>
        </draw:line>
        <draw:frame draw:style-name="gr1" draw:text-style-name="P1" draw:layer="layout" svg:width="2.499cm" svg:height="1.062cm" svg:x="20.179cm" svg:y="7.885cm">
          <draw:image xlink:href="Pictures/10000001000001370000008A3032A3C2.png" xlink:type="simple" xlink:show="embed" xlink:actuate="onLoad" draw:mime-type="image/png">
            <text:p/>
          </draw:image>
        </draw:frame>
        <draw:line draw:style-name="gr39" draw:text-style-name="P1" draw:layer="layout" svg:x1="14.349cm" svg:y1="8.444cm" svg:x2="20.381cm" svg:y2="8.444cm">
          <text:p/>
        </draw:line>
        <draw:line draw:style-name="gr45" draw:text-style-name="P1" draw:layer="layout" svg:x1="17.936cm" svg:y1="5.27cm" svg:x2="21.425cm" svg:y2="7.949cm">
          <text:p/>
        </draw:line>
        <draw:frame draw:style-name="gr46" draw:text-style-name="P16" draw:layer="layout" svg:width="0.987cm" svg:height="0.852cm" svg:x="12.86cm" svg:y="8.26cm">
          <draw:text-box>
            <text:p><text:span text:style-name="T5">S1</text:span></text:p>
          </draw:text-box>
        </draw:frame>
        <draw:frame draw:style-name="gr46" draw:text-style-name="P16" draw:layer="layout" svg:width="0.987cm" svg:height="0.852cm" svg:x="8.422cm" svg:y="4.721cm">
          <draw:text-box>
            <text:p><text:span text:style-name="T5">S2</text:span></text:p>
          </draw:text-box>
        </draw:frame>
        <draw:frame draw:style-name="gr46" draw:text-style-name="P16" draw:layer="layout" svg:width="0.987cm" svg:height="0.852cm" svg:x="12.854cm" svg:y="1.92cm">
          <draw:text-box>
            <text:p><text:span text:style-name="T5">S3</text:span></text:p>
          </draw:text-box>
        </draw:frame>
        <draw:frame draw:style-name="gr46" draw:text-style-name="P16" draw:layer="layout" svg:width="0.987cm" svg:height="0.852cm" svg:x="17.345cm" svg:y="11.099cm">
          <draw:text-box>
            <text:p><text:span text:style-name="T5">S4</text:span></text:p>
          </draw:text-box>
        </draw:frame>
        <draw:frame draw:style-name="gr46" draw:text-style-name="P16" draw:layer="layout" svg:width="0.987cm" svg:height="0.852cm" svg:x="8.446cm" svg:y="11.108cm">
          <draw:text-box>
            <text:p><text:span text:style-name="T5">S6</text:span></text:p>
          </draw:text-box>
        </draw:frame>
        <draw:frame draw:style-name="gr46" draw:text-style-name="P16" draw:layer="layout" svg:width="0.987cm" svg:height="0.852cm" svg:x="20.962cm" svg:y="8.182cm">
          <draw:text-box>
            <text:p><text:span text:style-name="T5">S7</text:span></text:p>
          </draw:text-box>
        </draw:frame>
        <draw:line draw:style-name="gr39" draw:text-style-name="P1" draw:layer="layout" svg:x1="14.5cm" svg:y1="1.778cm" svg:x2="16.058cm" svg:y2="1.778cm">
          <text:p/>
        </draw:line>
        <draw:frame draw:style-name="gr47" draw:text-style-name="P9" draw:layer="layout" svg:width="1.824cm" svg:height="0.852cm" svg:x="15.936cm" svg:y="0.46cm">
          <draw:text-box>
            <text:p><text:span text:style-name="T2">Host A</text:span></text:p>
          </draw:text-box>
        </draw:frame>
        <draw:frame draw:style-name="gr48" draw:text-style-name="P9" draw:layer="layout" svg:width="1.807cm" svg:height="0.852cm" svg:x="21.784cm" svg:y="4.86cm">
          <draw:text-box>
            <text:p><text:span text:style-name="T2">Host </text:span><text:span text:style-name="T6">B</text:span></text:p>
          </draw:text-box>
        </draw:frame>
        <draw:line draw:style-name="gr39" draw:text-style-name="P1" draw:layer="layout" svg:x1="22.254cm" svg:y1="6.73cm" svg:x2="21.426cm" svg:y2="7.95cm">
          <text:p/>
        </draw:line>
        <draw:custom-shape draw:style-name="gr38" draw:text-style-name="P15" draw:layer="layout" svg:width="0.651cm" svg:height="1.019cm" svg:x="21.059cm" svg:y="10.482cm">
          <text:p/>
          <draw:enhanced-geometry svg:viewBox="0 0 21600 21600" draw:type="rectangle" draw:enhanced-path="M 0 0 L 21600 0 21600 21600 0 21600 0 0 Z N"/>
        </draw:custom-shape>
        <draw:frame draw:style-name="gr1" draw:text-style-name="P1" draw:layer="layout" svg:width="2.129cm" svg:height="2.129cm" svg:x="20.025cm" svg:y="10.061cm">
          <draw:image xlink:href="Pictures/10000001000004B0000004B0923FE4BE.png" xlink:type="simple" xlink:show="embed" xlink:actuate="onLoad" draw:mime-type="image/png">
            <text:p/>
          </draw:image>
        </draw:frame>
        <draw:frame draw:style-name="gr49" draw:text-style-name="P9" draw:layer="layout" svg:width="1.802cm" svg:height="0.852cm" svg:x="20.127cm" svg:y="9.651cm">
          <draw:text-box>
            <text:p><text:span text:style-name="T2">Host </text:span><text:span text:style-name="T6">C</text:span></text:p>
          </draw:text-box>
        </draw:frame>
        <draw:line draw:style-name="gr39" draw:text-style-name="P1" draw:layer="layout" svg:x1="20.17cm" svg:y1="10.96cm" svg:x2="18.957cm" svg:y2="10.96cm">
          <text:p/>
        </draw:line>
        <draw:frame draw:style-name="gr46" draw:text-style-name="P16" draw:layer="layout" svg:width="0.987cm" svg:height="0.852cm" svg:x="17.282cm" svg:y="4.721cm">
          <draw:text-box>
            <text:p><text:span text:style-name="T5">S5</text:span></text:p>
          </draw:text-box>
        </draw:frame>
        <draw:frame draw:style-name="gr1" draw:text-style-name="P1" draw:layer="layout" svg:width="2.129cm" svg:height="2.129cm" svg:x="21.682cm" svg:y="5.27cm">
          <draw:image xlink:href="Pictures/10000001000004B0000004B0923FE4BE.png" xlink:type="simple" xlink:show="embed" xlink:actuate="onLoad" draw:mime-type="image/png">
            <text:p/>
          </draw:image>
        </draw:frame>
        <draw:frame draw:style-name="gr1" draw:text-style-name="P1" draw:layer="layout" svg:width="2.129cm" svg:height="2.129cm" svg:x="15.884cm" svg:y="0.819cm">
          <draw:image xlink:href="Pictures/10000001000004B0000004B0923FE4BE.png" xlink:type="simple" xlink:show="embed" xlink:actuate="onLoad" draw:mime-type="image/png">
            <text:p/>
          </draw:image>
        </draw:frame>
        <presentation:notes draw:style-name="dp2">
          <draw:page-thumbnail draw:style-name="gr7"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Blank" presentation:presentation-page-layout-name="AL2T1">
        <draw:custom-shape draw:style-name="gr29" draw:text-style-name="P15" draw:layer="layout" svg:width="1.856cm" svg:height="2.699cm" svg:x="19.35cm" svg:y="7.357cm">
          <text:p/>
          <draw:enhanced-geometry svg:viewBox="0 0 21600 21600" draw:type="rectangle" draw:enhanced-path="M 0 0 L 21600 0 21600 21600 0 21600 0 0 Z N"/>
        </draw:custom-shape>
        <draw:custom-shape draw:style-name="gr30" draw:text-style-name="P15" draw:layer="layout" svg:width="0.811cm" svg:height="1.825cm" svg:x="20.828cm" svg:y="2.094cm">
          <text:p/>
          <draw:enhanced-geometry svg:viewBox="0 0 21600 21600" draw:type="rectangle" draw:enhanced-path="M 0 0 L 21600 0 21600 21600 0 21600 0 0 Z N"/>
        </draw:custom-shape>
        <draw:custom-shape draw:style-name="gr31" draw:text-style-name="P15" draw:layer="layout" svg:width="1.856cm" svg:height="0.867cm" svg:x="9.118cm" svg:y="1.987cm">
          <text:p/>
          <draw:enhanced-geometry svg:viewBox="0 0 21600 21600" draw:type="rectangle" draw:enhanced-path="M 0 0 L 21600 0 21600 21600 0 21600 0 0 Z N"/>
        </draw:custom-shape>
        <draw:custom-shape draw:style-name="gr32" draw:text-style-name="P15" draw:layer="layout" svg:width="1.183cm" svg:height="0.867cm" svg:x="4.192cm" svg:y="8.204cm">
          <text:p/>
          <draw:enhanced-geometry svg:viewBox="0 0 21600 21600" draw:type="rectangle" draw:enhanced-path="M 0 0 L 21600 0 21600 21600 0 21600 0 0 Z N"/>
        </draw:custom-shape>
        <draw:custom-shape draw:style-name="gr33" draw:text-style-name="P15" draw:layer="layout" svg:width="1.184cm" svg:height="0.867cm" svg:x="10.31cm" svg:y="12.11cm">
          <text:p/>
          <draw:enhanced-geometry svg:viewBox="0 0 21600 21600" draw:type="rectangle" draw:enhanced-path="M 0 0 L 21600 0 21600 21600 0 21600 0 0 Z N"/>
        </draw:custom-shape>
        <draw:custom-shape draw:style-name="gr34" draw:text-style-name="P15" draw:layer="layout" svg:width="0.631cm" svg:height="0.869cm" svg:x="5.994cm" svg:y="11.002cm">
          <text:p/>
          <draw:enhanced-geometry svg:viewBox="0 0 21600 21600" draw:type="rectangle" draw:enhanced-path="M 0 0 L 21600 0 21600 21600 0 21600 0 0 Z N"/>
        </draw:custom-shape>
        <draw:custom-shape draw:style-name="gr35" draw:text-style-name="P15" draw:layer="layout" svg:width="0.702cm" svg:height="0.942cm" svg:x="13.514cm" svg:y="1.305cm">
          <text:p/>
          <draw:enhanced-geometry svg:viewBox="0 0 21600 21600" draw:type="rectangle" draw:enhanced-path="M 0 0 L 21600 0 21600 21600 0 21600 0 0 Z N"/>
        </draw:custom-shape>
        <draw:custom-shape draw:style-name="gr36" draw:text-style-name="P15" draw:layer="layout" svg:width="1.855cm" svg:height="1.464cm" svg:x="15.673cm" svg:y="10.787cm">
          <text:p/>
          <draw:enhanced-geometry svg:viewBox="0 0 21600 21600" draw:type="rectangle" draw:enhanced-path="M 0 0 L 21600 0 21600 21600 0 21600 0 0 Z N"/>
        </draw:custom-shape>
        <draw:custom-shape draw:style-name="gr37" draw:text-style-name="P15" draw:layer="layout" svg:width="1.716cm" svg:height="2.03cm" svg:x="19.751cm" svg:y="7.885cm">
          <text:p/>
          <draw:enhanced-geometry svg:viewBox="0 0 21600 21600" draw:type="rectangle" draw:enhanced-path="M 0 0 L 21600 0 21600 21600 0 21600 0 0 Z N"/>
        </draw:custom-shape>
        <draw:custom-shape draw:style-name="gr38" draw:text-style-name="P15" draw:layer="layout" svg:width="0.651cm" svg:height="1.019cm" svg:x="22.716cm" svg:y="5.691cm">
          <text:p/>
          <draw:enhanced-geometry svg:viewBox="0 0 21600 21600" draw:type="rectangle" draw:enhanced-path="M 0 0 L 21600 0 21600 21600 0 21600 0 0 Z N"/>
        </draw:custom-shape>
        <draw:frame draw:style-name="gr1" draw:text-style-name="P1" draw:layer="layout" svg:width="2.499cm" svg:height="1.062cm" svg:x="7.672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10.797cm">
          <draw:image xlink:href="Pictures/10000001000001370000008A3032A3C2.png" xlink:type="simple" xlink:show="embed" xlink:actuate="onLoad" draw:mime-type="image/png">
            <text:p/>
          </draw:image>
        </draw:frame>
        <draw:frame draw:style-name="gr1" draw:text-style-name="P1" draw:layer="layout" svg:width="2.499cm" svg:height="1.062cm" svg:x="12.101cm" svg:y="7.96cm">
          <draw:image xlink:href="Pictures/10000001000001370000008A3032A3C2.png" xlink:type="simple" xlink:show="embed" xlink:actuate="onLoad" draw:mime-type="image/png">
            <text:p/>
          </draw:image>
        </draw:frame>
        <draw:line draw:style-name="gr39" draw:text-style-name="P1" draw:layer="layout" svg:x1="13.934cm" svg:y1="8.017cm" svg:x2="17.483cm" svg:y2="5.359cm">
          <text:p/>
        </draw:line>
        <draw:line draw:style-name="gr39" draw:text-style-name="P1" draw:layer="layout" svg:x1="13.901cm" svg:y1="8.885cm" svg:x2="17.924cm" svg:y2="10.849cm">
          <text:p/>
        </draw:line>
        <draw:line draw:style-name="gr39" draw:text-style-name="P1" draw:layer="layout" svg:x1="9.085cm" svg:y1="5.339cm" svg:x2="12.893cm" svg:y2="8.031cm">
          <text:p/>
        </draw:line>
        <draw:custom-shape draw:style-name="gr40" draw:text-style-name="P15" draw:layer="layout" svg:width="1.589cm" svg:height="0.834cm" svg:x="10.051cm" svg:y="1.98cm">
          <text:p/>
          <draw:enhanced-geometry svg:viewBox="0 0 21600 21600" draw:type="rectangle" draw:enhanced-path="M 0 0 L 21600 0 21600 21600 0 21600 0 0 Z N"/>
        </draw:custom-shape>
        <draw:custom-shape draw:style-name="gr41" draw:text-style-name="P15" draw:layer="layout" svg:width="1.012cm" svg:height="0.834cm" svg:x="6.441cm" svg:y="4.906cm">
          <text:p/>
          <draw:enhanced-geometry svg:viewBox="0 0 21600 21600" draw:type="rectangle" draw:enhanced-path="M 0 0 L 21600 0 21600 21600 0 21600 0 0 Z N"/>
        </draw:custom-shape>
        <draw:custom-shape draw:style-name="gr41" draw:text-style-name="P15" draw:layer="layout" svg:width="1.012cm" svg:height="0.834cm" svg:x="5.836cm" svg:y="7.95cm">
          <text:p/>
          <draw:enhanced-geometry svg:viewBox="0 0 21600 21600" draw:type="rectangle" draw:enhanced-path="M 0 0 L 21600 0 21600 21600 0 21600 0 0 Z N"/>
        </draw:custom-shape>
        <draw:custom-shape draw:style-name="gr42" draw:text-style-name="P15" draw:layer="layout" svg:width="1.012cm" svg:height="0.833cm" svg:x="11.072cm" svg:y="11.702cm">
          <text:p/>
          <draw:enhanced-geometry svg:viewBox="0 0 21600 21600" draw:type="rectangle" draw:enhanced-path="M 0 0 L 21600 0 21600 21600 0 21600 0 0 Z N"/>
        </draw:custom-shape>
        <draw:custom-shape draw:style-name="gr43" draw:text-style-name="P15" draw:layer="layout" svg:width="0.541cm" svg:height="0.833cm" svg:x="7.378cm" svg:y="10.638cm">
          <text:p/>
          <draw:enhanced-geometry svg:viewBox="0 0 21600 21600" draw:type="rectangle" draw:enhanced-path="M 0 0 L 21600 0 21600 21600 0 21600 0 0 Z N"/>
        </draw:custom-shape>
        <draw:frame draw:style-name="gr1" draw:text-style-name="P1" draw:layer="layout" svg:width="2.499cm" svg:height="1.062cm" svg:x="7.672cm" svg:y="10.797cm">
          <draw:image xlink:href="Pictures/10000001000001370000008A3032A3C2.png" xlink:type="simple" xlink:show="embed" xlink:actuate="onLoad" draw:mime-type="image/png">
            <text:p/>
          </draw:image>
        </draw:frame>
        <draw:custom-shape draw:style-name="gr44" draw:text-style-name="P15" draw:layer="layout" svg:width="0.603cm" svg:height="0.903cm" svg:x="13.812cm" svg:y="1.326cm">
          <text:p/>
          <draw:enhanced-geometry svg:viewBox="0 0 21600 21600" draw:type="rectangle" draw:enhanced-path="M 0 0 L 21600 0 21600 21600 0 21600 0 0 Z N"/>
        </draw:custom-shape>
        <draw:frame draw:style-name="gr1" draw:text-style-name="P1" draw:layer="layout" svg:width="2.499cm" svg:height="1.062cm" svg:x="12.101cm" svg:y="1.614cm">
          <draw:image xlink:href="Pictures/10000001000001370000008A3032A3C2.png" xlink:type="simple" xlink:show="embed" xlink:actuate="onLoad" draw:mime-type="image/png">
            <text:p/>
          </draw:image>
        </draw:frame>
        <draw:line draw:style-name="gr50" draw:text-style-name="P1" draw:layer="layout" svg:x1="9.933cm" svg:y1="11.298cm" svg:x2="16.811cm" svg:y2="11.298cm">
          <text:p/>
        </draw:line>
        <draw:line draw:style-name="gr39" draw:text-style-name="P1" draw:layer="layout" svg:x1="8.963cm" svg:y1="10.839cm" svg:x2="12.7cm" svg:y2="8.904cm">
          <text:p/>
        </draw:line>
        <draw:line draw:style-name="gr50" draw:text-style-name="P1" draw:layer="layout" svg:x1="14.088cm" svg:y1="2.392cm" svg:x2="17.213cm" svg:y2="4.508cm">
          <text:p/>
        </draw:line>
        <draw:line draw:style-name="gr39" draw:text-style-name="P1" draw:layer="layout" svg:x1="9.712cm" svg:y1="4.468cm" svg:x2="12.455cm" svg:y2="2.563cm">
          <text:p/>
        </draw:line>
        <draw:frame draw:style-name="gr1" draw:text-style-name="P1" draw:layer="layout" svg:width="2.499cm" svg:height="1.062cm" svg:x="20.179cm" svg:y="7.885cm">
          <draw:image xlink:href="Pictures/10000001000001370000008A3032A3C2.png" xlink:type="simple" xlink:show="embed" xlink:actuate="onLoad" draw:mime-type="image/png">
            <text:p/>
          </draw:image>
        </draw:frame>
        <draw:line draw:style-name="gr39" draw:text-style-name="P1" draw:layer="layout" svg:x1="14.349cm" svg:y1="8.444cm" svg:x2="20.381cm" svg:y2="8.444cm">
          <text:p/>
        </draw:line>
        <draw:line draw:style-name="gr50" draw:text-style-name="P1" draw:layer="layout" svg:x1="17.936cm" svg:y1="5.27cm" svg:x2="21.425cm" svg:y2="7.949cm">
          <text:p/>
        </draw:line>
        <draw:frame draw:style-name="gr46" draw:text-style-name="P16" draw:layer="layout" svg:width="0.987cm" svg:height="0.852cm" svg:x="12.86cm" svg:y="8.26cm">
          <draw:text-box>
            <text:p><text:span text:style-name="T5">S1</text:span></text:p>
          </draw:text-box>
        </draw:frame>
        <draw:frame draw:style-name="gr46" draw:text-style-name="P16" draw:layer="layout" svg:width="0.987cm" svg:height="0.852cm" svg:x="8.422cm" svg:y="4.721cm">
          <draw:text-box>
            <text:p><text:span text:style-name="T5">S2</text:span></text:p>
          </draw:text-box>
        </draw:frame>
        <draw:frame draw:style-name="gr46" draw:text-style-name="P16" draw:layer="layout" svg:width="0.987cm" svg:height="0.852cm" svg:x="12.854cm" svg:y="1.92cm">
          <draw:text-box>
            <text:p><text:span text:style-name="T5">S3</text:span></text:p>
          </draw:text-box>
        </draw:frame>
        <draw:frame draw:style-name="gr46" draw:text-style-name="P16" draw:layer="layout" svg:width="0.987cm" svg:height="0.852cm" svg:x="17.345cm" svg:y="11.099cm">
          <draw:text-box>
            <text:p><text:span text:style-name="T5">S4</text:span></text:p>
          </draw:text-box>
        </draw:frame>
        <draw:frame draw:style-name="gr46" draw:text-style-name="P16" draw:layer="layout" svg:width="0.987cm" svg:height="0.852cm" svg:x="8.446cm" svg:y="11.108cm">
          <draw:text-box>
            <text:p><text:span text:style-name="T5">S6</text:span></text:p>
          </draw:text-box>
        </draw:frame>
        <draw:frame draw:style-name="gr46" draw:text-style-name="P16" draw:layer="layout" svg:width="0.987cm" svg:height="0.852cm" svg:x="20.962cm" svg:y="8.182cm">
          <draw:text-box>
            <text:p><text:span text:style-name="T5">S7</text:span></text:p>
          </draw:text-box>
        </draw:frame>
        <draw:line draw:style-name="gr39" draw:text-style-name="P1" draw:layer="layout" svg:x1="14.5cm" svg:y1="1.778cm" svg:x2="16.058cm" svg:y2="1.778cm">
          <text:p/>
        </draw:line>
        <draw:frame draw:style-name="gr47" draw:text-style-name="P9" draw:layer="layout" svg:width="1.824cm" svg:height="0.852cm" svg:x="15.936cm" svg:y="0.46cm">
          <draw:text-box>
            <text:p><text:span text:style-name="T2">Host A</text:span></text:p>
          </draw:text-box>
        </draw:frame>
        <draw:frame draw:style-name="gr48" draw:text-style-name="P9" draw:layer="layout" svg:width="1.807cm" svg:height="0.852cm" svg:x="21.784cm" svg:y="4.86cm">
          <draw:text-box>
            <text:p><text:span text:style-name="T2">Host </text:span><text:span text:style-name="T6">B</text:span></text:p>
          </draw:text-box>
        </draw:frame>
        <draw:line draw:style-name="gr39" draw:text-style-name="P1" draw:layer="layout" svg:x1="22.254cm" svg:y1="6.73cm" svg:x2="21.426cm" svg:y2="7.95cm">
          <text:p/>
        </draw:line>
        <draw:custom-shape draw:style-name="gr38" draw:text-style-name="P15" draw:layer="layout" svg:width="0.651cm" svg:height="1.019cm" svg:x="21.059cm" svg:y="10.482cm">
          <text:p/>
          <draw:enhanced-geometry svg:viewBox="0 0 21600 21600" draw:type="rectangle" draw:enhanced-path="M 0 0 L 21600 0 21600 21600 0 21600 0 0 Z N"/>
        </draw:custom-shape>
        <draw:frame draw:style-name="gr1" draw:text-style-name="P1" draw:layer="layout" svg:width="2.129cm" svg:height="2.129cm" svg:x="20.025cm" svg:y="10.061cm">
          <draw:image xlink:href="Pictures/10000001000004B0000004B0923FE4BE.png" xlink:type="simple" xlink:show="embed" xlink:actuate="onLoad" draw:mime-type="image/png">
            <text:p/>
          </draw:image>
        </draw:frame>
        <draw:frame draw:style-name="gr49" draw:text-style-name="P9" draw:layer="layout" svg:width="1.802cm" svg:height="0.852cm" svg:x="20.127cm" svg:y="9.651cm">
          <draw:text-box>
            <text:p><text:span text:style-name="T2">Host </text:span><text:span text:style-name="T6">C</text:span></text:p>
          </draw:text-box>
        </draw:frame>
        <draw:line draw:style-name="gr39" draw:text-style-name="P1" draw:layer="layout" svg:x1="20.17cm" svg:y1="10.96cm" svg:x2="18.957cm" svg:y2="10.96cm">
          <text:p/>
        </draw:line>
        <draw:frame draw:style-name="gr46" draw:text-style-name="P16" draw:layer="layout" svg:width="0.987cm" svg:height="0.852cm" svg:x="17.282cm" svg:y="4.721cm">
          <draw:text-box>
            <text:p><text:span text:style-name="T5">S5</text:span></text:p>
          </draw:text-box>
        </draw:frame>
        <draw:frame draw:style-name="gr1" draw:text-style-name="P1" draw:layer="layout" svg:width="2.129cm" svg:height="2.129cm" svg:x="21.682cm" svg:y="5.27cm">
          <draw:image xlink:href="Pictures/10000001000004B0000004B0923FE4BE.png" xlink:type="simple" xlink:show="embed" xlink:actuate="onLoad" draw:mime-type="image/png">
            <text:p/>
          </draw:image>
        </draw:frame>
        <draw:frame draw:style-name="gr1" draw:text-style-name="P1" draw:layer="layout" svg:width="2.129cm" svg:height="2.129cm" svg:x="15.884cm" svg:y="0.819cm">
          <draw:image xlink:href="Pictures/10000001000004B0000004B0923FE4BE.png" xlink:type="simple" xlink:show="embed" xlink:actuate="onLoad" draw:mime-type="image/png">
            <text:p/>
          </draw:image>
        </draw:frame>
        <presentation:notes draw:style-name="dp2">
          <draw:page-thumbnail draw:style-name="gr7"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Blank" presentation:presentation-page-layout-name="AL2T1">
        <draw:line draw:style-name="gr39" draw:text-style-name="P1" draw:layer="layout" svg:x1="7.971cm" svg:y1="3.143cm" svg:x2="5.315cm" svg:y2="5.615cm">
          <text:p/>
        </draw:line>
        <draw:line draw:style-name="gr39" draw:text-style-name="P1" draw:layer="layout" svg:x1="13.416cm" svg:y1="8.4cm" svg:x2="8.187cm" svg:y2="8.4cm">
          <text:p/>
        </draw:line>
        <draw:line draw:style-name="gr39" draw:text-style-name="P1" draw:layer="layout" svg:x1="10.743cm" svg:y1="10.943cm" svg:x2="5.514cm" svg:y2="10.943cm">
          <text:p/>
        </draw:line>
        <draw:line draw:style-name="gr39" draw:text-style-name="P1" draw:layer="layout" svg:x1="5.485cm" svg:y1="6.101cm" svg:x2="10.342cm" svg:y2="10.615cm">
          <text:p/>
        </draw:line>
        <draw:line draw:style-name="gr39" draw:text-style-name="P1" draw:layer="layout" svg:x1="10.457cm" svg:y1="5.943cm" svg:x2="5.314cm" svg:y2="10.715cm">
          <text:p/>
        </draw:line>
        <draw:line draw:style-name="gr39" draw:text-style-name="P1" draw:layer="layout" svg:x1="8.143cm" svg:y1="3.372cm" svg:x2="13cm" svg:y2="7.886cm">
          <text:p/>
        </draw:line>
        <draw:custom-shape draw:style-name="gr32" draw:text-style-name="P15" draw:layer="layout" svg:width="1.183cm" svg:height="0.867cm" svg:x="4.503cm" svg:y="8.104cm">
          <text:p/>
          <draw:enhanced-geometry svg:viewBox="0 0 21600 21600" draw:type="rectangle" draw:enhanced-path="M 0 0 L 21600 0 21600 21600 0 21600 0 0 Z N"/>
        </draw:custom-shape>
        <draw:frame draw:style-name="gr51" draw:text-style-name="P16" draw:layer="layout" svg:width="0.845cm" svg:height="1.453cm" svg:x="10.242cm" svg:y="10.181cm">
          <draw:text-box>
            <text:p><text:span text:style-name="T5">S6</text:span></text:p>
          </draw:text-box>
        </draw:frame>
        <draw:custom-shape draw:style-name="gr52" draw:text-style-name="P15" draw:layer="layout" svg:width="1.257cm" svg:height="1.257cm" svg:x="4.466cm" svg:y="10.27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2.682cm" svg:y="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7.269cm" svg:y="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0.036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0.03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4.466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7.24cm" svg:y="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18.997cm" svg:y1="3.105cm" svg:x2="16.341cm" svg:y2="5.577cm">
          <text:p/>
        </draw:line>
        <draw:line draw:style-name="gr39" draw:text-style-name="P1" draw:layer="layout" svg:x1="24.442cm" svg:y1="8.362cm" svg:x2="19.213cm" svg:y2="8.362cm">
          <text:p/>
        </draw:line>
        <draw:line draw:style-name="gr39" draw:text-style-name="P1" draw:layer="layout" svg:x1="16.511cm" svg:y1="6.063cm" svg:x2="21.368cm" svg:y2="10.577cm">
          <text:p/>
        </draw:line>
        <draw:line draw:style-name="gr39" draw:text-style-name="P1" draw:layer="layout" svg:x1="21.483cm" svg:y1="5.905cm" svg:x2="16.34cm" svg:y2="10.677cm">
          <text:p/>
        </draw:line>
        <draw:custom-shape draw:style-name="gr32" draw:text-style-name="P15" draw:layer="layout" svg:width="1.183cm" svg:height="0.867cm" svg:x="15.529cm" svg:y="8.066cm">
          <text:p/>
          <draw:enhanced-geometry svg:viewBox="0 0 21600 21600" draw:type="rectangle" draw:enhanced-path="M 0 0 L 21600 0 21600 21600 0 21600 0 0 Z N"/>
        </draw:custom-shape>
        <draw:frame draw:style-name="gr51" draw:text-style-name="P16" draw:layer="layout" svg:width="0.845cm" svg:height="1.453cm" svg:x="21.268cm" svg:y="10.143cm">
          <draw:text-box>
            <text:p><text:span text:style-name="T5">S6</text:span></text:p>
          </draw:text-box>
        </draw:frame>
        <draw:custom-shape draw:style-name="gr52" draw:text-style-name="P15" draw:layer="layout" svg:width="1.257cm" svg:height="1.257cm" svg:x="15.492cm" svg:y="10.2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23.708cm" svg:y="7.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8.295cm" svg:y="7.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21.062cm" svg:y="5.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21.062cm" svg:y="10.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5.492cm" svg:y="5.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8.266cm" svg:y="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 draw:layer="layout" svg:width="1.113cm" svg:height="0.941cm" svg:x="4.514cm" svg:y="2.744cm">
          <draw:text-box>
            <text:p><text:span text:style-name="T1">(a)</text:span></text:p>
          </draw:text-box>
        </draw:frame>
        <draw:frame draw:style-name="gr54" draw:text-style-name="P2" draw:layer="layout" svg:width="1.139cm" svg:height="0.941cm" svg:x="15.586cm" svg:y="2.745cm">
          <draw:text-box>
            <text:p><text:span text:style-name="T1">(b)</text:span></text:p>
          </draw:text-box>
        </draw:frame>
        <presentation:notes draw:style-name="dp2">
          <draw:page-thumbnail draw:style-name="gr7" draw:layer="layout" svg:width="0.001cm" svg:height="0.001cm" svg:x="0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Blank" presentation:presentation-page-layout-name="AL2T1">
        <draw:connector draw:name="Straight Arrow Connector 7" draw:style-name="gr55" draw:text-style-name="P17" draw:layer="layout" draw:type="line" svg:x1="4.607cm" svg:y1="5.519cm" svg:x2="4.586cm" svg:y2="9.441cm" svg:d="M4607 5519l-21 3922" svg:viewBox="0 0 22 3923">
          <text:p/>
        </draw:connector>
        <draw:custom-shape draw:name="Rectangle 8" draw:style-name="gr56" draw:text-style-name="P19" draw:layer="layout" svg:width="2.973cm" svg:height="1.85cm" svg:x="3.013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frame draw:name="TextBox 12" draw:style-name="gr57" draw:text-style-name="P21" draw:layer="layout" svg:width="1.365cm" svg:height="1.102cm" svg:x="14.031cm" svg:y="1.624cm">
          <draw:text-box>
            <text:p text:style-name="P20"><text:span text:style-name="T8">. . .</text:span></text:p>
          </draw:text-box>
        </draw:frame>
        <draw:connector draw:name="Straight Arrow Connector 16" draw:style-name="gr58" draw:text-style-name="P17" draw:layer="layout" draw:type="line" svg:x1="12.773cm" svg:y1="5.41cm" svg:x2="12.752cm" svg:y2="9.332cm" svg:d="M12773 5410l-21 3922" svg:viewBox="0 0 22 3923">
          <text:p/>
        </draw:connector>
        <draw:connector draw:name="Straight Arrow Connector 17" draw:style-name="gr59" draw:text-style-name="P17" draw:layer="layout" draw:type="line" svg:x1="17.052cm" svg:y1="3.302cm" svg:x2="17.03cm" svg:y2="7.223cm" svg:d="M17052 3302l-22 3921" svg:viewBox="0 0 23 3922">
          <text:p/>
        </draw:connector>
        <draw:connector draw:name="Straight Arrow Connector 18" draw:style-name="gr60" draw:text-style-name="P17" draw:layer="layout" draw:type="line" svg:x1="9.215cm" svg:y1="3.211cm" svg:x2="9.193cm" svg:y2="7.133cm" svg:d="M9215 3211l-22 3922" svg:viewBox="0 0 23 3923">
          <text:p/>
        </draw:connector>
        <draw:connector draw:name="Straight Connector 32" draw:style-name="gr61" draw:text-style-name="P17" draw:layer="layout" draw:type="line" svg:x1="1.941cm" svg:y1="6.317cm" svg:x2="23.78cm" svg:y2="6.349cm" svg:d="M1941 6317l21839 32" svg:viewBox="0 0 21840 33">
          <text:p/>
        </draw:connector>
        <draw:frame draw:name="TextBox 33" draw:style-name="gr62" draw:text-style-name="P21" draw:layer="layout" svg:width="3.987cm" svg:height="1.017cm" svg:x="20.313cm" svg:y="5.412cm">
          <draw:text-box>
            <text:p text:style-name="P20"><text:span text:style-name="T9">Control Plane</text:span></text:p>
          </draw:text-box>
        </draw:frame>
        <draw:frame draw:name="TextBox 34" draw:style-name="gr63" draw:text-style-name="P21" draw:layer="layout" svg:width="3.279cm" svg:height="1.017cm" svg:x="20.97cm" svg:y="6.376cm">
          <draw:text-box>
            <text:p text:style-name="P20"><text:span text:style-name="T9">Data Plane</text:span></text:p>
          </draw:text-box>
        </draw:frame>
        <draw:frame draw:name="TextBox 35" draw:style-name="gr64" draw:text-style-name="P23" draw:layer="layout" svg:width="3.266cm" svg:height="1.017cm" svg:x="1.628cm" svg:y="7.085cm">
          <draw:text-box>
            <text:p text:style-name="P22"><text:span text:style-name="T9">Flow Rules</text:span></text:p>
          </draw:text-box>
        </draw:frame>
        <draw:custom-shape draw:name="Rectangle 51" draw:style-name="gr56" draw:text-style-name="P19" draw:layer="layout" svg:width="2.973cm" svg:height="1.85cm" svg:x="6.769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custom-shape draw:name="Rectangle 52" draw:style-name="gr65" draw:text-style-name="P19" draw:layer="layout" svg:width="2.974cm" svg:height="1.85cm" svg:x="10.407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custom-shape draw:name="Rectangle 53" draw:style-name="gr65" draw:text-style-name="P19" draw:layer="layout" svg:width="2.974cm" svg:height="1.85cm" svg:x="15.881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g draw:name="Group 50" draw:style-name="gr12">
          <draw:custom-shape draw:name="Rectangle 49" draw:style-name="gr66" draw:text-style-name="P25" draw:layer="layout" svg:width="15.803cm" svg:height="2.835cm" svg:x="3.013cm" svg:y="3.147cm">
            <text:p text:style-name="P24"><text:span text:style-name="T10">Network OS</text:span></text:p>
            <draw:enhanced-geometry svg:viewBox="0 0 21600 21600" draw:type="non-primitive" draw:enhanced-path="M 0 0 L 21600 0 21600 21600 0 21600 Z N"/>
          </draw:custom-shape>
          <draw:g draw:name="Group 20" draw:style-name="gr12">
            <draw:custom-shape draw:name="Oval 21" draw:style-name="gr67" draw:text-style-name="P26" draw:layer="layout" svg:width="0.64cm" svg:height="0.626cm" svg:x="13.999cm" svg:y="4.5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2" draw:style-name="gr68" draw:text-style-name="P26" draw:layer="layout" svg:width="0.64cm" svg:height="0.627cm" svg:x="15.029cm" svg:y="5.18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3" draw:style-name="gr67" draw:text-style-name="P26" draw:layer="layout" svg:width="0.64cm" svg:height="0.626cm" svg:x="15.029cm" svg:y="3.90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4" draw:style-name="gr68" draw:text-style-name="P26" draw:layer="layout" svg:width="0.64cm" svg:height="0.627cm" svg:x="16.16cm" svg:y="3.28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5" draw:style-name="gr67" draw:text-style-name="P26" draw:layer="layout" svg:width="0.64cm" svg:height="0.626cm" svg:x="16.16cm" svg:y="4.5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26" draw:style-name="gr69" draw:text-style-name="P17" draw:layer="layout" draw:type="line" svg:x1="14.545cm" svg:y1="4.625cm" svg:x2="16.706cm" svg:y2="3.373cm" svg:d="M14545 4625l2161-1252" svg:viewBox="0 0 2162 1253">
              <text:p/>
            </draw:connector>
            <draw:connector draw:name="Straight Connector 27" draw:style-name="gr69" draw:text-style-name="P17" draw:layer="layout" draw:type="line" svg:x1="16.706cm" svg:y1="4.625cm" svg:x2="15.575cm" svg:y2="5.28cm" svg:d="M16706 4625l-1131 655" svg:viewBox="0 0 1132 656">
              <text:p/>
            </draw:connector>
            <draw:connector draw:name="Straight Connector 28" draw:style-name="gr69" draw:text-style-name="P17" draw:layer="layout" draw:type="line" svg:x1="15.123cm" svg:y1="3.999cm" svg:x2="16.706cm" svg:y2="5.068cm" svg:d="M15123 3999l1583 1069" svg:viewBox="0 0 1584 1070">
              <text:p/>
            </draw:connector>
            <draw:connector draw:name="Straight Connector 29" draw:style-name="gr69" draw:text-style-name="P17" draw:layer="layout" draw:type="line" svg:x1="14.093cm" svg:y1="4.625cm" svg:x2="15.575cm" svg:y2="5.723cm" svg:d="M14093 4625l1482 1098" svg:viewBox="0 0 1483 1099">
              <text:p/>
            </draw:connector>
            <draw:connector draw:name="Straight Connector 30" draw:style-name="gr69" draw:text-style-name="P17" draw:layer="layout" draw:type="line" svg:x1="16.48cm" svg:y1="3.908cm" svg:x2="16.48cm" svg:y2="4.534cm" svg:d="M16480 3908v626" svg:viewBox="0 0 1 627">
              <text:p/>
            </draw:connector>
          </draw:g>
          <draw:frame draw:name="TextBox 31" draw:style-name="gr70" draw:text-style-name="P27" draw:layer="layout" svg:width="2.54cm" svg:height="2.159cm" svg:x="16.342cm" svg:y="3.176cm">
            <draw:text-box>
              <text:p text:style-name="P22"><text:span text:style-name="T11">Global </text:span></text:p>
              <text:p text:style-name="P22"><text:span text:style-name="T11">Network</text:span></text:p>
              <text:p text:style-name="P22"><text:span text:style-name="T11">Map</text:span></text:p>
            </draw:text-box>
          </draw:frame>
        </draw:g>
        <draw:connector draw:name="Straight Connector 46" draw:style-name="gr71" draw:text-style-name="P17" draw:layer="layout" draw:type="line" svg:x1="12.686cm" svg:y1="10.109cm" svg:x2="9.423cm" svg:y2="11.699cm" svg:d="M12686 10109l-3263 1590" svg:viewBox="0 0 3264 1591">
          <text:p/>
        </draw:connector>
        <draw:connector draw:name="Straight Connector 47" draw:style-name="gr71" draw:text-style-name="P17" draw:layer="layout" draw:type="line" svg:x1="8.242cm" svg:y1="8.042cm" svg:x2="5.403cm" svg:y2="9.494cm" svg:d="M8242 8042l-2839 1452" svg:viewBox="0 0 2840 1453">
          <text:p/>
        </draw:connector>
        <draw:connector draw:name="Straight Connector 48" draw:style-name="gr71" draw:text-style-name="P17" draw:layer="layout" draw:type="line" svg:x1="11.773cm" svg:y1="9.5cm" svg:x2="9.422cm" svg:y2="7.949cm" svg:d="M11773 9500l-2351-1551" svg:viewBox="0 0 2352 1552">
          <text:p/>
        </draw:connector>
        <draw:g draw:name="Group 54" draw:style-name="gr12">
          <draw:custom-shape draw:name="Cube 55" draw:style-name="gr72" draw:text-style-name="P28" draw:layer="layout" svg:width="2.875cm" svg:height="1.097cm" svg:x="7.754cm" svg:y="7.159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6" draw:style-name="gr12">
            <draw:g draw:name="Group 57" draw:style-name="gr73">
              <draw:connector draw:name="Straight Arrow Connector 63" draw:style-name="gr74" draw:text-style-name="P17" draw:layer="layout" draw:type="line" svg:x1="9.365cm" svg:y1="7.318cm" svg:x2="10.35cm" svg:y2="7.318cm" svg:d="M9365 7318h985" svg:viewBox="0 0 986 1">
                <text:p/>
              </draw:connector>
              <draw:connector draw:name="Straight Arrow Connector 64" draw:style-name="gr75" draw:text-style-name="P17" draw:layer="layout" draw:type="line" svg:x1="9.365cm" svg:y1="7.667cm" svg:x2="9.984cm" svg:y2="7.667cm" svg:d="M9365 7667h619" svg:viewBox="0 0 620 1">
                <text:p/>
              </draw:connector>
            </draw:g>
            <draw:g draw:name="Group 58" draw:style-name="gr73">
              <draw:connector draw:name="Straight Arrow Connector 61" draw:style-name="gr76" draw:text-style-name="P17" draw:layer="layout" draw:type="line" svg:x1="9.018cm" svg:y1="7.324cm" svg:x2="8.415cm" svg:y2="7.324cm" svg:d="M9018 7324h-603" svg:viewBox="0 0 604 1">
                <text:p/>
              </draw:connector>
              <draw:connector draw:name="Straight Arrow Connector 62" draw:style-name="gr77" draw:text-style-name="P17" draw:layer="layout" draw:type="line" svg:x1="9.018cm" svg:y1="7.667cm" svg:x2="8.048cm" svg:y2="7.667cm" svg:d="M9018 7667h-970" svg:viewBox="0 0 971 1">
                <text:p/>
              </draw:connector>
            </draw:g>
            <draw:connector draw:name="Straight Connector 59" draw:style-name="gr78" draw:text-style-name="P17" draw:layer="layout" draw:type="line" svg:x1="8.998cm" svg:y1="7.674cm" svg:x2="9.385cm" svg:y2="7.312cm" svg:d="M8998 7674l387-362" svg:viewBox="0 0 388 363">
              <text:p/>
            </draw:connector>
            <draw:connector draw:name="Straight Connector 60" draw:style-name="gr78" draw:text-style-name="P17" draw:layer="layout" draw:type="line" svg:x1="9.385cm" svg:y1="7.674cm" svg:x2="8.998cm" svg:y2="7.312cm" svg:d="M9385 7674l-387-362" svg:viewBox="0 0 388 363">
              <text:p/>
            </draw:connector>
          </draw:g>
        </draw:g>
        <draw:connector draw:name="Straight Connector 65" draw:style-name="gr71" draw:text-style-name="P17" draw:layer="layout" draw:type="line" svg:x1="7.749cm" svg:y1="11.517cm" svg:x2="5.593cm" svg:y2="9.855cm" svg:d="M7749 11517l-2156-1662" svg:viewBox="0 0 2157 1663">
          <text:p/>
        </draw:connector>
        <draw:connector draw:name="Straight Connector 66" draw:style-name="gr71" draw:text-style-name="P17" draw:layer="layout" draw:type="line" svg:x1="16.421cm" svg:y1="8.065cm" svg:x2="13.51cm" svg:y2="9.494cm" svg:d="M16421 8065l-2911 1429" svg:viewBox="0 0 2912 1430">
          <text:p/>
        </draw:connector>
        <draw:g draw:name="Group 67" draw:style-name="gr12">
          <draw:custom-shape draw:name="Cube 68" draw:style-name="gr79" draw:text-style-name="P29" draw:layer="layout" svg:width="2.875cm" svg:height="1.048cm" svg:x="11.267cm" svg:y="9.34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9" draw:style-name="gr12">
            <draw:g draw:name="Group 70" draw:style-name="gr73">
              <draw:connector draw:name="Straight Arrow Connector 76" draw:style-name="gr80" draw:text-style-name="P17" draw:layer="layout" draw:type="line" svg:x1="12.879cm" svg:y1="9.508cm" svg:x2="13.865cm" svg:y2="9.508cm" svg:d="M12879 9508h986" svg:viewBox="0 0 987 1">
                <text:p/>
              </draw:connector>
              <draw:connector draw:name="Straight Arrow Connector 77" draw:style-name="gr81" draw:text-style-name="P17" draw:layer="layout" draw:type="line" svg:x1="12.879cm" svg:y1="9.857cm" svg:x2="13.498cm" svg:y2="9.857cm" svg:d="M12879 9857h619" svg:viewBox="0 0 620 1">
                <text:p/>
              </draw:connector>
            </draw:g>
            <draw:g draw:name="Group 71" draw:style-name="gr73">
              <draw:connector draw:name="Straight Arrow Connector 74" draw:style-name="gr82" draw:text-style-name="P17" draw:layer="layout" draw:type="line" svg:x1="12.531cm" svg:y1="9.514cm" svg:x2="11.93cm" svg:y2="9.514cm" svg:d="M12531 9514h-601" svg:viewBox="0 0 602 1">
                <text:p/>
              </draw:connector>
              <draw:connector draw:name="Straight Arrow Connector 75" draw:style-name="gr83" draw:text-style-name="P17" draw:layer="layout" draw:type="line" svg:x1="12.531cm" svg:y1="9.857cm" svg:x2="11.563cm" svg:y2="9.857cm" svg:d="M12531 9857h-968" svg:viewBox="0 0 969 1">
                <text:p/>
              </draw:connector>
            </draw:g>
            <draw:connector draw:name="Straight Connector 72" draw:style-name="gr78" draw:text-style-name="P17" draw:layer="layout" draw:type="line" svg:x1="12.512cm" svg:y1="9.863cm" svg:x2="12.899cm" svg:y2="9.502cm" svg:d="M12512 9863l387-361" svg:viewBox="0 0 388 362">
              <text:p/>
            </draw:connector>
            <draw:connector draw:name="Straight Connector 73" draw:style-name="gr78" draw:text-style-name="P17" draw:layer="layout" draw:type="line" svg:x1="12.899cm" svg:y1="9.863cm" svg:x2="12.512cm" svg:y2="9.502cm" svg:d="M12899 9863l-387-361" svg:viewBox="0 0 388 362">
              <text:p/>
            </draw:connector>
          </draw:g>
        </draw:g>
        <draw:g draw:name="Group 78" draw:style-name="gr12">
          <draw:custom-shape draw:name="Cube 79" draw:style-name="gr84" draw:text-style-name="P30" draw:layer="layout" svg:width="2.875cm" svg:height="1.077cm" svg:x="15.61cm" svg:y="7.2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0" draw:style-name="gr12">
            <draw:g draw:name="Group 81" draw:style-name="gr73">
              <draw:connector draw:name="Straight Arrow Connector 87" draw:style-name="gr85" draw:text-style-name="P17" draw:layer="layout" draw:type="line" svg:x1="17.221cm" svg:y1="7.388cm" svg:x2="18.207cm" svg:y2="7.388cm" svg:d="M17221 7388h986" svg:viewBox="0 0 987 1">
                <text:p/>
              </draw:connector>
              <draw:connector draw:name="Straight Arrow Connector 88" draw:style-name="gr86" draw:text-style-name="P17" draw:layer="layout" draw:type="line" svg:x1="17.221cm" svg:y1="7.737cm" svg:x2="17.84cm" svg:y2="7.737cm" svg:d="M17221 7737h619" svg:viewBox="0 0 620 1">
                <text:p/>
              </draw:connector>
            </draw:g>
            <draw:g draw:name="Group 82" draw:style-name="gr73">
              <draw:connector draw:name="Straight Arrow Connector 85" draw:style-name="gr87" draw:text-style-name="P17" draw:layer="layout" draw:type="line" svg:x1="16.874cm" svg:y1="7.394cm" svg:x2="16.272cm" svg:y2="7.394cm" svg:d="M16874 7394h-602" svg:viewBox="0 0 603 1">
                <text:p/>
              </draw:connector>
              <draw:connector draw:name="Straight Arrow Connector 86" draw:style-name="gr88" draw:text-style-name="P17" draw:layer="layout" draw:type="line" svg:x1="16.874cm" svg:y1="7.737cm" svg:x2="15.905cm" svg:y2="7.737cm" svg:d="M16874 7737h-969" svg:viewBox="0 0 970 1">
                <text:p/>
              </draw:connector>
            </draw:g>
            <draw:connector draw:name="Straight Connector 83" draw:style-name="gr78" draw:text-style-name="P17" draw:layer="layout" draw:type="line" svg:x1="16.854cm" svg:y1="7.743cm" svg:x2="17.241cm" svg:y2="7.382cm" svg:d="M16854 7743l387-361" svg:viewBox="0 0 388 362">
              <text:p/>
            </draw:connector>
            <draw:connector draw:name="Straight Connector 84" draw:style-name="gr78" draw:text-style-name="P17" draw:layer="layout" draw:type="line" svg:x1="17.241cm" svg:y1="7.743cm" svg:x2="16.854cm" svg:y2="7.382cm" svg:d="M17241 7743l-387-361" svg:viewBox="0 0 388 362">
              <text:p/>
            </draw:connector>
          </draw:g>
        </draw:g>
        <draw:g draw:name="Group 89" draw:style-name="gr12">
          <draw:custom-shape draw:name="Cube 90" draw:style-name="gr89" draw:text-style-name="P31" draw:layer="layout" svg:width="2.875cm" svg:height="1.097cm" svg:x="6.895cm" svg:y="11.51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91" draw:style-name="gr12">
            <draw:g draw:name="Group 92" draw:style-name="gr73">
              <draw:connector draw:name="Straight Arrow Connector 98" draw:style-name="gr90" draw:text-style-name="P17" draw:layer="layout" draw:type="line" svg:x1="8.506cm" svg:y1="11.676cm" svg:x2="9.491cm" svg:y2="11.676cm" svg:d="M8506 11676h985" svg:viewBox="0 0 986 1">
                <text:p/>
              </draw:connector>
              <draw:connector draw:name="Straight Arrow Connector 99" draw:style-name="gr91" draw:text-style-name="P17" draw:layer="layout" draw:type="line" svg:x1="8.506cm" svg:y1="12.025cm" svg:x2="9.125cm" svg:y2="12.025cm" svg:d="M8506 12025h619" svg:viewBox="0 0 620 1">
                <text:p/>
              </draw:connector>
            </draw:g>
            <draw:g draw:name="Group 93" draw:style-name="gr73">
              <draw:connector draw:name="Straight Arrow Connector 96" draw:style-name="gr92" draw:text-style-name="P17" draw:layer="layout" draw:type="line" svg:x1="8.159cm" svg:y1="11.682cm" svg:x2="7.556cm" svg:y2="11.682cm" svg:d="M8159 11682h-603" svg:viewBox="0 0 604 1">
                <text:p/>
              </draw:connector>
              <draw:connector draw:name="Straight Arrow Connector 97" draw:style-name="gr93" draw:text-style-name="P17" draw:layer="layout" draw:type="line" svg:x1="8.159cm" svg:y1="12.025cm" svg:x2="7.189cm" svg:y2="12.025cm" svg:d="M8159 12025h-970" svg:viewBox="0 0 971 1">
                <text:p/>
              </draw:connector>
            </draw:g>
            <draw:connector draw:name="Straight Connector 94" draw:style-name="gr78" draw:text-style-name="P17" draw:layer="layout" draw:type="line" svg:x1="8.139cm" svg:y1="12.032cm" svg:x2="8.526cm" svg:y2="11.67cm" svg:d="M8139 12032l387-362" svg:viewBox="0 0 388 363">
              <text:p/>
            </draw:connector>
            <draw:connector draw:name="Straight Connector 95" draw:style-name="gr78" draw:text-style-name="P17" draw:layer="layout" draw:type="line" svg:x1="8.526cm" svg:y1="12.032cm" svg:x2="8.139cm" svg:y2="11.67cm" svg:d="M8526 12032l-387-362" svg:viewBox="0 0 388 363">
              <text:p/>
            </draw:connector>
          </draw:g>
        </draw:g>
        <draw:g draw:name="Group 100" draw:style-name="gr12">
          <draw:custom-shape draw:name="Cube 101" draw:style-name="gr94" draw:text-style-name="P32" draw:layer="layout" svg:width="2.874cm" svg:height="0.998cm" svg:x="3.123cm" svg:y="9.4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102" draw:style-name="gr12">
            <draw:g draw:name="Group 103" draw:style-name="gr73">
              <draw:connector draw:name="Straight Arrow Connector 109" draw:style-name="gr95" draw:text-style-name="P17" draw:layer="layout" draw:type="line" svg:x1="4.734cm" svg:y1="9.62cm" svg:x2="5.72cm" svg:y2="9.62cm" svg:d="M4734 9620h986" svg:viewBox="0 0 987 1">
                <text:p/>
              </draw:connector>
              <draw:connector draw:name="Straight Arrow Connector 110" draw:style-name="gr96" draw:text-style-name="P17" draw:layer="layout" draw:type="line" svg:x1="4.734cm" svg:y1="9.97cm" svg:x2="5.353cm" svg:y2="9.97cm" svg:d="M4734 9970h619" svg:viewBox="0 0 620 1">
                <text:p/>
              </draw:connector>
            </draw:g>
            <draw:g draw:name="Group 104" draw:style-name="gr73">
              <draw:connector draw:name="Straight Arrow Connector 107" draw:style-name="gr97" draw:text-style-name="P17" draw:layer="layout" draw:type="line" svg:x1="4.386cm" svg:y1="9.627cm" svg:x2="3.785cm" svg:y2="9.627cm" svg:d="M4386 9627h-601" svg:viewBox="0 0 602 1">
                <text:p/>
              </draw:connector>
              <draw:connector draw:name="Straight Arrow Connector 108" draw:style-name="gr98" draw:text-style-name="P17" draw:layer="layout" draw:type="line" svg:x1="4.386cm" svg:y1="9.97cm" svg:x2="3.418cm" svg:y2="9.97cm" svg:d="M4386 9970h-968" svg:viewBox="0 0 969 1">
                <text:p/>
              </draw:connector>
            </draw:g>
            <draw:connector draw:name="Straight Connector 105" draw:style-name="gr78" draw:text-style-name="P17" draw:layer="layout" draw:type="line" svg:x1="4.367cm" svg:y1="9.976cm" svg:x2="4.754cm" svg:y2="9.615cm" svg:d="M4367 9976l387-361" svg:viewBox="0 0 388 362">
              <text:p/>
            </draw:connector>
            <draw:connector draw:name="Straight Connector 106" draw:style-name="gr78" draw:text-style-name="P17" draw:layer="layout" draw:type="line" svg:x1="4.754cm" svg:y1="9.976cm" svg:x2="4.367cm" svg:y2="9.615cm" svg:d="M4754 9976l-387-361" svg:viewBox="0 0 388 362">
              <text:p/>
            </draw:connector>
          </draw:g>
        </draw:g>
        <presentation:notes draw:style-name="dp2">
          <draw:page-thumbnail draw:style-name="gr7" draw:layer="layout" svg:width="0.001cm" svg:height="0.001cm" svg:x="0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Blank" presentation:presentation-page-layout-name="AL2T1">
        <draw:connector draw:style-name="gr99" draw:text-style-name="P1" draw:layer="layout" draw:type="line" svg:x1="10.695cm" svg:y1="6.261cm" svg:x2="10.695cm" svg:y2="7.437cm" svg:d="M10695 6261v1176" svg:viewBox="0 0 1 1177">
          <text:p/>
        </draw:connector>
        <draw:connector draw:name="Straight Connector 19" draw:style-name="gr69" draw:text-style-name="P17" draw:layer="layout" draw:type="line" svg:x1="13.304cm" svg:y1="3.186cm" svg:x2="10.882cm" svg:y2="5.724cm" svg:d="M13304 3186l-2422 2538" svg:viewBox="0 0 2423 2539">
          <text:p/>
        </draw:connector>
        <draw:connector draw:name="Straight Connector 20" draw:style-name="gr69" draw:text-style-name="P17" draw:layer="layout" draw:type="line" svg:x1="14.038cm" svg:y1="3.203cm" svg:x2="13.881cm" svg:y2="6.34cm" draw:start-shape="id1" draw:start-glue-point="2" draw:end-shape="id2" draw:end-glue-point="0" svg:d="M14038 3203l-157 3137" svg:viewBox="0 0 158 3138">
          <text:p/>
        </draw:connector>
        <draw:connector draw:name="Straight Connector 23" draw:style-name="gr69" draw:text-style-name="P17" draw:layer="layout" draw:type="line" svg:x1="11.922cm" svg:y1="5.732cm" svg:x2="18.418cm" svg:y2="3.176cm" svg:d="M11922 5732l6496-2556" svg:viewBox="0 0 6497 2557">
          <text:p/>
        </draw:connector>
        <draw:connector draw:name="Straight Connector 24" draw:style-name="gr69" draw:text-style-name="P17" draw:layer="layout" draw:type="line" svg:x1="19.117cm" svg:y1="2.877cm" svg:x2="14.189cm" svg:y2="6.481cm" svg:d="M19117 2877l-4928 3604" svg:viewBox="0 0 4929 3605">
          <text:p/>
        </draw:connector>
        <draw:connector draw:name="Straight Connector 25" draw:style-name="gr69" draw:text-style-name="P17" draw:layer="layout" draw:type="line" svg:x1="20.081cm" svg:y1="3.203cm" svg:x2="23.244cm" svg:y2="5.685cm" svg:d="M20081 3203l3163 2482" svg:viewBox="0 0 3164 2483">
          <text:p/>
        </draw:connector>
        <draw:connector draw:name="Straight Connector 2" draw:style-name="gr69" draw:text-style-name="P17" draw:layer="layout" draw:type="line" svg:x1="19.596cm" svg:y1="3.203cm" svg:x2="19.651cm" svg:y2="6.34cm" draw:end-shape="id3" draw:end-glue-point="0" svg:d="M19596 3203l55 3137" svg:viewBox="0 0 56 3138">
          <text:p/>
        </draw:connector>
        <draw:connector draw:name="Straight Connector 3" draw:style-name="gr69" draw:text-style-name="P17" draw:layer="layout" draw:type="line" svg:x1="15.108cm" svg:y1="3.14cm" svg:x2="22.415cm" svg:y2="5.685cm" svg:d="M15108 3140l7307 2545" svg:viewBox="0 0 7308 2546">
          <text:p/>
        </draw:connector>
        <draw:connector draw:name="Straight Connector 5" draw:style-name="gr69" draw:text-style-name="P17" draw:layer="layout" draw:type="line" svg:x1="14.668cm" svg:y1="3.14cm" svg:x2="18.945cm" svg:y2="6.368cm" svg:d="M14668 3140l4277 3228" svg:viewBox="0 0 4278 3229">
          <text:p/>
        </draw:connector>
        <draw:custom-shape draw:name="Rounded Rectangle 47" draw:style-name="gr100" draw:text-style-name="P33" xml:id="id4" draw:id="id4" draw:layer="layout" svg:width="3.194cm" svg:height="1.231cm" svg:x="13.67cm" svg:y="8.855cm">
          <text:p text:style-name="P24"><text:span text:style-name="T9">Serv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48" draw:style-name="gr101" draw:text-style-name="P34" xml:id="id5" draw:id="id5" draw:layer="layout" svg:width="3.194cm" svg:height="1.231cm" svg:x="13.67cm" svg:y="10.285cm">
          <text:p text:style-name="P24"><text:span text:style-name="T9">Serv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Elbow Connector 50" draw:style-name="gr69" draw:text-style-name="P17" draw:layer="layout" svg:x1="13.67cm" svg:y1="9.47cm" svg:x2="13.131cm" svg:y2="7.619cm" draw:start-shape="id4" draw:start-glue-point="3" svg:d="M13670 9470h-524v-1851h-15" svg:viewBox="0 0 540 1852">
          <text:p/>
        </draw:connector>
        <draw:connector draw:name="Elbow Connector 52" draw:style-name="gr69" draw:text-style-name="P17" draw:layer="layout" svg:x1="13.67cm" svg:y1="10.9cm" svg:x2="12.825cm" svg:y2="7.572cm" draw:start-shape="id5" draw:start-glue-point="3" svg:d="M13670 10900h-677v-3328h-168" svg:viewBox="0 0 846 3329">
          <text:p/>
        </draw:connector>
        <draw:connector draw:name="Elbow Connector 54" draw:style-name="gr69" draw:text-style-name="P17" draw:layer="layout" draw:line-skew="2.397cm" svg:x1="11.228cm" svg:y1="6.955cm" svg:x2="13.67cm" svg:y2="9.137cm" draw:start-shape="id6" draw:start-glue-point="2" svg:d="M11228 6955v3743h2442v-1561" svg:viewBox="0 0 2443 3744">
          <text:p/>
        </draw:connector>
        <draw:connector draw:name="Elbow Connector 55" draw:style-name="gr69" draw:text-style-name="P17" draw:layer="layout" svg:x1="10.701cm" svg:y1="7.428cm" svg:x2="13.67cm" svg:y2="11.034cm" svg:d="M10701 7428v1803h2969v1803" svg:viewBox="0 0 2970 3607">
          <text:p/>
        </draw:connector>
        <draw:frame draw:name="TextBox 71" draw:style-name="gr102" draw:text-style-name="P36" draw:layer="layout" svg:width="2.41cm" svg:height="1.351cm" svg:x="21.095cm" svg:y="13.173cm">
          <draw:text-box>
            <text:p text:style-name="P35"><text:span text:style-name="T7">External</text:span></text:p>
            <text:p text:style-name="P35"><text:span text:style-name="T7">Routers</text:span></text:p>
          </draw:text-box>
        </draw:frame>
        <draw:connector draw:name="Straight Connector 6" draw:style-name="gr69" draw:text-style-name="P17" draw:layer="layout" draw:type="line" svg:x1="19.651cm" svg:y1="7.571cm" svg:x2="22.3cm" svg:y2="11.905cm" draw:start-shape="id3" draw:start-glue-point="2" svg:d="M19651 7571l2649 4334" svg:viewBox="0 0 2650 4335">
          <text:p/>
        </draw:connector>
        <draw:connector draw:name="Straight Connector 76" draw:style-name="gr69" draw:text-style-name="P17" draw:layer="layout" draw:type="line" svg:x1="22.3cm" svg:y1="6.916cm" svg:x2="19.652cm" svg:y2="12.928cm" draw:start-shape="id7" draw:start-glue-point="2" svg:d="M22300 6916l-2648 6012" svg:viewBox="0 0 2649 6013">
          <text:p/>
        </draw:connector>
        <draw:connector draw:name="Straight Connector 79" draw:style-name="gr69" draw:text-style-name="P17" draw:layer="layout" draw:type="line" svg:x1="22.3cm" svg:y1="6.916cm" svg:x2="22.3cm" svg:y2="11.905cm" draw:start-shape="id7" draw:start-glue-point="2" svg:d="M22300 6916v4989" svg:viewBox="0 0 1 4990">
          <text:p/>
        </draw:connector>
        <draw:connector draw:name="Straight Connector 82" draw:style-name="gr69" draw:text-style-name="P17" draw:layer="layout" draw:type="line" svg:x1="19.651cm" svg:y1="7.571cm" svg:x2="19.652cm" svg:y2="12.928cm" draw:start-shape="id3" draw:start-glue-point="2" svg:d="M19651 7571l1 5357" svg:viewBox="0 0 2 5358">
          <text:p/>
        </draw:connector>
        <draw:connector draw:name="Straight Connector 89" draw:style-name="gr69" draw:text-style-name="P17" draw:layer="layout" draw:type="line" svg:x1="13.151cm" svg:y1="3.186cm" svg:x2="10.665cm" svg:y2="5.816cm" svg:d="M13151 3186l-2486 2630" svg:viewBox="0 0 2487 2631">
          <text:p/>
        </draw:connector>
        <draw:connector draw:name="Straight Connector 91" draw:style-name="gr69" draw:text-style-name="P17" draw:layer="layout" draw:type="line" svg:x1="11.757cm" svg:y1="5.705cm" svg:x2="18.252cm" svg:y2="3.126cm" svg:d="M11757 5705l6495-2579" svg:viewBox="0 0 6496 2580">
          <text:p/>
        </draw:connector>
        <draw:connector draw:name="Straight Connector 92" draw:style-name="gr69" draw:text-style-name="P17" draw:layer="layout" draw:type="line" svg:x1="13.884cm" svg:y1="3.203cm" svg:x2="13.727cm" svg:y2="6.34cm" svg:d="M13884 3203l-157 3137" svg:viewBox="0 0 158 3138">
          <text:p/>
        </draw:connector>
        <draw:connector draw:name="Straight Connector 93" draw:style-name="gr69" draw:text-style-name="P17" draw:layer="layout" draw:type="line" svg:x1="19.466cm" svg:y1="2.762cm" svg:x2="14.549cm" svg:y2="6.368cm" svg:d="M19466 2762l-4917 3606" svg:viewBox="0 0 4918 3607">
          <text:p/>
        </draw:connector>
        <draw:connector draw:name="Straight Connector 7" draw:style-name="gr69" draw:text-style-name="P17" draw:layer="layout" draw:type="line" svg:x1="14.828cm" svg:y1="3.149cm" svg:x2="22.815cm" svg:y2="5.981cm" svg:d="M14828 3149l7987 2832" svg:viewBox="0 0 7988 2833">
          <text:p/>
        </draw:connector>
        <draw:connector draw:name="Straight Connector 8" draw:style-name="gr69" draw:text-style-name="P17" draw:layer="layout" draw:type="line" svg:x1="20.33cm" svg:y1="3.203cm" svg:x2="23.493cm" svg:y2="5.685cm" svg:d="M20330 3203l3163 2482" svg:viewBox="0 0 3164 2483">
          <text:p/>
        </draw:connector>
        <draw:connector draw:name="Straight Connector 98" draw:style-name="gr69" draw:text-style-name="P17" draw:layer="layout" draw:type="line" svg:x1="19.739cm" svg:y1="3.213cm" svg:x2="19.805cm" svg:y2="6.378cm" svg:d="M19739 3213l66 3165" svg:viewBox="0 0 67 3166">
          <text:p/>
        </draw:connector>
        <draw:custom-shape draw:name="Rounded Rectangle 1" draw:style-name="gr103" draw:text-style-name="P37" draw:layer="layout" svg:width="3.194cm" svg:height="1.231cm" svg:x="17.54cm" svg:y="1.972cm">
          <text:p text:style-name="P24"><text:span text:style-name="T12">Spine 2</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5" draw:style-name="gr104" draw:text-style-name="P38" xml:id="id7" draw:id="id7" draw:layer="layout" svg:width="3.194cm" svg:height="1.231cm" svg:x="20.703cm" svg:y="5.685cm">
          <text:p text:style-name="P24"><text:span text:style-name="T9">Leaf 3</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 draw:style-name="gr105" draw:text-style-name="P39" xml:id="id6" draw:id="id6" draw:layer="layout" svg:width="3.194cm" svg:height="1.231cm" svg:x="9.631cm" svg:y="5.724cm">
          <text:p text:style-name="P24"><text:span text:style-name="T9">Leaf 1</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6" draw:style-name="gr106" draw:text-style-name="P40" xml:id="id2" draw:id="id2" draw:layer="layout" svg:width="3.194cm" svg:height="1.231cm" svg:x="12.284cm" svg:y="6.34cm">
          <text:p text:style-name="P24"><text:span text:style-name="T9">Leaf 2</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8" draw:style-name="gr107" draw:text-style-name="P41" xml:id="id1" draw:id="id1" draw:layer="layout" svg:width="3.194cm" svg:height="1.231cm" svg:x="12.441cm" svg:y="1.972cm">
          <text:p text:style-name="P24"><text:span text:style-name="T12">Spine 1</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130" draw:style-name="gr69" draw:text-style-name="P17" draw:layer="layout" draw:type="line" svg:x1="14.58cm" svg:y1="3.213cm" svg:x2="18.857cm" svg:y2="6.441cm" svg:d="M14580 3213l4277 3228" svg:viewBox="0 0 4278 3229">
          <text:p/>
        </draw:connector>
        <draw:custom-shape draw:name="Rounded Rectangle 3" draw:style-name="gr108" draw:text-style-name="P42" xml:id="id3" draw:id="id3" draw:layer="layout" svg:width="3.194cm" svg:height="1.231cm" svg:x="18.054cm" svg:y="6.34cm">
          <text:p text:style-name="P24"><text:span text:style-name="T9">Leaf 4</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Oval 131" draw:style-name="gr109" draw:text-style-name="P43" draw:layer="layout" svg:width="0.971cm" svg:height="0.398cm" svg:x="20.272cm" svg:y="3.4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3" draw:style-name="gr110" draw:text-style-name="P43" draw:layer="layout" svg:width="3.006cm" svg:height="0.427cm" svg:x="20.355cm" svg:y="5.10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4" draw:style-name="gr111" draw:text-style-name="P43" draw:layer="layout" svg:width="2.579cm" svg:height="0.516cm" svg:x="17.685cm" svg:y="5.63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5" draw:style-name="gr112" draw:text-style-name="P43" xml:id="id9" draw:id="id9" draw:layer="layout" svg:width="0.896cm" svg:height="0.35cm" svg:x="12.316cm" svg:y="3.46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6" draw:style-name="gr111" draw:text-style-name="P43" draw:layer="layout" svg:width="2.579cm" svg:height="0.516cm" svg:x="13.283cm" svg:y="5.62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7" draw:style-name="gr113" draw:text-style-name="P43" xml:id="id10" draw:id="id10" draw:layer="layout" svg:width="3.006cm" svg:height="0.427cm" svg:x="10.619cm" svg:y="5.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8" draw:style-name="gr114" draw:text-style-name="P43" xml:id="id13" draw:id="id13" draw:layer="layout" svg:width="0.385cm" svg:height="0.672cm" svg:x="13.155cm" svg:y="10.4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9" draw:style-name="gr114" draw:text-style-name="P43" xml:id="id12" draw:id="id12" draw:layer="layout" svg:width="0.385cm" svg:height="0.672cm" svg:x="13.216cm" svg:y="8.97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41" draw:style-name="gr115" draw:text-style-name="P36" xml:id="id8" draw:id="id8" draw:layer="layout" svg:width="2.185cm" svg:height="1.351cm" svg:x="8.871cm" svg:y="2.963cm">
          <draw:text-box>
            <text:p text:style-name="P35"><text:span text:style-name="T7">ECMP</text:span></text:p>
            <text:p text:style-name="P35"><text:span text:style-name="T7">Groups</text:span></text:p>
          </draw:text-box>
        </draw:frame>
        <draw:connector draw:name="Straight Arrow Connector 143" draw:style-name="gr116" draw:text-style-name="P17" draw:layer="layout" draw:type="line" svg:x1="11.056cm" svg:y1="3.638cm" svg:x2="12.316cm" svg:y2="3.636cm" draw:start-shape="id8" draw:start-glue-point="1" draw:end-shape="id9" draw:end-glue-point="3" svg:d="M11056 3638l1260-2" svg:viewBox="0 0 1261 3">
          <text:p/>
        </draw:connector>
        <draw:connector draw:name="Straight Arrow Connector 145" draw:style-name="gr117" draw:text-style-name="P17" draw:layer="layout" draw:type="line" svg:x1="11.056cm" svg:y1="3.638cm" svg:x2="11.059cm" svg:y2="5.162cm" draw:start-shape="id8" draw:start-glue-point="1" draw:end-shape="id10" draw:end-glue-point="4" svg:d="M11056 3638l3 1524" svg:viewBox="0 0 4 1525">
          <text:p/>
        </draw:connector>
        <draw:custom-shape draw:name="Oval 150" draw:style-name="gr118" draw:text-style-name="P43" draw:layer="layout" svg:width="0.928cm" svg:height="0.369cm" svg:x="19.225cm" svg:y="3.60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1" draw:style-name="gr119" draw:text-style-name="P43" draw:layer="layout" svg:width="0.869cm" svg:height="0.329cm" svg:x="17.501cm" svg:y="3.61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2" draw:style-name="gr120" draw:text-style-name="P43" draw:layer="layout" svg:width="0.878cm" svg:height="0.269cm" svg:x="17.087cm" svg:y="3.31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3" draw:style-name="gr118" draw:text-style-name="P43" draw:layer="layout" svg:width="0.928cm" svg:height="0.369cm" svg:x="15.693cm" svg:y="3.3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4" draw:style-name="gr118" draw:text-style-name="P43" draw:layer="layout" svg:width="0.928cm" svg:height="0.369cm" svg:x="15.028cm" svg:y="3.68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5" draw:style-name="gr118" draw:text-style-name="P43" draw:layer="layout" svg:width="0.928cm" svg:height="0.369cm" svg:x="13.468cm" svg:y="3.57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58" draw:style-name="gr121" draw:text-style-name="P36" draw:layer="layout" svg:width="3.434cm" svg:height="1.351cm" svg:x="13.453cm" svg:y="11.704cm">
          <draw:text-box>
            <text:p text:style-name="P35"><text:span text:style-name="T7">Dual-Homed</text:span></text:p>
            <text:p text:style-name="P35"><text:span text:style-name="T7">Servers</text:span></text:p>
          </draw:text-box>
        </draw:frame>
        <draw:frame draw:name="TextBox 159" draw:style-name="gr122" draw:text-style-name="P44" xml:id="id11" draw:id="id11" draw:layer="layout" svg:width="3.759cm" svg:height="0.84cm" svg:x="9.18cm" svg:y="11.905cm">
          <draw:text-box>
            <text:p text:style-name="P35"><text:span text:style-name="T7">Link Bonding</text:span></text:p>
          </draw:text-box>
        </draw:frame>
        <draw:connector draw:name="Straight Arrow Connector 161" draw:style-name="gr123" draw:text-style-name="P17" draw:layer="layout" draw:type="line" svg:x1="11.059cm" svg:y1="11.905cm" svg:x2="13.272cm" svg:y2="9.545cm" draw:start-shape="id11" draw:start-glue-point="0" draw:end-shape="id12" draw:end-glue-point="5" svg:d="M11059 11905l2213-2360" svg:viewBox="0 0 2214 2361">
          <text:p/>
        </draw:connector>
        <draw:connector draw:name="Straight Arrow Connector 163" draw:style-name="gr124" draw:text-style-name="P17" draw:layer="layout" draw:type="line" svg:x1="11.059cm" svg:y1="11.905cm" svg:x2="13.211cm" svg:y2="11.036cm" draw:start-shape="id11" draw:start-glue-point="0" draw:end-shape="id13" draw:end-glue-point="5" svg:d="M11059 11905l2152-869" svg:viewBox="0 0 2153 870">
          <text:p/>
        </draw:connector>
        <draw:frame draw:name="TextBox 164" draw:style-name="gr125" draw:text-style-name="P36" draw:layer="layout" svg:width="3.103cm" svg:height="1.898cm" svg:x="15.234cm" svg:y="6.467cm">
          <draw:text-box>
            <text:p text:style-name="P35"><text:span text:style-name="T7">Paired</text:span></text:p>
            <text:p text:style-name="P35"><text:span text:style-name="T7">Leaves</text:span></text:p>
            <text:p text:style-name="P35"><text:span text:style-name="T7">(Dual ToRs)</text:span></text:p>
          </draw:text-box>
        </draw:frame>
        <draw:frame draw:style-name="gr1" draw:text-style-name="P1" draw:layer="layout" svg:width="1.604cm" svg:height="1.083cm" svg:x="18.858cm" svg:y="12.928cm">
          <draw:image xlink:href="Pictures/10000001000001F3000001510BDF560F.png" xlink:type="simple" xlink:show="embed" xlink:actuate="onLoad" draw:mime-type="image/png">
            <text:p/>
          </draw:image>
        </draw:frame>
        <draw:frame draw:style-name="gr1" draw:text-style-name="P1" draw:layer="layout" svg:width="1.604cm" svg:height="1.083cm" svg:x="21.49cm" svg:y="11.838cm">
          <draw:image xlink:href="Pictures/10000001000001F3000001510BDF560F.png" xlink:type="simple" xlink:show="embed" xlink:actuate="onLoad" draw:mime-type="image/png">
            <text:p/>
          </draw:image>
        </draw:frame>
        <presentation:notes draw:style-name="dp2">
          <draw:page-thumbnail draw:style-name="gr7" draw:layer="layout" svg:width="0.001cm" svg:height="0.001cm" svg:x="0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Blank" presentation:presentation-page-layout-name="AL2T1">
        <draw:custom-shape draw:name="Rectangle 7" draw:style-name="gr126" draw:text-style-name="P46" draw:layer="layout" svg:width="4.971cm" svg:height="2.975cm" svg:x="18.823cm" svg:y="6.892cm">
          <text:p text:style-name="P45"><text:span text:style-name="T13">Match: </text:span></text:p>
          <text:p text:style-name="P45"><text:span text:style-name="T13">DST_IP <text:s/>= 10.0.2.1/32</text:span></text:p>
          <draw:enhanced-geometry svg:viewBox="0 0 21600 21600" draw:type="non-primitive" draw:enhanced-path="M 0 0 L 21600 0 21600 21600 0 21600 Z N"/>
        </draw:custom-shape>
        <draw:custom-shape draw:name="Rectangle 2" draw:style-name="gr126" draw:text-style-name="P46" draw:layer="layout" svg:width="4.971cm" svg:height="2.975cm" svg:x="8.203cm" svg:y="6.892cm">
          <text:p text:style-name="P45"><text:span text:style-name="T13">Match: </text:span></text:p>
          <text:p text:style-name="P45"><text:span text:style-name="T13">DST_IP <text:s/>= 10.0.2.0/24</text:span></text:p>
          <draw:enhanced-geometry svg:viewBox="0 0 21600 21600" draw:type="non-primitive" draw:enhanced-path="M 0 0 L 21600 0 21600 21600 0 21600 Z N"/>
        </draw:custom-shape>
        <draw:custom-shape draw:name="Rectangle 5" draw:style-name="gr126" draw:text-style-name="P46" xml:id="id15" draw:id="id15" draw:layer="layout" svg:width="4.971cm" svg:height="2.975cm" svg:x="7.903cm" svg:y="6.592cm">
          <text:p text:style-name="P45"><text:span text:style-name="T13">Match: </text:span></text:p>
          <text:p text:style-name="P45"><text:span text:style-name="T13">DST_IP <text:s/>= 10.0.2.0/24</text:span></text:p>
          <draw:enhanced-geometry svg:viewBox="0 0 21600 21600" draw:type="non-primitive" draw:enhanced-path="M 0 0 L 21600 0 21600 21600 0 21600 Z N"/>
        </draw:custom-shape>
        <draw:custom-shape draw:name="Rectangle 6" draw:style-name="gr126" draw:text-style-name="P46" xml:id="id17" draw:id="id17" draw:layer="layout" svg:width="4.971cm" svg:height="2.975cm" svg:x="18.523cm" svg:y="6.592cm">
          <text:p text:style-name="P45"><text:span text:style-name="T13">Match: </text:span></text:p>
          <text:p text:style-name="P45"><text:span text:style-name="T13">DST_IP <text:s/>= 10.0.2.1/32</text:span></text:p>
          <draw:enhanced-geometry svg:viewBox="0 0 21600 21600" draw:type="non-primitive" draw:enhanced-path="M 0 0 L 21600 0 21600 21600 0 21600 Z N"/>
        </draw:custom-shape>
        <draw:custom-shape draw:name="Oval 7" draw:style-name="gr127" draw:text-style-name="P47" xml:id="id19" draw:id="id19" draw:layer="layout" svg:width="4.971cm" svg:height="3.012cm" svg:x="7.903cm" svg:y="11.805cm">
          <text:p text:style-name="P45"><text:span text:style-name="T14">10.0.1.1/2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127" draw:text-style-name="P47" xml:id="id18" draw:id="id18" draw:layer="layout" svg:width="4.971cm" svg:height="3.012cm" svg:x="18.523cm" svg:y="11.805cm">
          <text:p text:style-name="P45"><text:span text:style-name="T14">10.0.2.1/2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0" draw:style-name="gr71" draw:text-style-name="P17" draw:layer="layout" draw:type="line" svg:x1="10.388cm" svg:y1="4.354cm" svg:x2="10.388cm" svg:y2="6.592cm" draw:start-shape="id14" draw:start-glue-point="2" draw:end-shape="id15" draw:end-glue-point="0" svg:d="M10388 4354v2238" svg:viewBox="0 0 1 2239">
          <text:p/>
        </draw:connector>
        <draw:connector draw:name="Straight Connector 11" draw:style-name="gr71" draw:text-style-name="P17" draw:layer="layout" draw:type="line" svg:x1="21.008cm" svg:y1="4.354cm" svg:x2="21.008cm" svg:y2="6.592cm" draw:start-shape="id16" draw:start-glue-point="2" draw:end-shape="id17" draw:end-glue-point="0" svg:d="M21008 4354v2238" svg:viewBox="0 0 1 2239">
          <text:p/>
        </draw:connector>
        <draw:connector draw:name="Straight Connector 14" draw:style-name="gr71" draw:text-style-name="P17" draw:layer="layout" draw:type="line" svg:x1="21.008cm" svg:y1="9.567cm" svg:x2="21.008cm" svg:y2="11.805cm" draw:start-shape="id17" draw:start-glue-point="2" draw:end-shape="id18" draw:end-glue-point="0" svg:d="M21008 9567v2238" svg:viewBox="0 0 1 2239">
          <text:p/>
        </draw:connector>
        <draw:connector draw:name="Straight Connector 17" draw:style-name="gr71" draw:text-style-name="P17" draw:layer="layout" draw:type="line" svg:x1="10.388cm" svg:y1="9.567cm" svg:x2="10.388cm" svg:y2="11.805cm" draw:start-shape="id15" draw:start-glue-point="2" draw:end-shape="id19" draw:end-glue-point="0" svg:d="M10388 9567v2238" svg:viewBox="0 0 1 2239">
          <text:p/>
        </draw:connector>
        <draw:connector draw:name="Straight Connector 9" draw:style-name="gr71" draw:text-style-name="P17" draw:layer="layout" draw:type="line" svg:x1="19.732cm" svg:y1="4.306cm" svg:x2="11.604cm" svg:y2="6.592cm" svg:d="M19732 4306l-8128 2286" svg:viewBox="0 0 8129 2287">
          <text:p/>
        </draw:connector>
        <draw:connector draw:name="Straight Connector 12" draw:style-name="gr71" draw:text-style-name="P17" draw:layer="layout" draw:type="line" svg:x1="19.732cm" svg:y1="6.592cm" svg:x2="11.698cm" svg:y2="4.33cm" svg:d="M19732 6592l-8034-2262" svg:viewBox="0 0 8035 2263">
          <text:p/>
        </draw:connector>
        <draw:frame draw:name="TextBox 26" draw:style-name="gr128" draw:text-style-name="P48" draw:layer="layout" svg:width="2.077cm" svg:height="1.795cm" svg:x="5.826cm" svg:y="7.182cm">
          <draw:text-box>
            <text:p text:style-name="P24"><text:span text:style-name="T9">Leaf 1</text:span></text:p>
            <text:p text:style-name="P24"><text:span text:style-name="T9">(101)</text:span></text:p>
          </draw:text-box>
        </draw:frame>
        <draw:frame draw:name="TextBox 27" draw:style-name="gr129" draw:text-style-name="P48" draw:layer="layout" svg:width="2.423cm" svg:height="1.795cm" svg:x="5.48cm" svg:y="1.969cm">
          <draw:text-box>
            <text:p text:style-name="P24"><text:span text:style-name="T9">Spine 1</text:span></text:p>
            <text:p text:style-name="P24"><text:span text:style-name="T9">(103)</text:span></text:p>
          </draw:text-box>
        </draw:frame>
        <draw:frame draw:name="TextBox 28" draw:style-name="gr129" draw:text-style-name="P48" draw:layer="layout" svg:width="2.423cm" svg:height="1.795cm" svg:x="23.458cm" svg:y="1.969cm">
          <draw:text-box>
            <text:p text:style-name="P24"><text:span text:style-name="T9">Spine 2</text:span></text:p>
            <text:p text:style-name="P24"><text:span text:style-name="T9">(104)</text:span></text:p>
          </draw:text-box>
        </draw:frame>
        <draw:frame draw:name="TextBox 29" draw:style-name="gr128" draw:text-style-name="P48" draw:layer="layout" svg:width="2.077cm" svg:height="1.795cm" svg:x="23.722cm" svg:y="7.182cm">
          <draw:text-box>
            <text:p text:style-name="P24"><text:span text:style-name="T9">Leaf 2</text:span></text:p>
            <text:p text:style-name="P24"><text:span text:style-name="T9">(102)</text:span></text:p>
          </draw:text-box>
        </draw:frame>
        <draw:connector draw:name="Straight Arrow Connector 38" draw:style-name="gr130" draw:text-style-name="P17" draw:layer="layout" draw:type="line" svg:x1="10.842cm" svg:y1="11.539cm" svg:x2="10.842cm" svg:y2="9.869cm" svg:d="M10842 11539v-1670" svg:viewBox="0 0 1 1671">
          <text:p/>
        </draw:connector>
        <draw:frame draw:name="TextBox 39" draw:style-name="gr131" draw:text-style-name="P49" draw:layer="layout" svg:width="1.003cm" svg:height="1.026cm" svg:x="10.733cm" svg:y="10.264cm">
          <draw:text-box>
            <text:p text:style-name="P20"><text:span text:style-name="T15">IP</text:span></text:p>
          </draw:text-box>
        </draw:frame>
        <draw:connector draw:name="Straight Arrow Connector 40" draw:style-name="gr132" draw:text-style-name="P17" draw:layer="layout" draw:type="line" svg:x1="21.389cm" svg:y1="11.526cm" svg:x2="21.389cm" svg:y2="9.857cm" svg:d="M21389 11526v-1669" svg:viewBox="0 0 1 1670">
          <text:p/>
        </draw:connector>
        <draw:frame draw:name="TextBox 41" draw:style-name="gr131" draw:text-style-name="P49" draw:layer="layout" svg:width="1.003cm" svg:height="1.026cm" svg:x="21.281cm" svg:y="10.251cm">
          <draw:text-box>
            <text:p text:style-name="P20"><text:span text:style-name="T15">IP</text:span></text:p>
          </draw:text-box>
        </draw:frame>
        <draw:custom-shape draw:name="Rectangle 4" draw:style-name="gr126" draw:text-style-name="P46" xml:id="id16" draw:id="id16" draw:layer="layout" svg:width="4.971cm" svg:height="2.975cm" svg:x="18.523cm" svg:y="1.379cm">
          <text:p text:style-name="P45"><text:span text:style-name="T13">Match:</text:span></text:p>
          <text:p text:style-name="P45"><text:span text:style-name="T13">Label = 102</text:span></text:p>
          <draw:enhanced-geometry svg:viewBox="0 0 21600 21600" draw:type="non-primitive" draw:enhanced-path="M 0 0 L 21600 0 21600 21600 0 21600 Z N"/>
        </draw:custom-shape>
        <draw:connector draw:name="Straight Arrow Connector 5" draw:style-name="gr133" draw:text-style-name="P17" draw:layer="layout" draw:type="line" svg:x1="10.842cm" svg:y1="6.313cm" svg:x2="10.842cm" svg:y2="4.644cm" svg:d="M10842 6313v-1669" svg:viewBox="0 0 1 1670">
          <text:p/>
        </draw:connector>
        <draw:connector draw:name="Straight Arrow Connector 51" draw:style-name="gr134" draw:text-style-name="P17" draw:layer="layout" draw:type="line" svg:x1="11.235cm" svg:y1="6.313cm" svg:x2="18.523cm" svg:y2="4.306cm" svg:d="M11235 6313l7288-2007" svg:viewBox="0 0 7289 2008">
          <text:p/>
        </draw:connector>
        <draw:frame draw:name="TextBox 53" draw:style-name="gr135" draw:text-style-name="P51" draw:layer="layout" svg:width="1.769cm" svg:height="1.488cm" svg:x="10.77cm" svg:y="4.799cm">
          <draw:text-box>
            <text:p text:style-name="P50"><text:span text:style-name="T15">Push</text:span></text:p>
            <text:p text:style-name="P50"><text:span text:style-name="T15">102</text:span></text:p>
          </draw:text-box>
        </draw:frame>
        <draw:connector draw:name="Straight Arrow Connector 55" draw:style-name="gr136" draw:text-style-name="P17" draw:layer="layout" draw:type="line" svg:x1="12.642cm" svg:y1="4.136cm" svg:x2="19.757cm" svg:y2="6.192cm" draw:end-shape="id20" draw:end-glue-point="3" svg:d="M12642 4136l7115 2056" svg:viewBox="0 0 7116 2057">
          <text:p/>
        </draw:connector>
        <draw:frame draw:name="TextBox 56" draw:style-name="gr131" draw:text-style-name="P49" xml:id="id20" draw:id="id20" draw:layer="layout" svg:width="1.003cm" svg:height="1.026cm" svg:x="19.757cm" svg:y="5.679cm">
          <draw:text-box>
            <text:p text:style-name="P20"><text:span text:style-name="T15">IP</text:span></text:p>
          </draw:text-box>
        </draw:frame>
        <draw:custom-shape draw:name="Rectangle 1" draw:style-name="gr126" draw:text-style-name="P46" xml:id="id14" draw:id="id14" draw:layer="layout" svg:width="4.971cm" svg:height="2.975cm" svg:x="7.903cm" svg:y="1.379cm">
          <text:p text:style-name="P45"><text:span text:style-name="T13">Match:</text:span></text:p>
          <text:p text:style-name="P45"><text:span text:style-name="T13">Label = 102</text:span></text:p>
          <draw:enhanced-geometry svg:viewBox="0 0 21600 21600" draw:type="non-primitive" draw:enhanced-path="M 0 0 L 21600 0 21600 21600 0 21600 Z N"/>
        </draw:custom-shape>
        <draw:connector draw:name="Straight Arrow Connector 59" draw:style-name="gr137" draw:text-style-name="P17" draw:layer="layout" draw:type="line" svg:x1="21.414cm" svg:y1="6.326cm" svg:x2="21.414cm" svg:y2="4.656cm" svg:d="M21414 6326v-1670" svg:viewBox="0 0 1 1671">
          <text:p/>
        </draw:connector>
        <draw:frame draw:name="TextBox 60" draw:style-name="gr131" draw:text-style-name="P49" draw:layer="layout" svg:width="1.003cm" svg:height="1.026cm" svg:x="21.341cm" svg:y="5.667cm">
          <draw:text-box>
            <text:p text:style-name="P20"><text:span text:style-name="T15">IP</text:span></text:p>
          </draw:text-box>
        </draw:frame>
        <draw:frame draw:name="TextBox 61" draw:style-name="gr138" draw:text-style-name="P51" draw:layer="layout" svg:width="3.038cm" svg:height="0.872cm" svg:x="12.732cm" svg:y="3.446cm">
          <draw:text-box>
            <text:p text:style-name="P50"><text:span text:style-name="T15">Pop</text:span><text:span text:style-name="T16"> </text:span><text:span text:style-name="T15">Label</text:span></text:p>
          </draw:text-box>
        </draw:frame>
        <draw:frame draw:name="TextBox 62" draw:style-name="gr138" draw:text-style-name="P51" draw:layer="layout" svg:width="3.038cm" svg:height="0.872cm" svg:x="21.327cm" svg:y="4.338cm">
          <draw:text-box>
            <text:p text:style-name="P50"><text:span text:style-name="T15">Pop</text:span><text:span text:style-name="T16"> </text:span><text:span text:style-name="T15">Label</text:span></text:p>
          </draw:text-box>
        </draw:frame>
        <draw:frame draw:name="TextBox 64" draw:style-name="gr139" draw:text-style-name="P48" draw:layer="layout" svg:width="2.18cm" svg:height="1.026cm" svg:x="5.695cm" svg:y="12.798cm">
          <draw:text-box>
            <text:p text:style-name="P24"><text:span text:style-name="T9">Host 1</text:span></text:p>
          </draw:text-box>
        </draw:frame>
        <draw:frame draw:name="TextBox 65" draw:style-name="gr139" draw:text-style-name="P48" draw:layer="layout" svg:width="2.18cm" svg:height="1.026cm" svg:x="23.522cm" svg:y="12.798cm">
          <draw:text-box>
            <text:p text:style-name="P24"><text:span text:style-name="T9">Host 2</text:span></text:p>
          </draw:text-box>
        </draw:frame>
        <presentation:notes draw:style-name="dp2">
          <draw:page-thumbnail draw:style-name="gr7" draw:layer="layout" svg:width="0.001cm" svg:height="0.001cm" svg:x="0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Blank" presentation:presentation-page-layout-name="AL2T1">
        <draw:g draw:style-name="gr12">
          <draw:custom-shape draw:name="Oval 4" draw:style-name="gr140" draw:text-style-name="P53" xml:id="id21" draw:id="id21" draw:layer="layout" svg:width="2.15cm" svg:height="1.271cm" svg:x="0.685cm" svg:y="1.627cm">
            <text:p text:style-name="P52"><text:span text:style-name="T11">Phy</text:span></text:p>
            <text:p text:style-name="P52"><text:span text:style-name="T11">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Rounded Rectangle 5" draw:style-name="gr141" draw:text-style-name="P53" xml:id="id22" draw:id="id22" draw:layer="layout" svg:width="2.122cm" svg:height="2.772cm" svg:x="0.699cm" svg:y="3.561cm">
            <text:p text:style-name="P52"><text:span text:style-name="T17">Ingress</text:span></text:p>
            <text:p text:style-name="P52"><text:span text:style-name="T11">Port</text:span></text:p>
            <text:p text:style-name="P52"><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6" draw:style-name="gr141" draw:text-style-name="P53" xml:id="id23" draw:id="id23" draw:layer="layout" svg:width="2.122cm" svg:height="2.772cm" svg:x="0.699cm" svg:y="6.997cm">
            <text:p text:style-name="P52"><text:span text:style-name="T11">VLAN</text:span></text:p>
            <text:p text:style-name="P52"><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7" draw:style-name="gr142" draw:text-style-name="P53" xml:id="id25" draw:id="id25" draw:layer="layout" svg:width="2.125cm" svg:height="2.772cm" svg:x="3.355cm" svg:y="6.997cm">
            <text:p text:style-name="P52"><text:span text:style-name="T11">Termin-ation MAC</text:span></text:p>
            <text:p text:style-name="P52"><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8" draw:style-name="gr143" draw:text-style-name="P53" xml:id="id26" draw:id="id26" draw:layer="layout" svg:width="2.166cm" svg:height="2.248cm" svg:x="3.36cm" svg:y="10.438cm">
            <text:p text:style-name="P52"><text:span text:style-name="T11">MPLS</text:span></text:p>
            <text:p text:style-name="P52"><text:span text:style-name="T11">L2 Port</text:span></text:p>
            <text:p text:style-name="P52"><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9" draw:style-name="gr144" draw:text-style-name="P53" xml:id="id24" draw:id="id24" draw:layer="layout" svg:width="2.32cm" svg:height="2.248cm" svg:x="0.6cm" svg:y="10.438cm">
            <text:p text:style-name="P52"><text:span text:style-name="T11">VLAN 1</text:span></text:p>
            <text:p text:style-name="P52"><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0" draw:style-name="gr145" draw:text-style-name="P53" xml:id="id30" draw:id="id30" draw:layer="layout" svg:width="2.724cm" svg:height="2.019cm" svg:x="6.505cm" svg:y="13.034cm">
            <text:p text:style-name="P52"><text:span text:style-name="T11">Bridg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1" draw:style-name="gr145" draw:text-style-name="P53" xml:id="id29" draw:id="id29" draw:layer="layout" svg:width="2.724cm" svg:height="2.019cm" svg:x="6.505cm" svg:y="9.601cm">
            <text:p text:style-name="P52"><text:span text:style-name="T11">MPLS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2" draw:style-name="gr145" draw:text-style-name="P53" xml:id="id28" draw:id="id28" draw:layer="layout" svg:width="2.724cm" svg:height="2.019cm" svg:x="6.505cm" svg:y="5.669cm">
            <text:p text:style-name="P52"><text:span text:style-name="T11">Unicast Rout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3" draw:style-name="gr146" draw:text-style-name="P53" xml:id="id27" draw:id="id27" draw:layer="layout" svg:width="2.724cm" svg:height="2.02cm" svg:x="6.505cm" svg:y="2.12cm">
            <text:p text:style-name="P52"><text:span text:style-name="T11">Multicast</text:span></text:p>
            <text:p text:style-name="P52"><text:span text:style-name="T11">Rout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4" draw:style-name="gr147" draw:text-style-name="P53" xml:id="id31" draw:id="id31" draw:layer="layout" svg:width="2.123cm" svg:height="2.772cm" svg:x="9.998cm" svg:y="7.204cm">
            <text:p text:style-name="P52"><text:span text:style-name="T11">ACL Policy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9" draw:style-name="gr148" draw:text-style-name="P53" xml:id="id40" draw:id="id40" draw:layer="layout" svg:width="2.725cm" svg:height="1.905cm" svg:x="13.138cm" svg:y="9.603cm">
            <text:p text:style-name="P52"><text:span text:style-name="T11">L2 Flood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0" draw:style-name="gr149" draw:text-style-name="P53" xml:id="id39" draw:id="id39" draw:layer="layout" svg:width="2.723cm" svg:height="1.905cm" svg:x="13.135cm" svg:y="5.826cm">
            <text:p text:style-name="P52"><text:span text:style-name="T11">L3 Unicast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2" draw:style-name="gr149" draw:text-style-name="P53" xml:id="id36" draw:id="id36" draw:layer="layout" svg:width="2.723cm" svg:height="1.905cm" svg:x="13.135cm" svg:y="2.551cm">
            <text:p text:style-name="P52"><text:span text:style-name="T11">L3 ECMP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3" draw:style-name="gr150" draw:text-style-name="P53" xml:id="id37" draw:id="id37" draw:layer="layout" svg:width="2.724cm" svg:height="1.903cm" svg:x="16.454cm" svg:y="1.427cm">
            <text:p text:style-name="P52"><text:span text:style-name="T11">MPLS Label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4" draw:style-name="gr151" draw:text-style-name="P53" xml:id="id38" draw:id="id38" draw:layer="layout" svg:width="2.724cm" svg:height="1.905cm" svg:x="16.454cm" svg:y="3.619cm">
            <text:p text:style-name="P52"><text:span text:style-name="T11">MPLS Label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5" draw:style-name="gr152" draw:text-style-name="P53" xml:id="id32" draw:id="id32" draw:layer="layout" svg:width="2.723cm" svg:height="1.904cm" svg:x="21.091cm" svg:y="7.645cm">
            <text:p text:style-name="P52"><text:span text:style-name="T11">L2 Interface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6" draw:style-name="gr152" draw:text-style-name="P53" xml:id="id34" draw:id="id34" draw:layer="layout" svg:width="2.723cm" svg:height="1.904cm" svg:x="21.091cm" svg:y="9.948cm">
            <text:p text:style-name="P52"><text:span text:style-name="T11">L2 Interface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7" draw:style-name="gr153" draw:text-style-name="P53" xml:id="id41" draw:id="id41" draw:layer="layout" svg:width="2.723cm" svg:height="1.906cm" svg:x="13.135cm" svg:y="12.805cm">
            <text:p text:style-name="P52"><text:span text:style-name="T11">L3 Multicast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Oval 28" draw:style-name="gr140" draw:text-style-name="P53" xml:id="id33" draw:id="id33" draw:layer="layout" svg:width="2.15cm" svg:height="1.271cm" svg:x="24.254cm" svg:y="7.962cm">
            <text:p text:style-name="P52"><text:span text:style-name="T11">Phy 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9" draw:style-name="gr154" draw:text-style-name="P53" xml:id="id35" draw:id="id35" draw:layer="layout" svg:width="2.151cm" svg:height="1.271cm" svg:x="24.239cm" svg:y="10.264cm">
            <text:p text:style-name="P52"><text:span text:style-name="T11">Phy 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32" draw:style-name="gr155" draw:text-style-name="P55" draw:layer="layout" svg:width="2.397cm" svg:height="0.789cm" svg:x="21.339cm" svg:y="6.866cm">
            <draw:text-box>
              <text:p text:style-name="P54"><text:span text:style-name="T11">INDIRECT</text:span></text:p>
            </draw:text-box>
          </draw:frame>
          <draw:frame draw:name="TextBox 1" draw:style-name="gr155" draw:text-style-name="P55" draw:layer="layout" svg:width="2.397cm" svg:height="0.789cm" svg:x="16.703cm" svg:y="0.658cm">
            <draw:text-box>
              <text:p text:style-name="P54"><text:span text:style-name="T11">INDIRECT</text:span></text:p>
            </draw:text-box>
          </draw:frame>
          <draw:frame draw:name="TextBox 2" draw:style-name="gr156" draw:text-style-name="P55" draw:layer="layout" svg:width="1.932cm" svg:height="0.789cm" svg:x="13.598cm" svg:y="1.785cm">
            <draw:text-box>
              <text:p text:style-name="P54"><text:span text:style-name="T11">SELECT</text:span></text:p>
            </draw:text-box>
          </draw:frame>
          <draw:frame draw:name="TextBox 3" draw:style-name="gr155" draw:text-style-name="P55" draw:layer="layout" svg:width="2.397cm" svg:height="0.789cm" svg:x="13.382cm" svg:y="5.037cm">
            <draw:text-box>
              <text:p text:style-name="P54"><text:span text:style-name="T11">INDIRECT</text:span></text:p>
            </draw:text-box>
          </draw:frame>
          <draw:frame draw:name="TextBox 36" draw:style-name="gr157" draw:text-style-name="P55" draw:layer="layout" svg:width="1.213cm" svg:height="0.789cm" svg:x="13.933cm" svg:y="8.827cm">
            <draw:text-box>
              <text:p text:style-name="P54"><text:span text:style-name="T11">ALL</text:span></text:p>
            </draw:text-box>
          </draw:frame>
          <draw:frame draw:name="TextBox 37" draw:style-name="gr157" draw:text-style-name="P55" draw:layer="layout" svg:width="1.213cm" svg:height="0.789cm" svg:x="13.933cm" svg:y="12.033cm">
            <draw:text-box>
              <text:p text:style-name="P54"><text:span text:style-name="T11">ALL</text:span></text:p>
            </draw:text-box>
          </draw:frame>
          <draw:connector draw:name="Straight Arrow Connector 39" draw:style-name="gr158" draw:text-style-name="P17" draw:layer="layout" draw:type="line" svg:x1="1.76cm" svg:y1="2.898cm" svg:x2="1.76cm" svg:y2="3.561cm" draw:start-shape="id21" draw:start-glue-point="2" draw:end-shape="id22" draw:end-glue-point="0" svg:d="M1760 2898v663" svg:viewBox="0 0 1 664">
            <text:p/>
          </draw:connector>
          <draw:connector draw:name="Straight Arrow Connector 42" draw:style-name="gr159" draw:text-style-name="P17" draw:layer="layout" draw:type="line" svg:x1="1.76cm" svg:y1="6.333cm" svg:x2="1.76cm" svg:y2="6.997cm" draw:start-shape="id22" draw:start-glue-point="2" draw:end-shape="id23" draw:end-glue-point="0" svg:d="M1760 6333v664" svg:viewBox="0 0 1 665">
            <text:p/>
          </draw:connector>
          <draw:connector draw:name="Straight Arrow Connector 45" draw:style-name="gr160" draw:text-style-name="P17" draw:layer="layout" draw:type="line" svg:x1="1.76cm" svg:y1="9.769cm" svg:x2="1.76cm" svg:y2="10.438cm" draw:start-shape="id23" draw:start-glue-point="2" draw:end-shape="id24" draw:end-glue-point="0" svg:d="M1760 9769v669" svg:viewBox="0 0 1 670">
            <text:p/>
          </draw:connector>
          <draw:connector draw:name="Straight Arrow Connector 49" draw:style-name="gr161" draw:text-style-name="P17" draw:layer="layout" draw:type="line" svg:x1="2.821cm" svg:y1="8.383cm" svg:x2="3.355cm" svg:y2="8.383cm" draw:start-shape="id23" draw:start-glue-point="1" draw:end-shape="id25" draw:end-glue-point="3" svg:d="M2821 8383h534" svg:viewBox="0 0 535 1">
            <text:p/>
          </draw:connector>
          <draw:connector draw:name="Straight Arrow Connector 50" draw:style-name="gr162" draw:text-style-name="P17" draw:layer="layout" draw:type="line" svg:x1="2.92cm" svg:y1="11.562cm" svg:x2="3.36cm" svg:y2="11.562cm" draw:start-shape="id24" draw:start-glue-point="1" draw:end-shape="id26" draw:end-glue-point="3" svg:d="M2920 11562h440" svg:viewBox="0 0 441 1">
            <text:p/>
          </draw:connector>
          <draw:connector draw:name="Straight Arrow Connector 53" draw:style-name="gr163" draw:text-style-name="P17" draw:layer="layout" draw:type="line" svg:x1="5.48cm" svg:y1="8.383cm" svg:x2="6.505cm" svg:y2="3.13cm" draw:start-shape="id25" draw:start-glue-point="1" draw:end-shape="id27" draw:end-glue-point="3" svg:d="M5480 8383l1025-5253" svg:viewBox="0 0 1026 5254">
            <text:p/>
          </draw:connector>
          <draw:connector draw:name="Straight Arrow Connector 57" draw:style-name="gr164" draw:text-style-name="P17" draw:layer="layout" draw:type="line" svg:x1="5.48cm" svg:y1="8.383cm" svg:x2="6.505cm" svg:y2="6.678cm" draw:start-shape="id25" draw:start-glue-point="1" draw:end-shape="id28" draw:end-glue-point="3" svg:d="M5480 8383l1025-1705" svg:viewBox="0 0 1026 1706">
            <text:p/>
          </draw:connector>
          <draw:connector draw:name="Straight Arrow Connector 60" draw:style-name="gr165" draw:text-style-name="P17" draw:layer="layout" draw:type="line" svg:x1="5.48cm" svg:y1="8.383cm" svg:x2="6.505cm" svg:y2="10.61cm" draw:start-shape="id25" draw:start-glue-point="1" draw:end-shape="id29" draw:end-glue-point="3" svg:d="M5480 8383l1025 2227" svg:viewBox="0 0 1026 2228">
            <text:p/>
          </draw:connector>
          <draw:connector draw:name="Straight Arrow Connector 1" draw:style-name="gr166" draw:text-style-name="P17" draw:layer="layout" draw:type="line" svg:x1="5.48cm" svg:y1="8.383cm" svg:x2="6.505cm" svg:y2="14.043cm" draw:start-shape="id25" draw:start-glue-point="1" draw:end-shape="id30" draw:end-glue-point="3" svg:d="M5480 8383l1025 5660" svg:viewBox="0 0 1026 5661">
            <text:p/>
          </draw:connector>
          <draw:connector draw:name="Straight Arrow Connector 66" draw:style-name="gr167" draw:text-style-name="P17" draw:layer="layout" draw:type="line" svg:x1="6.505cm" svg:y1="8.59cm" svg:x2="9.998cm" svg:y2="8.59cm" draw:end-shape="id31" draw:end-glue-point="3" svg:d="M6505 8590h3493" svg:viewBox="0 0 3494 1">
            <text:p/>
          </draw:connector>
          <draw:connector draw:name="Straight Connector 71" draw:style-name="gr168" draw:text-style-name="P17" draw:layer="layout" draw:type="line" svg:x1="5.526cm" svg:y1="11.562cm" svg:x2="6.505cm" svg:y2="8.59cm" draw:start-shape="id26" draw:start-glue-point="1" svg:d="M5526 11562l979-2972" svg:viewBox="0 0 980 2973">
            <text:p/>
          </draw:connector>
          <draw:connector draw:name="Straight Arrow Connector 72" draw:style-name="gr169" draw:text-style-name="P17" draw:layer="layout" draw:type="line" svg:x1="9.229cm" svg:y1="6.678cm" svg:x2="9.998cm" svg:y2="8.59cm" draw:start-shape="id28" draw:start-glue-point="1" draw:end-shape="id31" draw:end-glue-point="3" svg:d="M9229 6678l769 1912" svg:viewBox="0 0 770 1913">
            <text:p/>
          </draw:connector>
          <draw:connector draw:name="Straight Arrow Connector 2" draw:style-name="gr170" draw:text-style-name="P17" draw:layer="layout" draw:type="line" svg:x1="9.229cm" svg:y1="3.13cm" svg:x2="9.998cm" svg:y2="8.59cm" draw:start-shape="id27" draw:start-glue-point="1" draw:end-shape="id31" draw:end-glue-point="3" svg:d="M9229 3130l769 5460" svg:viewBox="0 0 770 5461">
            <text:p/>
          </draw:connector>
          <draw:connector draw:name="Straight Arrow Connector 78" draw:style-name="gr171" draw:text-style-name="P17" draw:layer="layout" draw:type="line" svg:x1="9.229cm" svg:y1="10.61cm" svg:x2="9.998cm" svg:y2="8.59cm" draw:start-shape="id29" draw:start-glue-point="1" draw:end-shape="id31" draw:end-glue-point="3" svg:d="M9229 10610l769-2020" svg:viewBox="0 0 770 2021">
            <text:p/>
          </draw:connector>
          <draw:connector draw:name="Straight Arrow Connector 81" draw:style-name="gr172" draw:text-style-name="P17" draw:layer="layout" draw:type="line" svg:x1="9.229cm" svg:y1="14.043cm" svg:x2="9.998cm" svg:y2="8.59cm" draw:start-shape="id30" draw:start-glue-point="1" draw:end-shape="id31" draw:end-glue-point="3" svg:d="M9229 14043l769-5453" svg:viewBox="0 0 770 5454">
            <text:p/>
          </draw:connector>
          <draw:connector draw:name="Straight Arrow Connector 84" draw:style-name="gr173" draw:text-style-name="P17" draw:layer="layout" draw:type="line" svg:x1="23.814cm" svg:y1="8.597cm" svg:x2="24.254cm" svg:y2="8.597cm" draw:start-shape="id32" draw:start-glue-point="1" draw:end-shape="id33" draw:end-glue-point="3" svg:d="M23814 8597h440" svg:viewBox="0 0 441 1">
            <text:p/>
          </draw:connector>
          <draw:connector draw:name="Straight Arrow Connector 89" draw:style-name="gr174" draw:text-style-name="P17" draw:layer="layout" draw:type="line" svg:x1="23.814cm" svg:y1="10.9cm" svg:x2="24.239cm" svg:y2="10.899cm" draw:start-shape="id34" draw:start-glue-point="1" draw:end-shape="id35" draw:end-glue-point="3" svg:d="M23814 10900l425-1" svg:viewBox="0 0 426 2">
            <text:p/>
          </draw:connector>
          <draw:connector draw:name="Straight Arrow Connector 92" draw:style-name="gr175" draw:text-style-name="P17" draw:layer="layout" draw:type="line" svg:x1="15.858cm" svg:y1="3.503cm" svg:x2="16.454cm" svg:y2="2.378cm" draw:start-shape="id36" draw:start-glue-point="1" draw:end-shape="id37" draw:end-glue-point="3" svg:d="M15858 3503l596-1125" svg:viewBox="0 0 597 1126">
            <text:p/>
          </draw:connector>
          <draw:connector draw:name="Straight Arrow Connector 95" draw:style-name="gr176" draw:text-style-name="P17" draw:layer="layout" draw:type="line" svg:x1="15.858cm" svg:y1="3.503cm" svg:x2="16.454cm" svg:y2="4.571cm" draw:start-shape="id36" draw:start-glue-point="1" draw:end-shape="id38" draw:end-glue-point="3" svg:d="M15858 3503l596 1068" svg:viewBox="0 0 597 1069">
            <text:p/>
          </draw:connector>
          <draw:connector draw:name="Straight Arrow Connector 3" draw:style-name="gr177" draw:text-style-name="P17" draw:layer="layout" draw:type="line" svg:x1="12.121cm" svg:y1="8.59cm" svg:x2="13.135cm" svg:y2="3.503cm" draw:start-shape="id31" draw:start-glue-point="1" draw:end-shape="id36" draw:end-glue-point="3" svg:d="M12121 8590l1014-5087" svg:viewBox="0 0 1015 5088">
            <text:p/>
          </draw:connector>
          <draw:connector draw:name="Straight Arrow Connector 101" draw:style-name="gr178" draw:text-style-name="P17" draw:layer="layout" draw:type="line" svg:x1="12.121cm" svg:y1="8.59cm" svg:x2="13.135cm" svg:y2="6.778cm" draw:start-shape="id31" draw:start-glue-point="1" draw:end-shape="id39" draw:end-glue-point="3" svg:d="M12121 8590l1014-1812" svg:viewBox="0 0 1015 1813">
            <text:p/>
          </draw:connector>
          <draw:connector draw:name="Straight Arrow Connector 104" draw:style-name="gr179" draw:text-style-name="P17" draw:layer="layout" draw:type="line" svg:x1="12.121cm" svg:y1="8.59cm" svg:x2="13.138cm" svg:y2="10.555cm" draw:start-shape="id31" draw:start-glue-point="1" draw:end-shape="id40" draw:end-glue-point="3" svg:d="M12121 8590l1017 1965" svg:viewBox="0 0 1018 1966">
            <text:p/>
          </draw:connector>
          <draw:connector draw:name="Straight Arrow Connector 4" draw:style-name="gr180" draw:text-style-name="P17" draw:layer="layout" draw:type="line" svg:x1="12.121cm" svg:y1="8.59cm" svg:x2="13.135cm" svg:y2="13.758cm" draw:start-shape="id31" draw:start-glue-point="1" draw:end-shape="id41" draw:end-glue-point="3" svg:d="M12121 8590l1014 5168" svg:viewBox="0 0 1015 5169">
            <text:p/>
          </draw:connector>
          <draw:connector draw:name="Straight Arrow Connector 111" draw:style-name="gr181" draw:text-style-name="P17" draw:layer="layout" draw:type="line" svg:x1="12.121cm" svg:y1="8.59cm" svg:x2="21.091cm" svg:y2="8.597cm" draw:start-shape="id31" draw:start-glue-point="1" draw:end-shape="id32" draw:end-glue-point="3" svg:d="M12121 8590l8970 7" svg:viewBox="0 0 8971 8">
            <text:p/>
          </draw:connector>
          <draw:connector draw:name="Straight Arrow Connector 114" draw:style-name="gr182" draw:text-style-name="P17" draw:layer="layout" draw:type="line" svg:x1="15.858cm" svg:y1="13.758cm" svg:x2="21.091cm" svg:y2="10.9cm" draw:start-shape="id41" draw:start-glue-point="1" draw:end-shape="id34" draw:end-glue-point="3" svg:d="M15858 13758l5233-2858" svg:viewBox="0 0 5234 2859">
            <text:p/>
          </draw:connector>
          <draw:connector draw:name="Straight Arrow Connector 117" draw:style-name="gr183" draw:text-style-name="P17" draw:layer="layout" draw:type="line" svg:x1="15.858cm" svg:y1="13.758cm" svg:x2="21.091cm" svg:y2="8.597cm" draw:start-shape="id41" draw:start-glue-point="1" draw:end-shape="id32" draw:end-glue-point="3" svg:d="M15858 13758l5233-5161" svg:viewBox="0 0 5234 5162">
            <text:p/>
          </draw:connector>
          <draw:connector draw:name="Straight Arrow Connector 120" draw:style-name="gr184" draw:text-style-name="P17" draw:layer="layout" draw:type="line" svg:x1="15.863cm" svg:y1="10.555cm" svg:x2="21.091cm" svg:y2="8.597cm" draw:start-shape="id40" draw:start-glue-point="1" draw:end-shape="id32" draw:end-glue-point="3" svg:d="M15863 10555l5228-1958" svg:viewBox="0 0 5229 1959">
            <text:p/>
          </draw:connector>
          <draw:connector draw:name="Straight Arrow Connector 123" draw:style-name="gr185" draw:text-style-name="P17" draw:layer="layout" draw:type="line" svg:x1="15.863cm" svg:y1="10.555cm" svg:x2="21.091cm" svg:y2="10.9cm" draw:start-shape="id40" draw:start-glue-point="1" draw:end-shape="id34" draw:end-glue-point="3" svg:d="M15863 10555l5228 345" svg:viewBox="0 0 5229 346">
            <text:p/>
          </draw:connector>
          <draw:connector draw:name="Straight Arrow Connector 126" draw:style-name="gr186" draw:text-style-name="P17" draw:layer="layout" draw:type="line" svg:x1="19.178cm" svg:y1="4.571cm" svg:x2="21.091cm" svg:y2="10.9cm" draw:start-shape="id38" draw:start-glue-point="1" draw:end-shape="id34" draw:end-glue-point="3" svg:d="M19178 4571l1913 6329" svg:viewBox="0 0 1914 6330">
            <text:p/>
          </draw:connector>
          <draw:connector draw:name="Straight Arrow Connector 129" draw:style-name="gr187" draw:text-style-name="P17" draw:layer="layout" draw:type="line" svg:x1="19.178cm" svg:y1="2.378cm" svg:x2="21.091cm" svg:y2="8.597cm" draw:start-shape="id37" draw:start-glue-point="1" draw:end-shape="id32" draw:end-glue-point="3" svg:d="M19178 2378l1913 6219" svg:viewBox="0 0 1914 6220">
            <text:p/>
          </draw:connector>
          <draw:connector draw:name="Straight Arrow Connector 132" draw:style-name="gr188" draw:text-style-name="P17" draw:layer="layout" draw:type="line" svg:x1="15.858cm" svg:y1="6.778cm" svg:x2="21.091cm" svg:y2="8.597cm" draw:start-shape="id39" draw:start-glue-point="1" draw:end-shape="id32" draw:end-glue-point="3" svg:d="M15858 6778l5233 1819" svg:viewBox="0 0 5234 1820">
            <text:p/>
          </draw:connector>
        </draw:g>
        <presentation:notes draw:style-name="dp2">
          <draw:page-thumbnail draw:style-name="gr7" draw:layer="layout" svg:width="0.001cm" svg:height="0.001cm" svg:x="0cm" svg:y="2.257cm" draw:page-number="9"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4"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88"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112" draw:style="linear" draw:start-color="#71a6db" draw:end-color="#559bdb" draw:start-intensity="100%" draw:end-intensity="100%" draw:angle="0deg" draw:border="0%">
      <loext:gradient-stop svg:offset="0" loext:color-type="rgb" loext:color-value="#71a6db"/>
      <loext:gradient-stop svg:offset="1" loext:color-type="rgb" loext:color-value="#559bdb"/>
    </draw:gradient>
    <draw:gradient draw:name="a1116"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0"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4"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8" draw:style="linear" draw:start-color="#71a6db" draw:end-color="#559bdb" draw:start-intensity="100%" draw:end-intensity="100%" draw:angle="0deg" draw:border="0%">
      <loext:gradient-stop svg:offset="0" loext:color-type="rgb" loext:color-value="#71a6db"/>
      <loext:gradient-stop svg:offset="1" loext:color-type="rgb" loext:color-value="#559bdb"/>
    </draw:gradient>
    <draw:gradient draw:name="a1133"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798"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12"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26"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40"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54"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marker draw:name="Arrow" svg:viewBox="0 0 20 30" svg:d="M10 0l-10 30h20z"/>
    <draw:marker draw:name="Arrowheads_20_2" draw:display-name="Arrowheads 2" svg:viewBox="0 0 20 20" svg:d="M0 20l10-20 10 20z"/>
    <draw:marker draw:name="a1012" svg:viewBox="0 0 20 30" svg:d="M10 0l-10 30h20z"/>
    <draw:marker draw:name="a1014" svg:viewBox="0 0 20 30" svg:d="M10 0l-10 30h20z"/>
    <draw:marker draw:name="a1016" svg:viewBox="0 0 20 30" svg:d="M10 0l-10 30h20z"/>
    <draw:marker draw:name="a1018" svg:viewBox="0 0 20 30" svg:d="M10 0l-10 30h20z"/>
    <draw:marker draw:name="a1020" svg:viewBox="0 0 20 30" svg:d="M10 0l-10 30h20z"/>
    <draw:marker draw:name="a1022" svg:viewBox="0 0 20 30" svg:d="M10 0l-10 30h20z"/>
    <draw:marker draw:name="a1024" svg:viewBox="0 0 20 30" svg:d="M10 0l-10 30h20z"/>
    <draw:marker draw:name="a1026" svg:viewBox="0 0 20 30" svg:d="M10 0l-10 30h20z"/>
    <draw:marker draw:name="a1028" svg:viewBox="0 0 20 30" svg:d="M10 0l-10 30h20z"/>
    <draw:marker draw:name="a1030" svg:viewBox="0 0 20 30" svg:d="M10 0l-10 30h20z"/>
    <draw:marker draw:name="a1033" svg:viewBox="0 0 20 30" svg:d="M10 0l-10 30h20z"/>
    <draw:marker draw:name="a1035" svg:viewBox="0 0 20 30" svg:d="M10 0l-10 30h20z"/>
    <draw:marker draw:name="a1037" svg:viewBox="0 0 20 30" svg:d="M10 0l-10 30h20z"/>
    <draw:marker draw:name="a1039" svg:viewBox="0 0 20 30" svg:d="M10 0l-10 30h20z"/>
    <draw:marker draw:name="a1041" svg:viewBox="0 0 20 30" svg:d="M10 0l-10 30h20z"/>
    <draw:marker draw:name="a1043" svg:viewBox="0 0 20 30" svg:d="M10 0l-10 30h20z"/>
    <draw:marker draw:name="a1045" svg:viewBox="0 0 20 30" svg:d="M10 0l-10 30h20z"/>
    <draw:marker draw:name="a1047" svg:viewBox="0 0 20 30" svg:d="M10 0l-10 30h20z"/>
    <draw:marker draw:name="a1049" svg:viewBox="0 0 20 30" svg:d="M10 0l-10 30h20z"/>
    <draw:marker draw:name="a1051" svg:viewBox="0 0 20 30" svg:d="M10 0l-10 30h20z"/>
    <draw:marker draw:name="a1053" svg:viewBox="0 0 20 30" svg:d="M10 0l-10 30h20z"/>
    <draw:marker draw:name="a1055" svg:viewBox="0 0 20 30" svg:d="M10 0l-10 30h20z"/>
    <draw:marker draw:name="a1057" svg:viewBox="0 0 20 30" svg:d="M10 0l-10 30h20z"/>
    <draw:marker draw:name="a1059" svg:viewBox="0 0 20 30" svg:d="M10 0l-10 30h20z"/>
    <draw:marker draw:name="a1061" svg:viewBox="0 0 20 30" svg:d="M10 0l-10 30h20z"/>
    <draw:marker draw:name="a1063" svg:viewBox="0 0 20 30" svg:d="M10 0l-10 30h20z"/>
    <draw:marker draw:name="a1065" svg:viewBox="0 0 20 30" svg:d="M10 0l-10 30h20z"/>
    <draw:marker draw:name="a1067" svg:viewBox="0 0 20 30" svg:d="M10 0l-10 30h20z"/>
    <draw:marker draw:name="a1069" svg:viewBox="0 0 20 30" svg:d="M10 0l-10 30h20z"/>
    <draw:marker draw:name="a1071" svg:viewBox="0 0 20 30" svg:d="M10 0l-10 30h20z"/>
    <draw:marker draw:name="a1164" svg:viewBox="0 0 20 30" svg:d="M10 0l-10 30h20z"/>
    <draw:marker draw:name="a1166" svg:viewBox="0 0 20 30" svg:d="M10 0l-10 30h20z"/>
    <draw:marker draw:name="a1196" svg:viewBox="0 0 20 30" svg:d="M10 0l-10 30h20z"/>
    <draw:marker draw:name="a1198" svg:viewBox="0 0 20 30" svg:d="M10 0l-10 30h20z"/>
    <draw:marker draw:name="a1261" svg:viewBox="0 0 20 30" svg:d="M10 0l-10 30h20z"/>
    <draw:marker draw:name="a1267" svg:viewBox="0 0 20 30" svg:d="M10 0l-10 30h20z"/>
    <draw:marker draw:name="a1278" svg:viewBox="0 0 20 30" svg:d="M10 0l-10 30h20z"/>
    <draw:marker draw:name="a1281" svg:viewBox="0 0 20 30" svg:d="M10 0l-10 30h20z"/>
    <draw:marker draw:name="a1289" svg:viewBox="0 0 20 30" svg:d="M10 0l-10 30h20z"/>
    <draw:marker draw:name="a1300" svg:viewBox="0 0 20 30" svg:d="M10 0l-10 30h20z"/>
    <draw:marker draw:name="a745" svg:viewBox="0 0 20 30" svg:d="M10 0l-10 30h20z"/>
    <draw:marker draw:name="a756" svg:viewBox="0 0 20 30" svg:d="M10 0l-10 30h20z"/>
    <draw:marker draw:name="a759" svg:viewBox="0 0 20 30" svg:d="M10 0l-10 30h20z"/>
    <draw:marker draw:name="a762" svg:viewBox="0 0 20 30" svg:d="M10 0l-10 30h20z"/>
    <draw:marker draw:name="a802" svg:viewBox="0 0 20 30" svg:d="M10 0l-10 30h20z"/>
    <draw:marker draw:name="a804" svg:viewBox="0 0 20 30" svg:d="M10 0l-10 30h20z"/>
    <draw:marker draw:name="a806" svg:viewBox="0 0 20 30" svg:d="M10 0l-10 30h20z"/>
    <draw:marker draw:name="a808" svg:viewBox="0 0 20 30" svg:d="M10 0l-10 30h20z"/>
    <draw:marker draw:name="a816" svg:viewBox="0 0 20 30" svg:d="M10 0l-10 30h20z"/>
    <draw:marker draw:name="a818" svg:viewBox="0 0 20 30" svg:d="M10 0l-10 30h20z"/>
    <draw:marker draw:name="a820" svg:viewBox="0 0 20 30" svg:d="M10 0l-10 30h20z"/>
    <draw:marker draw:name="a822" svg:viewBox="0 0 20 30" svg:d="M10 0l-10 30h20z"/>
    <draw:marker draw:name="a830" svg:viewBox="0 0 20 30" svg:d="M10 0l-10 30h20z"/>
    <draw:marker draw:name="a832" svg:viewBox="0 0 20 30" svg:d="M10 0l-10 30h20z"/>
    <draw:marker draw:name="a834" svg:viewBox="0 0 20 30" svg:d="M10 0l-10 30h20z"/>
    <draw:marker draw:name="a836" svg:viewBox="0 0 20 30" svg:d="M10 0l-10 30h20z"/>
    <draw:marker draw:name="a844" svg:viewBox="0 0 20 30" svg:d="M10 0l-10 30h20z"/>
    <draw:marker draw:name="a846" svg:viewBox="0 0 20 30" svg:d="M10 0l-10 30h20z"/>
    <draw:marker draw:name="a848" svg:viewBox="0 0 20 30" svg:d="M10 0l-10 30h20z"/>
    <draw:marker draw:name="a850" svg:viewBox="0 0 20 30" svg:d="M10 0l-10 30h20z"/>
    <draw:marker draw:name="a858" svg:viewBox="0 0 20 30" svg:d="M10 0l-10 30h20z"/>
    <draw:marker draw:name="a860" svg:viewBox="0 0 20 30" svg:d="M10 0l-10 30h20z"/>
    <draw:marker draw:name="a862" svg:viewBox="0 0 20 30" svg:d="M10 0l-10 30h20z"/>
    <draw:marker draw:name="a864" svg:viewBox="0 0 20 30" svg:d="M10 0l-10 30h20z"/>
    <draw:stroke-dash draw:name="Long_20_Dash" draw:display-name="Long Dash" draw:style="rect" draw:dots1="1" draw:dots1-length="400%" draw:distance="300%"/>
    <draw:stroke-dash draw:name="SysDash" draw:style="rect" draw:dots1="1" draw:dots1-length="0.079cm" draw:distance="0.079cm"/>
    <draw:stroke-dash draw:name="SysDot" draw:style="rect" draw:dots1="1" draw:dots1-length="0.035cm" draw:distance="0.035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8</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8</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8</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3-24T11:24:04.840759000</dc:date>
    <meta:editing-duration>P1DT3H30M24S</meta:editing-duration>
    <meta:editing-cycles>21</meta:editing-cycles>
    <meta:generator>LibreOffice/25.2.4.3$MacOSX_AARCH64 LibreOffice_project/33e196637044ead23f5c3226cde09b47731f7e27</meta:generator>
    <meta:print-date>2026-03-18T10:05:16.646670000</meta:print-date>
    <meta:printed-by>PDF files</meta:printed-by>
    <meta:document-statistic meta:object-count="483"/>
  </office:meta>
</office:document-meta>
</file>