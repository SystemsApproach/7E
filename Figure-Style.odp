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B0000004B04F859FEB.png" manifest:media-type="image/png"/>
  <manifest:file-entry manifest:full-path="Pictures/10000001000004B0000004B068CCAF1D.png" manifest:media-type="image/png"/>
  <manifest:file-entry manifest:full-path="Pictures/100000010000053D000003B1B3F0749D.png" manifest:media-type="image/png"/>
  <manifest:file-entry manifest:full-path="Pictures/10004B2B000068C4000049D48AB69D38.pdf" manifest:media-type="application/pdf"/>
  <manifest:file-entry manifest:full-path="Pictures/10000001000002C3000002C39E67A95F.png" manifest:media-type="image/png"/>
  <manifest:file-entry manifest:full-path="Pictures/1000184A00001CAC00002AF8D75A7ACE.pdf" manifest:media-type="application/pdf"/>
  <manifest:file-entry manifest:full-path="Pictures/100008A0000046A9000046A969C5F579.svg" manifest:media-type="image/svg+xml"/>
  <manifest:file-entry manifest:full-path="Pictures/100013AB0000210C0000210C811FDA0D.pdf" manifest:media-type="application/pdf"/>
  <manifest:file-entry manifest:full-path="Pictures/10000001000001A7000001A70E49BCAC.png" manifest:media-type="image/png"/>
  <manifest:file-entry manifest:full-path="Pictures/100026C100006E3C000035FC5A5D306F.pdf" manifest:media-type="application/pdf"/>
  <manifest:file-entry manifest:full-path="Pictures/10000001000003790000034F4650DA64.png" manifest:media-type="image/png"/>
  <manifest:file-entry manifest:full-path="Pictures/100000010000016F0000022688FE1F25.png" manifest:media-type="image/png"/>
  <manifest:file-entry manifest:full-path="Pictures/100019D0000045740000422CC074E74B.pdf" manifest:media-type="application/pdf"/>
  <manifest:file-entry manifest:full-path="Pictures/1000000100000583000002B3E48388A4.png" manifest:media-type="image/png"/>
  <manifest:file-entry manifest:full-path="Pictures/1000000100000316000005E6C4157AF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solid" draw:fill-color="#6a99d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81cm" loext:decorative="false"/>
      <style:paragraph-properties style:writing-mode="lr-tb"/>
    </style:style>
    <style:style style:name="gr5" style:family="graphic" style:parent-style-name="standard">
      <style:graphic-properties svg:stroke-color="#0070c0" draw:fill="solid" draw:fill-color="#0070c0" draw:textarea-horizontal-align="justify" draw:textarea-vertical-align="middle" draw:auto-grow-height="false" fo:min-height="0.639cm" fo:min-width="0.961cm" loext:decorative="false"/>
    </style:style>
    <style:style style:name="gr6" style:family="graphic" style:parent-style-name="standard">
      <style:graphic-properties svg:stroke-color="#bdd7ee" draw:fill="solid" draw:fill-color="#bdd7ee" draw:textarea-horizontal-align="justify" draw:textarea-vertical-align="middle" draw:auto-grow-height="false" fo:min-height="0.639cm" fo:min-width="0.961cm" loext:decorative="false"/>
    </style:style>
    <style:style style:name="gr7" style:family="graphic" style:parent-style-name="standard">
      <style:graphic-properties svg:stroke-color="#6a99d0" draw:fill="solid" draw:fill-color="#6a99d0" draw:textarea-horizontal-align="justify" draw:textarea-vertical-align="middle" draw:auto-grow-height="false" fo:min-height="0.639cm" fo:min-width="0.961cm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a99d0"/>
      <style:paragraph-properties fo:text-align="center"/>
    </style:style>
    <style:style style:name="P3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alibri" fo:font-size="16pt" style:font-size-asian="16pt" style:font-size-complex="16pt"/>
    </style:style>
    <style:style style:name="P6" style:family="paragraph">
      <loext:graphic-properties draw:fill="solid" draw:fill-color="#0070c0"/>
      <style:paragraph-properties fo:text-align="center"/>
      <style:text-properties style:font-name="Calibri"/>
    </style:style>
    <style:style style:name="P7" style:family="paragraph">
      <loext:graphic-properties draw:fill="solid" draw:fill-color="#bdd7ee"/>
      <style:paragraph-properties fo:text-align="center"/>
      <style:text-properties style:font-name="Calibri"/>
    </style:style>
    <style:style style:name="P8" style:family="paragraph">
      <loext:graphic-properties draw:fill="solid" draw:fill-color="#6a99d0"/>
      <style:paragraph-properties fo:text-align="center"/>
      <style:text-properties style:font-name="Calibri"/>
    </style:style>
    <style:style style:name="P9" style:family="paragraph">
      <loext:graphic-properties draw:fill-color="#ffffff"/>
    </style:style>
    <style:style style:name="T1" style:family="text">
      <style:text-properties style:font-name="Calibr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575cm" svg:height="3.013cm" svg:x="23.217cm" svg:y="9.812cm">
          <draw:image xlink:href="Pictures/1000000100000316000005E6C4157AF2.png" xlink:type="simple" xlink:show="embed" xlink:actuate="onLoad" draw:mime-type="image/png">
            <text:p/>
          </draw:image>
        </draw:frame>
        <draw:frame draw:style-name="gr1" draw:text-style-name="P1" draw:layer="layout" svg:width="2.221cm" svg:height="2.116cm" svg:x="2.793cm" svg:y="10.403cm">
          <draw:image xlink:href="Pictures/100019D0000045740000422CC074E74B.pdf" xlink:type="simple" xlink:show="embed" xlink:actuate="onLoad" draw:mime-type="application/pdf">
            <text:p/>
          </draw:image>
          <draw:image xlink:href="Pictures/10000001000003790000034F4650DA64.png" xlink:type="simple" xlink:show="embed" xlink:actuate="onLoad" draw:mime-type="image/png"/>
        </draw:frame>
        <draw:frame draw:style-name="gr1" draw:text-style-name="P1" draw:layer="layout" svg:width="1.798cm" svg:height="1.798cm" svg:x="7.282cm" svg:y="10.425cm">
          <draw:image xlink:href="Pictures/100013AB0000210C0000210C811FDA0D.pdf" xlink:type="simple" xlink:show="embed" xlink:actuate="onLoad" draw:mime-type="application/pdf">
            <text:p/>
          </draw:image>
          <draw:image xlink:href="Pictures/10000001000001A7000001A70E49BCAC.png" xlink:type="simple" xlink:show="embed" xlink:actuate="onLoad" draw:mime-type="image/png"/>
        </draw:frame>
        <draw:frame draw:style-name="gr2" draw:text-style-name="P2" draw:layer="layout" svg:width="2.907cm" svg:height="1.423cm" svg:x="6.855cm" svg:y="8.501cm">
          <draw:image xlink:href="Pictures/100026C100006E3C000035FC5A5D306F.pdf" xlink:type="simple" xlink:show="embed" xlink:actuate="onLoad" draw:mime-type="application/pdf">
            <text:p/>
          </draw:image>
          <draw:image xlink:href="Pictures/1000000100000583000002B3E48388A4.png" xlink:type="simple" xlink:show="embed" xlink:actuate="onLoad" draw:mime-type="image/png"/>
        </draw:frame>
        <draw:frame draw:style-name="gr1" draw:text-style-name="P1" draw:layer="layout" svg:width="2.571cm" svg:height="2.571cm" svg:x="17.991cm" svg:y="10.084cm">
          <draw:image xlink:href="Pictures/100008A0000046A9000046A969C5F579.svg" xlink:type="simple" xlink:show="embed" xlink:actuate="onLoad" draw:mime-type="image/svg+xml">
            <text:p/>
          </draw:image>
          <draw:image xlink:href="Pictures/10000001000002C3000002C39E67A95F.png" xlink:type="simple" xlink:show="embed" xlink:actuate="onLoad" draw:mime-type="image/png"/>
        </draw:frame>
        <draw:frame draw:style-name="gr1" draw:text-style-name="P1" draw:layer="layout" svg:width="1.188cm" svg:height="1.782cm" svg:x="15.32cm" svg:y="10.678cm">
          <draw:image xlink:href="Pictures/1000184A00001CAC00002AF8D75A7ACE.pdf" xlink:type="simple" xlink:show="embed" xlink:actuate="onLoad" draw:mime-type="application/pdf">
            <text:p/>
          </draw:image>
          <draw:image xlink:href="Pictures/100000010000016F0000022688FE1F25.png" xlink:type="simple" xlink:show="embed" xlink:actuate="onLoad" draw:mime-type="image/png"/>
        </draw:frame>
        <draw:frame draw:style-name="gr1" draw:text-style-name="P1" draw:layer="layout" svg:width="2.983cm" svg:height="2.102cm" svg:x="10.736cm" svg:y="10.629cm">
          <draw:image xlink:href="Pictures/10004B2B000068C4000049D48AB69D38.pdf" xlink:type="simple" xlink:show="embed" xlink:actuate="onLoad" draw:mime-type="application/pdf">
            <text:p/>
          </draw:image>
          <draw:image xlink:href="Pictures/100000010000053D000003B1B3F0749D.png" xlink:type="simple" xlink:show="embed" xlink:actuate="onLoad" draw:mime-type="image/png"/>
        </draw:frame>
        <draw:frame draw:style-name="gr1" draw:text-style-name="P1" draw:layer="layout" svg:width="2.221cm" svg:height="2.116cm" svg:x="2.794cm" svg:y="10.403cm">
          <draw:image xlink:href="Pictures/100019D0000045740000422CC074E74B.pdf" xlink:type="simple" xlink:show="embed" xlink:actuate="onLoad" draw:mime-type="application/pdf">
            <text:p/>
          </draw:image>
          <draw:image xlink:href="Pictures/10000001000003790000034F4650DA64.png" xlink:type="simple" xlink:show="embed" xlink:actuate="onLoad" draw:mime-type="image/png"/>
        </draw:frame>
        <draw:frame draw:style-name="gr3" draw:text-style-name="P3" draw:layer="layout" svg:width="6.729cm" svg:height="1.175cm" svg:x="1.842cm" svg:y="1.175cm">
          <draw:text-box>
            <text:p><text:span text:style-name="T1">Calibri (16pt by default)</text:span></text:p>
          </draw:text-box>
        </draw:frame>
        <draw:frame draw:style-name="gr4" draw:text-style-name="P5" draw:layer="layout" svg:width="4.506cm" svg:height="1.631cm" svg:x="1.684cm" svg:y="12.882cm">
          <draw:text-box>
            <text:p text:style-name="P4"><text:span text:style-name="T1">Server(s)</text:span></text:p>
            <text:p text:style-name="P4"><text:span text:style-name="T1">Stackable = Rack</text:span></text:p>
          </draw:text-box>
        </draw:frame>
        <draw:frame draw:style-name="gr3" draw:text-style-name="P3" draw:layer="layout" svg:width="6.729cm" svg:height="1.175cm" svg:x="1.843cm" svg:y="1.176cm">
          <draw:text-box>
            <text:p><text:span text:style-name="T1">Calibri (16pt by default)</text:span></text:p>
          </draw:text-box>
        </draw:frame>
        <draw:frame draw:style-name="gr4" draw:text-style-name="P5" draw:layer="layout" svg:width="4.506cm" svg:height="1.631cm" svg:x="5.984cm" svg:y="12.883cm">
          <draw:text-box>
            <text:p text:style-name="P4"><text:span text:style-name="T1">Generic</text:span></text:p>
            <text:p text:style-name="P4"><text:span text:style-name="T1">Switch</text:span></text:p>
          </draw:text-box>
        </draw:frame>
        <draw:frame draw:style-name="gr1" draw:text-style-name="P1" draw:layer="layout" svg:width="2.983cm" svg:height="2.102cm" svg:x="10.737cm" svg:y="10.629cm">
          <draw:image xlink:href="Pictures/10004B2B000068C4000049D48AB69D38.pdf" xlink:type="simple" xlink:show="embed" xlink:actuate="onLoad" draw:mime-type="application/pdf">
            <text:p/>
          </draw:image>
          <draw:image xlink:href="Pictures/100000010000053D000003B1B3F0749D.png" xlink:type="simple" xlink:show="embed" xlink:actuate="onLoad" draw:mime-type="image/png"/>
        </draw:frame>
        <draw:frame draw:style-name="gr4" draw:text-style-name="P5" draw:layer="layout" svg:width="4.506cm" svg:height="1.631cm" svg:x="9.889cm" svg:y="12.884cm">
          <draw:text-box>
            <text:p text:style-name="P4"><text:span text:style-name="T1">User</text:span></text:p>
          </draw:text-box>
        </draw:frame>
        <draw:frame draw:style-name="gr4" draw:text-style-name="P5" draw:layer="layout" svg:width="4.506cm" svg:height="1.631cm" svg:x="5.984cm" svg:y="12.884cm">
          <draw:text-box>
            <text:p text:style-name="P4"><text:span text:style-name="T1">Generic</text:span></text:p>
            <text:p text:style-name="P4"><text:span text:style-name="T1">Switch</text:span></text:p>
          </draw:text-box>
        </draw:frame>
        <draw:frame draw:style-name="gr4" draw:text-style-name="P5" draw:layer="layout" svg:width="4.506cm" svg:height="1.631cm" svg:x="13.589cm" svg:y="12.885cm">
          <draw:text-box>
            <text:p text:style-name="P4"><text:span text:style-name="T1">UE</text:span></text:p>
            <text:p text:style-name="P4"><text:span text:style-name="T1">Phone</text:span></text:p>
          </draw:text-box>
        </draw:frame>
        <draw:frame draw:style-name="gr4" draw:text-style-name="P5" draw:layer="layout" svg:width="4.506cm" svg:height="1.631cm" svg:x="13.589cm" svg:y="12.886cm">
          <draw:text-box>
            <text:p text:style-name="P4"><text:span text:style-name="T1">UE</text:span></text:p>
            <text:p text:style-name="P4"><text:span text:style-name="T1">Phone</text:span></text:p>
          </draw:text-box>
        </draw:frame>
        <draw:frame draw:style-name="gr4" draw:text-style-name="P5" draw:layer="layout" svg:width="4.506cm" svg:height="1.631cm" svg:x="17.089cm" svg:y="12.887cm">
          <draw:text-box>
            <text:p text:style-name="P4"><text:span text:style-name="T1">Generic Office</text:span></text:p>
            <text:p text:style-name="P4"><text:span text:style-name="T1">or Enterprise</text:span></text:p>
          </draw:text-box>
        </draw:frame>
        <draw:frame draw:style-name="gr4" draw:text-style-name="P5" draw:layer="layout" svg:width="4.506cm" svg:height="1.631cm" svg:x="13.589cm" svg:y="12.887cm">
          <draw:text-box>
            <text:p text:style-name="P4"><text:span text:style-name="T1">UE</text:span></text:p>
            <text:p text:style-name="P4"><text:span text:style-name="T1">Phone</text:span></text:p>
          </draw:text-box>
        </draw:frame>
        <draw:frame draw:style-name="gr4" draw:text-style-name="P5" draw:layer="layout" svg:width="4.506cm" svg:height="1.631cm" svg:x="21.789cm" svg:y="12.888cm">
          <draw:text-box>
            <text:p text:style-name="P4"><text:span text:style-name="T1">5G</text:span></text:p>
            <text:p text:style-name="P4"><text:span text:style-name="T1">Basestation</text:span></text:p>
          </draw:text-box>
        </draw:frame>
        <draw:frame draw:style-name="gr1" draw:text-style-name="P1" draw:layer="layout" svg:width="2.445cm" svg:height="2.445cm" svg:x="22.635cm" svg:y="4.57cm">
          <draw:image xlink:href="Pictures/10000001000004B0000004B068CCAF1D.png" xlink:type="simple" xlink:show="embed" xlink:actuate="onLoad" draw:mime-type="image/png">
            <text:p/>
          </draw:image>
        </draw:frame>
        <draw:frame draw:style-name="gr4" draw:text-style-name="P5" draw:layer="layout" svg:width="4.506cm" svg:height="1.631cm" svg:x="21.535cm" svg:y="7.008cm">
          <draw:text-box>
            <text:p text:style-name="P4"><text:span text:style-name="T1">WiFi</text:span></text:p>
            <text:p text:style-name="P4"><text:span text:style-name="T1">Access Point</text:span></text:p>
          </draw:text-box>
        </draw:frame>
        <draw:frame draw:style-name="gr1" draw:text-style-name="P1" draw:layer="layout" svg:width="2.669cm" svg:height="2.669cm" svg:x="6.855cm" svg:y="6.031cm">
          <draw:image xlink:href="Pictures/10000001000004B0000004B04F859FEB.png" xlink:type="simple" xlink:show="embed" xlink:actuate="onLoad" draw:mime-type="image/png">
            <text:p/>
          </draw:image>
        </draw:frame>
        <draw:custom-shape draw:style-name="gr5" draw:text-style-name="P6" draw:layer="layout" svg:width="1.461cm" svg:height="0.889cm" svg:x="2.158cm" svg:y="2.5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461cm" svg:height="0.889cm" svg:x="2.158cm" svg:y="5.28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729cm" svg:height="1.175cm" svg:x="3.744cm" svg:y="2.577cm">
          <draw:text-box>
            <text:p><text:span text:style-name="T1">Darker Color</text:span></text:p>
          </draw:text-box>
        </draw:frame>
        <draw:frame draw:style-name="gr3" draw:text-style-name="P3" draw:layer="layout" svg:width="6.729cm" svg:height="1.175cm" svg:x="3.745cm" svg:y="5.178cm">
          <draw:text-box>
            <text:p><text:span text:style-name="T1">Lighter Color</text:span></text:p>
          </draw:text-box>
        </draw:frame>
        <draw:custom-shape draw:style-name="gr7" draw:text-style-name="P8" draw:layer="layout" svg:width="1.461cm" svg:height="0.889cm" svg:x="2.126cm" svg:y="3.91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729cm" svg:height="1.175cm" svg:x="3.745cm" svg:y="3.878cm">
          <draw:text-box>
            <text:p><text:span text:style-name="T1">Default Colo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2:25:18.326757000</meta:creation-date>
    <dc:date>2025-12-11T13:26:58.706936000</dc:date>
    <meta:editing-duration>PT8M53S</meta:editing-duration>
    <meta:editing-cycles>3</meta:editing-cycles>
    <meta:generator>LibreOffice/25.2.4.3$MacOSX_AARCH64 LibreOffice_project/33e196637044ead23f5c3226cde09b47731f7e27</meta:generator>
    <meta:document-statistic meta:object-count="52"/>
  </office:meta>
</office:document-meta>
</file>