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6D00000320CC065078.png" manifest:media-type="image/png"/>
  <manifest:file-entry manifest:full-path="Pictures/10000001000001370000008A3032A3C2.png" manifest:media-type="image/png"/>
  <manifest:file-entry manifest:full-path="Pictures/10000001000004B0000004B065953AC9.png" manifest:media-type="image/png"/>
  <manifest:file-entry manifest:full-path="Pictures/10000001000004B0000004B0250C3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8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5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498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1cm" fo:min-width="2.5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ffffff" draw:opacity="100%" draw:textarea-horizontal-align="right" draw:textarea-vertical-align="bottom" draw:auto-grow-height="false" draw:auto-grow-width="false" fo:min-height="2.779cm" fo:min-width="6.2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892cm" fo:min-width="2.593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2cm" svg:stroke-color="#0070c0" draw:marker-start-width="0.127cm" draw:marker-end-width="0.127cm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947cm" fo:min-width="2.61cm" fo:padding-top="0.099cm" fo:padding-bottom="0.099cm" fo:padding-left="0.226cm" fo:padding-right="0.22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end="a822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svg:stroke-width="0.053cm" svg:stroke-color="#000000" draw:marker-end="a82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21cm" fo:min-width="0.28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a834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000000" draw:marker-end="a836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dash" draw:stroke-dash="SysDot" svg:stroke-width="0.079cm" svg:stroke-color="#000000" svg:stroke-opacity="100%" draw:stroke-linejoin="miter" svg:stroke-linecap="butt" draw:fill="none" draw:textarea-horizontal-align="center" draw:textarea-vertical-align="top" draw:auto-grow-height="false" draw:auto-grow-width="false" fo:min-height="12.381cm" fo:min-width="3.1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341cm" fo:min-width="4.552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6a99d0" draw:marker-start="Arrowheads_20_1" draw:marker-start-width="0.381cm" draw:marker-end="Arrowheads_20_2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05cm" fo:min-width="2.496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>
      <style:graphic-properties style:writing-mode="lr-tb" loext:decorative="false"/>
    </style:style>
    <style:style style:name="gr22" style:family="graphic">
      <style:graphic-properties loext:decorative="false"/>
    </style:style>
    <style:style style:name="gr23" style:family="graphic" style:parent-style-name="objectwithoutfill">
      <style:graphic-properties svg:stroke-width="0.051cm" svg:stroke-color="#313131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e7e6e6" draw:opacity="100%" draw:textarea-horizontal-align="center" draw:textarea-vertical-align="middle" draw:auto-grow-height="false" draw:auto-grow-width="false" fo:min-height="1.493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492cm" fo:min-width="6.8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283cm" fo:min-width="0.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28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1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27cm" fo:min-width="2.26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79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493cm" fo:min-width="6.85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70c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min-height="1.041cm" fo:min-width="2.6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70c0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4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023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style:mirror="none" loext:decorative="false"/>
    </style:style>
    <style:style style:name="gr36" style:family="graphic" style:parent-style-name="Object_20_with_20_no_20_fill_20_and_20_no_20_line">
      <style:graphic-properties draw:stroke="none" draw:fill="none" style:mirror="horizontal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3.411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795cm" fo:min-width="3.118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41" style:family="graphic" style:parent-style-name="objectwithoutfill">
      <style:graphic-properties svg:stroke-width="0.051cm" svg:stroke-color="#000000" draw:marker-start="Arrowheads_20_5" draw:marker-start-width="0.279cm" draw:marker-end="" draw:marker-end-width="0.381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42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48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1.655cm" loext:decorative="false"/>
      <style:paragraph-properties style:writing-mode="lr-tb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415cm" fo:min-width="0cm" fo:padding-top="0.15cm" fo:padding-bottom="0.15cm" fo:padding-left="0.275cm" fo:padding-right="0.275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577cm" loext:decorative="false"/>
      <style:paragraph-properties style:writing-mode="lr-tb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129cm" fo:min-width="0cm" fo:padding-top="0.15cm" fo:padding-bottom="0.15cm" fo:padding-left="0.275cm" fo:padding-right="0.275cm" fo:wrap-option="wrap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632cm" loext:decorative="false"/>
      <style:paragraph-properties style:writing-mode="lr-tb"/>
    </style:style>
    <style:style style:name="gr50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1.546cm" fo:min-width="1.296cm" fo:padding-top="0.15cm" fo:padding-bottom="0.15cm" fo:padding-left="0.275cm" fo:padding-right="0.275cm" loext:decorative="false"/>
      <style:paragraph-properties style:writing-mode="lr-tb"/>
    </style:style>
    <style:style style:name="gr51" style:family="graphic" style:parent-style-name="standard">
      <style:graphic-properties svg:stroke-width="0.051cm" draw:marker-start-width="0.279cm" draw:marker-end-width="0.279cm" draw:fill="solid" draw:fill-color="#ffffff" draw:textarea-horizontal-align="justify" draw:textarea-vertical-align="middle" draw:auto-grow-height="false" fo:min-height="1.216cm" fo:min-width="5.547cm" fo:padding-top="0.15cm" fo:padding-bottom="0.15cm" fo:padding-left="0.275cm" fo:padding-right="0.275cm" loext:decorative="false"/>
    </style:style>
    <style:style style:name="gr5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3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54" style:family="graphic" style:parent-style-name="standard">
      <style:graphic-properties draw:fill="solid" draw:fill-color="#bdd7ee" draw:textarea-horizontal-align="justify" draw:textarea-vertical-align="middle" draw:auto-grow-height="false" fo:min-height="0.385cm" fo:min-width="0.041cm" loext:decorative="false"/>
    </style:style>
    <style:style style:name="gr55" style:family="graphic" style:parent-style-name="objectwithoutfill">
      <style:graphic-properties svg:stroke-width="0.051cm" draw:marker-start-width="0.279cm" draw:marker-end="Arrowheads_20_8" draw:marker-end-width="0.381cm" draw:fill="none" draw:textarea-vertical-align="middle" fo:padding-top="0.15cm" fo:padding-bottom="0.15cm" fo:padding-left="0.275cm" fo:padding-right="0.275cm" loext:decorative="false"/>
    </style:style>
    <style:style style:name="gr56" style:family="graphic" style:parent-style-name="standard">
      <style:graphic-properties draw:fill="solid" draw:fill-color="#3465a4" draw:textarea-horizontal-align="justify" draw:textarea-vertical-align="middle" draw:auto-grow-height="false" fo:min-height="0.385cm" fo:min-width="0.041cm" loext:decorative="false"/>
    </style:style>
    <style:style style:name="gr5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04cm" fo:min-width="0cm" fo:padding-top="0.15cm" fo:padding-bottom="0.15cm" fo:padding-left="0.275cm" fo:padding-right="0.275cm" fo:wrap-option="wrap" loext:decorative="false"/>
    </style:style>
    <style:style style:name="gr5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031cm" fo:min-width="0cm" fo:padding-top="0.15cm" fo:padding-bottom="0.15cm" fo:padding-left="0.275cm" fo:padding-right="0.275cm" fo:wrap-option="wrap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style:font-name="Calibri" fo:font-size="18pt" style:font-size-asian="18pt" style:font-size-complex="18pt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style:font-name="Calibri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4" style:family="paragraph">
      <loext:graphic-properties draw:fill="solid" draw:fill-color="#bdd7ee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65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65%" fo:text-align="start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end"/>
      <style:text-properties style:font-name="Calibri" fo:font-size="16pt" style:font-size-asian="16pt" style:font-size-complex="16pt"/>
    </style:style>
    <style:style style:name="P13" style:family="paragraph">
      <loext:graphic-properties draw:fill="solid" draw:fill-color="#bdd7ee"/>
      <style:paragraph-properties fo:text-align="end" style:writing-mode="lr-tb"/>
      <style:text-properties style:font-name="Calibri" fo:font-size="16pt" style:font-size-asian="16pt" style:font-size-complex="16pt"/>
    </style:style>
    <style:style style:name="P14" style:family="paragraph">
      <style:paragraph-properties fo:text-align="center"/>
      <style:text-properties style:font-name="Calibri" fo:font-size="16pt" style:font-size-asian="16pt" style:font-size-complex="16pt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Calibri" fo:font-size="16pt" style:font-size-asian="16pt" style:font-size-complex="16pt"/>
    </style:style>
    <style:style style:name="P16" style:family="paragraph">
      <style:paragraph-properties fo:text-align="start"/>
      <style:text-properties style:font-name="Calibri" fo:font-size="16pt" style:font-size-asian="16pt" style:font-size-complex="16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Calibri" fo:font-size="16pt" fo:font-style="normal" style:font-size-asian="16pt" style:font-style-asian="normal" style:font-size-complex="16pt" style:font-style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e7e6e6" draw:opacity="100%"/>
      <style:paragraph-properties style:writing-mode="lr-tb" style:font-independent-line-spacing="true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 style:font-size-asian="18pt" style:font-size-complex="18pt"/>
    </style:style>
    <style:style style:name="P2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85%" fo:text-align="center" fo:text-indent="0cm" style:punctuation-wrap="hanging" loext:tab-stop-distance="0cm" style:writing-mode="lr-tb">
        <style:tab-stops/>
      </style:paragraph-properties>
      <style:text-properties fo:font-size="16pt" style:font-size-asian="16pt" style:font-size-complex="16pt"/>
    </style:style>
    <style:style style:name="P29" style:family="paragraph">
      <loext:graphic-properties draw:fill="solid" draw:fill-color="#bdd7ee" draw:opacity="100%"/>
      <style:paragraph-properties fo:margin-left="0cm" fo:margin-right="0cm" fo:margin-top="0cm" fo:margin-bottom="0cm" fo:line-height="85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35" style:family="paragraph">
      <loext:graphic-properties draw:fill="none"/>
      <style:paragraph-properties fo:text-align="center"/>
      <style:text-properties style:font-name="Calibri" fo:font-size="16pt" style:font-size-asian="16pt" style:font-size-complex="16pt"/>
    </style:style>
    <style:style style:name="P36" style:family="paragraph">
      <loext:graphic-properties draw:fill="none" draw:fill-color="#ffffff"/>
      <style:text-properties style:font-name="Calibri"/>
    </style:style>
    <style:style style:name="P37" style:family="paragraph">
      <loext:graphic-properties draw:fill="none" draw:fill-color="#ffffff"/>
      <style:paragraph-properties fo:text-align="center"/>
      <style:text-properties style:font-name="Calibri"/>
    </style:style>
    <style:style style:name="P38" style:family="paragraph">
      <loext:graphic-properties draw:fill="solid" draw:fill-color="#ffffff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bdd7ee"/>
      <style:paragraph-properties fo:text-align="center"/>
    </style:style>
    <style:style style:name="P40" style:family="paragraph">
      <loext:graphic-properties draw:fill="solid" draw:fill-color="#3465a4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size-asian="18pt" style:font-weight-asian="normal" style:font-size-complex="18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alibri" fo:font-size="16pt" style:font-size-asian="16pt" style:font-size-complex="16pt"/>
    </style:style>
    <style:style style:name="T6" style:family="text">
      <style:text-properties style:font-name="Calibri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alibri" fo:font-size="6pt" style:font-size-asian="6pt" style:font-size-complex="6pt"/>
    </style:style>
    <style:style style:name="T9" style:family="text">
      <style:text-properties style:font-name="Calibri"/>
    </style:style>
    <style:style style:name="T10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Rectangle 1" draw:style-name="gr1" draw:text-style-name="P2" draw:layer="layout" svg:width="6.718cm" svg:height="3.034cm" svg:x="16.938cm" svg:y="11.039cm">
          <text:p text:style-name="P1"><text:span text:style-name="T1">Server </text:span><text:span text:style-name="T2">n</text:span></text:p>
          <draw:enhanced-geometry svg:viewBox="0 0 21600 21600" draw:type="non-primitive" draw:enhanced-path="M 0 0 L 21600 0 21600 21600 0 21600 Z N"/>
        </draw:custom-shape>
        <draw:custom-shape draw:name="Rectangle 41" draw:style-name="gr2" draw:text-style-name="P4" xml:id="id5" draw:id="id5" draw:layer="layout" svg:width="2.952cm" svg:height="2.145cm" svg:x="6.667cm" svg:y="6.869cm">
          <text:p text:style-name="P3"><text:span text:style-name="T3">Client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43" draw:style-name="gr3" draw:text-style-name="P4" xml:id="id4" draw:id="id4" draw:layer="layout" svg:width="3.006cm" svg:height="2.145cm" svg:x="17.439cm" svg:y="11.484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3" draw:style-name="gr1" draw:text-style-name="P6" draw:layer="layout" svg:width="6.718cm" svg:height="3.034cm" svg:x="16.938cm" svg:y="6.424cm">
          <text:p text:style-name="P5"><text:span text:style-name="T3">Server 2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" draw:id="id3" draw:layer="layout" svg:width="3.069cm" svg:height="2.145cm" svg:x="17.439cm" svg:y="6.86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6" draw:layer="layout" svg:width="6.718cm" svg:height="3.033cm" svg:x="16.938cm" svg:y="3.045cm">
          <text:p text:style-name="P5"><text:span text:style-name="T3">Server 1</text:span></text:p>
          <draw:enhanced-geometry svg:viewBox="0 0 21600 21600" draw:type="non-primitive" draw:enhanced-path="M 0 0 L 21600 0 21600 21600 0 21600 Z N"/>
        </draw:custom-shape>
        <draw:custom-shape draw:name="Rectangle 16" draw:style-name="gr6" draw:text-style-name="P4" xml:id="id2" draw:id="id2" draw:layer="layout" svg:width="3.101cm" svg:height="2.146cm" svg:x="17.439cm" svg:y="3.489cm">
          <text:p text:style-name="P3"><text:span text:style-name="T3">Server</text:span></text:p>
          <text:p text:style-name="P3"><text:span text:style-name="T3">Process</text:span></text:p>
          <draw:enhanced-geometry svg:viewBox="0 0 21600 21600" draw:type="non-primitive" draw:enhanced-path="M 0 0 L 21600 0 21600 21600 0 21600 Z N"/>
        </draw:custom-shape>
        <draw:custom-shape draw:name="Rectangle 17" draw:style-name="gr7" draw:text-style-name="P4" xml:id="id1" draw:id="id1" draw:layer="layout" svg:width="3.062cm" svg:height="2.145cm" svg:x="12.826cm" svg:y="6.869cm">
          <text:p text:style-name="P3"><text:span text:style-name="T3">Load</text:span></text:p>
          <text:p text:style-name="P3"><text:span text:style-name="T3">Balancer</text:span></text:p>
          <draw:enhanced-geometry svg:viewBox="0 0 21600 21600" draw:type="non-primitive" draw:enhanced-path="M 0 0 L 21600 0 21600 21600 0 21600 Z N"/>
        </draw:custom-shape>
        <draw:connector draw:name="Straight Arrow Connector 2" draw:style-name="gr8" draw:text-style-name="P7" draw:layer="layout" draw:type="line" svg:x1="15.888cm" svg:y1="7.941cm" svg:x2="17.439cm" svg:y2="4.562cm" draw:start-shape="id1" draw:start-glue-point="1" draw:end-shape="id2" draw:end-glue-point="3" svg:d="M15888 7941l1551-3379" svg:viewBox="0 0 1552 3380">
          <text:p/>
        </draw:connector>
        <draw:connector draw:name="Straight Arrow Connector 22" draw:style-name="gr9" draw:text-style-name="P7" draw:layer="layout" draw:type="line" svg:x1="15.888cm" svg:y1="7.941cm" svg:x2="17.439cm" svg:y2="7.941cm" draw:start-shape="id1" draw:start-glue-point="1" draw:end-shape="id3" draw:end-glue-point="3" svg:d="M15888 7941h1551" svg:viewBox="0 0 1552 1">
          <text:p/>
        </draw:connector>
        <draw:frame draw:name="TextBox 9" draw:style-name="gr10" draw:text-style-name="P9" draw:layer="layout" svg:width="0.788cm" svg:height="1.575cm" svg:x="21.835cm" svg:y="9.427cm">
          <draw:text-box>
            <text:p text:style-name="P8"><text:span text:style-name="T4">.</text:span></text:p>
            <text:p text:style-name="P8"><text:span text:style-name="T4">. </text:span></text:p>
            <text:p text:style-name="P8"><text:span text:style-name="T4">.</text:span></text:p>
          </draw:text-box>
        </draw:frame>
        <draw:connector draw:name="Straight Arrow Connector 26" draw:style-name="gr11" draw:text-style-name="P7" draw:layer="layout" draw:type="line" svg:x1="15.888cm" svg:y1="7.941cm" svg:x2="17.439cm" svg:y2="12.556cm" draw:start-shape="id1" draw:start-glue-point="1" draw:end-shape="id4" draw:end-glue-point="3" svg:d="M15888 7941l1551 4615" svg:viewBox="0 0 1552 4616">
          <text:p/>
        </draw:connector>
        <draw:connector draw:name="Straight Arrow Connector 29" draw:style-name="gr12" draw:text-style-name="P7" draw:layer="layout" draw:type="line" svg:x1="9.619cm" svg:y1="7.941cm" svg:x2="12.826cm" svg:y2="7.941cm" draw:start-shape="id5" draw:start-glue-point="1" draw:end-shape="id1" draw:end-glue-point="3" svg:d="M9619 7941h3207" svg:viewBox="0 0 3208 1">
          <text:p/>
        </draw:connector>
        <draw:custom-shape draw:name="Rectangle 32" draw:style-name="gr13" draw:text-style-name="P10" draw:layer="layout" svg:width="3.667cm" svg:height="12.635cm" svg:x="17.163cm" svg:y="1.672cm">
          <text:p text:style-name="P3"><text:span text:style-name="T3">Service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4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15" draw:text-style-name="P13" draw:layer="layout" svg:width="5.104cm" svg:height="7.643cm" svg:x="5.069cm" svg:y="2.561cm">
          <text:p text:style-name="P12"><text:span text:style-name="T5">Send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6.081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6.0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7.61cm" svg:y1="5.807cm" svg:x2="7.633cm" svg:y2="7.767cm">
          <text:p/>
        </draw:line>
        <draw:custom-shape draw:style-name="gr15" draw:text-style-name="P13" draw:layer="layout" svg:width="5.104cm" svg:height="7.643cm" svg:x="12.669cm" svg:y="2.561cm">
          <text:p text:style-name="P12"><text:span text:style-name="T5">Mail Gateway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13.681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3.681cm" svg:y1="8.843cm" svg:x2="9.162cm" svg:y2="8.843cm">
          <text:p/>
        </draw:line>
        <draw:frame draw:style-name="gr19" draw:text-style-name="P19" draw:layer="layout" svg:width="2.996cm" svg:height="1.055cm" svg:x="9.924cm" svg:y="8.843cm">
          <draw:text-box>
            <text:p text:style-name="P18"><text:span text:style-name="T6">SMTP</text:span></text:p>
          </draw:text-box>
        </draw:frame>
        <draw:custom-shape draw:style-name="gr15" draw:text-style-name="P13" draw:layer="layout" svg:width="5.104cm" svg:height="7.643cm" svg:x="20.295cm" svg:y="2.535cm">
          <text:p text:style-name="P12"><text:span text:style-name="T5">Receiving Ho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081cm" svg:height="1.952cm" svg:x="21.307cm" svg:y="3.855cm">
          <text:p text:style-name="P14"><text:span text:style-name="T5">Mail</text:span></text:p>
          <text:p text:style-name="P14"><text:span text:style-name="T5">R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081cm" svg:height="1.952cm" svg:x="21.307cm" svg:y="7.767cm">
          <text:p text:style-name="P16"><text:span text:style-name="T5">MTA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22.836cm" svg:y1="5.807cm" svg:x2="22.859cm" svg:y2="7.767cm">
          <text:p/>
        </draw:line>
        <draw:frame draw:style-name="gr20" draw:text-style-name="P20" draw:layer="layout" svg:width="1.959cm" svg:height="1.959cm" svg:x="22.637cm" svg:y="7.795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15.038cm" svg:y="7.796cm">
          <draw:image xlink:href="Pictures/10000001000004B0000004B0250C3613.png" xlink:type="simple" xlink:show="embed" xlink:actuate="onLoad" draw:mime-type="image/png">
            <text:p/>
          </draw:image>
        </draw:frame>
        <draw:frame draw:style-name="gr20" draw:text-style-name="P20" draw:layer="layout" svg:width="1.959cm" svg:height="1.959cm" svg:x="7.439cm" svg:y="7.797cm">
          <draw:image xlink:href="Pictures/10000001000004B0000004B0250C3613.png" xlink:type="simple" xlink:show="embed" xlink:actuate="onLoad" draw:mime-type="image/png">
            <text:p/>
          </draw:image>
        </draw:frame>
        <draw:line draw:style-name="gr18" draw:text-style-name="P17" draw:layer="layout" svg:x1="21.282cm" svg:y1="8.843cm" svg:x2="16.763cm" svg:y2="8.843cm">
          <text:p/>
        </draw:line>
        <draw:frame draw:style-name="gr19" draw:text-style-name="P19" draw:layer="layout" svg:width="2.996cm" svg:height="1.055cm" svg:x="17.524cm" svg:y="8.844cm">
          <draw:text-box>
            <text:p text:style-name="P18"><text:span text:style-name="T6">SMTP</text:span></text:p>
          </draw:text-box>
        </draw:frame>
        <presentation:notes draw:style-name="dp2">
          <draw:page-thumbnail draw:style-name="gr14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g draw:style-name="gr21">
          <draw:g draw:style-name="gr22">
            <draw:frame draw:style-name="gr20" draw:text-style-name="P20" draw:layer="layout" svg:width="2.612cm" svg:height="2.612cm" svg:x="4.983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4.983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4.983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4.983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9.9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9.9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9.9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9.9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15.098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15.098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15.098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15.098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g draw:style-name="gr21">
          <draw:g draw:style-name="gr22">
            <draw:frame draw:style-name="gr20" draw:text-style-name="P20" draw:layer="layout" svg:width="2.612cm" svg:height="2.612cm" svg:x="20.17cm" svg:y="11.7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20.17cm" svg:y="10.0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  <draw:g draw:style-name="gr22">
            <draw:frame draw:style-name="gr20" draw:text-style-name="P20" draw:layer="layout" svg:width="2.612cm" svg:height="2.612cm" svg:x="20.17cm" svg:y="8.396cm">
              <draw:image xlink:href="Pictures/10000001000004B0000004B065953AC9.png" xlink:type="simple" xlink:show="embed" xlink:actuate="onLoad" draw:mime-type="image/png">
                <text:p/>
              </draw:image>
            </draw:frame>
            <draw:frame draw:style-name="gr20" draw:text-style-name="P20" draw:layer="layout" svg:width="2.612cm" svg:height="2.612cm" svg:x="20.17cm" svg:y="6.696cm">
              <draw:image xlink:href="Pictures/10000001000004B0000004B065953AC9.png" xlink:type="simple" xlink:show="embed" xlink:actuate="onLoad" draw:mime-type="image/png">
                <text:p/>
              </draw:image>
            </draw:frame>
          </draw:g>
        </draw:g>
        <draw:frame draw:style-name="gr20" draw:text-style-name="P20" draw:layer="layout" svg:width="2.7cm" svg:height="1.198cm" svg:x="4.939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9.9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5.054cm" svg:y="5.7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20.154cm" svg:y="5.732cm">
          <draw:image xlink:href="Pictures/10000001000001370000008A3032A3C2.png" xlink:type="simple" xlink:show="embed" xlink:actuate="onLoad" draw:mime-type="image/png">
            <text:p/>
          </draw:image>
        </draw:frame>
        <draw:g draw:style-name="gr22">
          <draw:line draw:style-name="gr23" draw:text-style-name="P20" draw:layer="layout" svg:x1="4.445cm" svg:y1="6.508cm" svg:x2="4.445cm" svg:y2="13.619cm">
            <text:p/>
          </draw:line>
          <draw:line draw:style-name="gr23" draw:text-style-name="P20" draw:layer="layout" svg:x1="5.114cm" svg:y1="6.486cm" svg:x2="4.445cm" svg:y2="6.508cm">
            <text:p/>
          </draw:line>
          <draw:line draw:style-name="gr23" draw:text-style-name="P20" draw:layer="layout" svg:x1="5.12cm" svg:y1="7.408cm" svg:x2="4.445cm" svg:y2="7.408cm">
            <text:p/>
          </draw:line>
          <draw:line draw:style-name="gr23" draw:text-style-name="P20" draw:layer="layout" svg:x1="5.121cm" svg:y1="8.008cm" svg:x2="4.446cm" svg:y2="8.008cm">
            <text:p/>
          </draw:line>
          <draw:line draw:style-name="gr23" draw:text-style-name="P20" draw:layer="layout" svg:x1="5.122cm" svg:y1="8.608cm" svg:x2="4.447cm" svg:y2="8.608cm">
            <text:p/>
          </draw:line>
          <draw:line draw:style-name="gr23" draw:text-style-name="P20" draw:layer="layout" svg:x1="5.123cm" svg:y1="9.108cm" svg:x2="4.448cm" svg:y2="9.108cm">
            <text:p/>
          </draw:line>
          <draw:line draw:style-name="gr23" draw:text-style-name="P20" draw:layer="layout" svg:x1="5.124cm" svg:y1="9.708cm" svg:x2="4.449cm" svg:y2="9.708cm">
            <text:p/>
          </draw:line>
          <draw:line draw:style-name="gr23" draw:text-style-name="P20" draw:layer="layout" svg:x1="5.125cm" svg:y1="10.308cm" svg:x2="4.45cm" svg:y2="10.308cm">
            <text:p/>
          </draw:line>
          <draw:line draw:style-name="gr23" draw:text-style-name="P20" draw:layer="layout" svg:x1="5.125cm" svg:y1="10.808cm" svg:x2="4.45cm" svg:y2="10.808cm">
            <text:p/>
          </draw:line>
          <draw:line draw:style-name="gr23" draw:text-style-name="P20" draw:layer="layout" svg:x1="5.125cm" svg:y1="11.408cm" svg:x2="4.45cm" svg:y2="11.408cm">
            <text:p/>
          </draw:line>
          <draw:line draw:style-name="gr23" draw:text-style-name="P20" draw:layer="layout" svg:x1="5.125cm" svg:y1="12.008cm" svg:x2="4.45cm" svg:y2="12.008cm">
            <text:p/>
          </draw:line>
          <draw:line draw:style-name="gr23" draw:text-style-name="P20" draw:layer="layout" svg:x1="5.125cm" svg:y1="12.508cm" svg:x2="4.45cm" svg:y2="12.508cm">
            <text:p/>
          </draw:line>
          <draw:line draw:style-name="gr23" draw:text-style-name="P20" draw:layer="layout" svg:x1="5.125cm" svg:y1="13.108cm" svg:x2="4.45cm" svg:y2="13.108cm">
            <text:p/>
          </draw:line>
          <draw:line draw:style-name="gr23" draw:text-style-name="P20" draw:layer="layout" svg:x1="5.125cm" svg:y1="13.608cm" svg:x2="4.45cm" svg:y2="13.608cm">
            <text:p/>
          </draw:line>
        </draw:g>
        <draw:g draw:style-name="gr22">
          <draw:line draw:style-name="gr23" draw:text-style-name="P20" draw:layer="layout" svg:x1="9.445cm" svg:y1="6.509cm" svg:x2="9.445cm" svg:y2="13.62cm">
            <text:p/>
          </draw:line>
          <draw:line draw:style-name="gr23" draw:text-style-name="P20" draw:layer="layout" svg:x1="10.114cm" svg:y1="6.487cm" svg:x2="9.445cm" svg:y2="6.509cm">
            <text:p/>
          </draw:line>
          <draw:line draw:style-name="gr23" draw:text-style-name="P20" draw:layer="layout" svg:x1="10.12cm" svg:y1="7.409cm" svg:x2="9.445cm" svg:y2="7.409cm">
            <text:p/>
          </draw:line>
          <draw:line draw:style-name="gr23" draw:text-style-name="P20" draw:layer="layout" svg:x1="10.121cm" svg:y1="8.009cm" svg:x2="9.446cm" svg:y2="8.009cm">
            <text:p/>
          </draw:line>
          <draw:line draw:style-name="gr23" draw:text-style-name="P20" draw:layer="layout" svg:x1="10.122cm" svg:y1="8.609cm" svg:x2="9.447cm" svg:y2="8.609cm">
            <text:p/>
          </draw:line>
          <draw:line draw:style-name="gr23" draw:text-style-name="P20" draw:layer="layout" svg:x1="10.123cm" svg:y1="9.109cm" svg:x2="9.448cm" svg:y2="9.109cm">
            <text:p/>
          </draw:line>
          <draw:line draw:style-name="gr23" draw:text-style-name="P20" draw:layer="layout" svg:x1="10.124cm" svg:y1="9.709cm" svg:x2="9.449cm" svg:y2="9.709cm">
            <text:p/>
          </draw:line>
          <draw:line draw:style-name="gr23" draw:text-style-name="P20" draw:layer="layout" svg:x1="10.125cm" svg:y1="10.309cm" svg:x2="9.45cm" svg:y2="10.309cm">
            <text:p/>
          </draw:line>
          <draw:line draw:style-name="gr23" draw:text-style-name="P20" draw:layer="layout" svg:x1="10.125cm" svg:y1="10.809cm" svg:x2="9.45cm" svg:y2="10.809cm">
            <text:p/>
          </draw:line>
          <draw:line draw:style-name="gr23" draw:text-style-name="P20" draw:layer="layout" svg:x1="10.125cm" svg:y1="11.409cm" svg:x2="9.45cm" svg:y2="11.409cm">
            <text:p/>
          </draw:line>
          <draw:line draw:style-name="gr23" draw:text-style-name="P20" draw:layer="layout" svg:x1="10.125cm" svg:y1="12.009cm" svg:x2="9.45cm" svg:y2="12.009cm">
            <text:p/>
          </draw:line>
          <draw:line draw:style-name="gr23" draw:text-style-name="P20" draw:layer="layout" svg:x1="10.125cm" svg:y1="12.509cm" svg:x2="9.45cm" svg:y2="12.509cm">
            <text:p/>
          </draw:line>
          <draw:line draw:style-name="gr23" draw:text-style-name="P20" draw:layer="layout" svg:x1="10.125cm" svg:y1="13.109cm" svg:x2="9.45cm" svg:y2="13.109cm">
            <text:p/>
          </draw:line>
          <draw:line draw:style-name="gr23" draw:text-style-name="P20" draw:layer="layout" svg:x1="10.125cm" svg:y1="13.609cm" svg:x2="9.45cm" svg:y2="13.609cm">
            <text:p/>
          </draw:line>
        </draw:g>
        <draw:g draw:style-name="gr22">
          <draw:line draw:style-name="gr23" draw:text-style-name="P20" draw:layer="layout" svg:x1="14.545cm" svg:y1="6.509cm" svg:x2="14.545cm" svg:y2="13.62cm">
            <text:p/>
          </draw:line>
          <draw:line draw:style-name="gr23" draw:text-style-name="P20" draw:layer="layout" svg:x1="15.214cm" svg:y1="6.487cm" svg:x2="14.545cm" svg:y2="6.509cm">
            <text:p/>
          </draw:line>
          <draw:line draw:style-name="gr23" draw:text-style-name="P20" draw:layer="layout" svg:x1="15.22cm" svg:y1="7.409cm" svg:x2="14.545cm" svg:y2="7.409cm">
            <text:p/>
          </draw:line>
          <draw:line draw:style-name="gr23" draw:text-style-name="P20" draw:layer="layout" svg:x1="15.221cm" svg:y1="8.009cm" svg:x2="14.546cm" svg:y2="8.009cm">
            <text:p/>
          </draw:line>
          <draw:line draw:style-name="gr23" draw:text-style-name="P20" draw:layer="layout" svg:x1="15.222cm" svg:y1="8.609cm" svg:x2="14.547cm" svg:y2="8.609cm">
            <text:p/>
          </draw:line>
          <draw:line draw:style-name="gr23" draw:text-style-name="P20" draw:layer="layout" svg:x1="15.223cm" svg:y1="9.109cm" svg:x2="14.548cm" svg:y2="9.109cm">
            <text:p/>
          </draw:line>
          <draw:line draw:style-name="gr23" draw:text-style-name="P20" draw:layer="layout" svg:x1="15.224cm" svg:y1="9.709cm" svg:x2="14.549cm" svg:y2="9.709cm">
            <text:p/>
          </draw:line>
          <draw:line draw:style-name="gr23" draw:text-style-name="P20" draw:layer="layout" svg:x1="15.225cm" svg:y1="10.309cm" svg:x2="14.55cm" svg:y2="10.309cm">
            <text:p/>
          </draw:line>
          <draw:line draw:style-name="gr23" draw:text-style-name="P20" draw:layer="layout" svg:x1="15.225cm" svg:y1="10.809cm" svg:x2="14.55cm" svg:y2="10.809cm">
            <text:p/>
          </draw:line>
          <draw:line draw:style-name="gr23" draw:text-style-name="P20" draw:layer="layout" svg:x1="15.225cm" svg:y1="11.409cm" svg:x2="14.55cm" svg:y2="11.409cm">
            <text:p/>
          </draw:line>
          <draw:line draw:style-name="gr23" draw:text-style-name="P20" draw:layer="layout" svg:x1="15.225cm" svg:y1="12.009cm" svg:x2="14.55cm" svg:y2="12.009cm">
            <text:p/>
          </draw:line>
          <draw:line draw:style-name="gr23" draw:text-style-name="P20" draw:layer="layout" svg:x1="15.225cm" svg:y1="12.509cm" svg:x2="14.55cm" svg:y2="12.509cm">
            <text:p/>
          </draw:line>
          <draw:line draw:style-name="gr23" draw:text-style-name="P20" draw:layer="layout" svg:x1="15.225cm" svg:y1="13.109cm" svg:x2="14.55cm" svg:y2="13.109cm">
            <text:p/>
          </draw:line>
          <draw:line draw:style-name="gr23" draw:text-style-name="P20" draw:layer="layout" svg:x1="15.225cm" svg:y1="13.609cm" svg:x2="14.55cm" svg:y2="13.609cm">
            <text:p/>
          </draw:line>
        </draw:g>
        <draw:g draw:style-name="gr22">
          <draw:line draw:style-name="gr23" draw:text-style-name="P20" draw:layer="layout" svg:x1="19.645cm" svg:y1="6.51cm" svg:x2="19.645cm" svg:y2="13.621cm">
            <text:p/>
          </draw:line>
          <draw:line draw:style-name="gr23" draw:text-style-name="P20" draw:layer="layout" svg:x1="20.314cm" svg:y1="6.488cm" svg:x2="19.645cm" svg:y2="6.51cm">
            <text:p/>
          </draw:line>
          <draw:line draw:style-name="gr23" draw:text-style-name="P20" draw:layer="layout" svg:x1="20.32cm" svg:y1="7.41cm" svg:x2="19.645cm" svg:y2="7.41cm">
            <text:p/>
          </draw:line>
          <draw:line draw:style-name="gr23" draw:text-style-name="P20" draw:layer="layout" svg:x1="20.321cm" svg:y1="8.01cm" svg:x2="19.646cm" svg:y2="8.01cm">
            <text:p/>
          </draw:line>
          <draw:line draw:style-name="gr23" draw:text-style-name="P20" draw:layer="layout" svg:x1="20.322cm" svg:y1="8.61cm" svg:x2="19.647cm" svg:y2="8.61cm">
            <text:p/>
          </draw:line>
          <draw:line draw:style-name="gr23" draw:text-style-name="P20" draw:layer="layout" svg:x1="20.323cm" svg:y1="9.11cm" svg:x2="19.648cm" svg:y2="9.11cm">
            <text:p/>
          </draw:line>
          <draw:line draw:style-name="gr23" draw:text-style-name="P20" draw:layer="layout" svg:x1="20.324cm" svg:y1="9.71cm" svg:x2="19.649cm" svg:y2="9.71cm">
            <text:p/>
          </draw:line>
          <draw:line draw:style-name="gr23" draw:text-style-name="P20" draw:layer="layout" svg:x1="20.325cm" svg:y1="10.31cm" svg:x2="19.65cm" svg:y2="10.31cm">
            <text:p/>
          </draw:line>
          <draw:line draw:style-name="gr23" draw:text-style-name="P20" draw:layer="layout" svg:x1="20.325cm" svg:y1="10.81cm" svg:x2="19.65cm" svg:y2="10.81cm">
            <text:p/>
          </draw:line>
          <draw:line draw:style-name="gr23" draw:text-style-name="P20" draw:layer="layout" svg:x1="20.325cm" svg:y1="11.41cm" svg:x2="19.65cm" svg:y2="11.41cm">
            <text:p/>
          </draw:line>
          <draw:line draw:style-name="gr23" draw:text-style-name="P20" draw:layer="layout" svg:x1="20.325cm" svg:y1="12.01cm" svg:x2="19.65cm" svg:y2="12.01cm">
            <text:p/>
          </draw:line>
          <draw:line draw:style-name="gr23" draw:text-style-name="P20" draw:layer="layout" svg:x1="20.325cm" svg:y1="12.51cm" svg:x2="19.65cm" svg:y2="12.51cm">
            <text:p/>
          </draw:line>
          <draw:line draw:style-name="gr23" draw:text-style-name="P20" draw:layer="layout" svg:x1="20.325cm" svg:y1="13.11cm" svg:x2="19.65cm" svg:y2="13.11cm">
            <text:p/>
          </draw:line>
          <draw:line draw:style-name="gr23" draw:text-style-name="P20" draw:layer="layout" svg:x1="20.325cm" svg:y1="13.61cm" svg:x2="19.65cm" svg:y2="13.61cm">
            <text:p/>
          </draw:line>
        </draw:g>
        <draw:frame draw:style-name="gr20" draw:text-style-name="P20" draw:layer="layout" svg:width="2.7cm" svg:height="1.198cm" svg:x="7.4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2.539cm" svg:y="2.932cm">
          <draw:image xlink:href="Pictures/10000001000001370000008A3032A3C2.png" xlink:type="simple" xlink:show="embed" xlink:actuate="onLoad" draw:mime-type="image/png">
            <text:p/>
          </draw:image>
        </draw:frame>
        <draw:frame draw:style-name="gr20" draw:text-style-name="P20" draw:layer="layout" svg:width="2.7cm" svg:height="1.198cm" svg:x="17.639cm" svg:y="2.932cm">
          <draw:image xlink:href="Pictures/10000001000001370000008A3032A3C2.png" xlink:type="simple" xlink:show="embed" xlink:actuate="onLoad" draw:mime-type="image/png">
            <text:p/>
          </draw:image>
        </draw:frame>
        <draw:line draw:style-name="gr23" draw:text-style-name="P20" draw:layer="layout" svg:x1="6.381cm" svg:y1="5.732cm" svg:x2="8.412cm" svg:y2="3.969cm">
          <text:p/>
        </draw:line>
        <draw:line draw:style-name="gr23" draw:text-style-name="P20" draw:layer="layout" svg:x1="11.482cm" svg:y1="5.733cm" svg:x2="13.513cm" svg:y2="3.97cm">
          <text:p/>
        </draw:line>
        <draw:line draw:style-name="gr23" draw:text-style-name="P20" draw:layer="layout" svg:x1="16.583cm" svg:y1="5.734cm" svg:x2="18.614cm" svg:y2="3.971cm">
          <text:p/>
        </draw:line>
        <draw:line draw:style-name="gr23" draw:text-style-name="P20" draw:layer="layout" svg:x1="11.482cm" svg:y1="5.733cm" svg:x2="8.412cm" svg:y2="3.969cm">
          <text:p/>
        </draw:line>
        <draw:line draw:style-name="gr23" draw:text-style-name="P20" draw:layer="layout" svg:x1="16.582cm" svg:y1="5.733cm" svg:x2="13.512cm" svg:y2="3.969cm">
          <text:p/>
        </draw:line>
        <draw:line draw:style-name="gr23" draw:text-style-name="P20" draw:layer="layout" svg:x1="21.682cm" svg:y1="5.733cm" svg:x2="18.612cm" svg:y2="3.969cm">
          <text:p/>
        </draw:line>
        <draw:line draw:style-name="gr23" draw:text-style-name="P20" draw:layer="layout" svg:x1="16.582cm" svg:y1="5.732cm" svg:x2="8.412cm" svg:y2="3.969cm">
          <text:p/>
        </draw:line>
        <draw:line draw:style-name="gr23" draw:text-style-name="P20" draw:layer="layout" svg:x1="21.682cm" svg:y1="5.733cm" svg:x2="13.512cm" svg:y2="3.97cm">
          <text:p/>
        </draw:line>
        <draw:line draw:style-name="gr23" draw:text-style-name="P20" draw:layer="layout" svg:x1="6.381cm" svg:y1="5.732cm" svg:x2="13.512cm" svg:y2="3.97cm">
          <text:p/>
        </draw:line>
        <draw:line draw:style-name="gr23" draw:text-style-name="P20" draw:layer="layout" svg:x1="11.482cm" svg:y1="5.732cm" svg:x2="18.613cm" svg:y2="3.97cm">
          <text:p/>
        </draw:line>
        <draw:line draw:style-name="gr23" draw:text-style-name="P20" draw:layer="layout" svg:x1="6.381cm" svg:y1="5.732cm" svg:x2="18.612cm" svg:y2="3.971cm">
          <text:p/>
        </draw:line>
        <draw:line draw:style-name="gr23" draw:text-style-name="P20" draw:layer="layout" svg:x1="21.537cm" svg:y1="5.732cm" svg:x2="8.412cm" svg:y2="3.971cm">
          <text:p/>
        </draw:line>
        <presentation:notes draw:style-name="dp2">
          <draw:page-thumbnail draw:style-name="gr14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">
        <draw:custom-shape draw:name="Oval 1" draw:style-name="gr24" draw:text-style-name="P21" xml:id="id7" draw:id="id7" draw:layer="layout" svg:width="10.409cm" svg:height="2.469cm" svg:x="10.778cm" svg:y="6.45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0" draw:style-name="gr25" draw:text-style-name="P22" xml:id="id8" draw:id="id8" draw:layer="layout" svg:width="10.409cm" svg:height="2.468cm" svg:x="11.13cm" svg:y="7.133cm">
          <text:p text:style-name="P3"><text:span text:style-name="T3">Backbone Service Provid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" draw:style-name="gr26" draw:text-style-name="P23" xml:id="id6" draw:id="id6" draw:layer="layout" svg:width="0.746cm" svg:height="0.759cm" svg:x="9.405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2" draw:style-name="gr26" draw:text-style-name="P23" xml:id="id9" draw:id="id9" draw:layer="layout" svg:width="0.746cm" svg:height="0.759cm" svg:x="22.201cm" svg:y="7.69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" draw:style-name="gr27" draw:text-style-name="P7" draw:layer="layout" draw:type="line" svg:x1="10.151cm" svg:y1="8.072cm" svg:x2="10.778cm" svg:y2="7.691cm" draw:start-shape="id6" draw:start-glue-point="1" draw:end-shape="id7" draw:end-glue-point="3" svg:d="M10151 8072l627-381" svg:viewBox="0 0 628 382">
          <text:p/>
        </draw:connector>
        <draw:connector draw:name="Straight Connector 6" draw:style-name="gr27" draw:text-style-name="P7" draw:layer="layout" draw:type="line" svg:x1="10.151cm" svg:y1="8.072cm" svg:x2="11.13cm" svg:y2="8.367cm" draw:start-shape="id6" draw:start-glue-point="1" draw:end-shape="id8" draw:end-glue-point="3" svg:d="M10151 8072l979 295" svg:viewBox="0 0 980 296">
          <text:p/>
        </draw:connector>
        <draw:connector draw:name="Straight Connector 8" draw:style-name="gr27" draw:text-style-name="P7" draw:layer="layout" draw:type="line" svg:x1="22.201cm" svg:y1="8.072cm" svg:x2="21.187cm" svg:y2="7.693cm" draw:start-shape="id9" draw:start-glue-point="3" svg:d="M22201 8072l-1014-379" svg:viewBox="0 0 1015 380">
          <text:p/>
        </draw:connector>
        <draw:connector draw:name="Straight Connector 10" draw:style-name="gr27" draw:text-style-name="P7" draw:layer="layout" draw:type="line" svg:x1="22.201cm" svg:y1="8.072cm" svg:x2="21.539cm" svg:y2="8.367cm" draw:start-shape="id9" draw:start-glue-point="3" draw:end-shape="id8" draw:end-glue-point="1" svg:d="M22201 8072l-662 295" svg:viewBox="0 0 663 296">
          <text:p/>
        </draw:connector>
        <draw:custom-shape draw:name="Oval 51" draw:style-name="gr28" draw:text-style-name="P25" xml:id="id10" draw:id="id10" draw:layer="layout" svg:width="3.796cm" svg:height="1.953cm" svg:x="6.355cm" svg:y="9.443cm">
          <text:p text:style-name="P24"><text:span text:style-name="T7">Access</text:span></text:p>
          <text:p text:style-name="P24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4" draw:style-name="gr29" draw:text-style-name="P27" xml:id="id11" draw:id="id11" draw:layer="layout" svg:width="3.915cm" svg:height="1.953cm" svg:x="22.201cm" svg:y="9.443cm">
          <text:p text:style-name="P26"><text:span text:style-name="T7">Access</text:span></text:p>
          <text:p text:style-name="P26"><text:span text:style-name="T7">Network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" draw:style-name="gr27" draw:text-style-name="P7" draw:layer="layout" draw:type="line" svg:x1="8.253cm" svg:y1="9.443cm" svg:x2="9.514cm" svg:y2="8.341cm" draw:start-shape="id10" draw:start-glue-point="0" draw:end-shape="id6" draw:end-glue-point="5" svg:d="M8253 9443l1261-1102" svg:viewBox="0 0 1262 1103">
          <text:p/>
        </draw:connector>
        <draw:connector draw:name="Straight Connector 14" draw:style-name="gr27" draw:text-style-name="P7" draw:layer="layout" draw:type="line" svg:x1="24.158cm" svg:y1="9.443cm" svg:x2="22.574cm" svg:y2="8.452cm" draw:start-shape="id11" draw:start-glue-point="0" draw:end-shape="id9" draw:end-glue-point="2" svg:d="M24158 9443l-1584-991" svg:viewBox="0 0 1585 992">
          <text:p/>
        </draw:connector>
        <draw:custom-shape draw:name="Oval 64" draw:style-name="gr30" draw:text-style-name="P4" xml:id="id13" draw:id="id13" draw:layer="layout" svg:width="10.41cm" svg:height="2.469cm" svg:x="10.855cm" svg:y="3.092cm">
          <text:p text:style-name="P3"><text:span text:style-name="T3">Private Cloud Backbo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loud 23" draw:style-name="gr31" draw:text-style-name="P29" xml:id="id12" draw:id="id12" draw:layer="layout" svg:width="4.904cm" svg:height="1.987cm" svg:x="6.273cm" svg:y="4.984cm">
          <text:p text:style-name="P28"><text:span text:style-name="T7">Cloud</text:span></text:p>
          <text:p text:style-name="P28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25" draw:style-name="gr32" draw:text-style-name="P7" draw:layer="layout" draw:type="line" svg:x1="8.725cm" svg:y1="5.097cm" svg:x2="10.855cm" svg:y2="4.326cm" draw:start-shape="id12" draw:start-glue-point="7" draw:end-shape="id13" draw:end-glue-point="3" svg:d="M8725 5097l2130-771" svg:viewBox="0 0 2131 772">
          <text:p/>
        </draw:connector>
        <draw:connector draw:name="Straight Connector 27" draw:style-name="gr32" draw:text-style-name="P7" draw:layer="layout" draw:type="line" svg:x1="8.725cm" svg:y1="6.969cm" svg:x2="9.778cm" svg:y2="7.693cm" draw:start-shape="id12" draw:start-glue-point="5" draw:end-shape="id6" draw:end-glue-point="0" svg:d="M8725 6969l1053 724" svg:viewBox="0 0 1054 725">
          <text:p/>
        </draw:connector>
        <draw:connector draw:name="Straight Connector 30" draw:style-name="gr32" draw:text-style-name="P7" draw:layer="layout" draw:type="line" svg:x1="21.265cm" svg:y1="4.326cm" svg:x2="23.524cm" svg:y2="5.104cm" draw:start-shape="id13" draw:start-glue-point="1" draw:end-shape="id14" draw:end-glue-point="7" svg:d="M21265 4326l2259 778" svg:viewBox="0 0 2260 779">
          <text:p/>
        </draw:connector>
        <draw:connector draw:name="Straight Connector 224" draw:style-name="gr32" draw:text-style-name="P7" draw:layer="layout" draw:type="line" svg:x1="23.118cm" svg:y1="6.866cm" svg:x2="22.574cm" svg:y2="7.693cm" draw:end-shape="id9" draw:end-glue-point="0" svg:d="M23118 6866l-544 827" svg:viewBox="0 0 545 828">
          <text:p/>
        </draw:connector>
        <draw:frame draw:name="TextBox 234" draw:style-name="gr33" draw:text-style-name="P31" draw:layer="layout" svg:width="1.532cm" svg:height="1.171cm" svg:x="22.872cm" svg:y="7.46cm">
          <draw:text-box>
            <text:p text:style-name="P30"><text:span text:style-name="T3">IXP</text:span></text:p>
          </draw:text-box>
        </draw:frame>
        <draw:frame draw:name="TextBox 85" draw:style-name="gr34" draw:text-style-name="P31" draw:layer="layout" svg:width="1.531cm" svg:height="1.171cm" svg:x="8.126cm" svg:y="7.543cm">
          <draw:text-box>
            <text:p text:style-name="P30"><text:span text:style-name="T3">IXP</text:span></text:p>
          </draw:text-box>
        </draw:frame>
        <draw:frame draw:name="Picture 239" draw:style-name="gr35" draw:text-style-name="P7" xml:id="id15" draw:id="id15" draw:layer="layout" svg:width="2.528cm" svg:height="1.817cm" svg:x="5.46cm" svg:y="11.591cm">
          <draw:image xlink:href="Pictures/100000010000046D00000320CC065078.png" xlink:type="simple" xlink:show="embed" xlink:actuate="onLoad" draw:mime-type="image/png">
            <text:p/>
          </draw:image>
        </draw:frame>
        <draw:frame draw:name="Picture 89" draw:style-name="gr36" draw:text-style-name="P7" draw:layer="layout" svg:width="2.528cm" svg:height="1.817cm" svg:x="24.529cm" svg:y="11.591cm">
          <draw:image xlink:href="Pictures/100000010000046D00000320CC065078.png" xlink:type="simple" xlink:show="embed" xlink:actuate="onLoad" draw:mime-type="image/png">
            <text:p/>
          </draw:image>
        </draw:frame>
        <draw:connector draw:name="Straight Connector 241" draw:style-name="gr27" draw:text-style-name="P7" draw:layer="layout" draw:type="line" svg:x1="7.988cm" svg:y1="12.499cm" svg:x2="8.253cm" svg:y2="11.396cm" draw:start-shape="id15" draw:start-glue-point="1" draw:end-shape="id10" draw:end-glue-point="2" svg:d="M7988 12499l265-1103" svg:viewBox="0 0 266 1104">
          <text:p/>
        </draw:connector>
        <draw:frame draw:name="TextBox 244" draw:style-name="gr37" draw:text-style-name="P32" draw:layer="layout" svg:width="3.919cm" svg:height="2.05cm" svg:x="8.238cm" svg:y="12.02cm">
          <draw:text-box>
            <text:p text:style-name="P30"><text:span text:style-name="T7">West Coast</text:span></text:p>
            <text:p text:style-name="P30"><text:span text:style-name="T7">User</text:span></text:p>
          </draw:text-box>
        </draw:frame>
        <draw:frame draw:name="TextBox 98" draw:style-name="gr38" draw:text-style-name="P34" draw:layer="layout" svg:width="3.626cm" svg:height="2.049cm" svg:x="21.562cm" svg:y="11.805cm">
          <draw:text-box>
            <text:p text:style-name="P33"><text:span text:style-name="T7">East Coast</text:span></text:p>
            <text:p text:style-name="P33"><text:span text:style-name="T7">User</text:span></text:p>
          </draw:text-box>
        </draw:frame>
        <draw:custom-shape draw:name="Cloud 1" draw:style-name="gr31" draw:text-style-name="P29" xml:id="id14" draw:id="id14" draw:layer="layout" svg:width="4.904cm" svg:height="1.987cm" svg:x="21.072cm" svg:y="4.991cm">
          <text:p text:style-name="P28"><text:span text:style-name="T7">Cloud</text:span></text:p>
          <text:p text:style-name="P28"><text:span text:style-name="T7">Datacenter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name="Straight Connector 1" draw:style-name="gr27" draw:text-style-name="P7" draw:layer="layout" draw:type="line" svg:x1="24.453cm" svg:y1="12.571cm" svg:x2="24.254cm" svg:y2="11.397cm" svg:d="M24453 12571l-199-1174" svg:viewBox="0 0 200 1175">
          <text:p/>
        </draw:connector>
        <presentation:notes draw:style-name="dp2">
          <draw:page-thumbnail draw:style-name="gr14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">
        <draw:line draw:style-name="gr39" draw:text-style-name="P20" draw:layer="layout" svg:x1="7.645cm" svg:y1="1.872cm" svg:x2="7.613cm" svg:y2="15.111cm">
          <text:p/>
        </draw:line>
        <draw:line draw:style-name="gr39" draw:text-style-name="P20" draw:layer="layout" svg:x1="15.282cm" svg:y1="1.872cm" svg:x2="15.301cm" svg:y2="15.111cm">
          <text:p/>
        </draw:line>
        <draw:line draw:style-name="gr40" draw:text-style-name="P35" draw:layer="layout" svg:x1="7.682cm" svg:y1="8.332cm" svg:x2="15.282cm" svg:y2="9.094cm">
          <text:p text:style-name="P18"><text:span text:style-name="T5">HTTP GET</text:span></text:p>
          <text:p text:style-name="P18"><text:span text:style-name="T8"/></text:p>
        </draw:line>
        <draw:line draw:style-name="gr41" draw:text-style-name="P35" draw:layer="layout" svg:x1="7.682cm" svg:y1="10.948cm" svg:x2="15.282cm" svg:y2="9.656cm">
          <text:p text:style-name="P18"><text:span text:style-name="T5">HTTP Response</text:span></text:p>
          <text:p text:style-name="P18"><text:span text:style-name="T8"/></text:p>
        </draw:line>
        <draw:g draw:style-name="gr22">
          <draw:line draw:style-name="gr42" draw:text-style-name="P20" draw:layer="layout" svg:x1="7.682cm" svg:y1="6.13cm" svg:x2="15.282cm" svg:y2="6.829cm">
            <text:p/>
          </draw:line>
          <draw:line draw:style-name="gr43" draw:text-style-name="P20" draw:layer="layout" svg:x1="15.282cm" svg:y1="7.114cm" svg:x2="7.682cm" svg:y2="7.749cm">
            <text:p/>
          </draw:line>
        </draw:g>
        <draw:g draw:style-name="gr22">
          <draw:line draw:style-name="gr42" draw:text-style-name="P20" draw:layer="layout" svg:x1="7.682cm" svg:y1="2.297cm" svg:x2="15.282cm" svg:y2="2.996cm">
            <text:p/>
          </draw:line>
          <draw:line draw:style-name="gr43" draw:text-style-name="P20" draw:layer="layout" svg:x1="15.282cm" svg:y1="3.281cm" svg:x2="7.682cm" svg:y2="3.916cm">
            <text:p/>
          </draw:line>
        </draw:g>
        <draw:g draw:style-name="gr22">
          <draw:line draw:style-name="gr42" draw:text-style-name="P20" draw:layer="layout" svg:x1="7.682cm" svg:y1="4.197cm" svg:x2="15.282cm" svg:y2="4.896cm">
            <text:p/>
          </draw:line>
          <draw:line draw:style-name="gr43" draw:text-style-name="P20" draw:layer="layout" svg:x1="15.282cm" svg:y1="5.181cm" svg:x2="7.682cm" svg:y2="5.816cm">
            <text:p/>
          </draw:line>
        </draw:g>
        <draw:g draw:style-name="gr22">
          <draw:line draw:style-name="gr42" draw:text-style-name="P20" draw:layer="layout" svg:x1="7.682cm" svg:y1="11.264cm" svg:x2="15.282cm" svg:y2="11.963cm">
            <text:p/>
          </draw:line>
          <draw:line draw:style-name="gr43" draw:text-style-name="P20" draw:layer="layout" svg:x1="15.282cm" svg:y1="12.248cm" svg:x2="7.682cm" svg:y2="12.883cm">
            <text:p/>
          </draw:line>
        </draw:g>
        <draw:g draw:style-name="gr22">
          <draw:line draw:style-name="gr42" draw:text-style-name="P20" draw:layer="layout" svg:x1="7.682cm" svg:y1="13.164cm" svg:x2="15.282cm" svg:y2="13.863cm">
            <text:p/>
          </draw:line>
          <draw:line draw:style-name="gr43" draw:text-style-name="P20" draw:layer="layout" svg:x1="15.282cm" svg:y1="14.148cm" svg:x2="7.682cm" svg:y2="14.783cm">
            <text:p/>
          </draw:line>
        </draw:g>
        <draw:frame draw:style-name="gr44" draw:text-style-name="P36" draw:layer="layout" svg:width="1.988cm" svg:height="1.026cm" svg:x="6.635cm" svg:y="0.826cm">
          <draw:text-box>
            <text:p><text:span text:style-name="T9">Client</text:span></text:p>
          </draw:text-box>
        </draw:frame>
        <draw:frame draw:style-name="gr45" draw:text-style-name="P37" draw:layer="layout" svg:width="2.155cm" svg:height="1.026cm" svg:x="14.153cm" svg:y="0.826cm">
          <draw:text-box>
            <text:p text:style-name="P18"><text:span text:style-name="T9">Server</text:span></text:p>
          </draw:text-box>
        </draw:frame>
        <draw:custom-shape draw:style-name="gr46" draw:text-style-name="P20" draw:layer="layout" svg:width="0.19cm" svg:height="4.921cm" svg:x="15.619cm" svg:y="2.4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7" draw:text-style-name="P36" draw:layer="layout" svg:width="5.077cm" svg:height="1.801cm" svg:x="15.809cm" svg:y="4.036cm">
          <draw:text-box>
            <text:p><text:span text:style-name="T9">TCP and TLS</text:span></text:p>
            <text:p><text:span text:style-name="T9">Connection Setup</text:span></text:p>
          </draw:text-box>
        </draw:frame>
        <draw:custom-shape draw:style-name="gr48" draw:text-style-name="P20" draw:layer="layout" svg:width="0.19cm" svg:height="3.617cm" svg:x="15.607cm" svg:y="11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9" draw:text-style-name="P36" draw:layer="layout" svg:width="6.132cm" svg:height="1.801cm" svg:x="15.797cm" svg:y="11.988cm">
          <draw:text-box>
            <text:p><text:span text:style-name="T9">TCP and TLS</text:span></text:p>
            <text:p><text:span text:style-name="T9">Connection Teardown</text:span></text:p>
          </draw:text-box>
        </draw:frame>
        <presentation:notes draw:style-name="dp2">
          <draw:page-thumbnail draw:style-name="gr14" draw:layer="layout" svg:width="0.001cm" svg:height="0.001cm" svg:x="0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">
        <draw:custom-shape draw:style-name="gr50" draw:text-style-name="P38" draw:layer="layout" svg:width="2.54cm" svg:height="2.54cm" svg:x="16.381cm" svg:y="4.54cm">
          <text:p text:style-name="P18"><text:span text:style-name="T10">Video 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6.097cm" svg:height="1.516cm" svg:x="8.803cm" svg:y="5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0" draw:layer="layout" svg:x1="9.303cm" svg:y1="5.052cm" svg:x2="9.303cm" svg:y2="6.568cm">
          <text:p/>
        </draw:line>
        <draw:line draw:style-name="gr52" draw:text-style-name="P20" draw:layer="layout" svg:x1="10.103cm" svg:y1="5.052cm" svg:x2="10.103cm" svg:y2="6.568cm">
          <text:p/>
        </draw:line>
        <draw:line draw:style-name="gr52" draw:text-style-name="P20" draw:layer="layout" svg:x1="10.903cm" svg:y1="5.052cm" svg:x2="10.903cm" svg:y2="6.568cm">
          <text:p/>
        </draw:line>
        <draw:line draw:style-name="gr52" draw:text-style-name="P20" draw:layer="layout" svg:x1="11.703cm" svg:y1="5.052cm" svg:x2="11.703cm" svg:y2="6.568cm">
          <text:p/>
        </draw:line>
        <draw:line draw:style-name="gr52" draw:text-style-name="P20" draw:layer="layout" svg:x1="12.503cm" svg:y1="5.052cm" svg:x2="12.503cm" svg:y2="6.568cm">
          <text:p/>
        </draw:line>
        <draw:line draw:style-name="gr52" draw:text-style-name="P20" draw:layer="layout" svg:x1="13.303cm" svg:y1="5.052cm" svg:x2="13.303cm" svg:y2="6.568cm">
          <text:p/>
        </draw:line>
        <draw:line draw:style-name="gr52" draw:text-style-name="P20" draw:layer="layout" svg:x1="14.103cm" svg:y1="5.052cm" svg:x2="14.103cm" svg:y2="6.568cm">
          <text:p/>
        </draw:line>
        <draw:line draw:style-name="gr53" draw:text-style-name="P20" draw:layer="layout" svg:x1="8.818cm" svg:y1="4.985cm" svg:x2="8.816cm" svg:y2="6.635cm">
          <text:p/>
        </draw:line>
        <draw:custom-shape draw:style-name="gr54" draw:text-style-name="P39" draw:layer="layout" svg:width="0.541cm" svg:height="0.635cm" svg:x="11.0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11.8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12.6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13.4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14.2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6.9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4.8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4.022cm" svg:y="5.49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0.541cm" svg:height="0.635cm" svg:x="1.922cm" svg:y="5.493cm">
          <text:p/>
          <draw:enhanced-geometry svg:viewBox="0 0 21600 21600" draw:type="rectangle" draw:enhanced-path="M 0 0 L 21600 0 21600 21600 0 21600 0 0 Z N"/>
        </draw:custom-shape>
        <draw:line draw:style-name="gr55" draw:text-style-name="P20" draw:layer="layout" svg:x1="7.969cm" svg:y1="5.81cm" svg:x2="9.016cm" svg:y2="5.81cm">
          <text:p/>
        </draw:line>
        <draw:line draw:style-name="gr55" draw:text-style-name="P20" draw:layer="layout" svg:x1="15.157cm" svg:y1="5.81cm" svg:x2="16.204cm" svg:y2="5.81cm">
          <text:p/>
        </draw:line>
        <draw:line draw:style-name="gr55" draw:text-style-name="P20" draw:layer="layout" svg:x1="19.145cm" svg:y1="5.81cm" svg:x2="20.192cm" svg:y2="5.81cm">
          <text:p/>
        </draw:line>
        <draw:custom-shape draw:style-name="gr56" draw:text-style-name="P40" draw:layer="layout" svg:width="0.541cm" svg:height="0.635cm" svg:x="20.422cm" svg:y="5.4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0.541cm" svg:height="0.635cm" svg:x="21.222cm" svg:y="5.4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0.541cm" svg:height="0.635cm" svg:x="22.022cm" svg:y="5.4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0.541cm" svg:height="0.635cm" svg:x="22.822cm" svg:y="5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0.276cm" svg:height="3.062cm" draw:transform="rotate (-1.56765473414131) translate (23.376cm 6.6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58" draw:text-style-name="P20" draw:layer="layout" svg:width="0.302cm" svg:height="5.623cm" draw:transform="rotate (-1.56765473414131) translate (7.496cm 6.5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59" draw:text-style-name="P41" draw:layer="layout" svg:width="4.009cm" svg:height="1.453cm" svg:x="19.841cm" svg:y="6.984cm">
          <draw:text-box>
            <text:p text:style-name="P18"><text:span text:style-name="T11">Frames displayed</text:span></text:p>
            <text:p text:style-name="P18"><text:span text:style-name="T11">at a constant rate</text:span></text:p>
          </draw:text-box>
        </draw:frame>
        <draw:frame draw:style-name="gr59" draw:text-style-name="P41" draw:layer="layout" svg:width="3.926cm" svg:height="1.453cm" svg:x="2.687cm" svg:y="6.985cm">
          <draw:text-box>
            <text:p text:style-name="P18"><text:span text:style-name="T11">Packets arrive at</text:span></text:p>
            <text:p text:style-name="P18"><text:span text:style-name="T11">variable intervals</text:span></text:p>
          </draw:text-box>
        </draw:frame>
        <draw:frame draw:style-name="gr59" draw:text-style-name="P41" draw:layer="layout" svg:width="3.593cm" svg:height="0.852cm" svg:x="10.257cm" svg:y="6.686cm">
          <draw:text-box>
            <text:p text:style-name="P18"><text:span text:style-name="T11">Playback Buffer</text:span></text:p>
          </draw:text-box>
        </draw:frame>
        <presentation:notes draw:style-name="dp3">
          <draw:page-thumbnail draw:style-name="gr14" draw:layer="layout" svg:width="0.001cm" svg:height="0.001cm" svg:x="0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822" svg:viewBox="0 0 20 30" svg:d="M10 0l-10 30h20z"/>
    <draw:marker draw:name="a824" svg:viewBox="0 0 20 30" svg:d="M10 0l-10 30h20z"/>
    <draw:marker draw:name="a834" svg:viewBox="0 0 20 30" svg:d="M10 0l-10 30h20z"/>
    <draw:marker draw:name="a836" svg:viewBox="0 0 20 30" svg:d="M10 0l-10 30h20z"/>
    <draw:stroke-dash draw:name="SysDot" draw:style="rect" draw:dots1="1" draw:dots1-length="0.079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2:25:18.326757000</meta:creation-date>
    <dc:date>2026-02-24T09:30:56.804981000</dc:date>
    <meta:editing-duration>PT5H43M17S</meta:editing-duration>
    <meta:editing-cycles>15</meta:editing-cycles>
    <meta:generator>LibreOffice/25.2.4.3$MacOSX_AARCH64 LibreOffice_project/33e196637044ead23f5c3226cde09b47731f7e27</meta:generator>
    <meta:print-date>2026-02-24T09:30:52.318502000</meta:print-date>
    <meta:printed-by>PDF files</meta:printed-by>
    <meta:document-statistic meta:object-count="265"/>
  </office:meta>
</office:document-meta>
</file>