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6D00000320CC065078.png" manifest:media-type="image/png"/>
  <manifest:file-entry manifest:full-path="Pictures/10000001000001370000008A3032A3C2.png" manifest:media-type="image/png"/>
  <manifest:file-entry manifest:full-path="Pictures/10000001000004B0000004B065953AC9.png" manifest:media-type="image/png"/>
  <manifest:file-entry manifest:full-path="Pictures/10000001000004B0000004B0250C3613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ffffff" draw:opacity="100%" draw:textarea-horizontal-align="right" draw:textarea-vertical-align="bottom" draw:auto-grow-height="false" draw:auto-grow-width="false" fo:min-height="2.78cm" fo:min-width="6.21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947cm" fo:min-width="2.5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891cm" fo:min-width="2.498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891cm" fo:min-width="2.561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ffffff" draw:opacity="100%" draw:textarea-horizontal-align="right" draw:textarea-vertical-align="bottom" draw:auto-grow-height="false" draw:auto-grow-width="false" fo:min-height="2.779cm" fo:min-width="6.21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892cm" fo:min-width="2.593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947cm" fo:min-width="2.61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53cm" svg:stroke-color="#000000" draw:marker-end="a822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solid" svg:stroke-width="0.053cm" svg:stroke-color="#000000" draw:marker-end="a824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321cm" fo:min-width="0.28cm" fo:padding-top="0.127cm" fo:padding-bottom="0.127cm" fo:padding-left="0.254cm" fo:padding-right="0.254cm" fo:wrap-option="no-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053cm" svg:stroke-color="#000000" draw:marker-end="a834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stroke="solid" svg:stroke-width="0.053cm" svg:stroke-color="#000000" draw:marker-end="a836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dash" draw:stroke-dash="SysDot" svg:stroke-width="0.079cm" svg:stroke-color="#000000" svg:stroke-opacity="100%" draw:stroke-linejoin="miter" svg:stroke-linecap="butt" draw:fill="none" draw:textarea-horizontal-align="center" draw:textarea-vertical-align="top" draw:auto-grow-height="false" draw:auto-grow-width="false" fo:min-height="12.381cm" fo:min-width="3.159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gr15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right" draw:textarea-vertical-align="top" draw:auto-grow-height="false" fo:min-height="7.341cm" fo:min-width="4.552cm" fo:padding-top="0.151cm" fo:padding-bottom="0.151cm" fo:padding-left="0.276cm" fo:padding-right="0.276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652cm" fo:min-width="2.531cm" fo:padding-top="0.15cm" fo:padding-bottom="0.15cm" fo:padding-left="0.275cm" fo:padding-right="0.275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middle" draw:auto-grow-height="false" fo:min-height="1.652cm" fo:min-width="2.531cm" fo:padding-top="0.15cm" fo:padding-bottom="0.15cm" fo:padding-left="0.275cm" fo:padding-right="0.275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51cm" svg:stroke-color="#6a99d0" draw:marker-start="Arrowheads_20_1" draw:marker-start-width="0.381cm" draw:marker-end="Arrowheads_20_2" draw:marker-end-width="0.381cm" draw:fill="solid" draw:fill-color="#ffffff" draw:textarea-vertical-align="middle" fo:padding-top="0.15cm" fo:padding-bottom="0.15cm" fo:padding-left="0.275cm" fo:padding-right="0.27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05cm" fo:min-width="2.496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>
      <style:graphic-properties style:writing-mode="lr-tb" loext:decorative="false"/>
    </style:style>
    <style:style style:name="gr22" style:family="graphic">
      <style:graphic-properties loext:decorative="fals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objectwithoutfill">
      <style:graphic-properties svg:stroke-width="0.051cm" svg:stroke-color="#313131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25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e7e6e6" draw:opacity="100%" draw:textarea-horizontal-align="center" draw:textarea-vertical-align="middle" draw:auto-grow-height="false" draw:auto-grow-width="false" fo:min-height="1.493cm" fo:min-width="6.85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1.492cm" fo:min-width="6.85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283cm" fo:min-width="0.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079cm" svg:stroke-color="#000000" svg:stroke-opacity="100%" draw:stroke-linejoin="miter" svg:stroke-linecap="butt" draw:fill="none" fo:padding-top="0.164cm" fo:padding-bottom="0.164cm" fo:padding-left="0.289cm" fo:padding-right="0.289cm" loext:decorative="false"/>
    </style:style>
    <style:style style:name="gr29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1.127cm" fo:min-width="2.17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1.127cm" fo:min-width="2.261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79cm" svg:stroke-color="#0070c0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493cm" fo:min-width="6.85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35cm" svg:stroke-color="#0070c0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041cm" fo:min-width="2.69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svg:stroke-width="0.079cm" svg:stroke-color="#0070c0" svg:stroke-opacity="100%" draw:stroke-linejoin="miter" svg:stroke-linecap="butt" draw:fill="none" fo:padding-top="0.164cm" fo:padding-bottom="0.164cm" fo:padding-left="0.289cm" fo:padding-right="0.289cm" loext:decorative="fals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1.024cm" fo:padding-top="0.127cm" fo:padding-bottom="0.127cm" fo:padding-left="0.254cm" fo:padding-right="0.254cm" fo:wrap-option="no-wrap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1.023cm" fo:padding-top="0.127cm" fo:padding-bottom="0.127cm" fo:padding-left="0.254cm" fo:padding-right="0.254cm" fo:wrap-option="no-wrap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style:mirror="none" loext:decorative="false"/>
    </style:style>
    <style:style style:name="gr37" style:family="graphic" style:parent-style-name="Object_20_with_20_no_20_fill_20_and_20_no_20_line">
      <style:graphic-properties draw:stroke="none" draw:fill="none" style:mirror="horizontal" loext:decorative="false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796cm" fo:min-width="3.411cm" fo:padding-top="0.127cm" fo:padding-bottom="0.127cm" fo:padding-left="0.254cm" fo:padding-right="0.254cm" fo:wrap-option="no-wrap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795cm" fo:min-width="3.118cm" fo:padding-top="0.127cm" fo:padding-bottom="0.127cm" fo:padding-left="0.254cm" fo:padding-right="0.254cm" fo:wrap-option="no-wrap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style:font-name="Calibri1" fo:font-size="18pt" style:font-size-asian="18pt" style:font-size-complex="18pt"/>
    </style:style>
    <style:style style:name="P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end" fo:text-indent="0cm" style:punctuation-wrap="hanging" loext:tab-stop-distance="0cm" style:writing-mode="lr-tb" style:font-independent-line-spacing="true">
        <style:tab-stops/>
      </style:paragraph-properties>
      <style:text-properties style:font-name="Calibri1"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fo:font-size="18pt" style:font-size-asian="18pt" style:font-size-complex="18pt"/>
    </style:style>
    <style:style style:name="P4" style:family="paragraph">
      <loext:graphic-properties draw:fill="solid" draw:fill-color="#bdd7ee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18pt" style:font-size-asian="18pt" style:font-size-complex="18pt"/>
    </style:style>
    <style:style style:name="P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end" fo:text-indent="0cm" style:punctuation-wrap="hanging" loext:tab-stop-distance="0cm" style:writing-mode="lr-tb" style:font-independent-line-spacing="true">
        <style:tab-stops/>
      </style:paragraph-properties>
      <style:text-properties fo:font-size="18pt" style:font-size-asian="18pt" style:font-size-complex="18p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65%" fo:text-align="start" fo:text-indent="0cm" style:punctuation-wrap="hanging" loext:tab-stop-distance="0cm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65%" fo:text-align="start" fo:text-indent="0cm" style:punctuation-wrap="hanging" loext:tab-stop-distance="0cm" style:font-independent-line-spacing="true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 style:font-size-asian="18pt" style:font-size-complex="18pt"/>
    </style:style>
    <style:style style:name="P11" style:family="paragraph">
      <loext:graphic-properties draw:fill-color="#ffffff"/>
    </style:style>
    <style:style style:name="P12" style:family="paragraph">
      <style:paragraph-properties fo:text-align="end"/>
      <style:text-properties style:font-name="Calibri1" fo:font-size="16pt" style:font-size-asian="16pt" style:font-size-complex="16pt"/>
    </style:style>
    <style:style style:name="P13" style:family="paragraph">
      <loext:graphic-properties draw:fill="solid" draw:fill-color="#bdd7ee"/>
      <style:paragraph-properties fo:text-align="end" style:writing-mode="lr-tb"/>
      <style:text-properties style:font-name="Calibri1" fo:font-size="16pt" style:font-size-asian="16pt" style:font-size-complex="16pt"/>
    </style:style>
    <style:style style:name="P14" style:family="paragraph">
      <style:paragraph-properties fo:text-align="center"/>
      <style:text-properties style:font-name="Calibri1" fo:font-size="16pt" style:font-size-asian="16pt" style:font-size-complex="16pt"/>
    </style:style>
    <style:style style:name="P15" style:family="paragraph">
      <loext:graphic-properties draw:fill="solid" draw:fill-color="#ffffff"/>
      <style:paragraph-properties fo:text-align="center" style:writing-mode="lr-tb"/>
      <style:text-properties style:font-name="Calibri1" fo:font-size="16pt" style:font-size-asian="16pt" style:font-size-complex="16pt"/>
    </style:style>
    <style:style style:name="P16" style:family="paragraph">
      <style:paragraph-properties fo:text-align="start"/>
      <style:text-properties style:font-name="Calibri1" fo:font-size="16pt" style:font-size-asian="16pt" style:font-size-complex="16pt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9" style:family="paragraph">
      <loext:graphic-properties draw:fill="none" draw:fill-color="#ffffff"/>
      <style:paragraph-properties fo:text-align="center"/>
      <style:text-properties style:font-name="Calibri1" fo:font-size="16pt" fo:font-style="normal" style:font-size-asian="16pt" style:font-style-asian="normal" style:font-size-complex="16pt" style:font-style-complex="normal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solid" draw:fill-color="#e7e6e6" draw:opacity="100%"/>
      <style:paragraph-properties style:writing-mode="lr-tb" style:font-independent-line-spacing="true"/>
    </style:style>
    <style:style style:name="P23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 style:font-size-asian="18pt" style:font-size-complex="18pt"/>
    </style:style>
    <style:style style:name="P2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fo:font-size="16pt" style:font-size-asian="16pt" style:font-size-complex="16pt"/>
    </style:style>
    <style:style style:name="P2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6pt" style:font-size-asian="16pt" style:font-size-complex="16pt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28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29" style:family="paragraph">
      <style:paragraph-properties fo:margin-left="0cm" fo:margin-right="0cm" fo:margin-top="0cm" fo:margin-bottom="0cm" fo:line-height="85%" fo:text-align="center" fo:text-indent="0cm" style:punctuation-wrap="hanging" loext:tab-stop-distance="0cm" style:writing-mode="lr-tb">
        <style:tab-stops/>
      </style:paragraph-properties>
      <style:text-properties fo:font-size="16pt" style:font-size-asian="16pt" style:font-size-complex="16pt"/>
    </style:style>
    <style:style style:name="P30" style:family="paragraph">
      <loext:graphic-properties draw:fill="solid" draw:fill-color="#bdd7ee" draw:opacity="100%"/>
      <style:paragraph-properties fo:margin-left="0cm" fo:margin-right="0cm" fo:margin-top="0cm" fo:margin-bottom="0cm" fo:line-height="85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6pt" style:font-size-asian="16pt" style:font-size-complex="16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6pt" style:font-size-asian="16pt" style:font-size-complex="16pt"/>
    </style:style>
    <style:style style:name="P34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style:text-underline-style="none" fo:font-weight="normal" style:text-underline-mode="continuous" style:text-overline-mode="continuous" style:text-line-through-mode="continuous" style:letter-kerning="true" style:font-size-asian="18pt" style:font-weight-asian="normal" style:font-size-complex="18pt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alibri1" fo:font-size="16pt" style:font-size-asian="16pt" style:font-size-complex="16pt"/>
    </style:style>
    <style:style style:name="T6" style:family="text">
      <style:text-properties style:font-name="Calibri1" fo:font-size="16pt" fo:font-style="normal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name="Rectangle 1" draw:style-name="gr1" draw:text-style-name="P2" draw:layer="layout" svg:width="6.718cm" svg:height="3.034cm" svg:x="16.938cm" svg:y="11.039cm">
          <text:p text:style-name="P1"><text:span text:style-name="T1">Server </text:span><text:span text:style-name="T2">n</text:span></text:p>
          <draw:enhanced-geometry svg:viewBox="0 0 21600 21600" draw:type="non-primitive" draw:enhanced-path="M 0 0 L 21600 0 21600 21600 0 21600 Z N"/>
        </draw:custom-shape>
        <draw:custom-shape draw:name="Rectangle 41" draw:style-name="gr2" draw:text-style-name="P4" xml:id="id5" draw:id="id5" draw:layer="layout" svg:width="2.952cm" svg:height="2.145cm" svg:x="6.667cm" svg:y="6.869cm">
          <text:p text:style-name="P3"><text:span text:style-name="T3">Client</text:span></text:p>
          <text:p text:style-name="P3"><text:span text:style-name="T3">Process</text:span></text:p>
          <draw:enhanced-geometry svg:viewBox="0 0 21600 21600" draw:type="non-primitive" draw:enhanced-path="M 0 0 L 21600 0 21600 21600 0 21600 Z N"/>
        </draw:custom-shape>
        <draw:custom-shape draw:name="Rectangle 43" draw:style-name="gr3" draw:text-style-name="P4" xml:id="id4" draw:id="id4" draw:layer="layout" svg:width="3.006cm" svg:height="2.145cm" svg:x="17.439cm" svg:y="11.484cm">
          <text:p text:style-name="P3"><text:span text:style-name="T3">Server</text:span></text:p>
          <text:p text:style-name="P3"><text:span text:style-name="T3">Process</text:span></text:p>
          <draw:enhanced-geometry svg:viewBox="0 0 21600 21600" draw:type="non-primitive" draw:enhanced-path="M 0 0 L 21600 0 21600 21600 0 21600 Z N"/>
        </draw:custom-shape>
        <draw:custom-shape draw:name="Rectangle 13" draw:style-name="gr1" draw:text-style-name="P6" draw:layer="layout" svg:width="6.718cm" svg:height="3.034cm" svg:x="16.938cm" svg:y="6.424cm">
          <text:p text:style-name="P5"><text:span text:style-name="T3">Server 2</text:span></text:p>
          <draw:enhanced-geometry svg:viewBox="0 0 21600 21600" draw:type="non-primitive" draw:enhanced-path="M 0 0 L 21600 0 21600 21600 0 21600 Z N"/>
        </draw:custom-shape>
        <draw:custom-shape draw:name="Rectangle 14" draw:style-name="gr4" draw:text-style-name="P4" xml:id="id3" draw:id="id3" draw:layer="layout" svg:width="3.069cm" svg:height="2.145cm" svg:x="17.439cm" svg:y="6.869cm">
          <text:p text:style-name="P3"><text:span text:style-name="T3">Server</text:span></text:p>
          <text:p text:style-name="P3"><text:span text:style-name="T3">Process</text:span></text:p>
          <draw:enhanced-geometry svg:viewBox="0 0 21600 21600" draw:type="non-primitive" draw:enhanced-path="M 0 0 L 21600 0 21600 21600 0 21600 Z N"/>
        </draw:custom-shape>
        <draw:custom-shape draw:name="Rectangle 15" draw:style-name="gr5" draw:text-style-name="P6" draw:layer="layout" svg:width="6.718cm" svg:height="3.033cm" svg:x="16.938cm" svg:y="3.045cm">
          <text:p text:style-name="P5"><text:span text:style-name="T3">Server 1</text:span></text:p>
          <draw:enhanced-geometry svg:viewBox="0 0 21600 21600" draw:type="non-primitive" draw:enhanced-path="M 0 0 L 21600 0 21600 21600 0 21600 Z N"/>
        </draw:custom-shape>
        <draw:custom-shape draw:name="Rectangle 16" draw:style-name="gr6" draw:text-style-name="P4" xml:id="id2" draw:id="id2" draw:layer="layout" svg:width="3.101cm" svg:height="2.146cm" svg:x="17.439cm" svg:y="3.489cm">
          <text:p text:style-name="P3"><text:span text:style-name="T3">Server</text:span></text:p>
          <text:p text:style-name="P3"><text:span text:style-name="T3">Process</text:span></text:p>
          <draw:enhanced-geometry svg:viewBox="0 0 21600 21600" draw:type="non-primitive" draw:enhanced-path="M 0 0 L 21600 0 21600 21600 0 21600 Z N"/>
        </draw:custom-shape>
        <draw:custom-shape draw:name="Rectangle 17" draw:style-name="gr7" draw:text-style-name="P4" xml:id="id1" draw:id="id1" draw:layer="layout" svg:width="3.062cm" svg:height="2.145cm" svg:x="12.826cm" svg:y="6.869cm">
          <text:p text:style-name="P3"><text:span text:style-name="T3">Load</text:span></text:p>
          <text:p text:style-name="P3"><text:span text:style-name="T3">Balancer</text:span></text:p>
          <draw:enhanced-geometry svg:viewBox="0 0 21600 21600" draw:type="non-primitive" draw:enhanced-path="M 0 0 L 21600 0 21600 21600 0 21600 Z N"/>
        </draw:custom-shape>
        <draw:connector draw:name="Straight Arrow Connector 2" draw:style-name="gr8" draw:text-style-name="P7" draw:layer="layout" draw:type="line" svg:x1="15.888cm" svg:y1="7.941cm" svg:x2="17.439cm" svg:y2="4.562cm" draw:start-shape="id1" draw:start-glue-point="1" draw:end-shape="id2" draw:end-glue-point="3" svg:d="M15888 7941l1551-3379" svg:viewBox="0 0 1552 3380">
          <text:p/>
        </draw:connector>
        <draw:connector draw:name="Straight Arrow Connector 22" draw:style-name="gr9" draw:text-style-name="P7" draw:layer="layout" draw:type="line" svg:x1="15.888cm" svg:y1="7.941cm" svg:x2="17.439cm" svg:y2="7.941cm" draw:start-shape="id1" draw:start-glue-point="1" draw:end-shape="id3" draw:end-glue-point="3" svg:d="M15888 7941h1551" svg:viewBox="0 0 1552 1">
          <text:p/>
        </draw:connector>
        <draw:frame draw:name="TextBox 9" draw:style-name="gr10" draw:text-style-name="P9" draw:layer="layout" svg:width="0.788cm" svg:height="1.575cm" svg:x="21.835cm" svg:y="9.427cm">
          <draw:text-box>
            <text:p text:style-name="P8"><text:span text:style-name="T4">.</text:span></text:p>
            <text:p text:style-name="P8"><text:span text:style-name="T4">. </text:span></text:p>
            <text:p text:style-name="P8"><text:span text:style-name="T4">.</text:span></text:p>
          </draw:text-box>
        </draw:frame>
        <draw:connector draw:name="Straight Arrow Connector 26" draw:style-name="gr11" draw:text-style-name="P7" draw:layer="layout" draw:type="line" svg:x1="15.888cm" svg:y1="7.941cm" svg:x2="17.439cm" svg:y2="12.556cm" draw:start-shape="id1" draw:start-glue-point="1" draw:end-shape="id4" draw:end-glue-point="3" svg:d="M15888 7941l1551 4615" svg:viewBox="0 0 1552 4616">
          <text:p/>
        </draw:connector>
        <draw:connector draw:name="Straight Arrow Connector 29" draw:style-name="gr12" draw:text-style-name="P7" draw:layer="layout" draw:type="line" svg:x1="9.619cm" svg:y1="7.941cm" svg:x2="12.826cm" svg:y2="7.941cm" draw:start-shape="id5" draw:start-glue-point="1" draw:end-shape="id1" draw:end-glue-point="3" svg:d="M9619 7941h3207" svg:viewBox="0 0 3208 1">
          <text:p/>
        </draw:connector>
        <draw:custom-shape draw:name="Rectangle 32" draw:style-name="gr13" draw:text-style-name="P10" draw:layer="layout" svg:width="3.667cm" svg:height="12.635cm" svg:x="17.163cm" svg:y="1.672cm">
          <text:p text:style-name="P3"><text:span text:style-name="T3">Service</text:span></text:p>
          <draw:enhanced-geometry svg:viewBox="0 0 21600 21600" draw:mirror-horizontal="false" draw:mirror-vertical="false" draw:type="non-primitive" draw:enhanced-path="M 0 0 L 21600 0 21600 21600 0 21600 Z N"/>
        </draw:custom-shape>
        <presentation:notes draw:style-name="dp2">
          <draw:page-thumbnail draw:style-name="gr14" draw:layer="layout" svg:width="0.001cm" svg:height="0.001cm" svg:x="0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">
        <draw:custom-shape draw:style-name="gr15" draw:text-style-name="P13" draw:layer="layout" svg:width="5.104cm" svg:height="7.643cm" svg:x="5.069cm" svg:y="2.561cm">
          <text:p text:style-name="P12"><text:span text:style-name="T5">Sending Host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081cm" svg:height="1.952cm" svg:x="6.081cm" svg:y="3.855cm">
          <text:p text:style-name="P14"><text:span text:style-name="T5">Mail</text:span></text:p>
          <text:p text:style-name="P14"><text:span text:style-name="T5">Rea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081cm" svg:height="1.952cm" svg:x="6.081cm" svg:y="7.767cm">
          <text:p text:style-name="P16"><text:span text:style-name="T5">MTA</text:span></text:p>
          <draw:enhanced-geometry svg:viewBox="0 0 21600 21600" draw:type="rectangle" draw:enhanced-path="M 0 0 L 21600 0 21600 21600 0 21600 0 0 Z N"/>
        </draw:custom-shape>
        <draw:line draw:style-name="gr18" draw:text-style-name="P17" draw:layer="layout" svg:x1="7.61cm" svg:y1="5.807cm" svg:x2="7.633cm" svg:y2="7.767cm">
          <text:p/>
        </draw:line>
        <draw:custom-shape draw:style-name="gr15" draw:text-style-name="P13" draw:layer="layout" svg:width="5.104cm" svg:height="7.643cm" svg:x="12.669cm" svg:y="2.561cm">
          <text:p text:style-name="P12"><text:span text:style-name="T5">Mail Gateway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081cm" svg:height="1.952cm" svg:x="13.681cm" svg:y="7.767cm">
          <text:p text:style-name="P16"><text:span text:style-name="T5">MTA</text:span></text:p>
          <draw:enhanced-geometry svg:viewBox="0 0 21600 21600" draw:type="rectangle" draw:enhanced-path="M 0 0 L 21600 0 21600 21600 0 21600 0 0 Z N"/>
        </draw:custom-shape>
        <draw:line draw:style-name="gr18" draw:text-style-name="P17" draw:layer="layout" svg:x1="13.681cm" svg:y1="8.843cm" svg:x2="9.162cm" svg:y2="8.843cm">
          <text:p/>
        </draw:line>
        <draw:frame draw:style-name="gr19" draw:text-style-name="P19" draw:layer="layout" svg:width="2.996cm" svg:height="1.055cm" svg:x="9.924cm" svg:y="8.843cm">
          <draw:text-box>
            <text:p text:style-name="P18"><text:span text:style-name="T6">SMTP</text:span></text:p>
          </draw:text-box>
        </draw:frame>
        <draw:custom-shape draw:style-name="gr15" draw:text-style-name="P13" draw:layer="layout" svg:width="5.104cm" svg:height="7.643cm" svg:x="20.295cm" svg:y="2.535cm">
          <text:p text:style-name="P12"><text:span text:style-name="T5">Receiving Host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081cm" svg:height="1.952cm" svg:x="21.307cm" svg:y="3.855cm">
          <text:p text:style-name="P14"><text:span text:style-name="T5">Mail</text:span></text:p>
          <text:p text:style-name="P14"><text:span text:style-name="T5">Rea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081cm" svg:height="1.952cm" svg:x="21.307cm" svg:y="7.767cm">
          <text:p text:style-name="P16"><text:span text:style-name="T5">MTA</text:span></text:p>
          <draw:enhanced-geometry svg:viewBox="0 0 21600 21600" draw:type="rectangle" draw:enhanced-path="M 0 0 L 21600 0 21600 21600 0 21600 0 0 Z N"/>
        </draw:custom-shape>
        <draw:line draw:style-name="gr18" draw:text-style-name="P17" draw:layer="layout" svg:x1="22.836cm" svg:y1="5.807cm" svg:x2="22.859cm" svg:y2="7.767cm">
          <text:p/>
        </draw:line>
        <draw:frame draw:style-name="gr20" draw:text-style-name="P20" draw:layer="layout" svg:width="1.959cm" svg:height="1.959cm" svg:x="22.637cm" svg:y="7.795cm">
          <draw:image xlink:href="Pictures/10000001000004B0000004B0250C3613.png" xlink:type="simple" xlink:show="embed" xlink:actuate="onLoad" draw:mime-type="image/png">
            <text:p/>
          </draw:image>
        </draw:frame>
        <draw:frame draw:style-name="gr20" draw:text-style-name="P20" draw:layer="layout" svg:width="1.959cm" svg:height="1.959cm" svg:x="15.038cm" svg:y="7.796cm">
          <draw:image xlink:href="Pictures/10000001000004B0000004B0250C3613.png" xlink:type="simple" xlink:show="embed" xlink:actuate="onLoad" draw:mime-type="image/png">
            <text:p/>
          </draw:image>
        </draw:frame>
        <draw:frame draw:style-name="gr20" draw:text-style-name="P20" draw:layer="layout" svg:width="1.959cm" svg:height="1.959cm" svg:x="7.439cm" svg:y="7.797cm">
          <draw:image xlink:href="Pictures/10000001000004B0000004B0250C3613.png" xlink:type="simple" xlink:show="embed" xlink:actuate="onLoad" draw:mime-type="image/png">
            <text:p/>
          </draw:image>
        </draw:frame>
        <draw:line draw:style-name="gr18" draw:text-style-name="P17" draw:layer="layout" svg:x1="21.282cm" svg:y1="8.843cm" svg:x2="16.763cm" svg:y2="8.843cm">
          <text:p/>
        </draw:line>
        <draw:frame draw:style-name="gr19" draw:text-style-name="P19" draw:layer="layout" svg:width="2.996cm" svg:height="1.055cm" svg:x="17.524cm" svg:y="8.844cm">
          <draw:text-box>
            <text:p text:style-name="P18"><text:span text:style-name="T6">SMTP</text:span></text:p>
          </draw:text-box>
        </draw:frame>
        <presentation:notes draw:style-name="dp2">
          <draw:page-thumbnail draw:style-name="gr14" draw:layer="layout" svg:width="0.001cm" svg:height="0.001cm" svg:x="0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1">
        <draw:g draw:style-name="gr21">
          <draw:g draw:style-name="gr22">
            <draw:frame draw:style-name="gr23" draw:text-style-name="P21" draw:layer="layout" svg:width="2.612cm" svg:height="2.612cm" svg:x="4.983cm" svg:y="11.7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3" draw:text-style-name="P21" draw:layer="layout" svg:width="2.612cm" svg:height="2.612cm" svg:x="4.983cm" svg:y="10.0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  <draw:g draw:style-name="gr22">
            <draw:frame draw:style-name="gr23" draw:text-style-name="P21" draw:layer="layout" svg:width="2.612cm" svg:height="2.612cm" svg:x="4.983cm" svg:y="8.3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3" draw:text-style-name="P21" draw:layer="layout" svg:width="2.612cm" svg:height="2.612cm" svg:x="4.983cm" svg:y="6.6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</draw:g>
        <draw:g draw:style-name="gr21">
          <draw:g draw:style-name="gr22">
            <draw:frame draw:style-name="gr23" draw:text-style-name="P21" draw:layer="layout" svg:width="2.612cm" svg:height="2.612cm" svg:x="9.998cm" svg:y="11.7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3" draw:text-style-name="P21" draw:layer="layout" svg:width="2.612cm" svg:height="2.612cm" svg:x="9.998cm" svg:y="10.0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  <draw:g draw:style-name="gr22">
            <draw:frame draw:style-name="gr23" draw:text-style-name="P21" draw:layer="layout" svg:width="2.612cm" svg:height="2.612cm" svg:x="9.998cm" svg:y="8.3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3" draw:text-style-name="P21" draw:layer="layout" svg:width="2.612cm" svg:height="2.612cm" svg:x="9.998cm" svg:y="6.6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</draw:g>
        <draw:g draw:style-name="gr21">
          <draw:g draw:style-name="gr22">
            <draw:frame draw:style-name="gr23" draw:text-style-name="P21" draw:layer="layout" svg:width="2.612cm" svg:height="2.612cm" svg:x="15.098cm" svg:y="11.7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3" draw:text-style-name="P21" draw:layer="layout" svg:width="2.612cm" svg:height="2.612cm" svg:x="15.098cm" svg:y="10.0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  <draw:g draw:style-name="gr22">
            <draw:frame draw:style-name="gr23" draw:text-style-name="P21" draw:layer="layout" svg:width="2.612cm" svg:height="2.612cm" svg:x="15.098cm" svg:y="8.3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3" draw:text-style-name="P21" draw:layer="layout" svg:width="2.612cm" svg:height="2.612cm" svg:x="15.098cm" svg:y="6.6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</draw:g>
        <draw:g draw:style-name="gr21">
          <draw:g draw:style-name="gr22">
            <draw:frame draw:style-name="gr23" draw:text-style-name="P21" draw:layer="layout" svg:width="2.612cm" svg:height="2.612cm" svg:x="20.17cm" svg:y="11.7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3" draw:text-style-name="P21" draw:layer="layout" svg:width="2.612cm" svg:height="2.612cm" svg:x="20.17cm" svg:y="10.0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  <draw:g draw:style-name="gr22">
            <draw:frame draw:style-name="gr23" draw:text-style-name="P21" draw:layer="layout" svg:width="2.612cm" svg:height="2.612cm" svg:x="20.17cm" svg:y="8.3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3" draw:text-style-name="P21" draw:layer="layout" svg:width="2.612cm" svg:height="2.612cm" svg:x="20.17cm" svg:y="6.6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</draw:g>
        <draw:frame draw:style-name="gr23" draw:text-style-name="P21" draw:layer="layout" svg:width="2.7cm" svg:height="1.198cm" svg:x="4.939cm" svg:y="5.7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23" draw:text-style-name="P21" draw:layer="layout" svg:width="2.7cm" svg:height="1.198cm" svg:x="9.954cm" svg:y="5.7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23" draw:text-style-name="P21" draw:layer="layout" svg:width="2.7cm" svg:height="1.198cm" svg:x="15.054cm" svg:y="5.7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23" draw:text-style-name="P21" draw:layer="layout" svg:width="2.7cm" svg:height="1.198cm" svg:x="20.154cm" svg:y="5.732cm">
          <draw:image xlink:href="Pictures/10000001000001370000008A3032A3C2.png" xlink:type="simple" xlink:show="embed" xlink:actuate="onLoad" draw:mime-type="image/png">
            <text:p/>
          </draw:image>
        </draw:frame>
        <draw:g draw:style-name="gr22">
          <draw:line draw:style-name="gr24" draw:text-style-name="P21" draw:layer="layout" svg:x1="4.445cm" svg:y1="6.508cm" svg:x2="4.445cm" svg:y2="13.619cm">
            <text:p/>
          </draw:line>
          <draw:line draw:style-name="gr24" draw:text-style-name="P21" draw:layer="layout" svg:x1="5.114cm" svg:y1="6.486cm" svg:x2="4.445cm" svg:y2="6.508cm">
            <text:p/>
          </draw:line>
          <draw:line draw:style-name="gr24" draw:text-style-name="P21" draw:layer="layout" svg:x1="5.12cm" svg:y1="7.408cm" svg:x2="4.445cm" svg:y2="7.408cm">
            <text:p/>
          </draw:line>
          <draw:line draw:style-name="gr24" draw:text-style-name="P21" draw:layer="layout" svg:x1="5.121cm" svg:y1="8.008cm" svg:x2="4.446cm" svg:y2="8.008cm">
            <text:p/>
          </draw:line>
          <draw:line draw:style-name="gr24" draw:text-style-name="P21" draw:layer="layout" svg:x1="5.122cm" svg:y1="8.608cm" svg:x2="4.447cm" svg:y2="8.608cm">
            <text:p/>
          </draw:line>
          <draw:line draw:style-name="gr24" draw:text-style-name="P21" draw:layer="layout" svg:x1="5.123cm" svg:y1="9.108cm" svg:x2="4.448cm" svg:y2="9.108cm">
            <text:p/>
          </draw:line>
          <draw:line draw:style-name="gr24" draw:text-style-name="P21" draw:layer="layout" svg:x1="5.124cm" svg:y1="9.708cm" svg:x2="4.449cm" svg:y2="9.708cm">
            <text:p/>
          </draw:line>
          <draw:line draw:style-name="gr24" draw:text-style-name="P21" draw:layer="layout" svg:x1="5.125cm" svg:y1="10.308cm" svg:x2="4.45cm" svg:y2="10.308cm">
            <text:p/>
          </draw:line>
          <draw:line draw:style-name="gr24" draw:text-style-name="P21" draw:layer="layout" svg:x1="5.125cm" svg:y1="10.808cm" svg:x2="4.45cm" svg:y2="10.808cm">
            <text:p/>
          </draw:line>
          <draw:line draw:style-name="gr24" draw:text-style-name="P21" draw:layer="layout" svg:x1="5.125cm" svg:y1="11.408cm" svg:x2="4.45cm" svg:y2="11.408cm">
            <text:p/>
          </draw:line>
          <draw:line draw:style-name="gr24" draw:text-style-name="P21" draw:layer="layout" svg:x1="5.125cm" svg:y1="12.008cm" svg:x2="4.45cm" svg:y2="12.008cm">
            <text:p/>
          </draw:line>
          <draw:line draw:style-name="gr24" draw:text-style-name="P21" draw:layer="layout" svg:x1="5.125cm" svg:y1="12.508cm" svg:x2="4.45cm" svg:y2="12.508cm">
            <text:p/>
          </draw:line>
          <draw:line draw:style-name="gr24" draw:text-style-name="P21" draw:layer="layout" svg:x1="5.125cm" svg:y1="13.108cm" svg:x2="4.45cm" svg:y2="13.108cm">
            <text:p/>
          </draw:line>
          <draw:line draw:style-name="gr24" draw:text-style-name="P21" draw:layer="layout" svg:x1="5.125cm" svg:y1="13.608cm" svg:x2="4.45cm" svg:y2="13.608cm">
            <text:p/>
          </draw:line>
        </draw:g>
        <draw:g draw:style-name="gr22">
          <draw:line draw:style-name="gr24" draw:text-style-name="P21" draw:layer="layout" svg:x1="9.445cm" svg:y1="6.509cm" svg:x2="9.445cm" svg:y2="13.62cm">
            <text:p/>
          </draw:line>
          <draw:line draw:style-name="gr24" draw:text-style-name="P21" draw:layer="layout" svg:x1="10.114cm" svg:y1="6.487cm" svg:x2="9.445cm" svg:y2="6.509cm">
            <text:p/>
          </draw:line>
          <draw:line draw:style-name="gr24" draw:text-style-name="P21" draw:layer="layout" svg:x1="10.12cm" svg:y1="7.409cm" svg:x2="9.445cm" svg:y2="7.409cm">
            <text:p/>
          </draw:line>
          <draw:line draw:style-name="gr24" draw:text-style-name="P21" draw:layer="layout" svg:x1="10.121cm" svg:y1="8.009cm" svg:x2="9.446cm" svg:y2="8.009cm">
            <text:p/>
          </draw:line>
          <draw:line draw:style-name="gr24" draw:text-style-name="P21" draw:layer="layout" svg:x1="10.122cm" svg:y1="8.609cm" svg:x2="9.447cm" svg:y2="8.609cm">
            <text:p/>
          </draw:line>
          <draw:line draw:style-name="gr24" draw:text-style-name="P21" draw:layer="layout" svg:x1="10.123cm" svg:y1="9.109cm" svg:x2="9.448cm" svg:y2="9.109cm">
            <text:p/>
          </draw:line>
          <draw:line draw:style-name="gr24" draw:text-style-name="P21" draw:layer="layout" svg:x1="10.124cm" svg:y1="9.709cm" svg:x2="9.449cm" svg:y2="9.709cm">
            <text:p/>
          </draw:line>
          <draw:line draw:style-name="gr24" draw:text-style-name="P21" draw:layer="layout" svg:x1="10.125cm" svg:y1="10.309cm" svg:x2="9.45cm" svg:y2="10.309cm">
            <text:p/>
          </draw:line>
          <draw:line draw:style-name="gr24" draw:text-style-name="P21" draw:layer="layout" svg:x1="10.125cm" svg:y1="10.809cm" svg:x2="9.45cm" svg:y2="10.809cm">
            <text:p/>
          </draw:line>
          <draw:line draw:style-name="gr24" draw:text-style-name="P21" draw:layer="layout" svg:x1="10.125cm" svg:y1="11.409cm" svg:x2="9.45cm" svg:y2="11.409cm">
            <text:p/>
          </draw:line>
          <draw:line draw:style-name="gr24" draw:text-style-name="P21" draw:layer="layout" svg:x1="10.125cm" svg:y1="12.009cm" svg:x2="9.45cm" svg:y2="12.009cm">
            <text:p/>
          </draw:line>
          <draw:line draw:style-name="gr24" draw:text-style-name="P21" draw:layer="layout" svg:x1="10.125cm" svg:y1="12.509cm" svg:x2="9.45cm" svg:y2="12.509cm">
            <text:p/>
          </draw:line>
          <draw:line draw:style-name="gr24" draw:text-style-name="P21" draw:layer="layout" svg:x1="10.125cm" svg:y1="13.109cm" svg:x2="9.45cm" svg:y2="13.109cm">
            <text:p/>
          </draw:line>
          <draw:line draw:style-name="gr24" draw:text-style-name="P21" draw:layer="layout" svg:x1="10.125cm" svg:y1="13.609cm" svg:x2="9.45cm" svg:y2="13.609cm">
            <text:p/>
          </draw:line>
        </draw:g>
        <draw:g draw:style-name="gr22">
          <draw:line draw:style-name="gr24" draw:text-style-name="P21" draw:layer="layout" svg:x1="14.545cm" svg:y1="6.509cm" svg:x2="14.545cm" svg:y2="13.62cm">
            <text:p/>
          </draw:line>
          <draw:line draw:style-name="gr24" draw:text-style-name="P21" draw:layer="layout" svg:x1="15.214cm" svg:y1="6.487cm" svg:x2="14.545cm" svg:y2="6.509cm">
            <text:p/>
          </draw:line>
          <draw:line draw:style-name="gr24" draw:text-style-name="P21" draw:layer="layout" svg:x1="15.22cm" svg:y1="7.409cm" svg:x2="14.545cm" svg:y2="7.409cm">
            <text:p/>
          </draw:line>
          <draw:line draw:style-name="gr24" draw:text-style-name="P21" draw:layer="layout" svg:x1="15.221cm" svg:y1="8.009cm" svg:x2="14.546cm" svg:y2="8.009cm">
            <text:p/>
          </draw:line>
          <draw:line draw:style-name="gr24" draw:text-style-name="P21" draw:layer="layout" svg:x1="15.222cm" svg:y1="8.609cm" svg:x2="14.547cm" svg:y2="8.609cm">
            <text:p/>
          </draw:line>
          <draw:line draw:style-name="gr24" draw:text-style-name="P21" draw:layer="layout" svg:x1="15.223cm" svg:y1="9.109cm" svg:x2="14.548cm" svg:y2="9.109cm">
            <text:p/>
          </draw:line>
          <draw:line draw:style-name="gr24" draw:text-style-name="P21" draw:layer="layout" svg:x1="15.224cm" svg:y1="9.709cm" svg:x2="14.549cm" svg:y2="9.709cm">
            <text:p/>
          </draw:line>
          <draw:line draw:style-name="gr24" draw:text-style-name="P21" draw:layer="layout" svg:x1="15.225cm" svg:y1="10.309cm" svg:x2="14.55cm" svg:y2="10.309cm">
            <text:p/>
          </draw:line>
          <draw:line draw:style-name="gr24" draw:text-style-name="P21" draw:layer="layout" svg:x1="15.225cm" svg:y1="10.809cm" svg:x2="14.55cm" svg:y2="10.809cm">
            <text:p/>
          </draw:line>
          <draw:line draw:style-name="gr24" draw:text-style-name="P21" draw:layer="layout" svg:x1="15.225cm" svg:y1="11.409cm" svg:x2="14.55cm" svg:y2="11.409cm">
            <text:p/>
          </draw:line>
          <draw:line draw:style-name="gr24" draw:text-style-name="P21" draw:layer="layout" svg:x1="15.225cm" svg:y1="12.009cm" svg:x2="14.55cm" svg:y2="12.009cm">
            <text:p/>
          </draw:line>
          <draw:line draw:style-name="gr24" draw:text-style-name="P21" draw:layer="layout" svg:x1="15.225cm" svg:y1="12.509cm" svg:x2="14.55cm" svg:y2="12.509cm">
            <text:p/>
          </draw:line>
          <draw:line draw:style-name="gr24" draw:text-style-name="P21" draw:layer="layout" svg:x1="15.225cm" svg:y1="13.109cm" svg:x2="14.55cm" svg:y2="13.109cm">
            <text:p/>
          </draw:line>
          <draw:line draw:style-name="gr24" draw:text-style-name="P21" draw:layer="layout" svg:x1="15.225cm" svg:y1="13.609cm" svg:x2="14.55cm" svg:y2="13.609cm">
            <text:p/>
          </draw:line>
        </draw:g>
        <draw:g draw:style-name="gr22">
          <draw:line draw:style-name="gr24" draw:text-style-name="P21" draw:layer="layout" svg:x1="19.645cm" svg:y1="6.51cm" svg:x2="19.645cm" svg:y2="13.621cm">
            <text:p/>
          </draw:line>
          <draw:line draw:style-name="gr24" draw:text-style-name="P21" draw:layer="layout" svg:x1="20.314cm" svg:y1="6.488cm" svg:x2="19.645cm" svg:y2="6.51cm">
            <text:p/>
          </draw:line>
          <draw:line draw:style-name="gr24" draw:text-style-name="P21" draw:layer="layout" svg:x1="20.32cm" svg:y1="7.41cm" svg:x2="19.645cm" svg:y2="7.41cm">
            <text:p/>
          </draw:line>
          <draw:line draw:style-name="gr24" draw:text-style-name="P21" draw:layer="layout" svg:x1="20.321cm" svg:y1="8.01cm" svg:x2="19.646cm" svg:y2="8.01cm">
            <text:p/>
          </draw:line>
          <draw:line draw:style-name="gr24" draw:text-style-name="P21" draw:layer="layout" svg:x1="20.322cm" svg:y1="8.61cm" svg:x2="19.647cm" svg:y2="8.61cm">
            <text:p/>
          </draw:line>
          <draw:line draw:style-name="gr24" draw:text-style-name="P21" draw:layer="layout" svg:x1="20.323cm" svg:y1="9.11cm" svg:x2="19.648cm" svg:y2="9.11cm">
            <text:p/>
          </draw:line>
          <draw:line draw:style-name="gr24" draw:text-style-name="P21" draw:layer="layout" svg:x1="20.324cm" svg:y1="9.71cm" svg:x2="19.649cm" svg:y2="9.71cm">
            <text:p/>
          </draw:line>
          <draw:line draw:style-name="gr24" draw:text-style-name="P21" draw:layer="layout" svg:x1="20.325cm" svg:y1="10.31cm" svg:x2="19.65cm" svg:y2="10.31cm">
            <text:p/>
          </draw:line>
          <draw:line draw:style-name="gr24" draw:text-style-name="P21" draw:layer="layout" svg:x1="20.325cm" svg:y1="10.81cm" svg:x2="19.65cm" svg:y2="10.81cm">
            <text:p/>
          </draw:line>
          <draw:line draw:style-name="gr24" draw:text-style-name="P21" draw:layer="layout" svg:x1="20.325cm" svg:y1="11.41cm" svg:x2="19.65cm" svg:y2="11.41cm">
            <text:p/>
          </draw:line>
          <draw:line draw:style-name="gr24" draw:text-style-name="P21" draw:layer="layout" svg:x1="20.325cm" svg:y1="12.01cm" svg:x2="19.65cm" svg:y2="12.01cm">
            <text:p/>
          </draw:line>
          <draw:line draw:style-name="gr24" draw:text-style-name="P21" draw:layer="layout" svg:x1="20.325cm" svg:y1="12.51cm" svg:x2="19.65cm" svg:y2="12.51cm">
            <text:p/>
          </draw:line>
          <draw:line draw:style-name="gr24" draw:text-style-name="P21" draw:layer="layout" svg:x1="20.325cm" svg:y1="13.11cm" svg:x2="19.65cm" svg:y2="13.11cm">
            <text:p/>
          </draw:line>
          <draw:line draw:style-name="gr24" draw:text-style-name="P21" draw:layer="layout" svg:x1="20.325cm" svg:y1="13.61cm" svg:x2="19.65cm" svg:y2="13.61cm">
            <text:p/>
          </draw:line>
        </draw:g>
        <draw:frame draw:style-name="gr23" draw:text-style-name="P21" draw:layer="layout" svg:width="2.7cm" svg:height="1.198cm" svg:x="7.439cm" svg:y="2.9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23" draw:text-style-name="P21" draw:layer="layout" svg:width="2.7cm" svg:height="1.198cm" svg:x="12.539cm" svg:y="2.9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23" draw:text-style-name="P21" draw:layer="layout" svg:width="2.7cm" svg:height="1.198cm" svg:x="17.639cm" svg:y="2.932cm">
          <draw:image xlink:href="Pictures/10000001000001370000008A3032A3C2.png" xlink:type="simple" xlink:show="embed" xlink:actuate="onLoad" draw:mime-type="image/png">
            <text:p/>
          </draw:image>
        </draw:frame>
        <draw:line draw:style-name="gr24" draw:text-style-name="P21" draw:layer="layout" svg:x1="6.381cm" svg:y1="5.732cm" svg:x2="8.412cm" svg:y2="3.969cm">
          <text:p/>
        </draw:line>
        <draw:line draw:style-name="gr24" draw:text-style-name="P21" draw:layer="layout" svg:x1="11.482cm" svg:y1="5.733cm" svg:x2="13.513cm" svg:y2="3.97cm">
          <text:p/>
        </draw:line>
        <draw:line draw:style-name="gr24" draw:text-style-name="P21" draw:layer="layout" svg:x1="16.583cm" svg:y1="5.734cm" svg:x2="18.614cm" svg:y2="3.971cm">
          <text:p/>
        </draw:line>
        <draw:line draw:style-name="gr24" draw:text-style-name="P21" draw:layer="layout" svg:x1="11.482cm" svg:y1="5.733cm" svg:x2="8.412cm" svg:y2="3.969cm">
          <text:p/>
        </draw:line>
        <draw:line draw:style-name="gr24" draw:text-style-name="P21" draw:layer="layout" svg:x1="16.582cm" svg:y1="5.733cm" svg:x2="13.512cm" svg:y2="3.969cm">
          <text:p/>
        </draw:line>
        <draw:line draw:style-name="gr24" draw:text-style-name="P21" draw:layer="layout" svg:x1="21.682cm" svg:y1="5.733cm" svg:x2="18.612cm" svg:y2="3.969cm">
          <text:p/>
        </draw:line>
        <draw:line draw:style-name="gr24" draw:text-style-name="P21" draw:layer="layout" svg:x1="16.582cm" svg:y1="5.732cm" svg:x2="8.412cm" svg:y2="3.969cm">
          <text:p/>
        </draw:line>
        <draw:line draw:style-name="gr24" draw:text-style-name="P21" draw:layer="layout" svg:x1="21.682cm" svg:y1="5.733cm" svg:x2="13.512cm" svg:y2="3.97cm">
          <text:p/>
        </draw:line>
        <draw:line draw:style-name="gr24" draw:text-style-name="P21" draw:layer="layout" svg:x1="6.381cm" svg:y1="5.732cm" svg:x2="13.512cm" svg:y2="3.97cm">
          <text:p/>
        </draw:line>
        <draw:line draw:style-name="gr24" draw:text-style-name="P21" draw:layer="layout" svg:x1="11.482cm" svg:y1="5.732cm" svg:x2="18.613cm" svg:y2="3.97cm">
          <text:p/>
        </draw:line>
        <draw:line draw:style-name="gr24" draw:text-style-name="P21" draw:layer="layout" svg:x1="6.381cm" svg:y1="5.732cm" svg:x2="18.612cm" svg:y2="3.971cm">
          <text:p/>
        </draw:line>
        <draw:line draw:style-name="gr24" draw:text-style-name="P21" draw:layer="layout" svg:x1="21.537cm" svg:y1="5.732cm" svg:x2="8.412cm" svg:y2="3.971cm">
          <text:p/>
        </draw:line>
        <presentation:notes draw:style-name="dp2">
          <draw:page-thumbnail draw:style-name="gr14" draw:layer="layout" svg:width="0.001cm" svg:height="0.001cm" svg:x="0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1">
        <draw:custom-shape draw:name="Oval 1" draw:style-name="gr25" draw:text-style-name="P22" xml:id="id7" draw:id="id7" draw:layer="layout" svg:width="10.409cm" svg:height="2.469cm" svg:x="10.778cm" svg:y="6.45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0" draw:style-name="gr26" draw:text-style-name="P23" xml:id="id8" draw:id="id8" draw:layer="layout" svg:width="10.409cm" svg:height="2.468cm" svg:x="11.13cm" svg:y="7.133cm">
          <text:p text:style-name="P3"><text:span text:style-name="T3">Backbone Service Provid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2" draw:style-name="gr27" draw:text-style-name="P24" xml:id="id6" draw:id="id6" draw:layer="layout" svg:width="0.746cm" svg:height="0.759cm" svg:x="9.405cm" svg:y="7.69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2" draw:style-name="gr27" draw:text-style-name="P24" xml:id="id9" draw:id="id9" draw:layer="layout" svg:width="0.746cm" svg:height="0.759cm" svg:x="22.201cm" svg:y="7.69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4" draw:style-name="gr28" draw:text-style-name="P7" draw:layer="layout" draw:type="line" svg:x1="10.151cm" svg:y1="8.072cm" svg:x2="10.778cm" svg:y2="7.691cm" draw:start-shape="id6" draw:start-glue-point="1" draw:end-shape="id7" draw:end-glue-point="3" svg:d="M10151 8072l627-381" svg:viewBox="0 0 628 382">
          <text:p/>
        </draw:connector>
        <draw:connector draw:name="Straight Connector 6" draw:style-name="gr28" draw:text-style-name="P7" draw:layer="layout" draw:type="line" svg:x1="10.151cm" svg:y1="8.072cm" svg:x2="11.13cm" svg:y2="8.367cm" draw:start-shape="id6" draw:start-glue-point="1" draw:end-shape="id8" draw:end-glue-point="3" svg:d="M10151 8072l979 295" svg:viewBox="0 0 980 296">
          <text:p/>
        </draw:connector>
        <draw:connector draw:name="Straight Connector 8" draw:style-name="gr28" draw:text-style-name="P7" draw:layer="layout" draw:type="line" svg:x1="22.201cm" svg:y1="8.072cm" svg:x2="21.187cm" svg:y2="7.693cm" draw:start-shape="id9" draw:start-glue-point="3" svg:d="M22201 8072l-1014-379" svg:viewBox="0 0 1015 380">
          <text:p/>
        </draw:connector>
        <draw:connector draw:name="Straight Connector 10" draw:style-name="gr28" draw:text-style-name="P7" draw:layer="layout" draw:type="line" svg:x1="22.201cm" svg:y1="8.072cm" svg:x2="21.539cm" svg:y2="8.367cm" draw:start-shape="id9" draw:start-glue-point="3" draw:end-shape="id8" draw:end-glue-point="1" svg:d="M22201 8072l-662 295" svg:viewBox="0 0 663 296">
          <text:p/>
        </draw:connector>
        <draw:custom-shape draw:name="Oval 51" draw:style-name="gr29" draw:text-style-name="P26" xml:id="id10" draw:id="id10" draw:layer="layout" svg:width="3.796cm" svg:height="1.953cm" svg:x="6.355cm" svg:y="9.443cm">
          <text:p text:style-name="P25"><text:span text:style-name="T7">Access</text:span></text:p>
          <text:p text:style-name="P25"><text:span text:style-name="T7">Network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4" draw:style-name="gr30" draw:text-style-name="P28" xml:id="id11" draw:id="id11" draw:layer="layout" svg:width="3.915cm" svg:height="1.953cm" svg:x="22.201cm" svg:y="9.443cm">
          <text:p text:style-name="P27"><text:span text:style-name="T7">Access</text:span></text:p>
          <text:p text:style-name="P27"><text:span text:style-name="T7">Network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12" draw:style-name="gr28" draw:text-style-name="P7" draw:layer="layout" draw:type="line" svg:x1="8.253cm" svg:y1="9.443cm" svg:x2="9.514cm" svg:y2="8.341cm" draw:start-shape="id10" draw:start-glue-point="0" draw:end-shape="id6" draw:end-glue-point="5" svg:d="M8253 9443l1261-1102" svg:viewBox="0 0 1262 1103">
          <text:p/>
        </draw:connector>
        <draw:connector draw:name="Straight Connector 14" draw:style-name="gr28" draw:text-style-name="P7" draw:layer="layout" draw:type="line" svg:x1="24.158cm" svg:y1="9.443cm" svg:x2="22.574cm" svg:y2="8.452cm" draw:start-shape="id11" draw:start-glue-point="0" draw:end-shape="id9" draw:end-glue-point="2" svg:d="M24158 9443l-1584-991" svg:viewBox="0 0 1585 992">
          <text:p/>
        </draw:connector>
        <draw:custom-shape draw:name="Oval 64" draw:style-name="gr31" draw:text-style-name="P4" xml:id="id13" draw:id="id13" draw:layer="layout" svg:width="10.41cm" svg:height="2.469cm" svg:x="10.855cm" svg:y="3.092cm">
          <text:p text:style-name="P3"><text:span text:style-name="T3">Private Cloud Backbo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Cloud 23" draw:style-name="gr32" draw:text-style-name="P30" xml:id="id12" draw:id="id12" draw:layer="layout" svg:width="4.904cm" svg:height="1.987cm" svg:x="6.273cm" svg:y="4.984cm">
          <text:p text:style-name="P29"><text:span text:style-name="T7">Cloud</text:span></text:p>
          <text:p text:style-name="P29"><text:span text:style-name="T7">Datacenter</text:span></text:p>
          <draw:enhanced-geometry svg:viewBox="0 0 43200 43200" draw:text-areas="?f29 ?f31 ?f30 ?f32" draw:glue-points="?f23 ?f24 ?f25 ?f26 ?f27 ?f24 ?f25 ?f28" draw:type="non-primitive" draw:enhanced-path="M 3900 14370 A ?f72 ?f73 ?f74 ?f75 3900 14370 ?f69 ?f71 W ?f76 ?f77 ?f78 ?f79 3900 14370 ?f69 ?f71 A ?f119 ?f120 ?f121 ?f122 ?f69 ?f71 ?f116 ?f118 W ?f123 ?f124 ?f125 ?f126 ?f69 ?f71 ?f116 ?f118 A ?f166 ?f167 ?f168 ?f169 ?f116 ?f118 ?f163 ?f165 W ?f170 ?f171 ?f172 ?f173 ?f116 ?f118 ?f163 ?f165 A ?f213 ?f214 ?f215 ?f216 ?f163 ?f165 ?f210 ?f212 W ?f217 ?f218 ?f219 ?f220 ?f163 ?f165 ?f210 ?f212 A ?f260 ?f261 ?f262 ?f263 ?f210 ?f212 ?f257 ?f259 W ?f264 ?f265 ?f266 ?f267 ?f210 ?f212 ?f257 ?f259 A ?f307 ?f308 ?f309 ?f310 ?f257 ?f259 ?f304 ?f306 W ?f311 ?f312 ?f313 ?f314 ?f257 ?f259 ?f304 ?f306 A ?f354 ?f355 ?f356 ?f357 ?f304 ?f306 ?f351 ?f353 W ?f358 ?f359 ?f360 ?f361 ?f304 ?f306 ?f351 ?f353 A ?f401 ?f402 ?f403 ?f404 ?f351 ?f353 ?f398 ?f400 W ?f405 ?f406 ?f407 ?f408 ?f351 ?f353 ?f398 ?f400 A ?f448 ?f449 ?f450 ?f451 ?f398 ?f400 ?f445 ?f447 W ?f452 ?f453 ?f454 ?f455 ?f398 ?f400 ?f445 ?f447 A ?f495 ?f496 ?f497 ?f498 ?f445 ?f447 ?f492 ?f494 W ?f499 ?f500 ?f501 ?f502 ?f445 ?f447 ?f492 ?f494 A ?f542 ?f543 ?f544 ?f545 ?f492 ?f494 ?f539 ?f541 W ?f546 ?f547 ?f548 ?f549 ?f492 ?f494 ?f539 ?f541 Z N F M 4693 26177 A ?f589 ?f590 ?f591 ?f592 4693 26177 ?f586 ?f588 W ?f593 ?f594 ?f595 ?f596 4693 26177 ?f586 ?f588 M 6928 34899 A ?f636 ?f637 ?f638 ?f639 6928 34899 ?f633 ?f635 W ?f640 ?f641 ?f642 ?f643 6928 34899 ?f633 ?f635 M 16478 39090 A ?f683 ?f684 ?f685 ?f686 16478 39090 ?f680 ?f682 W ?f687 ?f688 ?f689 ?f690 16478 39090 ?f680 ?f682 M 28827 34751 A ?f730 ?f731 ?f732 ?f733 28827 34751 ?f727 ?f729 W ?f734 ?f735 ?f736 ?f737 28827 34751 ?f727 ?f729 M 34129 22954 A ?f777 ?f778 ?f779 ?f780 34129 22954 ?f774 ?f776 W ?f781 ?f782 ?f783 ?f784 34129 22954 ?f774 ?f776 M 41798 15354 A ?f824 ?f825 ?f826 ?f827 41798 15354 ?f821 ?f823 W ?f828 ?f829 ?f830 ?f831 41798 15354 ?f821 ?f823 M 38324 5426 A ?f871 ?f872 ?f873 ?f874 38324 5426 ?f868 ?f870 W ?f875 ?f876 ?f877 ?f878 38324 5426 ?f868 ?f870 M 29078 3952 A ?f918 ?f919 ?f920 ?f921 29078 3952 ?f915 ?f917 W ?f922 ?f923 ?f924 ?f925 29078 3952 ?f915 ?f917 M 22141 4720 A ?f965 ?f966 ?f967 ?f968 22141 4720 ?f962 ?f964 W ?f969 ?f970 ?f971 ?f972 22141 4720 ?f962 ?f964 M 14000 5192 A ?f1012 ?f1013 ?f1014 ?f1015 14000 5192 ?f1009 ?f1011 W ?f1016 ?f1017 ?f1018 ?f1019 14000 5192 ?f1009 ?f1011 M 4127 15789 A ?f1059 ?f1060 ?f1061 ?f1062 4127 15789 ?f1056 ?f1058 W ?f1063 ?f1064 ?f1065 ?f1066 4127 15789 ?f1056 ?f105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onnector draw:name="Straight Connector 25" draw:style-name="gr33" draw:text-style-name="P7" draw:layer="layout" draw:type="line" svg:x1="8.725cm" svg:y1="5.097cm" svg:x2="10.855cm" svg:y2="4.326cm" draw:start-shape="id12" draw:start-glue-point="7" draw:end-shape="id13" draw:end-glue-point="3" svg:d="M8725 5097l2130-771" svg:viewBox="0 0 2131 772">
          <text:p/>
        </draw:connector>
        <draw:connector draw:name="Straight Connector 27" draw:style-name="gr33" draw:text-style-name="P7" draw:layer="layout" draw:type="line" svg:x1="8.725cm" svg:y1="6.969cm" svg:x2="9.778cm" svg:y2="7.693cm" draw:start-shape="id12" draw:start-glue-point="5" draw:end-shape="id6" draw:end-glue-point="0" svg:d="M8725 6969l1053 724" svg:viewBox="0 0 1054 725">
          <text:p/>
        </draw:connector>
        <draw:connector draw:name="Straight Connector 30" draw:style-name="gr33" draw:text-style-name="P7" draw:layer="layout" draw:type="line" svg:x1="21.265cm" svg:y1="4.326cm" svg:x2="23.524cm" svg:y2="5.104cm" draw:start-shape="id13" draw:start-glue-point="1" draw:end-shape="id14" draw:end-glue-point="7" svg:d="M21265 4326l2259 778" svg:viewBox="0 0 2260 779">
          <text:p/>
        </draw:connector>
        <draw:connector draw:name="Straight Connector 224" draw:style-name="gr33" draw:text-style-name="P7" draw:layer="layout" draw:type="line" svg:x1="23.118cm" svg:y1="6.866cm" svg:x2="22.574cm" svg:y2="7.693cm" draw:end-shape="id9" draw:end-glue-point="0" svg:d="M23118 6866l-544 827" svg:viewBox="0 0 545 828">
          <text:p/>
        </draw:connector>
        <draw:frame draw:name="TextBox 234" draw:style-name="gr34" draw:text-style-name="P32" draw:layer="layout" svg:width="1.532cm" svg:height="1.171cm" svg:x="22.872cm" svg:y="7.46cm">
          <draw:text-box>
            <text:p text:style-name="P31"><text:span text:style-name="T3">IXP</text:span></text:p>
          </draw:text-box>
        </draw:frame>
        <draw:frame draw:name="TextBox 85" draw:style-name="gr35" draw:text-style-name="P32" draw:layer="layout" svg:width="1.531cm" svg:height="1.171cm" svg:x="8.126cm" svg:y="7.543cm">
          <draw:text-box>
            <text:p text:style-name="P31"><text:span text:style-name="T3">IXP</text:span></text:p>
          </draw:text-box>
        </draw:frame>
        <draw:frame draw:name="Picture 239" draw:style-name="gr36" draw:text-style-name="P7" xml:id="id15" draw:id="id15" draw:layer="layout" svg:width="2.528cm" svg:height="1.817cm" svg:x="5.46cm" svg:y="11.591cm">
          <draw:image xlink:href="Pictures/100000010000046D00000320CC065078.png" xlink:type="simple" xlink:show="embed" xlink:actuate="onLoad" draw:mime-type="image/png">
            <text:p/>
          </draw:image>
        </draw:frame>
        <draw:frame draw:name="Picture 89" draw:style-name="gr37" draw:text-style-name="P7" draw:layer="layout" svg:width="2.528cm" svg:height="1.817cm" svg:x="24.529cm" svg:y="11.591cm">
          <draw:image xlink:href="Pictures/100000010000046D00000320CC065078.png" xlink:type="simple" xlink:show="embed" xlink:actuate="onLoad" draw:mime-type="image/png">
            <text:p/>
          </draw:image>
        </draw:frame>
        <draw:connector draw:name="Straight Connector 241" draw:style-name="gr28" draw:text-style-name="P7" draw:layer="layout" draw:type="line" svg:x1="7.988cm" svg:y1="12.499cm" svg:x2="8.253cm" svg:y2="11.396cm" draw:start-shape="id15" draw:start-glue-point="1" draw:end-shape="id10" draw:end-glue-point="2" svg:d="M7988 12499l265-1103" svg:viewBox="0 0 266 1104">
          <text:p/>
        </draw:connector>
        <draw:frame draw:name="TextBox 244" draw:style-name="gr38" draw:text-style-name="P33" draw:layer="layout" svg:width="3.919cm" svg:height="2.05cm" svg:x="8.238cm" svg:y="12.02cm">
          <draw:text-box>
            <text:p text:style-name="P31"><text:span text:style-name="T7">West Coast</text:span></text:p>
            <text:p text:style-name="P31"><text:span text:style-name="T7">User</text:span></text:p>
          </draw:text-box>
        </draw:frame>
        <draw:frame draw:name="TextBox 98" draw:style-name="gr39" draw:text-style-name="P35" draw:layer="layout" svg:width="3.626cm" svg:height="2.049cm" svg:x="21.562cm" svg:y="11.805cm">
          <draw:text-box>
            <text:p text:style-name="P34"><text:span text:style-name="T7">East Coast</text:span></text:p>
            <text:p text:style-name="P34"><text:span text:style-name="T7">User</text:span></text:p>
          </draw:text-box>
        </draw:frame>
        <draw:custom-shape draw:name="Cloud 1" draw:style-name="gr32" draw:text-style-name="P30" xml:id="id14" draw:id="id14" draw:layer="layout" svg:width="4.904cm" svg:height="1.987cm" svg:x="21.072cm" svg:y="4.991cm">
          <text:p text:style-name="P29"><text:span text:style-name="T7">Cloud</text:span></text:p>
          <text:p text:style-name="P29"><text:span text:style-name="T7">Datacenter</text:span></text:p>
          <draw:enhanced-geometry svg:viewBox="0 0 43200 43200" draw:text-areas="?f29 ?f31 ?f30 ?f32" draw:glue-points="?f23 ?f24 ?f25 ?f26 ?f27 ?f24 ?f25 ?f28" draw:type="non-primitive" draw:enhanced-path="M 3900 14370 A ?f72 ?f73 ?f74 ?f75 3900 14370 ?f69 ?f71 W ?f76 ?f77 ?f78 ?f79 3900 14370 ?f69 ?f71 A ?f119 ?f120 ?f121 ?f122 ?f69 ?f71 ?f116 ?f118 W ?f123 ?f124 ?f125 ?f126 ?f69 ?f71 ?f116 ?f118 A ?f166 ?f167 ?f168 ?f169 ?f116 ?f118 ?f163 ?f165 W ?f170 ?f171 ?f172 ?f173 ?f116 ?f118 ?f163 ?f165 A ?f213 ?f214 ?f215 ?f216 ?f163 ?f165 ?f210 ?f212 W ?f217 ?f218 ?f219 ?f220 ?f163 ?f165 ?f210 ?f212 A ?f260 ?f261 ?f262 ?f263 ?f210 ?f212 ?f257 ?f259 W ?f264 ?f265 ?f266 ?f267 ?f210 ?f212 ?f257 ?f259 A ?f307 ?f308 ?f309 ?f310 ?f257 ?f259 ?f304 ?f306 W ?f311 ?f312 ?f313 ?f314 ?f257 ?f259 ?f304 ?f306 A ?f354 ?f355 ?f356 ?f357 ?f304 ?f306 ?f351 ?f353 W ?f358 ?f359 ?f360 ?f361 ?f304 ?f306 ?f351 ?f353 A ?f401 ?f402 ?f403 ?f404 ?f351 ?f353 ?f398 ?f400 W ?f405 ?f406 ?f407 ?f408 ?f351 ?f353 ?f398 ?f400 A ?f448 ?f449 ?f450 ?f451 ?f398 ?f400 ?f445 ?f447 W ?f452 ?f453 ?f454 ?f455 ?f398 ?f400 ?f445 ?f447 A ?f495 ?f496 ?f497 ?f498 ?f445 ?f447 ?f492 ?f494 W ?f499 ?f500 ?f501 ?f502 ?f445 ?f447 ?f492 ?f494 A ?f542 ?f543 ?f544 ?f545 ?f492 ?f494 ?f539 ?f541 W ?f546 ?f547 ?f548 ?f549 ?f492 ?f494 ?f539 ?f541 Z N F M 4693 26177 A ?f589 ?f590 ?f591 ?f592 4693 26177 ?f586 ?f588 W ?f593 ?f594 ?f595 ?f596 4693 26177 ?f586 ?f588 M 6928 34899 A ?f636 ?f637 ?f638 ?f639 6928 34899 ?f633 ?f635 W ?f640 ?f641 ?f642 ?f643 6928 34899 ?f633 ?f635 M 16478 39090 A ?f683 ?f684 ?f685 ?f686 16478 39090 ?f680 ?f682 W ?f687 ?f688 ?f689 ?f690 16478 39090 ?f680 ?f682 M 28827 34751 A ?f730 ?f731 ?f732 ?f733 28827 34751 ?f727 ?f729 W ?f734 ?f735 ?f736 ?f737 28827 34751 ?f727 ?f729 M 34129 22954 A ?f777 ?f778 ?f779 ?f780 34129 22954 ?f774 ?f776 W ?f781 ?f782 ?f783 ?f784 34129 22954 ?f774 ?f776 M 41798 15354 A ?f824 ?f825 ?f826 ?f827 41798 15354 ?f821 ?f823 W ?f828 ?f829 ?f830 ?f831 41798 15354 ?f821 ?f823 M 38324 5426 A ?f871 ?f872 ?f873 ?f874 38324 5426 ?f868 ?f870 W ?f875 ?f876 ?f877 ?f878 38324 5426 ?f868 ?f870 M 29078 3952 A ?f918 ?f919 ?f920 ?f921 29078 3952 ?f915 ?f917 W ?f922 ?f923 ?f924 ?f925 29078 3952 ?f915 ?f917 M 22141 4720 A ?f965 ?f966 ?f967 ?f968 22141 4720 ?f962 ?f964 W ?f969 ?f970 ?f971 ?f972 22141 4720 ?f962 ?f964 M 14000 5192 A ?f1012 ?f1013 ?f1014 ?f1015 14000 5192 ?f1009 ?f1011 W ?f1016 ?f1017 ?f1018 ?f1019 14000 5192 ?f1009 ?f1011 M 4127 15789 A ?f1059 ?f1060 ?f1061 ?f1062 4127 15789 ?f1056 ?f1058 W ?f1063 ?f1064 ?f1065 ?f1066 4127 15789 ?f1056 ?f105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onnector draw:name="Straight Connector 1" draw:style-name="gr28" draw:text-style-name="P7" draw:layer="layout" draw:type="line" svg:x1="24.453cm" svg:y1="12.571cm" svg:x2="24.254cm" svg:y2="11.397cm" svg:d="M24453 12571l-199-1174" svg:viewBox="0 0 200 1175">
          <text:p/>
        </draw:connector>
        <presentation:notes draw:style-name="dp2">
          <draw:page-thumbnail draw:style-name="gr14" draw:layer="layout" svg:width="0.001cm" svg:height="0.001cm" svg:x="0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822" svg:viewBox="0 0 20 30" svg:d="M10 0l-10 30h20z"/>
    <draw:marker draw:name="a824" svg:viewBox="0 0 20 30" svg:d="M10 0l-10 30h20z"/>
    <draw:marker draw:name="a834" svg:viewBox="0 0 20 30" svg:d="M10 0l-10 30h20z"/>
    <draw:marker draw:name="a836" svg:viewBox="0 0 20 30" svg:d="M10 0l-10 30h20z"/>
    <draw:stroke-dash draw:name="SysDot" draw:style="rect" draw:dots1="1" draw:dots1-length="0.079cm" draw:distance="0.079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1T12:25:18.326757000</meta:creation-date>
    <dc:date>2026-02-09T14:37:33.230780000</dc:date>
    <meta:editing-duration>PT5H26M35S</meta:editing-duration>
    <meta:editing-cycles>12</meta:editing-cycles>
    <meta:generator>LibreOffice/25.2.4.3$MacOSX_AARCH64 LibreOffice_project/33e196637044ead23f5c3226cde09b47731f7e27</meta:generator>
    <meta:document-statistic meta:object-count="205"/>
  </office:meta>
</office:document-meta>
</file>